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1.65in"/>
    </style:style>
    <style:style style:name="co3" style:family="table-column">
      <style:table-column-properties fo:break-before="auto" style:column-width="1.45in"/>
    </style:style>
    <style:style style:name="co4" style:family="table-column">
      <style:table-column-properties fo:break-before="auto" style:column-width="0.85in"/>
    </style:style>
    <style:style style:name="co5" style:family="table-column">
      <style:table-column-properties fo:break-before="auto" style:column-width="1.2598in"/>
    </style:style>
    <style:style style:name="co6" style:family="table-column">
      <style:table-column-properties fo:break-before="auto" style:column-width="1.8598in"/>
    </style:style>
    <style:style style:name="co7" style:family="table-column">
      <style:table-column-properties fo:break-before="auto" style:column-width="2.8902in"/>
    </style:style>
    <style:style style:name="co8" style:family="table-column">
      <style:table-column-properties fo:break-before="auto" style:column-width="0.2201in"/>
    </style:style>
    <style:style style:name="co9" style:family="table-column">
      <style:table-column-properties fo:break-before="auto" style:column-width="0.1799in"/>
    </style:style>
    <style:style style:name="co10" style:family="table-column">
      <style:table-column-properties fo:break-before="auto" style:column-width="0.25in"/>
    </style:style>
    <style:style style:name="co11" style:family="table-column">
      <style:table-column-properties fo:break-before="auto" style:column-width="0.889in"/>
    </style:style>
    <style:style style:name="co12" style:family="table-column">
      <style:table-column-properties fo:break-before="auto" style:column-width="0.8902in"/>
    </style:style>
    <style:style style:name="co13" style:family="table-column">
      <style:table-column-properties fo:break-before="auto" style:column-width="0.6465in"/>
    </style:style>
    <style:style style:name="co14" style:family="table-column">
      <style:table-column-properties fo:break-before="auto" style:column-width="1.8583in"/>
    </style:style>
    <style:style style:name="co15" style:family="table-column">
      <style:table-column-properties fo:break-before="auto" style:column-width="1.2146in"/>
    </style:style>
    <style:style style:name="co16" style:family="table-column">
      <style:table-column-properties fo:break-before="auto" style:column-width="1.5in"/>
    </style:style>
    <style:style style:name="co17" style:family="table-column">
      <style:table-column-properties fo:break-before="auto" style:column-width="3.0484in"/>
    </style:style>
    <style:style style:name="co18" style:family="table-column">
      <style:table-column-properties fo:break-before="auto" style:column-width="2.7701in"/>
    </style:style>
    <style:style style:name="co19" style:family="table-column">
      <style:table-column-properties fo:break-before="auto" style:column-width="1.1291in"/>
    </style:style>
    <style:style style:name="co20" style:family="table-column">
      <style:table-column-properties fo:break-before="auto" style:column-width="2.5339in"/>
    </style:style>
    <style:style style:name="co21" style:family="table-column">
      <style:table-column-properties fo:break-before="auto" style:column-width="2.8882in"/>
    </style:style>
    <style:style style:name="co22" style:family="table-column">
      <style:table-column-properties fo:break-before="auto" style:column-width="0.9335in"/>
    </style:style>
    <style:style style:name="co23" style:family="table-column">
      <style:table-column-properties fo:break-before="auto" style:column-width="5in"/>
    </style:style>
    <style:style style:name="co24" style:family="table-column">
      <style:table-column-properties fo:break-before="auto" style:column-width="1.1398in"/>
    </style:style>
    <style:style style:name="co25" style:family="table-column">
      <style:table-column-properties fo:break-before="auto" style:column-width="0.861in"/>
    </style:style>
    <style:style style:name="co26" style:family="table-column">
      <style:table-column-properties fo:break-before="auto" style:column-width="0.4217in"/>
    </style:style>
    <style:style style:name="co27" style:family="table-column">
      <style:table-column-properties fo:break-before="auto" style:column-width="2.4693in"/>
    </style:style>
    <style:style style:name="co28" style:family="table-column">
      <style:table-column-properties fo:break-before="auto" style:column-width="1.2575in"/>
    </style:style>
    <style:style style:name="co29" style:family="table-column">
      <style:table-column-properties fo:break-before="auto" style:column-width="0.8291in"/>
    </style:style>
    <style:style style:name="co30" style:family="table-column">
      <style:table-column-properties fo:break-before="auto" style:column-width="1.311in"/>
    </style:style>
    <style:style style:name="co31" style:family="table-column">
      <style:table-column-properties fo:break-before="auto" style:column-width="0.9756in"/>
    </style:style>
    <style:style style:name="co32" style:family="table-column">
      <style:table-column-properties fo:break-before="auto" style:column-width="0.6898in"/>
    </style:style>
    <style:style style:name="co33" style:family="table-column">
      <style:table-column-properties fo:break-before="auto" style:column-width="0.5071in"/>
    </style:style>
    <style:style style:name="co34" style:family="table-column">
      <style:table-column-properties fo:break-before="auto" style:column-width="3.2744in"/>
    </style:style>
    <style:style style:name="co35" style:family="table-column">
      <style:table-column-properties fo:break-before="auto" style:column-width="0.5181in"/>
    </style:style>
    <style:style style:name="co36" style:family="table-column">
      <style:table-column-properties fo:break-before="auto" style:column-width="1.2791in"/>
    </style:style>
    <style:style style:name="co37" style:family="table-column">
      <style:table-column-properties fo:break-before="auto" style:column-width="0.7535in"/>
    </style:style>
    <style:style style:name="co38" style:family="table-column">
      <style:table-column-properties fo:break-before="auto" style:column-width="0.4752in"/>
    </style:style>
    <style:style style:name="co39" style:family="table-column">
      <style:table-column-properties fo:break-before="auto" style:column-width="1.6547in"/>
    </style:style>
    <style:style style:name="co40" style:family="table-column">
      <style:table-column-properties fo:break-before="auto" style:column-width="1.6437in"/>
    </style:style>
    <style:style style:name="co41" style:family="table-column">
      <style:table-column-properties fo:break-before="auto" style:column-width="1.3764in"/>
    </style:style>
    <style:style style:name="co42" style:family="table-column">
      <style:table-column-properties fo:break-before="auto" style:column-width="1.4508in"/>
    </style:style>
    <style:style style:name="ro1" style:family="table-row">
      <style:table-row-properties style:row-height="0.6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8492in" fo:break-before="auto" style:use-optimal-row-height="false"/>
    </style:style>
    <style:style style:name="ro4" style:family="table-row">
      <style:table-row-properties style:row-height="0.4866in" fo:break-before="auto" style:use-optimal-row-height="true"/>
    </style:style>
    <style:style style:name="ro5" style:family="table-row">
      <style:table-row-properties style:row-height="0.8035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1.2736in" fo:break-before="auto" style:use-optimal-row-height="true"/>
    </style:style>
    <style:style style:name="ro8" style:family="table-row">
      <style:table-row-properties style:row-height="0.1756in" fo:break-before="auto" style:use-optimal-row-height="true"/>
    </style:style>
    <style:style style:name="ro9" style:family="table-row">
      <style:table-row-properties style:row-height="0.7307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order-bottom="0.74pt solid #000000" fo:border-left="none" fo:border-right="none" fo:border-top="none"/>
    </style:style>
    <style:style style:name="ce8" style:family="table-cell" style:parent-style-name="Default">
      <style:table-cell-properties fo:background-color="#dee6ef" style:cell-protect="none" style:print-content="true"/>
    </style:style>
    <style:style style:name="ce17" style:family="table-cell" style:parent-style-name="Default">
      <style:table-cell-properties fo:border-bottom="0.74pt solid #000000" fo:background-color="#dee6ef" style:cell-protect="none" style:print-content="true" fo:border-left="none" fo:border-right="none" fo:border-top="none"/>
    </style:style>
    <style:style style:name="ce11" style:family="table-cell" style:parent-style-name="Default">
      <style:table-cell-properties fo:background-color="#dee6ef" style:cell-protect="none" style:print-content="true"/>
      <style:map style:condition="is-true-formula(AND([.$C2]&lt;&gt;&quot;&quot;;COUNTIF([Build.$BC31:.$CM31];[.$C2])=0))" style:apply-style-name="Frame_5f_Less" style:base-cell-address="Build.C2"/>
    </style:style>
    <style:style style:name="ce10" style:family="table-cell" style:parent-style-name="Default">
      <style:table-cell-properties fo:border-bottom="0.74pt solid #000000" style:diagonal-bl-tr="0.74pt dashed #808080" style:diagonal-tl-br="0.74pt dashed #808080" fo:border-left="none" fo:border-right="none" fo:border-top="none"/>
    </style:style>
    <style:style style:name="ce14" style:family="table-cell" style:parent-style-name="Default">
      <style:table-cell-properties fo:background-color="#dee6ef" style:cell-protect="none" style:print-content="true"/>
      <style:map style:condition="is-true-formula(AND([.$C6]&lt;&gt;&quot;&quot;;COUNTIF([Build.$BC34:.$CM34];[.$C6])=0))" style:apply-style-name="Frame_5f_Less" style:base-cell-address="Build.C6"/>
    </style:style>
    <style:style style:name="ce12" style:family="table-cell" style:parent-style-name="Default">
      <style:table-cell-properties style:diagonal-bl-tr="0.74pt dashed #808080" style:diagonal-tl-br="0.74pt dashed #808080"/>
    </style:style>
    <style:style style:name="ce18" style:family="table-cell" style:parent-style-name="Default">
      <style:table-cell-properties fo:background-color="#dee6ef" style:cell-protect="none" style:print-content="true"/>
      <style:map style:condition="is-true-formula(COUNTIF([.$D$2:.$D9];[.$D10])&gt;=6)" style:apply-style-name="Frame_5f_Less" style:base-cell-address="Build.D10"/>
    </style:style>
    <style:style style:name="ce19" style:family="table-cell" style:parent-style-name="Default">
      <style:table-cell-properties fo:background-color="#dee6ef" style:cell-protect="none" style:print-content="true"/>
      <style:map style:condition="is-true-formula(AND([.$E6]&lt;&gt;&quot;&quot;;COUNTIF([Build.$BC17:.$CN17];[.$E6])=0))" style:apply-style-name="Frame_5f_Less" style:base-cell-address="Build.E6"/>
    </style:style>
    <style:style style:name="ce16" style:family="table-cell" style:parent-style-name="Default">
      <style:table-cell-properties fo:border-bottom="0.74pt solid #000000" style:text-align-source="fix" style:repeat-content="false" fo:border-left="none" fo:border-right="none" fo:border-top="none" style:vertical-align="top"/>
      <style:paragraph-properties fo:text-align="center" fo:margin-left="0in"/>
      <style:text-properties fo:color="#000000" fo:font-size="8pt" style:font-size-asian="8pt" style:font-size-complex="8pt"/>
    </style:style>
    <style:style style:name="ce21" style:family="table-cell" style:parent-style-name="Default">
      <style:table-cell-properties fo:background-color="#000000" style:cell-protect="none" style:print-content="true"/>
      <style:map style:condition="is-true-formula(AND([.$G8]&lt;&gt;&quot;&quot;;COUNTIF([$Build.$BH$49:.$CM$49];[.$G8])=0))" style:apply-style-name="Frame_5f_Less" style:base-cell-address="Build.G8"/>
    </style:style>
    <style:style style:name="ce22" style:family="table-cell" style:parent-style-name="Default">
      <style:table-cell-properties fo:background-color="#000000" style:cell-protect="none" style:print-content="true"/>
      <style:map style:condition="is-true-formula(AND([.$G11]&lt;&gt;&quot;&quot;;COUNTIF([$Build.$BH$50:.$CM$50];[.$G11])=0))" style:apply-style-name="Frame_5f_Less" style:base-cell-address="Build.G11"/>
    </style:style>
    <style:style style:name="ce27" style:family="table-cell" style:parent-style-name="Default">
      <style:table-cell-properties fo:background-color="#000000" style:cell-protect="none" style:print-content="true"/>
      <style:map style:condition="is-true-formula(AND([.$G14]&lt;&gt;&quot;&quot;;COUNTIF([$Build.$BH$51:.$CM$51];[.$G14])=0))" style:apply-style-name="Frame_5f_Less" style:base-cell-address="Build.G14"/>
    </style:style>
    <style:style style:name="ce32" style:family="table-cell" style:parent-style-name="Default">
      <style:table-cell-properties fo:background-color="#000000" style:cell-protect="none" style:print-content="true"/>
      <style:map style:condition="is-true-formula(AND([.$G17]&lt;&gt;&quot;&quot;;COUNTIF([$Build.$BH$52:.$CM$52];[.$G17])=0))" style:apply-style-name="Frame_5f_Less" style:base-cell-address="Build.G17"/>
    </style:style>
    <style:style style:name="ce51" style:family="table-cell" style:parent-style-name="Default">
      <style:table-cell-properties fo:background-color="#ffe994" style:text-align-source="fix" style:repeat-content="false"/>
      <style:paragraph-properties fo:text-align="center" fo:margin-left="0in"/>
    </style:style>
    <style:style style:name="ce38" style:family="table-cell" style:parent-style-name="Default">
      <style:table-cell-properties fo:background-color="#ffe994" style:text-align-source="fix" style:repeat-content="false"/>
      <style:paragraph-properties fo:text-align="center" fo:margin-left="0in"/>
      <style:map style:condition="cell-content()&gt;6" style:apply-style-name="Frame_5f_Less" style:base-cell-address="Build.I5"/>
    </style:style>
    <style:style style:name="ce35" style:family="table-cell" style:parent-style-name="Default">
      <style:table-cell-properties fo:background-color="#fff5ce" style:text-align-source="fix" style:repeat-content="false"/>
      <style:paragraph-properties fo:text-align="center" fo:margin-left="0in"/>
    </style:style>
    <style:style style:name="ce40" style:family="table-cell" style:parent-style-name="Default">
      <style:table-cell-properties fo:background-color="#fff5ce" style:text-align-source="fix" style:repeat-content="false"/>
      <style:paragraph-properties fo:text-align="center" fo:margin-left="0in"/>
      <style:map style:condition="cell-content()&gt;6" style:apply-style-name="Frame_5f_Less" style:base-cell-address="Build.I5"/>
    </style:style>
    <style:style style:name="ce52" style:family="table-cell" style:parent-style-name="Default">
      <style:table-cell-properties style:text-align-source="fix" style:repeat-content="false" style:rotation-angle="45"/>
      <style:paragraph-properties fo:text-align="center" fo:margin-left="0in"/>
    </style:style>
    <style:style style:name="ce33"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background-color="#dddddd" style:text-align-source="fix" style:repeat-content="false" style:rotation-angle="45" style:rotation-align="bottom"/>
      <style:paragraph-properties fo:text-align="center" fo:margin-left="0in"/>
    </style:style>
    <style:style style:name="ce3" style:family="table-cell" style:parent-style-name="Default">
      <style:table-cell-properties fo:background-color="#dddddd"/>
    </style:style>
    <style:style style:name="ce57" style:family="table-cell" style:parent-style-name="Default">
      <style:table-cell-properties fo:background-color="#dddddd"/>
      <style:map style:condition="cell-content()&lt;[.O4]" style:apply-style-name="Bad" style:base-cell-address="Build.O5"/>
    </style:style>
    <style:style style:name="ce4" style:family="table-cell" style:parent-style-name="Default">
      <style:table-cell-properties style:text-align-source="fix" style:repeat-content="false" fo:background-color="transparent" style:rotation-angle="45" style:rotation-align="bottom"/>
      <style:paragraph-properties fo:text-align="center" fo:margin-left="0in"/>
    </style:style>
    <style:style style:name="ce59" style:family="table-cell" style:parent-style-name="Default">
      <style:map style:condition="cell-content()&lt;[.O4]" style:apply-style-name="Bad" style:base-cell-address="Build.O5"/>
    </style:style>
    <style:style style:name="ce44" style:family="table-cell" style:parent-style-name="Default">
      <style:table-cell-properties fo:background-color="#ffe994" style:text-align-source="fix" style:repeat-content="false" style:rotation-angle="45" style:rotation-align="bottom"/>
      <style:paragraph-properties fo:text-align="center" fo:margin-left="0in"/>
    </style:style>
    <style:style style:name="ce5" style:family="table-cell" style:parent-style-name="Default">
      <style:table-cell-properties fo:background-color="#ffe994"/>
    </style:style>
    <style:style style:name="ce62" style:family="table-cell" style:parent-style-name="Default">
      <style:table-cell-properties fo:background-color="#ffe994"/>
      <style:map style:condition="cell-content()&lt;[.O4]" style:apply-style-name="Bad" style:base-cell-address="Build.O5"/>
    </style:style>
    <style:style style:name="ce71" style:family="table-cell" style:parent-style-name="Default">
      <style:table-cell-properties style:cell-protect="none" style:print-content="true"/>
    </style:style>
    <style:style style:name="ce47" style:family="table-cell" style:parent-style-name="Default" style:data-style-name="N0"/>
    <style:style style:name="ce73" style:family="table-cell" style:parent-style-name="Default">
      <style:table-cell-properties style:vertical-align="middle"/>
      <style:text-properties fo:font-size="8pt" style:font-size-asian="8pt" style:font-size-complex="8pt"/>
    </style:style>
    <style:style style:name="ce66" style:family="table-cell" style:parent-style-name="Default">
      <style:map style:condition="cell-content()&gt;[$Build.$Y5]" style:apply-style-name="Frame_5f_Less" style:base-cell-address="Build.AI5"/>
    </style:style>
    <style:style style:name="ce68" style:family="table-cell" style:parent-style-name="Default">
      <style:table-cell-properties fo:background-color="#dee6ef"/>
    </style:style>
    <style:style style:name="ce75" style:family="table-cell" style:parent-style-name="Default" style:data-style-name="N168"/>
    <style:style style:name="ce70" style:family="table-cell" style:parent-style-name="Default">
      <style:map style:condition="is-true-formula(AND([.$C34]&lt;&gt;&quot;&quot;;COUNTIF([Build.$BC34:.EL$62];[.$C34])=0))" style:apply-style-name="Frame_5f_Less" style:base-cell-address="Build.BC34"/>
    </style:style>
    <style:style style:name="ce6" style:family="table-cell" style:parent-style-name="Default" style:data-style-name="N99"/>
    <style:style style:name="ce78" style:family="table-cell" style:parent-style-name="Default">
      <style:table-cell-properties fo:background-color="#dddddd" style:text-align-source="fix" style:repeat-content="false" style:rotation-angle="45" style:vertical-align="top"/>
      <style:paragraph-properties fo:text-align="center" fo:margin-left="0in"/>
    </style:style>
    <style:style style:name="ce79" style:family="table-cell" style:parent-style-name="Default">
      <style:table-cell-properties fo:background-color="#dddddd"/>
      <style:map style:condition="is-true-formula(AND([.D3]=COM.MICROSOFT.XLOOKUP(0; [.$P$2:.$P$56]; [.D$2:.D$56]); NOT(ISBLANK([.D3]))))" style:apply-style-name="Frame_5f_Equal" style:base-cell-address="Frames.D3"/>
    </style:style>
    <style:style style:name="ce80" style:family="table-cell" style:parent-style-name="Default" style:data-style-name="N0">
      <style:table-cell-properties fo:background-color="#dddddd"/>
      <style:map style:condition="is-true-formula(AND([.D3]=COM.MICROSOFT.XLOOKUP(0; [.$P$2:.$P$56]; [.D$2:.D$56]); NOT(ISBLANK([.D3]))))" style:apply-style-name="Frame_5f_Equal" style:base-cell-address="Frames.D3"/>
    </style:style>
    <style:style style:name="ce86" style:family="table-cell" style:parent-style-name="Default">
      <style:table-cell-properties style:text-align-source="fix" style:repeat-content="false" style:rotation-angle="45" style:rotation-align="bottom" style:vertical-align="top"/>
      <style:paragraph-properties fo:text-align="center" fo:margin-left="0in"/>
    </style:style>
    <style:style style:name="ce82" style:family="table-cell" style:parent-style-name="Default">
      <style:map style:condition="is-true-formula(AND([.E3]=COM.MICROSOFT.XLOOKUP(0; [.$P$2:.$P$56]; [.E$2:.E$56]); NOT(ISBLANK([.E3]))))" style:apply-style-name="Frame_5f_Equal" style:base-cell-address="Frames.E3"/>
    </style:style>
    <style:style style:name="ce90" style:family="table-cell" style:parent-style-name="Default">
      <style:table-cell-properties fo:background-color="#dddddd" style:text-align-source="fix" style:repeat-content="false" style:rotation-angle="45" style:rotation-align="bottom" style:vertical-align="top"/>
      <style:paragraph-properties fo:text-align="center" fo:margin-left="0in"/>
    </style:style>
    <style:style style:name="ce84" style:family="table-cell" style:parent-style-name="Default">
      <style:table-cell-properties fo:background-color="#dddddd"/>
      <style:map style:condition="is-true-formula(AND([.E3]=COM.MICROSOFT.XLOOKUP(0; [.$P$2:.$P$56]; [.E$2:.E$56]); NOT(ISBLANK([.E3]))))" style:apply-style-name="Frame_5f_Equal" style:base-cell-address="Frames.E3"/>
    </style:style>
    <style:style style:name="ce85" style:family="table-cell" style:parent-style-name="Frame_5f_Equal">
      <style:map style:condition="is-true-formula(AND([.E3]=COM.MICROSOFT.XLOOKUP(0; [.$P$2:.$P$56]; [.E$2:.E$56]); NOT(ISBLANK([.E3]))))" style:apply-style-name="Frame_5f_Equal" style:base-cell-address="Frames.E3"/>
    </style:style>
    <style:style style:name="ce94" style:family="table-cell" style:parent-style-name="Default">
      <style:table-cell-properties fo:background-color="#000000" style:rotation-angle="45" style:rotation-align="bottom"/>
      <style:text-properties fo:color="#000000"/>
    </style:style>
    <style:style style:name="ce87" style:family="table-cell" style:parent-style-name="Default">
      <style:table-cell-properties fo:background-color="#000000"/>
      <style:text-properties fo:color="#000000"/>
    </style:style>
    <style:style style:name="ce67" style:family="table-cell" style:parent-style-name="Default">
      <style:table-cell-properties fo:background-color="#000000"/>
    </style:style>
    <style:style style:name="ce98" style:family="table-cell" style:parent-style-name="Default">
      <style:table-cell-properties style:text-align-source="fix" style:repeat-content="false"/>
      <style:paragraph-properties fo:text-align="end" fo:margin-left="0in"/>
    </style:style>
    <style:style style:name="ce69" style:family="table-cell" style:parent-style-name="Default">
      <style:table-cell-properties fo:background-color="#ffe994" style:text-align-source="fix" style:repeat-content="false"/>
      <style:paragraph-properties fo:text-align="end" fo:margin-left="0in"/>
    </style:style>
    <style:style style:name="ce101" style:family="table-cell" style:parent-style-name="Default">
      <style:table-cell-properties style:text-align-source="fix" style:repeat-content="false"/>
      <style:paragraph-properties fo:text-align="end" fo:margin-left="0in"/>
    </style:style>
    <style:style style:name="ce48" style:family="table-cell" style:parent-style-name="Default">
      <style:table-cell-properties style:text-align-source="fix" style:repeat-content="false"/>
      <style:paragraph-properties fo:text-align="start" fo:margin-left="0in"/>
    </style:style>
    <style:style style:name="ce50" style:family="table-cell" style:parent-style-name="Default">
      <style:table-cell-properties fo:background-color="#ffe994" style:text-align-source="fix" style:repeat-content="false" style:rotation-angle="45"/>
      <style:paragraph-properties fo:text-align="center" fo:margin-left="0in"/>
    </style:style>
    <style:style style:name="ce53" style:family="table-cell" style:parent-style-name="Default">
      <style:table-cell-properties fo:background-color="#dddddd" style:text-align-source="fix" style:repeat-content="false" style:rotation-angle="45"/>
      <style:paragraph-properties fo:text-align="center" fo:margin-left="0in"/>
    </style:style>
    <style:style style:name="ce54" style:family="table-cell" style:parent-style-name="Default">
      <style:table-cell-properties fo:background-color="#dddddd" style:text-align-source="fix" style:repeat-content="fals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null-year="1950"/>
      <table:content-validations>
        <table:content-validation table:name="val1" table:condition="of:cell-content-is-in-list([$'Skill Triggers'.$B$2:.$B$23])" table:allow-empty-cell="false" table:display-list="unsorted" table:base-cell-address="Build.B2">
          <table:error-message table:message-type="stop" table:display="true"/>
        </table:content-validation>
        <table:content-validation table:name="val2" table:condition="of:cell-content-is-in-list([$Build.$BC31:.$CM31])" table:allow-empty-cell="false" table:display-list="unsorted" table:base-cell-address="Build.C2">
          <table:error-message table:message-type="stop" table:display="true"/>
        </table:content-validation>
        <table:content-validation table:name="val3" table:condition="of:cell-content-is-in-list([$Build.$BC34:.$CM34])" table:allow-empty-cell="false" table:display-list="unsorted" table:base-cell-address="Build.C6">
          <table:error-message table:message-type="stop" table:display="true"/>
        </table:content-validation>
        <table:content-validation table:name="val4" table:condition="of:cell-content-is-in-list(&quot;Hull&quot;;&quot;Agility&quot;;&quot;Systems&quot;;&quot;Engineering&quot;)" table:allow-empty-cell="true" table:display-list="unsorted" table:base-cell-address="Build.D2">
          <table:error-message table:message-type="stop" table:display="true"/>
        </table:content-validation>
        <table:content-validation table:name="val5" table:condition="of:cell-content-is-in-list([$Build.$BC17:.$CN17])" table:allow-empty-cell="false" table:display-list="unsorted" table:base-cell-address="Build.E6">
          <table:error-message table:message-type="stop" table:display="true"/>
        </table:content-validation>
        <table:content-validation table:name="val6" table:condition="of:cell-content-is-in-list([$Build.$BC2:.$CN2])" table:allow-empty-cell="false" table:display-list="unsorted" table:base-cell-address="Build.F5">
          <table:error-message table:message-type="stop" table:display="true"/>
        </table:content-validation>
        <table:content-validation table:name="val7" table:condition="of:cell-content-is-in-list([$Build.$BH$49:.$CM$49])" table:allow-empty-cell="false" table:display-list="unsorted" table:base-cell-address="Build.G8">
          <table:error-message table:message-type="stop" table:display="true"/>
        </table:content-validation>
        <table:content-validation table:name="val8" table:condition="of:cell-content-is-in-list([$Build.$BH$50:.$CM$50])" table:allow-empty-cell="false" table:display-list="unsorted" table:base-cell-address="Build.G11">
          <table:error-message table:message-type="stop" table:display="true"/>
        </table:content-validation>
        <table:content-validation table:name="val9" table:condition="of:cell-content-is-in-list([$Build.$BH$51:.$CM$51])" table:allow-empty-cell="false" table:display-list="unsorted" table:base-cell-address="Build.G14">
          <table:error-message table:message-type="stop" table:display="true"/>
        </table:content-validation>
        <table:content-validation table:name="val10" table:condition="of:cell-content-is-in-list([$Build.$BH$52:.$CM$52])" table:allow-empty-cell="false" table:display-list="unsorted" table:base-cell-address="Build.G17">
          <table:error-message table:message-type="stop" table:display="true"/>
        </table:content-validation>
        <table:content-validation table:name="val11" table:condition="of:cell-content-is-in-list([$Build.$BC55:.$GA55])" table:allow-empty-cell="true" table:display-list="unsorted" table:base-cell-address="Build.AJ5">
          <table:error-message table:message-type="stop" table:display="true"/>
        </table:content-validation>
        <table:content-validation table:name="val12" table:condition="of:cell-content-is-in-list(#REF!)" table:allow-empty-cell="false" table:display-list="unsorted" table:base-cell-address="Build.E6">
          <table:error-message table:message-type="stop" table:display="true"/>
        </table:content-validation>
      </table:content-validations>
      <table:table table:name="Buil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51"/>
        <table:table-column table:style-name="co9" table:default-cell-style-name="ce35"/>
        <table:table-column table:style-name="co9" table:default-cell-style-name="ce51"/>
        <table:table-column table:style-name="co9" table:default-cell-style-name="ce35"/>
        <table:table-column table:style-name="co8" table:default-cell-style-name="Default"/>
        <table:table-column table:style-name="co10" table:default-cell-style-name="ce33"/>
        <table:table-column table:style-name="co10" table:default-cell-style-name="ce3"/>
        <table:table-column table:style-name="co10" table:default-cell-style-name="Default"/>
        <table:table-column table:style-name="co10" table:default-cell-style-name="ce3"/>
        <table:table-column table:style-name="co10" table:default-cell-style-name="Default"/>
        <table:table-column table:style-name="co10" table:default-cell-style-name="ce3"/>
        <table:table-column table:style-name="co10" table:default-cell-style-name="Default"/>
        <table:table-column table:style-name="co10" table:default-cell-style-name="ce3"/>
        <table:table-column table:style-name="co10" table:default-cell-style-name="Default"/>
        <table:table-column table:style-name="co10" table:default-cell-style-name="ce3"/>
        <table:table-column table:style-name="co10" table:default-cell-style-name="Default"/>
        <table:table-column table:style-name="co10" table:default-cell-style-name="ce5"/>
        <table:table-column table:style-name="co10" table:default-cell-style-name="Default"/>
        <table:table-column table:style-name="co8" table:default-cell-style-name="Default"/>
        <table:table-column table:style-name="co11" table:number-columns-repeated="5" table:default-cell-style-name="Default"/>
        <table:table-column table:style-name="co12" table:default-cell-style-name="Default"/>
        <table:table-column table:style-name="co8" table:default-cell-style-name="Default"/>
        <table:table-column table:style-name="co13" table:default-cell-style-name="Default"/>
        <table:table-column table:style-name="co11" table:number-columns-repeated="149" table:default-cell-style-name="Default"/>
        <table:table-row table:style-name="ro1">
          <table:table-cell office:value-type="string" calcext:value-type="string">
            <text:p>LL</text:p>
          </table:table-cell>
          <table:table-cell office:value-type="string" calcext:value-type="string">
            <text:p>Skill Trigger</text:p>
          </table:table-cell>
          <table:table-cell office:value-type="string" calcext:value-type="string">
            <text:p>Talent</text:p>
          </table:table-cell>
          <table:table-cell office:value-type="string" calcext:value-type="string">
            <text:p>Mech Skill</text:p>
          </table:table-cell>
          <table:table-cell office:value-type="string" calcext:value-type="string">
            <text:p>License</text:p>
          </table:table-cell>
          <table:table-cell office:value-type="string" calcext:value-type="string">
            <text:p>Frame</text:p>
          </table:table-cell>
          <table:table-cell office:value-type="string" calcext:value-type="string">
            <text:p>Core Bonus</text:p>
          </table:table-cell>
          <table:table-cell/>
          <table:table-cell office:value-type="string" calcext:value-type="string">
            <text:p>H</text:p>
          </table:table-cell>
          <table:table-cell office:value-type="string" calcext:value-type="string">
            <text:p>A</text:p>
          </table:table-cell>
          <table:table-cell office:value-type="string" calcext:value-type="string">
            <text:p>S</text:p>
          </table:table-cell>
          <table:table-cell office:value-type="string" calcext:value-type="string">
            <text:p>E</text:p>
          </table:table-cell>
          <table:table-cell/>
          <table:table-cell table:style-name="ce52" office:value-type="string" calcext:value-type="string">
            <text:p>Size</text:p>
          </table:table-cell>
          <table:table-cell table:style-name="ce2" office:value-type="string" calcext:value-type="string">
            <text:p>HP</text:p>
          </table:table-cell>
          <table:table-cell table:style-name="ce4" office:value-type="string" calcext:value-type="string">
            <text:p>Armor</text:p>
          </table:table-cell>
          <table:table-cell table:style-name="ce2" office:value-type="string" calcext:value-type="string">
            <text:p>Heat Cap</text:p>
          </table:table-cell>
          <table:table-cell table:style-name="ce4" office:value-type="string" calcext:value-type="string">
            <text:p>Evasion</text:p>
          </table:table-cell>
          <table:table-cell table:style-name="ce2" office:value-type="string" calcext:value-type="string">
            <text:p>Speed</text:p>
          </table:table-cell>
          <table:table-cell table:style-name="ce4" office:value-type="string" calcext:value-type="string">
            <text:p>E-Defense</text:p>
          </table:table-cell>
          <table:table-cell table:style-name="ce2" office:value-type="string" calcext:value-type="string">
            <text:p>Tech Atk</text:p>
          </table:table-cell>
          <table:table-cell table:style-name="ce4" office:value-type="string" calcext:value-type="string">
            <text:p>Sensors</text:p>
          </table:table-cell>
          <table:table-cell table:style-name="ce2" office:value-type="string" calcext:value-type="string">
            <text:p>Repair Cap</text:p>
          </table:table-cell>
          <table:table-cell table:style-name="ce4" office:value-type="string" calcext:value-type="string">
            <text:p>Save Tgt</text:p>
          </table:table-cell>
          <table:table-cell table:style-name="ce44" office:value-type="string" calcext:value-type="string">
            <text:p>SP</text:p>
          </table:table-cell>
          <table:table-cell table:style-name="ce4" office:value-type="string" calcext:value-type="string">
            <text:p>AI Cap</text:p>
          </table:table-cell>
          <table:table-cell/>
          <table:table-cell office:value-type="string" calcext:value-type="string">
            <text:p>Mount 1</text:p>
          </table:table-cell>
          <table:table-cell office:value-type="string" calcext:value-type="string">
            <text:p>Mount 2</text:p>
          </table:table-cell>
          <table:table-cell office:value-type="string" calcext:value-type="string">
            <text:p>Mount 3</text:p>
          </table:table-cell>
          <table:table-cell office:value-type="string" calcext:value-type="string">
            <text:p>Mount 4</text:p>
          </table:table-cell>
          <table:table-cell office:value-type="string" calcext:value-type="string">
            <text:p>Mount 5</text:p>
          </table:table-cell>
          <table:table-cell office:value-type="string" calcext:value-type="string">
            <text:p>Mount 6</text:p>
          </table:table-cell>
          <table:table-cell/>
          <table:table-cell office:value-type="string" calcext:value-type="string">
            <text:p>SP Cost</text:p>
          </table:table-cell>
          <table:table-cell table:number-columns-repeated="19"/>
          <table:table-cell office:value-type="string" calcext:value-type="string">
            <text:p>Valid Frame Selection</text:p>
          </table:table-cell>
          <table:table-cell table:number-columns-repeated="129"/>
        </table:table-row>
        <table:table-row table:style-name="ro2">
          <table:table-cell/>
          <table:table-cell table:style-name="ce8" table:content-validation-name="val1" office:value-type="string" calcext:value-type="string">
            <text:p>Act Unseen or Unheard</text:p>
          </table:table-cell>
          <table:table-cell table:style-name="ce11" table:content-validation-name="val2" office:value-type="string" calcext:value-type="string">
            <text:p>Technophile I</text:p>
          </table:table-cell>
          <table:table-cell table:style-name="ce8" table:content-validation-name="val4" office:value-type="string" calcext:value-type="string">
            <text:p>Agility</text:p>
          </table:table-cell>
          <table:table-cell table:style-name="ce12"/>
          <table:table-cell table:number-columns-repeated="49"/>
          <table:table-cell table:number-matrix-columns-spanned="47" table:number-matrix-rows-spanned="1" table:formula="of:=TRANSPOSE(     COM.MICROSOFT.FILTER(         [$Frames.$A$2:.$A$100];         ([$Frames.$C$2:.$C$100]=&quot;&quot;)         +         (COUNTIF([$Build.$E$5:.$E5];[$Frames.$C$2:.$C$100])&gt;0);         &quot;&quot;     ) )" office:value-type="string" office:string-value="Everest" calcext:value-type="string">
            <text:p>Everest</text:p>
          </table:table-cell>
          <table:table-cell office:value-type="string" office:string-value="Sagarmatha" calcext:value-type="string">
            <text:p>Sagarmatha</text:p>
          </table:table-cell>
          <table:table-cell office:value-type="string" office:string-value="Chomolungma" calcext:value-type="string">
            <text:p>Chomolungma</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83"/>
        </table:table-row>
        <table:table-row table:style-name="ro2">
          <table:table-cell/>
          <table:table-cell table:style-name="ce8" table:content-validation-name="val1" office:value-type="string" calcext:value-type="string">
            <text:p>Hack or Fix</text:p>
          </table:table-cell>
          <table:table-cell table:style-name="ce11" table:content-validation-name="val2" office:value-type="string" calcext:value-type="string">
            <text:p>Engineer I</text:p>
          </table:table-cell>
          <table:table-cell table:style-name="ce8" table:content-validation-name="val4" office:value-type="string" calcext:value-type="string">
            <text:p>Agility</text:p>
          </table:table-cell>
          <table:table-cell table:style-name="ce12"/>
          <table:table-cell table:number-columns-repeated="29"/>
          <table:table-cell table:style-name="ce73" office:value-type="string" calcext:value-type="string">
            <text:p>Red = Remove Systems</text:p>
          </table:table-cell>
          <table:table-cell table:number-columns-repeated="19"/>
          <table:table-cell table:number-matrix-columns-spanned="47" table:number-matrix-rows-spanned="1" table:formula="of:=TRANSPOSE(     COM.MICROSOFT.FILTER(         [$Frames.$A$2:.$A$100];         ([$Frames.$C$2:.$C$100]=&quot;&quot;)         +         (COUNTIF([$Build.$E$5:.$E6];[$Frames.$C$2:.$C$100])&gt;0);         &quot;&quot;     ) )" office:value-type="string" office:string-value="Everest" calcext:value-type="string">
            <text:p>Everest</text:p>
          </table:table-cell>
          <table:table-cell office:value-type="string" office:string-value="Sagarmatha" calcext:value-type="string">
            <text:p>Sagarmatha</text:p>
          </table:table-cell>
          <table:table-cell office:value-type="string" office:string-value="Chomolungma" calcext:value-type="string">
            <text:p>Chomolungma</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83"/>
        </table:table-row>
        <table:table-row table:style-name="ro2">
          <table:table-cell/>
          <table:table-cell table:style-name="ce8" table:content-validation-name="val1" office:value-type="string" calcext:value-type="string">
            <text:p>Read a Situation</text:p>
          </table:table-cell>
          <table:table-cell table:style-name="ce11" table:content-validation-name="val2" office:value-type="string" calcext:value-type="string">
            <text:p>Crack Shot I</text:p>
          </table:table-cell>
          <table:table-cell table:style-name="ce12" table:number-columns-repeated="2"/>
          <table:table-cell table:style-name="ce16" office:value-type="string" calcext:value-type="string">
            <text:p>Selection Carries Down</text:p>
          </table:table-cell>
          <table:table-cell table:number-columns-repeated="28"/>
          <table:table-cell table:style-name="ce73" office:value-type="string" calcext:value-type="string">
            <text:p>Gold = Unspent SP</text:p>
          </table:table-cell>
          <table:table-cell table:number-columns-repeated="19"/>
          <table:table-cell table:number-matrix-columns-spanned="48" table:number-matrix-rows-spanned="1" table:formula="of:=TRANSPOSE(     COM.MICROSOFT.FILTER(         [$Frames.$A$2:.$A$100];         ([$Frames.$C$2:.$C$100]=&quot;&quot;)         +         (COUNTIF([$Build.$E$5:.$E7];[$Frames.$C$2:.$C$100])&gt;0);         &quot;&quot;     ) )" office:value-type="string" office:string-value="Everest" calcext:value-type="string">
            <text:p>Everest</text:p>
          </table:table-cell>
          <table:table-cell office:value-type="string" office:string-value="Sagarmatha" calcext:value-type="string">
            <text:p>Sagarmatha</text:p>
          </table:table-cell>
          <table:table-cell office:value-type="string" office:string-value="Chomolungma" calcext:value-type="string">
            <text:p>Chomolungma</text:p>
          </table:table-cell>
          <table:table-cell table:style-name="ce47" office:value-type="string" office:string-value="Death’s Head" calcext:value-type="string">
            <text:p>Death’s Head</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82"/>
        </table:table-row>
        <table:table-row table:style-name="ro2">
          <table:table-cell table:style-name="ce1" office:value-type="float" office:value="0" calcext:value-type="float">
            <text:p>0</text:p>
          </table:table-cell>
          <table:table-cell table:style-name="ce17" table:content-validation-name="val1" office:value-type="string" calcext:value-type="string">
            <text:p>Spot</text:p>
          </table:table-cell>
          <table:table-cell table:style-name="ce10" table:number-columns-repeated="3"/>
          <table:table-cell table:style-name="ce8" table:content-validation-name="val6" office:value-type="string" calcext:value-type="string">
            <text:p>Everest</text:p>
          </table:table-cell>
          <table:table-cell table:style-name="ce12"/>
          <table:table-cell/>
          <table:table-cell table:style-name="ce38" table:formula="of:=COUNTIF([.$D$2:.$D5];&quot;Hull&quot;)" office:value-type="float" office:value="0" calcext:value-type="float">
            <text:p>0</text:p>
          </table:table-cell>
          <table:table-cell table:style-name="ce40" table:formula="of:=COUNTIF([.$D$2:.$D5];&quot;Agility&quot;)" office:value-type="float" office:value="2" calcext:value-type="float">
            <text:p>2</text:p>
          </table:table-cell>
          <table:table-cell table:style-name="ce38" table:formula="of:=COUNTIF([.$D$2:.$D5];&quot;Systems&quot;)" office:value-type="float" office:value="0" calcext:value-type="float">
            <text:p>0</text:p>
          </table:table-cell>
          <table:table-cell table:style-name="ce40" table:formula="of:=COUNTIF([.$D$2:.$D5];&quot;Engineering&quot;)" office:value-type="float" office:value="0" calcext:value-type="float">
            <text:p>0</text:p>
          </table:table-cell>
          <table:table-cell/>
          <table:table-cell table:formula="of:=IFERROR(COM.MICROSOFT.XLOOKUP(LOOKUP(2;1/([.$F$2:.$F5]&lt;&gt;&quot;&quot;);[.$F$2:.$F5]);[$Frames.$A$1:.$A$100];[$Frames.D$1:.D$100]);&quot;&quot;)" office:value-type="float" office:value="1" calcext:value-type="float">
            <text:p>1</text:p>
          </table:table-cell>
          <table:table-cell table:style-name="ce57" table:formula="of:=IFERROR(COM.MICROSOFT.XLOOKUP(LOOKUP(2;1/([.$F$2:.$F5]&lt;&gt;&quot;&quot;);[.$F$2:.$F5]);[$Frames.$A$1:.$A$100];[$Frames.E$1:.E$100]);&quot;&quot;)+CEILING([.A5]/2)+2*[.I5]+[.BC71]" office:value-type="float" office:value="10" calcext:value-type="float">
            <text:p>10</text:p>
          </table:table-cell>
          <table:table-cell table:style-name="ce59" table:formula="of:=MIN(4; IFERROR(COM.MICROSOFT.XLOOKUP(LOOKUP(2;1/([.$F$2:.$F5]&lt;&gt;&quot;&quot;);[.$F$2:.$F5]);[$Frames.$A$1:.$A$100];[$Frames.F$1:.F$100]);&quot;&quot;)+[.BD71])" office:value-type="float" office:value="0" calcext:value-type="float">
            <text:p>0</text:p>
          </table:table-cell>
          <table:table-cell table:style-name="ce57" table:formula="of:=IFERROR(COM.MICROSOFT.XLOOKUP(LOOKUP(2;1/([.$F$2:.$F5]&lt;&gt;&quot;&quot;);[.$F$2:.$F5]);[$Frames.$A$1:.$A$100];[$Frames.G$1:.G$100]);&quot;&quot;)+[.L5]+[.BE71]" office:value-type="float" office:value="6" calcext:value-type="float">
            <text:p>6</text:p>
          </table:table-cell>
          <table:table-cell table:style-name="ce59" table:formula="of:=IFERROR(COM.MICROSOFT.XLOOKUP(LOOKUP(2;1/([.$F$2:.$F5]&lt;&gt;&quot;&quot;);[.$F$2:.$F5]);[$Frames.$A$1:.$A$100];[$Frames.H$1:.H$100]);&quot;&quot;)+[.J5]+[.BF71]" office:value-type="float" office:value="10" calcext:value-type="float">
            <text:p>10</text:p>
          </table:table-cell>
          <table:table-cell table:style-name="ce57" table:formula="of:=IFERROR(COM.MICROSOFT.XLOOKUP(LOOKUP(2;1/([.$F$2:.$F5]&lt;&gt;&quot;&quot;);[.$F$2:.$F5]);[$Frames.$A$1:.$A$100];[$Frames.I$1:.I$100]);&quot;&quot;)+FLOOR([.J5]/2)+[.BG71]" office:value-type="float" office:value="5" calcext:value-type="float">
            <text:p>5</text:p>
          </table:table-cell>
          <table:table-cell table:style-name="ce59" table:formula="of:=IFERROR(COM.MICROSOFT.XLOOKUP(LOOKUP(2;1/([.$F$2:.$F5]&lt;&gt;&quot;&quot;);[.$F$2:.$F5]);[$Frames.$A$1:.$A$100];[$Frames.J$1:.J$100]);&quot;&quot;)+[.K5]+[.BH71]" office:value-type="float" office:value="8" calcext:value-type="float">
            <text:p>8</text:p>
          </table:table-cell>
          <table:table-cell table:style-name="ce57" table:formula="of:=IFERROR(COM.MICROSOFT.XLOOKUP(LOOKUP(2;1/([.$F$2:.$F5]&lt;&gt;&quot;&quot;);[.$F$2:.$F5]);[$Frames.$A$1:.$A$100];[$Frames.K$1:.K$100]);&quot;&quot;)+[.K5]+[.BI71]" office:value-type="float" office:value="0" calcext:value-type="float">
            <text:p>0</text:p>
          </table:table-cell>
          <table:table-cell table:style-name="ce59" table:formula="of:=IFERROR(COM.MICROSOFT.XLOOKUP(LOOKUP(2;1/([.$F$2:.$F5]&lt;&gt;&quot;&quot;);[.$F$2:.$F5]);[$Frames.$A$1:.$A$100];[$Frames.L$1:.L$100]);&quot;&quot;)+[.BJ71]" office:value-type="float" office:value="10" calcext:value-type="float">
            <text:p>10</text:p>
          </table:table-cell>
          <table:table-cell table:style-name="ce57" table:formula="of:=IFERROR(COM.MICROSOFT.XLOOKUP(LOOKUP(2;1/([.$F$2:.$F5]&lt;&gt;&quot;&quot;);[.$F$2:.$F5]);[$Frames.$A$1:.$A$100];[$Frames.M$1:.M$100]);&quot;&quot;)+FLOOR([.I5]/2)+[.BK71]" office:value-type="float" office:value="5" calcext:value-type="float">
            <text:p>5</text:p>
          </table:table-cell>
          <table:table-cell table:style-name="ce59" table:formula="of:=IFERROR(COM.MICROSOFT.XLOOKUP(LOOKUP(2;1/([.$F$2:.$F5]&lt;&gt;&quot;&quot;);[.$F$2:.$F5]);[$Frames.$A$1:.$A$100];[$Frames.N$1:.N$100]);&quot;&quot;)+CEILING([.A5]/2)+[.BL71]" office:value-type="float" office:value="10" calcext:value-type="float">
            <text:p>10</text:p>
          </table:table-cell>
          <table:table-cell table:style-name="ce62" table:formula="of:=IFERROR(COM.MICROSOFT.XLOOKUP(LOOKUP(2;1/([.$F$2:.$F5]&lt;&gt;&quot;&quot;);[.$F$2:.$F5]);[$Frames.$A$1:.$A$100];[$Frames.O$1:.O$100]);&quot;&quot;)+CEILING([.A5]/2)+FLOOR([.K5]/2)+[.BM71]" office:value-type="float" office:value="6" calcext:value-type="float">
            <text:p>6</text:p>
          </table:table-cell>
          <table:table-cell table:formula="of:=1+[.BN71]" office:value-type="float" office:value="1" calcext:value-type="float">
            <text:p>1</text:p>
          </table:table-cell>
          <table:table-cell/>
          <table:table-cell table:style-name="ce71" office:value-type="string" calcext:value-type="string">
            <text:p>Anti-Materiel Rifle</text:p>
          </table:table-cell>
          <table:table-cell table:style-name="ce71" office:value-type="string" calcext:value-type="string">
            <text:p>Mortar</text:p>
          </table:table-cell>
          <table:table-cell table:style-name="ce71" office:value-type="string" calcext:value-type="string">
            <text:p>Missile Rack/Missile Rack</text:p>
          </table:table-cell>
          <table:table-cell table:style-name="ce71" office:value-type="string" calcext:value-type="string">
            <text:p>Prototype Weapon I</text:p>
          </table:table-cell>
          <table:table-cell table:style-name="ce71" table:number-columns-repeated="2"/>
          <table:table-cell/>
          <table:table-cell table:style-name="ce66" table:formula="of:=COM.MICROSOFT.LET(     _xlpm.weaponText;     COM.MICROSOFT.TEXTJOIN(&quot;/&quot;;1;[.$AB5:.$AG5]);      _xlpm.weaponList;     &quot;¶&quot;&amp;SUBSTITUTE(_xlpm.weaponText;&quot;/&quot;;&quot;§¶&quot;)&amp;&quot;§&quot;;      _xlpm.systemsCost;     SUMPRODUCT(         ([$Systems.$A$11:.$A$300]&lt;&gt;&quot;&quot;)         *         COUNTIF([.$AJ5:.$AX5];[$Systems.$A$11:.$A$300])         *         [$Systems.$E$11:.$E$300]     );      _xlpm.weaponsCost;     SUMPRODUCT(         ([$Weapons.$A$2:.$A$300]&lt;&gt;&quot;&quot;)         *         (             LEN(_xlpm.weaponList)             -             LEN(                 SUBSTITUTE(                     _xlpm.weaponList;                     &quot;¶&quot;&amp;[$Weapons.$A$2:.$A$300]&amp;&quot;§&quot;;                     &quot;&quot;                 )             )         )         /         LEN(&quot;¶&quot;&amp;[$Weapons.$A$2:.$A$300]&amp;&quot;§&quot;)         *         [$Weapons.$H$2:.$H$300]     );      IF(         COUNTA([.$AB5:.$AG5])+COUNTA([.$AJ5:.$AX5]);         _xlpm.systemsCost+_xlpm.weaponsCost;         &quot;&quot;     ) )" office:value-type="float" office:value="6" calcext:value-type="float">
            <text:p>6</text:p>
          </table:table-cell>
          <table:table-cell table:style-name="ce8" table:content-validation-name="val11" office:value-type="string" calcext:value-type="string">
            <text:p>Servant-Class NHP</text:p>
          </table:table-cell>
          <table:table-cell table:style-name="ce8" table:content-validation-name="val11" office:value-type="string" calcext:value-type="string">
            <text:p>Pattern-A Jericho Deployable Cover</text:p>
          </table:table-cell>
          <table:table-cell table:style-name="ce8" table:content-validation-name="val11" office:value-type="string" calcext:value-type="string">
            <text:p>Pattern-A Smoke Charges</text:p>
          </table:table-cell>
          <table:table-cell table:style-name="ce8" table:content-validation-name="val11" office:value-type="string" calcext:value-type="string">
            <text:p>Rapid Burst Jump Jet Systems</text:p>
          </table:table-cell>
          <table:table-cell table:style-name="ce8" table:content-validation-name="val11" table:number-columns-repeated="10"/>
          <table:table-cell table:style-name="ce68" table:content-validation-name="val11" table:number-columns-repeated="3"/>
          <table:table-cell table:number-columns-repeated="2"/>
          <table:table-cell table:number-matrix-columns-spanned="48" table:number-matrix-rows-spanned="1" table:formula="of:=TRANSPOSE(     COM.MICROSOFT.FILTER(         [$Frames.$A$2:.$A$100];         ([$Frames.$C$2:.$C$100]=&quot;&quot;)         +         (COUNTIF([$Build.$E$5:.$E8];[$Frames.$C$2:.$C$100])&gt;0);         &quot;&quot;     ) )" office:value-type="string" office:string-value="Everest" calcext:value-type="string">
            <text:p>Everest</text:p>
          </table:table-cell>
          <table:table-cell office:value-type="string" office:string-value="Sagarmatha" calcext:value-type="string">
            <text:p>Sagarmatha</text:p>
          </table:table-cell>
          <table:table-cell office:value-type="string" office:string-value="Chomolungma" calcext:value-type="string">
            <text:p>Chomolungma</text:p>
          </table:table-cell>
          <table:table-cell office:value-type="string" office:string-value="Death’s Head" calcext:value-type="string">
            <text:p>Death’s Head</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82"/>
        </table:table-row>
        <table:table-row table:style-name="ro2">
          <table:table-cell office:value-type="float" office:value="1" calcext:value-type="float">
            <text:p>1</text:p>
          </table:table-cell>
          <table:table-cell table:style-name="ce8" table:content-validation-name="val1" office:value-type="string" calcext:value-type="string">
            <text:p>Spot</text:p>
          </table:table-cell>
          <table:table-cell table:style-name="ce14" table:content-validation-name="val3" office:value-type="string" calcext:value-type="string">
            <text:p>Technophile II</text:p>
          </table:table-cell>
          <table:table-cell table:style-name="ce8" table:content-validation-name="val4" office:value-type="string" calcext:value-type="string">
            <text:p>Hull</text:p>
          </table:table-cell>
          <table:table-cell table:style-name="ce19" table:content-validation-name="val5" office:value-type="string" calcext:value-type="string">
            <text:p>Death’s Head I</text:p>
          </table:table-cell>
          <table:table-cell table:style-name="ce8" table:content-validation-name="val6"/>
          <table:table-cell table:style-name="ce12"/>
          <table:table-cell/>
          <table:table-cell table:style-name="ce38" table:formula="of:=COUNTIF([.$D$2:.$D6];&quot;Hull&quot;)" office:value-type="float" office:value="1" calcext:value-type="float">
            <text:p>1</text:p>
          </table:table-cell>
          <table:table-cell table:style-name="ce40" table:formula="of:=COUNTIF([.$D$2:.$D6];&quot;Agility&quot;)" office:value-type="float" office:value="2" calcext:value-type="float">
            <text:p>2</text:p>
          </table:table-cell>
          <table:table-cell table:style-name="ce38" table:formula="of:=COUNTIF([.$D$2:.$D6];&quot;Systems&quot;)" office:value-type="float" office:value="0" calcext:value-type="float">
            <text:p>0</text:p>
          </table:table-cell>
          <table:table-cell table:style-name="ce40" table:formula="of:=COUNTIF([.$D$2:.$D6];&quot;Engineering&quot;)" office:value-type="float" office:value="0" calcext:value-type="float">
            <text:p>0</text:p>
          </table:table-cell>
          <table:table-cell/>
          <table:table-cell table:formula="of:=IFERROR(COM.MICROSOFT.XLOOKUP(LOOKUP(2;1/([.$F$2:.$F6]&lt;&gt;&quot;&quot;);[.$F$2:.$F6]);[$Frames.$A$1:.$A$100];[$Frames.D$1:.D$100]);&quot;&quot;)" office:value-type="float" office:value="1" calcext:value-type="float">
            <text:p>1</text:p>
          </table:table-cell>
          <table:table-cell table:style-name="ce57" table:formula="of:=IFERROR(COM.MICROSOFT.XLOOKUP(LOOKUP(2;1/([.$F$2:.$F6]&lt;&gt;&quot;&quot;);[.$F$2:.$F6]);[$Frames.$A$1:.$A$100];[$Frames.E$1:.E$100]);&quot;&quot;)+CEILING([.A6]/2)+2*[.I6]+[.BC72]" office:value-type="float" office:value="13" calcext:value-type="float">
            <text:p>13</text:p>
          </table:table-cell>
          <table:table-cell table:style-name="ce59" table:formula="of:=MIN(4; IFERROR(COM.MICROSOFT.XLOOKUP(LOOKUP(2;1/([.$F$2:.$F6]&lt;&gt;&quot;&quot;);[.$F$2:.$F6]);[$Frames.$A$1:.$A$100];[$Frames.F$1:.F$100]);&quot;&quot;)+[.BD72])" office:value-type="float" office:value="0" calcext:value-type="float">
            <text:p>0</text:p>
          </table:table-cell>
          <table:table-cell table:style-name="ce57" table:formula="of:=IFERROR(COM.MICROSOFT.XLOOKUP(LOOKUP(2;1/([.$F$2:.$F6]&lt;&gt;&quot;&quot;);[.$F$2:.$F6]);[$Frames.$A$1:.$A$100];[$Frames.G$1:.G$100]);&quot;&quot;)+[.L6]+[.BE72]" office:value-type="float" office:value="6" calcext:value-type="float">
            <text:p>6</text:p>
          </table:table-cell>
          <table:table-cell table:style-name="ce59" table:formula="of:=IFERROR(COM.MICROSOFT.XLOOKUP(LOOKUP(2;1/([.$F$2:.$F6]&lt;&gt;&quot;&quot;);[.$F$2:.$F6]);[$Frames.$A$1:.$A$100];[$Frames.H$1:.H$100]);&quot;&quot;)+[.J6]+[.BF72]" office:value-type="float" office:value="10" calcext:value-type="float">
            <text:p>10</text:p>
          </table:table-cell>
          <table:table-cell table:style-name="ce57" table:formula="of:=IFERROR(COM.MICROSOFT.XLOOKUP(LOOKUP(2;1/([.$F$2:.$F6]&lt;&gt;&quot;&quot;);[.$F$2:.$F6]);[$Frames.$A$1:.$A$100];[$Frames.I$1:.I$100]);&quot;&quot;)+FLOOR([.J6]/2)+[.BG72]" office:value-type="float" office:value="5" calcext:value-type="float">
            <text:p>5</text:p>
          </table:table-cell>
          <table:table-cell table:style-name="ce59" table:formula="of:=IFERROR(COM.MICROSOFT.XLOOKUP(LOOKUP(2;1/([.$F$2:.$F6]&lt;&gt;&quot;&quot;);[.$F$2:.$F6]);[$Frames.$A$1:.$A$100];[$Frames.J$1:.J$100]);&quot;&quot;)+[.K6]+[.BH72]" office:value-type="float" office:value="8" calcext:value-type="float">
            <text:p>8</text:p>
          </table:table-cell>
          <table:table-cell table:style-name="ce57" table:formula="of:=IFERROR(COM.MICROSOFT.XLOOKUP(LOOKUP(2;1/([.$F$2:.$F6]&lt;&gt;&quot;&quot;);[.$F$2:.$F6]);[$Frames.$A$1:.$A$100];[$Frames.K$1:.K$100]);&quot;&quot;)+[.K6]+[.BI72]" office:value-type="float" office:value="0" calcext:value-type="float">
            <text:p>0</text:p>
          </table:table-cell>
          <table:table-cell table:style-name="ce59" table:formula="of:=IFERROR(COM.MICROSOFT.XLOOKUP(LOOKUP(2;1/([.$F$2:.$F6]&lt;&gt;&quot;&quot;);[.$F$2:.$F6]);[$Frames.$A$1:.$A$100];[$Frames.L$1:.L$100]);&quot;&quot;)+[.BJ72]" office:value-type="float" office:value="10" calcext:value-type="float">
            <text:p>10</text:p>
          </table:table-cell>
          <table:table-cell table:style-name="ce57" table:formula="of:=IFERROR(COM.MICROSOFT.XLOOKUP(LOOKUP(2;1/([.$F$2:.$F6]&lt;&gt;&quot;&quot;);[.$F$2:.$F6]);[$Frames.$A$1:.$A$100];[$Frames.M$1:.M$100]);&quot;&quot;)+FLOOR([.I6]/2)+[.BK72]" office:value-type="float" office:value="5" calcext:value-type="float">
            <text:p>5</text:p>
          </table:table-cell>
          <table:table-cell table:style-name="ce59" table:formula="of:=IFERROR(COM.MICROSOFT.XLOOKUP(LOOKUP(2;1/([.$F$2:.$F6]&lt;&gt;&quot;&quot;);[.$F$2:.$F6]);[$Frames.$A$1:.$A$100];[$Frames.N$1:.N$100]);&quot;&quot;)+CEILING([.A6]/2)+[.BL72]" office:value-type="float" office:value="11" calcext:value-type="float">
            <text:p>11</text:p>
          </table:table-cell>
          <table:table-cell table:style-name="ce62" table:formula="of:=IFERROR(COM.MICROSOFT.XLOOKUP(LOOKUP(2;1/([.$F$2:.$F6]&lt;&gt;&quot;&quot;);[.$F$2:.$F6]);[$Frames.$A$1:.$A$100];[$Frames.O$1:.O$100]);&quot;&quot;)+CEILING([.A6]/2)+FLOOR([.K6]/2)+[.BM72]" office:value-type="float" office:value="7" calcext:value-type="float">
            <text:p>7</text:p>
          </table:table-cell>
          <table:table-cell table:formula="of:=1+[.BN72]" office:value-type="float" office:value="1" calcext:value-type="float">
            <text:p>1</text:p>
          </table:table-cell>
          <table:table-cell/>
          <table:table-cell table:style-name="ce71" office:value-type="string" calcext:value-type="string">
            <text:p>Anti-Materiel Rifle</text:p>
          </table:table-cell>
          <table:table-cell table:style-name="ce71" office:value-type="string" calcext:value-type="string">
            <text:p>Mortar</text:p>
          </table:table-cell>
          <table:table-cell table:style-name="ce71" office:value-type="string" calcext:value-type="string">
            <text:p>Missile Rack/Missile Rack</text:p>
          </table:table-cell>
          <table:table-cell table:style-name="ce71" office:value-type="string" calcext:value-type="string">
            <text:p>Prototype Weapon I</text:p>
          </table:table-cell>
          <table:table-cell table:style-name="ce71" table:number-columns-repeated="2"/>
          <table:table-cell/>
          <table:table-cell table:style-name="ce66" table:formula="of:=COM.MICROSOFT.LET(     _xlpm.weaponText;     COM.MICROSOFT.TEXTJOIN(&quot;/&quot;;1;[.$AB6:.$AG6]);      _xlpm.weaponList;     &quot;¶&quot;&amp;SUBSTITUTE(_xlpm.weaponText;&quot;/&quot;;&quot;§¶&quot;)&amp;&quot;§&quot;;      _xlpm.systemsCost;     SUMPRODUCT(         ([$Systems.$A$11:.$A$300]&lt;&gt;&quot;&quot;)         *         COUNTIF([.$AJ6:.$AX6];[$Systems.$A$11:.$A$300])         *         [$Systems.$E$11:.$E$300]     );      _xlpm.weaponsCost;     SUMPRODUCT(         ([$Weapons.$A$2:.$A$300]&lt;&gt;&quot;&quot;)         *         (             LEN(_xlpm.weaponList)             -             LEN(                 SUBSTITUTE(                     _xlpm.weaponList;                     &quot;¶&quot;&amp;[$Weapons.$A$2:.$A$300]&amp;&quot;§&quot;;                     &quot;&quot;                 )             )         )         /         LEN(&quot;¶&quot;&amp;[$Weapons.$A$2:.$A$300]&amp;&quot;§&quot;)         *         [$Weapons.$H$2:.$H$300]     );      IF(         COUNTA([.$AB6:.$AG6])+COUNTA([.$AJ6:.$AX6]);         _xlpm.systemsCost+_xlpm.weaponsCost;         &quot;&quot;     ) )" office:value-type="float" office:value="7" calcext:value-type="float">
            <text:p>7</text:p>
          </table:table-cell>
          <table:table-cell table:style-name="ce8" table:content-validation-name="val11" office:value-type="string" calcext:value-type="string">
            <text:p>Student-Class NHP</text:p>
          </table:table-cell>
          <table:table-cell table:style-name="ce8" table:content-validation-name="val11" office:value-type="string" calcext:value-type="string">
            <text:p>Pattern-A Jericho Deployable Cover</text:p>
          </table:table-cell>
          <table:table-cell table:style-name="ce8" table:content-validation-name="val11" office:value-type="string" calcext:value-type="string">
            <text:p>High-Stress Mag Clamps</text:p>
          </table:table-cell>
          <table:table-cell table:style-name="ce8" table:content-validation-name="val11" office:value-type="string" calcext:value-type="string">
            <text:p>Rapid Burst Jump Jet Systems</text:p>
          </table:table-cell>
          <table:table-cell table:style-name="ce8" table:content-validation-name="val11" office:value-type="string" calcext:value-type="string">
            <text:p>Tracking Bug</text:p>
          </table:table-cell>
          <table:table-cell table:style-name="ce8" table:content-validation-name="val11" table:number-columns-repeated="12"/>
          <table:table-cell table:number-columns-repeated="2"/>
          <table:table-cell table:number-matrix-columns-spanned="48" table:number-matrix-rows-spanned="1" table:formula="of:=TRANSPOSE(     COM.MICROSOFT.FILTER(         [$Frames.$A$2:.$A$100];         ([$Frames.$C$2:.$C$100]=&quot;&quot;)         +         (COUNTIF([$Build.$E$5:.$E9];[$Frames.$C$2:.$C$100])&gt;0);         &quot;&quot;     ) )" office:value-type="string" office:string-value="Everest" calcext:value-type="string">
            <text:p>Everest</text:p>
          </table:table-cell>
          <table:table-cell office:value-type="string" office:string-value="Sagarmatha" calcext:value-type="string">
            <text:p>Sagarmatha</text:p>
          </table:table-cell>
          <table:table-cell office:value-type="string" office:string-value="Chomolungma" calcext:value-type="string">
            <text:p>Chomolungma</text:p>
          </table:table-cell>
          <table:table-cell office:value-type="string" office:string-value="Death’s Head" calcext:value-type="string">
            <text:p>Death’s Head</text:p>
          </table:table-cell>
          <table:table-cell table:content-validation-name="val12"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82"/>
        </table:table-row>
        <table:table-row table:style-name="ro2">
          <table:table-cell office:value-type="float" office:value="2" calcext:value-type="float">
            <text:p>2</text:p>
          </table:table-cell>
          <table:table-cell table:style-name="ce8" table:content-validation-name="val1" office:value-type="string" calcext:value-type="string">
            <text:p>Hack or Fix</text:p>
          </table:table-cell>
          <table:table-cell table:style-name="ce14" table:content-validation-name="val3" office:value-type="string" calcext:value-type="string">
            <text:p>Technophile III</text:p>
          </table:table-cell>
          <table:table-cell table:style-name="ce8" table:content-validation-name="val4" office:value-type="string" calcext:value-type="string">
            <text:p>Hull</text:p>
          </table:table-cell>
          <table:table-cell table:style-name="ce19" table:content-validation-name="val5" office:value-type="string" calcext:value-type="string">
            <text:p>Death’s Head II</text:p>
          </table:table-cell>
          <table:table-cell table:style-name="ce8" table:content-validation-name="val6" office:value-type="string" calcext:value-type="string">
            <text:p>Death’s Head</text:p>
          </table:table-cell>
          <table:table-cell table:style-name="ce12"/>
          <table:table-cell/>
          <table:table-cell table:style-name="ce38" table:formula="of:=COUNTIF([.$D$2:.$D7];&quot;Hull&quot;)" office:value-type="float" office:value="2" calcext:value-type="float">
            <text:p>2</text:p>
          </table:table-cell>
          <table:table-cell table:style-name="ce40" table:formula="of:=COUNTIF([.$D$2:.$D7];&quot;Agility&quot;)" office:value-type="float" office:value="2" calcext:value-type="float">
            <text:p>2</text:p>
          </table:table-cell>
          <table:table-cell table:style-name="ce38" table:formula="of:=COUNTIF([.$D$2:.$D7];&quot;Systems&quot;)" office:value-type="float" office:value="0" calcext:value-type="float">
            <text:p>0</text:p>
          </table:table-cell>
          <table:table-cell table:style-name="ce40" table:formula="of:=COUNTIF([.$D$2:.$D7];&quot;Engineering&quot;)" office:value-type="float" office:value="0" calcext:value-type="float">
            <text:p>0</text:p>
          </table:table-cell>
          <table:table-cell/>
          <table:table-cell table:formula="of:=IFERROR(COM.MICROSOFT.XLOOKUP(LOOKUP(2;1/([.$F$2:.$F7]&lt;&gt;&quot;&quot;);[.$F$2:.$F7]);[$Frames.$A$1:.$A$100];[$Frames.D$1:.D$100]);&quot;&quot;)" office:value-type="float" office:value="1" calcext:value-type="float">
            <text:p>1</text:p>
          </table:table-cell>
          <table:table-cell table:style-name="ce57" table:formula="of:=IFERROR(COM.MICROSOFT.XLOOKUP(LOOKUP(2;1/([.$F$2:.$F7]&lt;&gt;&quot;&quot;);[.$F$2:.$F7]);[$Frames.$A$1:.$A$100];[$Frames.E$1:.E$100]);&quot;&quot;)+CEILING([.A7]/2)+2*[.I7]+[.BC73]" office:value-type="float" office:value="13" calcext:value-type="float">
            <text:p>13</text:p>
          </table:table-cell>
          <table:table-cell table:style-name="ce59" table:formula="of:=MIN(4; IFERROR(COM.MICROSOFT.XLOOKUP(LOOKUP(2;1/([.$F$2:.$F7]&lt;&gt;&quot;&quot;);[.$F$2:.$F7]);[$Frames.$A$1:.$A$100];[$Frames.F$1:.F$100]);&quot;&quot;)+[.BD73])" office:value-type="float" office:value="0" calcext:value-type="float">
            <text:p>0</text:p>
          </table:table-cell>
          <table:table-cell table:style-name="ce57" table:formula="of:=IFERROR(COM.MICROSOFT.XLOOKUP(LOOKUP(2;1/([.$F$2:.$F7]&lt;&gt;&quot;&quot;);[.$F$2:.$F7]);[$Frames.$A$1:.$A$100];[$Frames.G$1:.G$100]);&quot;&quot;)+[.L7]+[.BE73]" office:value-type="float" office:value="6" calcext:value-type="float">
            <text:p>6</text:p>
          </table:table-cell>
          <table:table-cell table:style-name="ce59" table:formula="of:=IFERROR(COM.MICROSOFT.XLOOKUP(LOOKUP(2;1/([.$F$2:.$F7]&lt;&gt;&quot;&quot;);[.$F$2:.$F7]);[$Frames.$A$1:.$A$100];[$Frames.H$1:.H$100]);&quot;&quot;)+[.J7]+[.BF73]" office:value-type="float" office:value="12" calcext:value-type="float">
            <text:p>12</text:p>
          </table:table-cell>
          <table:table-cell table:style-name="ce57" table:formula="of:=IFERROR(COM.MICROSOFT.XLOOKUP(LOOKUP(2;1/([.$F$2:.$F7]&lt;&gt;&quot;&quot;);[.$F$2:.$F7]);[$Frames.$A$1:.$A$100];[$Frames.I$1:.I$100]);&quot;&quot;)+FLOOR([.J7]/2)+[.BG73]" office:value-type="float" office:value="6" calcext:value-type="float">
            <text:p>6</text:p>
          </table:table-cell>
          <table:table-cell table:style-name="ce59" table:formula="of:=IFERROR(COM.MICROSOFT.XLOOKUP(LOOKUP(2;1/([.$F$2:.$F7]&lt;&gt;&quot;&quot;);[.$F$2:.$F7]);[$Frames.$A$1:.$A$100];[$Frames.J$1:.J$100]);&quot;&quot;)+[.K7]+[.BH73]" office:value-type="float" office:value="8" calcext:value-type="float">
            <text:p>8</text:p>
          </table:table-cell>
          <table:table-cell table:style-name="ce57" table:formula="of:=IFERROR(COM.MICROSOFT.XLOOKUP(LOOKUP(2;1/([.$F$2:.$F7]&lt;&gt;&quot;&quot;);[.$F$2:.$F7]);[$Frames.$A$1:.$A$100];[$Frames.K$1:.K$100]);&quot;&quot;)+[.K7]+[.BI73]" office:value-type="float" office:value="0" calcext:value-type="float">
            <text:p>0</text:p>
          </table:table-cell>
          <table:table-cell table:style-name="ce59" table:formula="of:=IFERROR(COM.MICROSOFT.XLOOKUP(LOOKUP(2;1/([.$F$2:.$F7]&lt;&gt;&quot;&quot;);[.$F$2:.$F7]);[$Frames.$A$1:.$A$100];[$Frames.L$1:.L$100]);&quot;&quot;)+[.BJ73]" office:value-type="float" office:value="20" calcext:value-type="float">
            <text:p>20</text:p>
          </table:table-cell>
          <table:table-cell table:style-name="ce57" table:formula="of:=IFERROR(COM.MICROSOFT.XLOOKUP(LOOKUP(2;1/([.$F$2:.$F7]&lt;&gt;&quot;&quot;);[.$F$2:.$F7]);[$Frames.$A$1:.$A$100];[$Frames.M$1:.M$100]);&quot;&quot;)+FLOOR([.I7]/2)+[.BK73]" office:value-type="float" office:value="3" calcext:value-type="float">
            <text:p>3</text:p>
          </table:table-cell>
          <table:table-cell table:style-name="ce59" table:formula="of:=IFERROR(COM.MICROSOFT.XLOOKUP(LOOKUP(2;1/([.$F$2:.$F7]&lt;&gt;&quot;&quot;);[.$F$2:.$F7]);[$Frames.$A$1:.$A$100];[$Frames.N$1:.N$100]);&quot;&quot;)+CEILING([.A7]/2)+[.BL73]" office:value-type="float" office:value="11" calcext:value-type="float">
            <text:p>11</text:p>
          </table:table-cell>
          <table:table-cell table:style-name="ce62" table:formula="of:=IFERROR(COM.MICROSOFT.XLOOKUP(LOOKUP(2;1/([.$F$2:.$F7]&lt;&gt;&quot;&quot;);[.$F$2:.$F7]);[$Frames.$A$1:.$A$100];[$Frames.O$1:.O$100]);&quot;&quot;)+CEILING([.A7]/2)+FLOOR([.K7]/2)+[.BM73]" office:value-type="float" office:value="7" calcext:value-type="float">
            <text:p>7</text:p>
          </table:table-cell>
          <table:table-cell table:formula="of:=1+[.BN73]" office:value-type="float" office:value="1" calcext:value-type="float">
            <text:p>1</text:p>
          </table:table-cell>
          <table:table-cell/>
          <table:table-cell table:style-name="ce71" office:value-type="string" calcext:value-type="string">
            <text:p>Anti-Materiel Rifle</text:p>
          </table:table-cell>
          <table:table-cell table:style-name="ce71" office:value-type="string" calcext:value-type="string">
            <text:p>Vulture DMR/Nexus (Light)</text:p>
          </table:table-cell>
          <table:table-cell table:style-name="ce71" office:value-type="string" calcext:value-type="string">
            <text:p>Prototype Weapon I</text:p>
          </table:table-cell>
          <table:table-cell table:style-name="ce71" table:number-columns-repeated="3"/>
          <table:table-cell/>
          <table:table-cell table:style-name="ce66" table:formula="of:=COM.MICROSOFT.LET(     _xlpm.weaponText;     COM.MICROSOFT.TEXTJOIN(&quot;/&quot;;1;[.$AB7:.$AG7]);      _xlpm.weaponList;     &quot;¶&quot;&amp;SUBSTITUTE(_xlpm.weaponText;&quot;/&quot;;&quot;§¶&quot;)&amp;&quot;§&quot;;      _xlpm.systemsCost;     SUMPRODUCT(         ([$Systems.$A$11:.$A$300]&lt;&gt;&quot;&quot;)         *         COUNTIF([.$AJ7:.$AX7];[$Systems.$A$11:.$A$300])         *         [$Systems.$E$11:.$E$300]     );      _xlpm.weaponsCost;     SUMPRODUCT(         ([$Weapons.$A$2:.$A$300]&lt;&gt;&quot;&quot;)         *         (             LEN(_xlpm.weaponList)             -             LEN(                 SUBSTITUTE(                     _xlpm.weaponList;                     &quot;¶&quot;&amp;[$Weapons.$A$2:.$A$300]&amp;&quot;§&quot;;                     &quot;&quot;                 )             )         )         /         LEN(&quot;¶&quot;&amp;[$Weapons.$A$2:.$A$300]&amp;&quot;§&quot;)         *         [$Weapons.$H$2:.$H$300]     );      IF(         COUNTA([.$AB7:.$AG7])+COUNTA([.$AJ7:.$AX7]);         _xlpm.systemsCost+_xlpm.weaponsCost;         &quot;&quot;     ) )" office:value-type="float" office:value="7" calcext:value-type="float">
            <text:p>7</text:p>
          </table:table-cell>
          <table:table-cell table:style-name="ce8" table:content-validation-name="val11" office:value-type="string" calcext:value-type="string">
            <text:p>Enlightenment-Class NHP</text:p>
          </table:table-cell>
          <table:table-cell table:style-name="ce8" table:content-validation-name="val11" office:value-type="string" calcext:value-type="string">
            <text:p>Pattern-A Jericho Deployable Cover</text:p>
          </table:table-cell>
          <table:table-cell table:style-name="ce8" table:content-validation-name="val11" office:value-type="string" calcext:value-type="string">
            <text:p>High-Stress Mag Clamps</text:p>
          </table:table-cell>
          <table:table-cell table:style-name="ce8" table:content-validation-name="val11" office:value-type="string" calcext:value-type="string">
            <text:p>Rapid Burst Jump Jet Systems</text:p>
          </table:table-cell>
          <table:table-cell table:style-name="ce8" table:content-validation-name="val11" office:value-type="string" calcext:value-type="string">
            <text:p>Core Siphon</text:p>
          </table:table-cell>
          <table:table-cell table:style-name="ce8" table:content-validation-name="val11" table:number-columns-repeated="12"/>
          <table:table-cell table:number-columns-repeated="2"/>
          <table:table-cell table:number-matrix-columns-spanned="50" table:number-matrix-rows-spanned="1" table:formula="of:=TRANSPOSE(     COM.MICROSOFT.FILTER(         [$Frames.$A$2:.$A$100];         ([$Frames.$C$2:.$C$100]=&quot;&quot;)         +         (COUNTIF([$Build.$E$5:.$E10];[$Frames.$C$2:.$C$100])&gt;0);         &quot;&quot;     ) )" office:value-type="string" office:string-value="Everest" calcext:value-type="string">
            <text:p>Everest</text:p>
          </table:table-cell>
          <table:table-cell office:value-type="string" office:string-value="Sagarmatha" calcext:value-type="string">
            <text:p>Sagarmatha</text:p>
          </table:table-cell>
          <table:table-cell office:value-type="string" office:string-value="Chomolungma" calcext:value-type="string">
            <text:p>Chomolungma</text:p>
          </table:table-cell>
          <table:table-cell office:value-type="string" office:string-value="Death’s Head" calcext:value-type="string">
            <text:p>Death’s Head</text:p>
          </table:table-cell>
          <table:table-cell table:content-validation-name="val12" office:value-type="string" office:string-value="Balor" calcext:value-type="string">
            <text:p>Balor</text:p>
          </table:table-cell>
          <table:table-cell office:value-type="string" office:string-value="Hecatoncheires" calcext:value-type="string">
            <text:p>Hecatoncheires</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80"/>
        </table:table-row>
        <table:table-row table:style-name="ro2">
          <table:table-cell office:value-type="float" office:value="3" calcext:value-type="float">
            <text:p>3</text:p>
          </table:table-cell>
          <table:table-cell table:style-name="ce8" table:content-validation-name="val1" office:value-type="string" calcext:value-type="string">
            <text:p>Get Somewhere Quickly</text:p>
          </table:table-cell>
          <table:table-cell table:style-name="ce14" table:content-validation-name="val3" office:value-type="string" calcext:value-type="string">
            <text:p>Black Thumb I</text:p>
          </table:table-cell>
          <table:table-cell table:style-name="ce8" table:content-validation-name="val4" office:value-type="string" calcext:value-type="string">
            <text:p>Agility</text:p>
          </table:table-cell>
          <table:table-cell table:style-name="ce19" table:content-validation-name="val5" office:value-type="string" calcext:value-type="string">
            <text:p>Death’s Head III</text:p>
          </table:table-cell>
          <table:table-cell table:style-name="ce8" table:content-validation-name="val6"/>
          <table:table-cell table:style-name="ce21" table:content-validation-name="val7" office:value-type="string" calcext:value-type="string">
            <text:p>Improved Armament</text:p>
          </table:table-cell>
          <table:table-cell/>
          <table:table-cell table:style-name="ce38" table:formula="of:=COUNTIF([.$D$2:.$D8];&quot;Hull&quot;)" office:value-type="float" office:value="2" calcext:value-type="float">
            <text:p>2</text:p>
          </table:table-cell>
          <table:table-cell table:style-name="ce40" table:formula="of:=COUNTIF([.$D$2:.$D8];&quot;Agility&quot;)" office:value-type="float" office:value="3" calcext:value-type="float">
            <text:p>3</text:p>
          </table:table-cell>
          <table:table-cell table:style-name="ce38" table:formula="of:=COUNTIF([.$D$2:.$D8];&quot;Systems&quot;)" office:value-type="float" office:value="0" calcext:value-type="float">
            <text:p>0</text:p>
          </table:table-cell>
          <table:table-cell table:style-name="ce40" table:formula="of:=COUNTIF([.$D$2:.$D8];&quot;Engineering&quot;)" office:value-type="float" office:value="0" calcext:value-type="float">
            <text:p>0</text:p>
          </table:table-cell>
          <table:table-cell/>
          <table:table-cell table:formula="of:=IFERROR(COM.MICROSOFT.XLOOKUP(LOOKUP(2;1/([.$F$2:.$F8]&lt;&gt;&quot;&quot;);[.$F$2:.$F8]);[$Frames.$A$1:.$A$100];[$Frames.D$1:.D$100]);&quot;&quot;)" office:value-type="float" office:value="1" calcext:value-type="float">
            <text:p>1</text:p>
          </table:table-cell>
          <table:table-cell table:style-name="ce57" table:formula="of:=IFERROR(COM.MICROSOFT.XLOOKUP(LOOKUP(2;1/([.$F$2:.$F8]&lt;&gt;&quot;&quot;);[.$F$2:.$F8]);[$Frames.$A$1:.$A$100];[$Frames.E$1:.E$100]);&quot;&quot;)+CEILING([.A8]/2)+2*[.I8]+[.BC74]" office:value-type="float" office:value="14" calcext:value-type="float">
            <text:p>14</text:p>
          </table:table-cell>
          <table:table-cell table:style-name="ce59" table:formula="of:=MIN(4; IFERROR(COM.MICROSOFT.XLOOKUP(LOOKUP(2;1/([.$F$2:.$F8]&lt;&gt;&quot;&quot;);[.$F$2:.$F8]);[$Frames.$A$1:.$A$100];[$Frames.F$1:.F$100]);&quot;&quot;)+[.BD74])" office:value-type="float" office:value="0" calcext:value-type="float">
            <text:p>0</text:p>
          </table:table-cell>
          <table:table-cell table:style-name="ce57" table:formula="of:=IFERROR(COM.MICROSOFT.XLOOKUP(LOOKUP(2;1/([.$F$2:.$F8]&lt;&gt;&quot;&quot;);[.$F$2:.$F8]);[$Frames.$A$1:.$A$100];[$Frames.G$1:.G$100]);&quot;&quot;)+[.L8]+[.BE74]" office:value-type="float" office:value="6" calcext:value-type="float">
            <text:p>6</text:p>
          </table:table-cell>
          <table:table-cell table:style-name="ce59" table:formula="of:=IFERROR(COM.MICROSOFT.XLOOKUP(LOOKUP(2;1/([.$F$2:.$F8]&lt;&gt;&quot;&quot;);[.$F$2:.$F8]);[$Frames.$A$1:.$A$100];[$Frames.H$1:.H$100]);&quot;&quot;)+[.J8]+[.BF74]" office:value-type="float" office:value="13" calcext:value-type="float">
            <text:p>13</text:p>
          </table:table-cell>
          <table:table-cell table:style-name="ce57" table:formula="of:=IFERROR(COM.MICROSOFT.XLOOKUP(LOOKUP(2;1/([.$F$2:.$F8]&lt;&gt;&quot;&quot;);[.$F$2:.$F8]);[$Frames.$A$1:.$A$100];[$Frames.I$1:.I$100]);&quot;&quot;)+FLOOR([.J8]/2)+[.BG74]" office:value-type="float" office:value="6" calcext:value-type="float">
            <text:p>6</text:p>
          </table:table-cell>
          <table:table-cell table:style-name="ce59" table:formula="of:=IFERROR(COM.MICROSOFT.XLOOKUP(LOOKUP(2;1/([.$F$2:.$F8]&lt;&gt;&quot;&quot;);[.$F$2:.$F8]);[$Frames.$A$1:.$A$100];[$Frames.J$1:.J$100]);&quot;&quot;)+[.K8]+[.BH74]" office:value-type="float" office:value="8" calcext:value-type="float">
            <text:p>8</text:p>
          </table:table-cell>
          <table:table-cell table:style-name="ce57" table:formula="of:=IFERROR(COM.MICROSOFT.XLOOKUP(LOOKUP(2;1/([.$F$2:.$F8]&lt;&gt;&quot;&quot;);[.$F$2:.$F8]);[$Frames.$A$1:.$A$100];[$Frames.K$1:.K$100]);&quot;&quot;)+[.K8]+[.BI74]" office:value-type="float" office:value="0" calcext:value-type="float">
            <text:p>0</text:p>
          </table:table-cell>
          <table:table-cell table:style-name="ce59" table:formula="of:=IFERROR(COM.MICROSOFT.XLOOKUP(LOOKUP(2;1/([.$F$2:.$F8]&lt;&gt;&quot;&quot;);[.$F$2:.$F8]);[$Frames.$A$1:.$A$100];[$Frames.L$1:.L$100]);&quot;&quot;)+[.BJ74]" office:value-type="float" office:value="20" calcext:value-type="float">
            <text:p>20</text:p>
          </table:table-cell>
          <table:table-cell table:style-name="ce57" table:formula="of:=IFERROR(COM.MICROSOFT.XLOOKUP(LOOKUP(2;1/([.$F$2:.$F8]&lt;&gt;&quot;&quot;);[.$F$2:.$F8]);[$Frames.$A$1:.$A$100];[$Frames.M$1:.M$100]);&quot;&quot;)+FLOOR([.I8]/2)+[.BK74]" office:value-type="float" office:value="3" calcext:value-type="float">
            <text:p>3</text:p>
          </table:table-cell>
          <table:table-cell table:style-name="ce59" table:formula="of:=IFERROR(COM.MICROSOFT.XLOOKUP(LOOKUP(2;1/([.$F$2:.$F8]&lt;&gt;&quot;&quot;);[.$F$2:.$F8]);[$Frames.$A$1:.$A$100];[$Frames.N$1:.N$100]);&quot;&quot;)+CEILING([.A8]/2)+[.BL74]" office:value-type="float" office:value="12" calcext:value-type="float">
            <text:p>12</text:p>
          </table:table-cell>
          <table:table-cell table:style-name="ce62" table:formula="of:=IFERROR(COM.MICROSOFT.XLOOKUP(LOOKUP(2;1/([.$F$2:.$F8]&lt;&gt;&quot;&quot;);[.$F$2:.$F8]);[$Frames.$A$1:.$A$100];[$Frames.O$1:.O$100]);&quot;&quot;)+CEILING([.A8]/2)+FLOOR([.K8]/2)+[.BM74]" office:value-type="float" office:value="8" calcext:value-type="float">
            <text:p>8</text:p>
          </table:table-cell>
          <table:table-cell table:formula="of:=1+[.BN74]" office:value-type="float" office:value="1" calcext:value-type="float">
            <text:p>1</text:p>
          </table:table-cell>
          <table:table-cell/>
          <table:table-cell table:style-name="ce71" office:value-type="string" calcext:value-type="string">
            <text:p>Railgun</text:p>
          </table:table-cell>
          <table:table-cell table:style-name="ce71" office:value-type="string" calcext:value-type="string">
            <text:p>Vulture DMR/Nexus (Light)</text:p>
          </table:table-cell>
          <table:table-cell table:style-name="ce71" office:value-type="string" calcext:value-type="string">
            <text:p>Prototype Weapon I</text:p>
          </table:table-cell>
          <table:table-cell table:style-name="ce71" table:number-columns-repeated="3"/>
          <table:table-cell/>
          <table:table-cell table:style-name="ce66" table:formula="of:=COM.MICROSOFT.LET(     _xlpm.weaponText;     COM.MICROSOFT.TEXTJOIN(&quot;/&quot;;1;[.$AB8:.$AG8]);      _xlpm.weaponList;     &quot;¶&quot;&amp;SUBSTITUTE(_xlpm.weaponText;&quot;/&quot;;&quot;§¶&quot;)&amp;&quot;§&quot;;      _xlpm.systemsCost;     SUMPRODUCT(         ([$Systems.$A$11:.$A$300]&lt;&gt;&quot;&quot;)         *         COUNTIF([.$AJ8:.$AX8];[$Systems.$A$11:.$A$300])         *         [$Systems.$E$11:.$E$300]     );      _xlpm.weaponsCost;     SUMPRODUCT(         ([$Weapons.$A$2:.$A$300]&lt;&gt;&quot;&quot;)         *         (             LEN(_xlpm.weaponList)             -             LEN(                 SUBSTITUTE(                     _xlpm.weaponList;                     &quot;¶&quot;&amp;[$Weapons.$A$2:.$A$300]&amp;&quot;§&quot;;                     &quot;&quot;                 )             )         )         /         LEN(&quot;¶&quot;&amp;[$Weapons.$A$2:.$A$300]&amp;&quot;§&quot;)         *         [$Weapons.$H$2:.$H$300]     );      IF(         COUNTA([.$AB8:.$AG8])+COUNTA([.$AJ8:.$AX8]);         _xlpm.systemsCost+_xlpm.weaponsCost;         &quot;&quot;     ) )" office:value-type="float" office:value="8" calcext:value-type="float">
            <text:p>8</text:p>
          </table:table-cell>
          <table:table-cell table:style-name="ce8" table:content-validation-name="val11" office:value-type="string" calcext:value-type="string">
            <text:p>Enlightenment-Class NHP</text:p>
          </table:table-cell>
          <table:table-cell table:style-name="ce8" table:content-validation-name="val11" office:value-type="string" calcext:value-type="string">
            <text:p>Pattern-A Jericho Deployable Cover</text:p>
          </table:table-cell>
          <table:table-cell table:style-name="ce8" table:content-validation-name="val11" office:value-type="string" calcext:value-type="string">
            <text:p>High-Stress Mag Clamps</text:p>
          </table:table-cell>
          <table:table-cell table:style-name="ce8" table:content-validation-name="val11" office:value-type="string" calcext:value-type="string">
            <text:p>Kinetic Compensator</text:p>
          </table:table-cell>
          <table:table-cell table:style-name="ce8" table:content-validation-name="val11" office:value-type="string" calcext:value-type="string">
            <text:p>Core Siphon</text:p>
          </table:table-cell>
          <table:table-cell table:style-name="ce8" table:content-validation-name="val11"/>
          <table:table-cell table:style-name="ce8" table:content-validation-name="val11" office:value-type="string" calcext:value-type="string">
            <text:p>Armament Redundancy</text:p>
          </table:table-cell>
          <table:table-cell table:style-name="ce8" table:content-validation-name="val11" table:number-columns-repeated="10"/>
          <table:table-cell table:number-columns-repeated="2"/>
          <table:table-cell table:number-matrix-columns-spanned="50" table:number-matrix-rows-spanned="1" table:formula="of:=TRANSPOSE(     COM.MICROSOFT.FILTER(         [$Frames.$A$2:.$A$100];         ([$Frames.$C$2:.$C$100]=&quot;&quot;)         +         (COUNTIF([$Build.$E$5:.$E11];[$Frames.$C$2:.$C$100])&gt;0);         &quot;&quot;     ) )" office:value-type="string" office:string-value="Everest" calcext:value-type="string">
            <text:p>Everest</text:p>
          </table:table-cell>
          <table:table-cell office:value-type="string" office:string-value="Sagarmatha" calcext:value-type="string">
            <text:p>Sagarmatha</text:p>
          </table:table-cell>
          <table:table-cell office:value-type="string" office:string-value="Chomolungma" calcext:value-type="string">
            <text:p>Chomolungma</text:p>
          </table:table-cell>
          <table:table-cell office:value-type="string" office:string-value="Death’s Head" calcext:value-type="string">
            <text:p>Death’s Head</text:p>
          </table:table-cell>
          <table:table-cell table:content-validation-name="val12" office:value-type="string" office:string-value="Balor" calcext:value-type="string">
            <text:p>Balor</text:p>
          </table:table-cell>
          <table:table-cell office:value-type="string" office:string-value="Hecatoncheires" calcext:value-type="string">
            <text:p>Hecatoncheires</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80"/>
        </table:table-row>
        <table:table-row table:style-name="ro2">
          <table:table-cell office:value-type="float" office:value="4" calcext:value-type="float">
            <text:p>4</text:p>
          </table:table-cell>
          <table:table-cell table:style-name="ce8" table:content-validation-name="val1" office:value-type="string" calcext:value-type="string">
            <text:p>Stay Cool</text:p>
          </table:table-cell>
          <table:table-cell table:style-name="ce14" table:content-validation-name="val3" office:value-type="string" calcext:value-type="string">
            <text:p>Black Thumb II</text:p>
          </table:table-cell>
          <table:table-cell table:style-name="ce8" table:content-validation-name="val4" office:value-type="string" calcext:value-type="string">
            <text:p>Agility</text:p>
          </table:table-cell>
          <table:table-cell table:style-name="ce19" table:content-validation-name="val5" office:value-type="string" calcext:value-type="string">
            <text:p>Balor I</text:p>
          </table:table-cell>
          <table:table-cell table:style-name="ce8" table:content-validation-name="val6"/>
          <table:table-cell table:style-name="ce12"/>
          <table:table-cell/>
          <table:table-cell table:style-name="ce38" table:formula="of:=COUNTIF([.$D$2:.$D9];&quot;Hull&quot;)" office:value-type="float" office:value="2" calcext:value-type="float">
            <text:p>2</text:p>
          </table:table-cell>
          <table:table-cell table:style-name="ce40" table:formula="of:=COUNTIF([.$D$2:.$D9];&quot;Agility&quot;)" office:value-type="float" office:value="4" calcext:value-type="float">
            <text:p>4</text:p>
          </table:table-cell>
          <table:table-cell table:style-name="ce38" table:formula="of:=COUNTIF([.$D$2:.$D9];&quot;Systems&quot;)" office:value-type="float" office:value="0" calcext:value-type="float">
            <text:p>0</text:p>
          </table:table-cell>
          <table:table-cell table:style-name="ce40" table:formula="of:=COUNTIF([.$D$2:.$D9];&quot;Engineering&quot;)" office:value-type="float" office:value="0" calcext:value-type="float">
            <text:p>0</text:p>
          </table:table-cell>
          <table:table-cell/>
          <table:table-cell table:formula="of:=IFERROR(COM.MICROSOFT.XLOOKUP(LOOKUP(2;1/([.$F$2:.$F9]&lt;&gt;&quot;&quot;);[.$F$2:.$F9]);[$Frames.$A$1:.$A$100];[$Frames.D$1:.D$100]);&quot;&quot;)" office:value-type="float" office:value="1" calcext:value-type="float">
            <text:p>1</text:p>
          </table:table-cell>
          <table:table-cell table:style-name="ce57" table:formula="of:=IFERROR(COM.MICROSOFT.XLOOKUP(LOOKUP(2;1/([.$F$2:.$F9]&lt;&gt;&quot;&quot;);[.$F$2:.$F9]);[$Frames.$A$1:.$A$100];[$Frames.E$1:.E$100]);&quot;&quot;)+CEILING([.A9]/2)+2*[.I9]+[.BC75]" office:value-type="float" office:value="14" calcext:value-type="float">
            <text:p>14</text:p>
          </table:table-cell>
          <table:table-cell table:style-name="ce59" table:formula="of:=MIN(4; IFERROR(COM.MICROSOFT.XLOOKUP(LOOKUP(2;1/([.$F$2:.$F9]&lt;&gt;&quot;&quot;);[.$F$2:.$F9]);[$Frames.$A$1:.$A$100];[$Frames.F$1:.F$100]);&quot;&quot;)+[.BD75])" office:value-type="float" office:value="0" calcext:value-type="float">
            <text:p>0</text:p>
          </table:table-cell>
          <table:table-cell table:style-name="ce57" table:formula="of:=IFERROR(COM.MICROSOFT.XLOOKUP(LOOKUP(2;1/([.$F$2:.$F9]&lt;&gt;&quot;&quot;);[.$F$2:.$F9]);[$Frames.$A$1:.$A$100];[$Frames.G$1:.G$100]);&quot;&quot;)+[.L9]+[.BE75]" office:value-type="float" office:value="6" calcext:value-type="float">
            <text:p>6</text:p>
          </table:table-cell>
          <table:table-cell table:style-name="ce59" table:formula="of:=IFERROR(COM.MICROSOFT.XLOOKUP(LOOKUP(2;1/([.$F$2:.$F9]&lt;&gt;&quot;&quot;);[.$F$2:.$F9]);[$Frames.$A$1:.$A$100];[$Frames.H$1:.H$100]);&quot;&quot;)+[.J9]+[.BF75]" office:value-type="float" office:value="14" calcext:value-type="float">
            <text:p>14</text:p>
          </table:table-cell>
          <table:table-cell table:style-name="ce57" table:formula="of:=IFERROR(COM.MICROSOFT.XLOOKUP(LOOKUP(2;1/([.$F$2:.$F9]&lt;&gt;&quot;&quot;);[.$F$2:.$F9]);[$Frames.$A$1:.$A$100];[$Frames.I$1:.I$100]);&quot;&quot;)+FLOOR([.J9]/2)+[.BG75]" office:value-type="float" office:value="7" calcext:value-type="float">
            <text:p>7</text:p>
          </table:table-cell>
          <table:table-cell table:style-name="ce59" table:formula="of:=IFERROR(COM.MICROSOFT.XLOOKUP(LOOKUP(2;1/([.$F$2:.$F9]&lt;&gt;&quot;&quot;);[.$F$2:.$F9]);[$Frames.$A$1:.$A$100];[$Frames.J$1:.J$100]);&quot;&quot;)+[.K9]+[.BH75]" office:value-type="float" office:value="8" calcext:value-type="float">
            <text:p>8</text:p>
          </table:table-cell>
          <table:table-cell table:style-name="ce57" table:formula="of:=IFERROR(COM.MICROSOFT.XLOOKUP(LOOKUP(2;1/([.$F$2:.$F9]&lt;&gt;&quot;&quot;);[.$F$2:.$F9]);[$Frames.$A$1:.$A$100];[$Frames.K$1:.K$100]);&quot;&quot;)+[.K9]+[.BI75]" office:value-type="float" office:value="0" calcext:value-type="float">
            <text:p>0</text:p>
          </table:table-cell>
          <table:table-cell table:style-name="ce59" table:formula="of:=IFERROR(COM.MICROSOFT.XLOOKUP(LOOKUP(2;1/([.$F$2:.$F9]&lt;&gt;&quot;&quot;);[.$F$2:.$F9]);[$Frames.$A$1:.$A$100];[$Frames.L$1:.L$100]);&quot;&quot;)+[.BJ75]" office:value-type="float" office:value="20" calcext:value-type="float">
            <text:p>20</text:p>
          </table:table-cell>
          <table:table-cell table:style-name="ce57" table:formula="of:=IFERROR(COM.MICROSOFT.XLOOKUP(LOOKUP(2;1/([.$F$2:.$F9]&lt;&gt;&quot;&quot;);[.$F$2:.$F9]);[$Frames.$A$1:.$A$100];[$Frames.M$1:.M$100]);&quot;&quot;)+FLOOR([.I9]/2)+[.BK75]" office:value-type="float" office:value="3" calcext:value-type="float">
            <text:p>3</text:p>
          </table:table-cell>
          <table:table-cell table:style-name="ce59" table:formula="of:=IFERROR(COM.MICROSOFT.XLOOKUP(LOOKUP(2;1/([.$F$2:.$F9]&lt;&gt;&quot;&quot;);[.$F$2:.$F9]);[$Frames.$A$1:.$A$100];[$Frames.N$1:.N$100]);&quot;&quot;)+CEILING([.A9]/2)+[.BL75]" office:value-type="float" office:value="12" calcext:value-type="float">
            <text:p>12</text:p>
          </table:table-cell>
          <table:table-cell table:style-name="ce62" table:formula="of:=IFERROR(COM.MICROSOFT.XLOOKUP(LOOKUP(2;1/([.$F$2:.$F9]&lt;&gt;&quot;&quot;);[.$F$2:.$F9]);[$Frames.$A$1:.$A$100];[$Frames.O$1:.O$100]);&quot;&quot;)+CEILING([.A9]/2)+FLOOR([.K9]/2)+[.BM75]" office:value-type="float" office:value="8" calcext:value-type="float">
            <text:p>8</text:p>
          </table:table-cell>
          <table:table-cell table:formula="of:=1+[.BN75]" office:value-type="float" office:value="1" calcext:value-type="float">
            <text:p>1</text:p>
          </table:table-cell>
          <table:table-cell/>
          <table:table-cell table:style-name="ce71" office:value-type="string" calcext:value-type="string">
            <text:p>Railgun</text:p>
          </table:table-cell>
          <table:table-cell table:style-name="ce71" office:value-type="string" calcext:value-type="string">
            <text:p>Vulture DMR/Nexus (Light)</text:p>
          </table:table-cell>
          <table:table-cell table:style-name="ce71" office:value-type="string" calcext:value-type="string">
            <text:p>Prototype Weapon I</text:p>
          </table:table-cell>
          <table:table-cell table:style-name="ce71" table:number-columns-repeated="3"/>
          <table:table-cell/>
          <table:table-cell table:style-name="ce66" table:formula="of:=COM.MICROSOFT.LET(     _xlpm.weaponText;     COM.MICROSOFT.TEXTJOIN(&quot;/&quot;;1;[.$AB9:.$AG9]);      _xlpm.weaponList;     &quot;¶&quot;&amp;SUBSTITUTE(_xlpm.weaponText;&quot;/&quot;;&quot;§¶&quot;)&amp;&quot;§&quot;;      _xlpm.systemsCost;     SUMPRODUCT(         ([$Systems.$A$11:.$A$300]&lt;&gt;&quot;&quot;)         *         COUNTIF([.$AJ9:.$AX9];[$Systems.$A$11:.$A$300])         *         [$Systems.$E$11:.$E$300]     );      _xlpm.weaponsCost;     SUMPRODUCT(         ([$Weapons.$A$2:.$A$300]&lt;&gt;&quot;&quot;)         *         (             LEN(_xlpm.weaponList)             -             LEN(                 SUBSTITUTE(                     _xlpm.weaponList;                     &quot;¶&quot;&amp;[$Weapons.$A$2:.$A$300]&amp;&quot;§&quot;;                     &quot;&quot;                 )             )         )         /         LEN(&quot;¶&quot;&amp;[$Weapons.$A$2:.$A$300]&amp;&quot;§&quot;)         *         [$Weapons.$H$2:.$H$300]     );      IF(         COUNTA([.$AB9:.$AG9])+COUNTA([.$AJ9:.$AX9]);         _xlpm.systemsCost+_xlpm.weaponsCost;         &quot;&quot;     ) )" office:value-type="float" office:value="8" calcext:value-type="float">
            <text:p>8</text:p>
          </table:table-cell>
          <table:table-cell table:style-name="ce8" table:content-validation-name="val11" office:value-type="string" calcext:value-type="string">
            <text:p>Enlightenment-Class NHP</text:p>
          </table:table-cell>
          <table:table-cell table:style-name="ce8" table:content-validation-name="val11" office:value-type="string" calcext:value-type="string">
            <text:p>Pattern-A Jericho Deployable Cover</text:p>
          </table:table-cell>
          <table:table-cell table:style-name="ce8" table:content-validation-name="val11" office:value-type="string" calcext:value-type="string">
            <text:p>High-Stress Mag Clamps</text:p>
          </table:table-cell>
          <table:table-cell table:style-name="ce8" table:content-validation-name="val11" office:value-type="string" calcext:value-type="string">
            <text:p>Kinetic Compensator</text:p>
          </table:table-cell>
          <table:table-cell table:style-name="ce8" table:content-validation-name="val11" office:value-type="string" calcext:value-type="string">
            <text:p>Core Siphon</text:p>
          </table:table-cell>
          <table:table-cell table:style-name="ce8" table:content-validation-name="val11"/>
          <table:table-cell table:style-name="ce8" table:content-validation-name="val11" office:value-type="string" calcext:value-type="string">
            <text:p>Armament Redundancy</text:p>
          </table:table-cell>
          <table:table-cell table:style-name="ce8" table:content-validation-name="val11" table:number-columns-repeated="10"/>
          <table:table-cell table:number-columns-repeated="2"/>
          <table:table-cell table:number-matrix-columns-spanned="51" table:number-matrix-rows-spanned="1" table:formula="of:=TRANSPOSE(     COM.MICROSOFT.FILTER(         [$Frames.$A$2:.$A$100];         ([$Frames.$C$2:.$C$100]=&quot;&quot;)         +         (COUNTIF([$Build.$E$5:.$E12];[$Frames.$C$2:.$C$100])&gt;0);         &quot;&quot;     ) )" office:value-type="string" office:string-value="Everest" calcext:value-type="string">
            <text:p>Everest</text:p>
          </table:table-cell>
          <table:table-cell office:value-type="string" office:string-value="Sagarmatha" calcext:value-type="string">
            <text:p>Sagarmatha</text:p>
          </table:table-cell>
          <table:table-cell office:value-type="string" office:string-value="Chomolungma" calcext:value-type="string">
            <text:p>Chomolungma</text:p>
          </table:table-cell>
          <table:table-cell office:value-type="string" office:string-value="Death’s Head" calcext:value-type="string">
            <text:p>Death’s Head</text:p>
          </table:table-cell>
          <table:table-cell table:content-validation-name="val12" office:value-type="string" office:string-value="Balor" calcext:value-type="string">
            <text:p>Balor</text:p>
          </table:table-cell>
          <table:table-cell office:value-type="string" office:string-value="Hecatoncheires" calcext:value-type="string">
            <text:p>Hecatoncheires</text:p>
          </table:table-cell>
          <table:table-cell office:value-type="string" office:string-value="Goblin" calcext:value-type="string">
            <text:p>Goblin</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79"/>
        </table:table-row>
        <table:table-row table:style-name="ro2">
          <table:table-cell office:value-type="float" office:value="5" calcext:value-type="float">
            <text:p>5</text:p>
          </table:table-cell>
          <table:table-cell table:style-name="ce8" table:content-validation-name="val1" office:value-type="string" calcext:value-type="string">
            <text:p>Read a Situation</text:p>
          </table:table-cell>
          <table:table-cell table:style-name="ce14" table:content-validation-name="val3" office:value-type="string" calcext:value-type="string">
            <text:p>Crack Shot II</text:p>
          </table:table-cell>
          <table:table-cell table:style-name="ce18" table:content-validation-name="val4" office:value-type="string" calcext:value-type="string">
            <text:p>Systems</text:p>
          </table:table-cell>
          <table:table-cell table:style-name="ce19" table:content-validation-name="val5" office:value-type="string" calcext:value-type="string">
            <text:p>Balor II</text:p>
          </table:table-cell>
          <table:table-cell table:style-name="ce8" table:content-validation-name="val6"/>
          <table:table-cell table:style-name="ce12"/>
          <table:table-cell/>
          <table:table-cell table:style-name="ce38" table:formula="of:=COUNTIF([.$D$2:.$D10];&quot;Hull&quot;)" office:value-type="float" office:value="2" calcext:value-type="float">
            <text:p>2</text:p>
          </table:table-cell>
          <table:table-cell table:style-name="ce40" table:formula="of:=COUNTIF([.$D$2:.$D10];&quot;Agility&quot;)" office:value-type="float" office:value="4" calcext:value-type="float">
            <text:p>4</text:p>
          </table:table-cell>
          <table:table-cell table:style-name="ce38" table:formula="of:=COUNTIF([.$D$2:.$D10];&quot;Systems&quot;)" office:value-type="float" office:value="1" calcext:value-type="float">
            <text:p>1</text:p>
          </table:table-cell>
          <table:table-cell table:style-name="ce40" table:formula="of:=COUNTIF([.$D$2:.$D10];&quot;Engineering&quot;)" office:value-type="float" office:value="0" calcext:value-type="float">
            <text:p>0</text:p>
          </table:table-cell>
          <table:table-cell/>
          <table:table-cell table:formula="of:=IFERROR(COM.MICROSOFT.XLOOKUP(LOOKUP(2;1/([.$F$2:.$F10]&lt;&gt;&quot;&quot;);[.$F$2:.$F10]);[$Frames.$A$1:.$A$100];[$Frames.D$1:.D$100]);&quot;&quot;)" office:value-type="float" office:value="1" calcext:value-type="float">
            <text:p>1</text:p>
          </table:table-cell>
          <table:table-cell table:style-name="ce57" table:formula="of:=IFERROR(COM.MICROSOFT.XLOOKUP(LOOKUP(2;1/([.$F$2:.$F10]&lt;&gt;&quot;&quot;);[.$F$2:.$F10]);[$Frames.$A$1:.$A$100];[$Frames.E$1:.E$100]);&quot;&quot;)+CEILING([.A10]/2)+2*[.I10]+[.BC76]" office:value-type="float" office:value="15" calcext:value-type="float">
            <text:p>15</text:p>
          </table:table-cell>
          <table:table-cell table:style-name="ce59" table:formula="of:=MIN(4; IFERROR(COM.MICROSOFT.XLOOKUP(LOOKUP(2;1/([.$F$2:.$F10]&lt;&gt;&quot;&quot;);[.$F$2:.$F10]);[$Frames.$A$1:.$A$100];[$Frames.F$1:.F$100]);&quot;&quot;)+[.BD76])" office:value-type="float" office:value="0" calcext:value-type="float">
            <text:p>0</text:p>
          </table:table-cell>
          <table:table-cell table:style-name="ce57" table:formula="of:=IFERROR(COM.MICROSOFT.XLOOKUP(LOOKUP(2;1/([.$F$2:.$F10]&lt;&gt;&quot;&quot;);[.$F$2:.$F10]);[$Frames.$A$1:.$A$100];[$Frames.G$1:.G$100]);&quot;&quot;)+[.L10]+[.BE76]" office:value-type="float" office:value="6" calcext:value-type="float">
            <text:p>6</text:p>
          </table:table-cell>
          <table:table-cell table:style-name="ce59" table:formula="of:=IFERROR(COM.MICROSOFT.XLOOKUP(LOOKUP(2;1/([.$F$2:.$F10]&lt;&gt;&quot;&quot;);[.$F$2:.$F10]);[$Frames.$A$1:.$A$100];[$Frames.H$1:.H$100]);&quot;&quot;)+[.J10]+[.BF76]" office:value-type="float" office:value="14" calcext:value-type="float">
            <text:p>14</text:p>
          </table:table-cell>
          <table:table-cell table:style-name="ce57" table:formula="of:=IFERROR(COM.MICROSOFT.XLOOKUP(LOOKUP(2;1/([.$F$2:.$F10]&lt;&gt;&quot;&quot;);[.$F$2:.$F10]);[$Frames.$A$1:.$A$100];[$Frames.I$1:.I$100]);&quot;&quot;)+FLOOR([.J10]/2)+[.BG76]" office:value-type="float" office:value="7" calcext:value-type="float">
            <text:p>7</text:p>
          </table:table-cell>
          <table:table-cell table:style-name="ce59" table:formula="of:=IFERROR(COM.MICROSOFT.XLOOKUP(LOOKUP(2;1/([.$F$2:.$F10]&lt;&gt;&quot;&quot;);[.$F$2:.$F10]);[$Frames.$A$1:.$A$100];[$Frames.J$1:.J$100]);&quot;&quot;)+[.K10]+[.BH76]" office:value-type="float" office:value="9" calcext:value-type="float">
            <text:p>9</text:p>
          </table:table-cell>
          <table:table-cell table:style-name="ce57" table:formula="of:=IFERROR(COM.MICROSOFT.XLOOKUP(LOOKUP(2;1/([.$F$2:.$F10]&lt;&gt;&quot;&quot;);[.$F$2:.$F10]);[$Frames.$A$1:.$A$100];[$Frames.K$1:.K$100]);&quot;&quot;)+[.K10]+[.BI76]" office:value-type="float" office:value="1" calcext:value-type="float">
            <text:p>1</text:p>
          </table:table-cell>
          <table:table-cell table:style-name="ce59" table:formula="of:=IFERROR(COM.MICROSOFT.XLOOKUP(LOOKUP(2;1/([.$F$2:.$F10]&lt;&gt;&quot;&quot;);[.$F$2:.$F10]);[$Frames.$A$1:.$A$100];[$Frames.L$1:.L$100]);&quot;&quot;)+[.BJ76]" office:value-type="float" office:value="20" calcext:value-type="float">
            <text:p>20</text:p>
          </table:table-cell>
          <table:table-cell table:style-name="ce57" table:formula="of:=IFERROR(COM.MICROSOFT.XLOOKUP(LOOKUP(2;1/([.$F$2:.$F10]&lt;&gt;&quot;&quot;);[.$F$2:.$F10]);[$Frames.$A$1:.$A$100];[$Frames.M$1:.M$100]);&quot;&quot;)+FLOOR([.I10]/2)+[.BK76]" office:value-type="float" office:value="3" calcext:value-type="float">
            <text:p>3</text:p>
          </table:table-cell>
          <table:table-cell table:style-name="ce59" table:formula="of:=IFERROR(COM.MICROSOFT.XLOOKUP(LOOKUP(2;1/([.$F$2:.$F10]&lt;&gt;&quot;&quot;);[.$F$2:.$F10]);[$Frames.$A$1:.$A$100];[$Frames.N$1:.N$100]);&quot;&quot;)+CEILING([.A10]/2)+[.BL76]" office:value-type="float" office:value="13" calcext:value-type="float">
            <text:p>13</text:p>
          </table:table-cell>
          <table:table-cell table:style-name="ce62" table:formula="of:=IFERROR(COM.MICROSOFT.XLOOKUP(LOOKUP(2;1/([.$F$2:.$F10]&lt;&gt;&quot;&quot;);[.$F$2:.$F10]);[$Frames.$A$1:.$A$100];[$Frames.O$1:.O$100]);&quot;&quot;)+CEILING([.A10]/2)+FLOOR([.K10]/2)+[.BM76]" office:value-type="float" office:value="9" calcext:value-type="float">
            <text:p>9</text:p>
          </table:table-cell>
          <table:table-cell table:formula="of:=1+[.BN76]" office:value-type="float" office:value="1" calcext:value-type="float">
            <text:p>1</text:p>
          </table:table-cell>
          <table:table-cell/>
          <table:table-cell table:style-name="ce71" office:value-type="string" calcext:value-type="string">
            <text:p>Railgun</text:p>
          </table:table-cell>
          <table:table-cell table:style-name="ce71" office:value-type="string" calcext:value-type="string">
            <text:p>Vulture DMR/Nexus (Light)</text:p>
          </table:table-cell>
          <table:table-cell table:style-name="ce71" office:value-type="string" calcext:value-type="string">
            <text:p>Prototype Weapon I</text:p>
          </table:table-cell>
          <table:table-cell table:style-name="ce71" table:number-columns-repeated="3"/>
          <table:table-cell/>
          <table:table-cell table:style-name="ce66" table:formula="of:=COM.MICROSOFT.LET(     _xlpm.weaponText;     COM.MICROSOFT.TEXTJOIN(&quot;/&quot;;1;[.$AB10:.$AG10]);      _xlpm.weaponList;     &quot;¶&quot;&amp;SUBSTITUTE(_xlpm.weaponText;&quot;/&quot;;&quot;§¶&quot;)&amp;&quot;§&quot;;      _xlpm.systemsCost;     SUMPRODUCT(         ([$Systems.$A$11:.$A$300]&lt;&gt;&quot;&quot;)         *         COUNTIF([.$AJ10:.$AX10];[$Systems.$A$11:.$A$300])         *         [$Systems.$E$11:.$E$300]     );      _xlpm.weaponsCost;     SUMPRODUCT(         ([$Weapons.$A$2:.$A$300]&lt;&gt;&quot;&quot;)         *         (             LEN(_xlpm.weaponList)             -             LEN(                 SUBSTITUTE(                     _xlpm.weaponList;                     &quot;¶&quot;&amp;[$Weapons.$A$2:.$A$300]&amp;&quot;§&quot;;                     &quot;&quot;                 )             )         )         /         LEN(&quot;¶&quot;&amp;[$Weapons.$A$2:.$A$300]&amp;&quot;§&quot;)         *         [$Weapons.$H$2:.$H$300]     );      IF(         COUNTA([.$AB10:.$AG10])+COUNTA([.$AJ10:.$AX10]);         _xlpm.systemsCost+_xlpm.weaponsCost;         &quot;&quot;     ) )" office:value-type="float" office:value="8" calcext:value-type="float">
            <text:p>8</text:p>
          </table:table-cell>
          <table:table-cell table:style-name="ce8" table:content-validation-name="val11" office:value-type="string" calcext:value-type="string">
            <text:p>Enlightenment-Class NHP</text:p>
          </table:table-cell>
          <table:table-cell table:style-name="ce8" table:content-validation-name="val11" office:value-type="string" calcext:value-type="string">
            <text:p>Nanocomposite Adaptation</text:p>
          </table:table-cell>
          <table:table-cell table:style-name="ce8" table:content-validation-name="val11" office:value-type="string" calcext:value-type="string">
            <text:p>High-Stress Mag Clamps</text:p>
          </table:table-cell>
          <table:table-cell table:style-name="ce8" table:content-validation-name="val11" office:value-type="string" calcext:value-type="string">
            <text:p>Kinetic Compensator</text:p>
          </table:table-cell>
          <table:table-cell table:style-name="ce8" table:content-validation-name="val11" office:value-type="string" calcext:value-type="string">
            <text:p>Core Siphon</text:p>
          </table:table-cell>
          <table:table-cell table:style-name="ce8" table:content-validation-name="val11"/>
          <table:table-cell table:style-name="ce8" table:content-validation-name="val11" office:value-type="string" calcext:value-type="string">
            <text:p>Armament Redundancy</text:p>
          </table:table-cell>
          <table:table-cell table:style-name="ce8" table:content-validation-name="val11" table:number-columns-repeated="10"/>
          <table:table-cell table:number-columns-repeated="2"/>
          <table:table-cell table:style-name="ce75" table:number-matrix-columns-spanned="51" table:number-matrix-rows-spanned="1" table:formula="of:=TRANSPOSE(     COM.MICROSOFT.FILTER(         [$Frames.$A$2:.$A$100];         ([$Frames.$C$2:.$C$100]=&quot;&quot;)         +         (COUNTIF([$Build.$E$5:.$E13];[$Frames.$C$2:.$C$100])&gt;0);         &quot;&quot;     ) )" office:value-type="string" office:string-value="Everest" calcext:value-type="string">
            <text:p>Everest</text:p>
          </table:table-cell>
          <table:table-cell office:value-type="string" office:string-value="Sagarmatha" calcext:value-type="string">
            <text:p>Sagarmatha</text:p>
          </table:table-cell>
          <table:table-cell office:value-type="string" office:string-value="Chomolungma" calcext:value-type="string">
            <text:p>Chomolungma</text:p>
          </table:table-cell>
          <table:table-cell office:value-type="string" office:string-value="Death’s Head" calcext:value-type="string">
            <text:p>Death’s Head</text:p>
          </table:table-cell>
          <table:table-cell table:content-validation-name="val12" office:value-type="string" office:string-value="Balor" calcext:value-type="string">
            <text:p>Balor</text:p>
          </table:table-cell>
          <table:table-cell office:value-type="string" office:string-value="Hecatoncheires" calcext:value-type="string">
            <text:p>Hecatoncheires</text:p>
          </table:table-cell>
          <table:table-cell office:value-type="string" office:string-value="Goblin" calcext:value-type="string">
            <text:p>Goblin</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79"/>
        </table:table-row>
        <table:table-row table:style-name="ro2">
          <table:table-cell office:value-type="float" office:value="6" calcext:value-type="float">
            <text:p>6</text:p>
          </table:table-cell>
          <table:table-cell table:style-name="ce8" table:content-validation-name="val1" office:value-type="string" calcext:value-type="string">
            <text:p>Survive</text:p>
          </table:table-cell>
          <table:table-cell table:style-name="ce14" table:content-validation-name="val3" office:value-type="string" calcext:value-type="string">
            <text:p>Engineer II</text:p>
          </table:table-cell>
          <table:table-cell table:style-name="ce18" table:content-validation-name="val4" office:value-type="string" calcext:value-type="string">
            <text:p>Systems</text:p>
          </table:table-cell>
          <table:table-cell table:style-name="ce19" table:content-validation-name="val5" office:value-type="string" calcext:value-type="string">
            <text:p>Goblin I</text:p>
          </table:table-cell>
          <table:table-cell table:style-name="ce8" table:content-validation-name="val6" office:value-type="string" calcext:value-type="string">
            <text:p>Hecatoncheires</text:p>
          </table:table-cell>
          <table:table-cell table:style-name="ce22" table:content-validation-name="val8" office:value-type="string" calcext:value-type="string">
            <text:p>The Lesson of the Held Image</text:p>
          </table:table-cell>
          <table:table-cell/>
          <table:table-cell table:style-name="ce38" table:formula="of:=COUNTIF([.$D$2:.$D11];&quot;Hull&quot;)" office:value-type="float" office:value="2" calcext:value-type="float">
            <text:p>2</text:p>
          </table:table-cell>
          <table:table-cell table:style-name="ce40" table:formula="of:=COUNTIF([.$D$2:.$D11];&quot;Agility&quot;)" office:value-type="float" office:value="4" calcext:value-type="float">
            <text:p>4</text:p>
          </table:table-cell>
          <table:table-cell table:style-name="ce38" table:formula="of:=COUNTIF([.$D$2:.$D11];&quot;Systems&quot;)" office:value-type="float" office:value="2" calcext:value-type="float">
            <text:p>2</text:p>
          </table:table-cell>
          <table:table-cell table:style-name="ce40" table:formula="of:=COUNTIF([.$D$2:.$D11];&quot;Engineering&quot;)" office:value-type="float" office:value="0" calcext:value-type="float">
            <text:p>0</text:p>
          </table:table-cell>
          <table:table-cell/>
          <table:table-cell table:formula="of:=IFERROR(COM.MICROSOFT.XLOOKUP(LOOKUP(2;1/([.$F$2:.$F11]&lt;&gt;&quot;&quot;);[.$F$2:.$F11]);[$Frames.$A$1:.$A$100];[$Frames.D$1:.D$100]);&quot;&quot;)" office:value-type="float" office:value="0.5" calcext:value-type="float">
            <text:p>0.5</text:p>
          </table:table-cell>
          <table:table-cell table:style-name="ce57" table:formula="of:=IFERROR(COM.MICROSOFT.XLOOKUP(LOOKUP(2;1/([.$F$2:.$F11]&lt;&gt;&quot;&quot;);[.$F$2:.$F11]);[$Frames.$A$1:.$A$100];[$Frames.E$1:.E$100]);&quot;&quot;)+CEILING([.A11]/2)+2*[.I11]+[.BC77]" office:value-type="float" office:value="13" calcext:value-type="float">
            <text:p>13</text:p>
          </table:table-cell>
          <table:table-cell table:style-name="ce59" table:formula="of:=MIN(4; IFERROR(COM.MICROSOFT.XLOOKUP(LOOKUP(2;1/([.$F$2:.$F11]&lt;&gt;&quot;&quot;);[.$F$2:.$F11]);[$Frames.$A$1:.$A$100];[$Frames.F$1:.F$100]);&quot;&quot;)+[.BD77])" office:value-type="float" office:value="0" calcext:value-type="float">
            <text:p>0</text:p>
          </table:table-cell>
          <table:table-cell table:style-name="ce57" table:formula="of:=IFERROR(COM.MICROSOFT.XLOOKUP(LOOKUP(2;1/([.$F$2:.$F11]&lt;&gt;&quot;&quot;);[.$F$2:.$F11]);[$Frames.$A$1:.$A$100];[$Frames.G$1:.G$100]);&quot;&quot;)+[.L11]+[.BE77]" office:value-type="float" office:value="5" calcext:value-type="float">
            <text:p>5</text:p>
          </table:table-cell>
          <table:table-cell table:style-name="ce59" table:formula="of:=IFERROR(COM.MICROSOFT.XLOOKUP(LOOKUP(2;1/([.$F$2:.$F11]&lt;&gt;&quot;&quot;);[.$F$2:.$F11]);[$Frames.$A$1:.$A$100];[$Frames.H$1:.H$100]);&quot;&quot;)+[.J11]+[.BF77]" office:value-type="float" office:value="14" calcext:value-type="float">
            <text:p>14</text:p>
          </table:table-cell>
          <table:table-cell table:style-name="ce57" table:formula="of:=IFERROR(COM.MICROSOFT.XLOOKUP(LOOKUP(2;1/([.$F$2:.$F11]&lt;&gt;&quot;&quot;);[.$F$2:.$F11]);[$Frames.$A$1:.$A$100];[$Frames.I$1:.I$100]);&quot;&quot;)+FLOOR([.J11]/2)+[.BG77]" office:value-type="float" office:value="7" calcext:value-type="float">
            <text:p>7</text:p>
          </table:table-cell>
          <table:table-cell table:style-name="ce59" table:formula="of:=IFERROR(COM.MICROSOFT.XLOOKUP(LOOKUP(2;1/([.$F$2:.$F11]&lt;&gt;&quot;&quot;);[.$F$2:.$F11]);[$Frames.$A$1:.$A$100];[$Frames.J$1:.J$100]);&quot;&quot;)+[.K11]+[.BH77]" office:value-type="float" office:value="12" calcext:value-type="float">
            <text:p>12</text:p>
          </table:table-cell>
          <table:table-cell table:style-name="ce57" table:formula="of:=IFERROR(COM.MICROSOFT.XLOOKUP(LOOKUP(2;1/([.$F$2:.$F11]&lt;&gt;&quot;&quot;);[.$F$2:.$F11]);[$Frames.$A$1:.$A$100];[$Frames.K$1:.K$100]);&quot;&quot;)+[.K11]+[.BI77]" office:value-type="float" office:value="3" calcext:value-type="float">
            <text:p>3</text:p>
          </table:table-cell>
          <table:table-cell table:style-name="ce59" table:formula="of:=IFERROR(COM.MICROSOFT.XLOOKUP(LOOKUP(2;1/([.$F$2:.$F11]&lt;&gt;&quot;&quot;);[.$F$2:.$F11]);[$Frames.$A$1:.$A$100];[$Frames.L$1:.L$100]);&quot;&quot;)+[.BJ77]" office:value-type="float" office:value="10" calcext:value-type="float">
            <text:p>10</text:p>
          </table:table-cell>
          <table:table-cell table:style-name="ce57" table:formula="of:=IFERROR(COM.MICROSOFT.XLOOKUP(LOOKUP(2;1/([.$F$2:.$F11]&lt;&gt;&quot;&quot;);[.$F$2:.$F11]);[$Frames.$A$1:.$A$100];[$Frames.M$1:.M$100]);&quot;&quot;)+FLOOR([.I11]/2)+[.BK77]" office:value-type="float" office:value="4" calcext:value-type="float">
            <text:p>4</text:p>
          </table:table-cell>
          <table:table-cell table:style-name="ce59" table:formula="of:=IFERROR(COM.MICROSOFT.XLOOKUP(LOOKUP(2;1/([.$F$2:.$F11]&lt;&gt;&quot;&quot;);[.$F$2:.$F11]);[$Frames.$A$1:.$A$100];[$Frames.N$1:.N$100]);&quot;&quot;)+CEILING([.A11]/2)+[.BL77]" office:value-type="float" office:value="13" calcext:value-type="float">
            <text:p>13</text:p>
          </table:table-cell>
          <table:table-cell table:style-name="ce62" table:formula="of:=IFERROR(COM.MICROSOFT.XLOOKUP(LOOKUP(2;1/([.$F$2:.$F11]&lt;&gt;&quot;&quot;);[.$F$2:.$F11]);[$Frames.$A$1:.$A$100];[$Frames.O$1:.O$100]);&quot;&quot;)+CEILING([.A11]/2)+FLOOR([.K11]/2)+[.BM77]" office:value-type="float" office:value="10" calcext:value-type="float">
            <text:p>10</text:p>
          </table:table-cell>
          <table:table-cell table:formula="of:=1+[.BN77]" office:value-type="float" office:value="1" calcext:value-type="float">
            <text:p>1</text:p>
          </table:table-cell>
          <table:table-cell/>
          <table:table-cell table:style-name="ce71" office:value-type="string" calcext:value-type="string">
            <text:p>Railgun</text:p>
          </table:table-cell>
          <table:table-cell table:style-name="ce71" office:value-type="string" calcext:value-type="string">
            <text:p>Vulture DMR/Nexus (Light)</text:p>
          </table:table-cell>
          <table:table-cell table:style-name="ce71" office:value-type="string" calcext:value-type="string">
            <text:p>Prototype Weapon II</text:p>
          </table:table-cell>
          <table:table-cell table:style-name="ce71" table:number-columns-repeated="3"/>
          <table:table-cell/>
          <table:table-cell table:style-name="ce66" table:formula="of:=COM.MICROSOFT.LET(     _xlpm.weaponText;     COM.MICROSOFT.TEXTJOIN(&quot;/&quot;;1;[.$AB11:.$AG11]);      _xlpm.weaponList;     &quot;¶&quot;&amp;SUBSTITUTE(_xlpm.weaponText;&quot;/&quot;;&quot;§¶&quot;)&amp;&quot;§&quot;;      _xlpm.systemsCost;     SUMPRODUCT(         ([$Systems.$A$11:.$A$300]&lt;&gt;&quot;&quot;)         *         COUNTIF([.$AJ11:.$AX11];[$Systems.$A$11:.$A$300])         *         [$Systems.$E$11:.$E$300]     );      _xlpm.weaponsCost;     SUMPRODUCT(         ([$Weapons.$A$2:.$A$300]&lt;&gt;&quot;&quot;)         *         (             LEN(_xlpm.weaponList)             -             LEN(                 SUBSTITUTE(                     _xlpm.weaponList;                     &quot;¶&quot;&amp;[$Weapons.$A$2:.$A$300]&amp;&quot;§&quot;;                     &quot;&quot;                 )             )         )         /         LEN(&quot;¶&quot;&amp;[$Weapons.$A$2:.$A$300]&amp;&quot;§&quot;)         *         [$Weapons.$H$2:.$H$300]     );      IF(         COUNTA([.$AB11:.$AG11])+COUNTA([.$AJ11:.$AX11]);         _xlpm.systemsCost+_xlpm.weaponsCost;         &quot;&quot;     ) )" office:value-type="float" office:value="10" calcext:value-type="float">
            <text:p>10</text:p>
          </table:table-cell>
          <table:table-cell table:style-name="ce8" table:content-validation-name="val11" office:value-type="string" calcext:value-type="string">
            <text:p>Enlightenment-Class NHP</text:p>
          </table:table-cell>
          <table:table-cell table:style-name="ce8" table:content-validation-name="val11" office:value-type="string" calcext:value-type="string">
            <text:p>Nanocomposite Adaptation</text:p>
          </table:table-cell>
          <table:table-cell table:style-name="ce8" table:content-validation-name="val11" office:value-type="string" calcext:value-type="string">
            <text:p>High-Stress Mag Clamps</text:p>
          </table:table-cell>
          <table:table-cell table:style-name="ce8" table:content-validation-name="val11" office:value-type="string" calcext:value-type="string">
            <text:p>H0R_OS System Upgrade I</text:p>
          </table:table-cell>
          <table:table-cell table:style-name="ce8" table:content-validation-name="val11" office:value-type="string" calcext:value-type="string">
            <text:p>Core Siphon</text:p>
          </table:table-cell>
          <table:table-cell table:style-name="ce8" table:content-validation-name="val11" office:value-type="string" calcext:value-type="string">
            <text:p>Turret Drones</text:p>
          </table:table-cell>
          <table:table-cell table:style-name="ce8" table:content-validation-name="val11" office:value-type="string" calcext:value-type="string">
            <text:p>Armament Redundancy</text:p>
          </table:table-cell>
          <table:table-cell table:style-name="ce8" table:content-validation-name="val11" table:number-columns-repeated="10"/>
          <table:table-cell table:number-columns-repeated="2"/>
          <table:table-cell table:number-matrix-columns-spanned="52" table:number-matrix-rows-spanned="1" table:formula="of:=TRANSPOSE(     COM.MICROSOFT.FILTER(         [$Frames.$A$2:.$A$100];         ([$Frames.$C$2:.$C$100]=&quot;&quot;)         +         (COUNTIF([$Build.$E$5:.$E14];[$Frames.$C$2:.$C$100])&gt;0);         &quot;&quot;     ) )" office:value-type="string" office:string-value="Everest" calcext:value-type="string">
            <text:p>Everest</text:p>
          </table:table-cell>
          <table:table-cell office:value-type="string" office:string-value="Sagarmatha" calcext:value-type="string">
            <text:p>Sagarmatha</text:p>
          </table:table-cell>
          <table:table-cell office:value-type="string" office:string-value="Chomolungma" calcext:value-type="string">
            <text:p>Chomolungma</text:p>
          </table:table-cell>
          <table:table-cell office:value-type="string" office:string-value="Death’s Head" calcext:value-type="string">
            <text:p>Death’s Head</text:p>
          </table:table-cell>
          <table:table-cell table:content-validation-name="val12" office:value-type="string" office:string-value="Balor" calcext:value-type="string">
            <text:p>Balor</text:p>
          </table:table-cell>
          <table:table-cell office:value-type="string" office:string-value="Hecatoncheires" calcext:value-type="string">
            <text:p>Hecatoncheires</text:p>
          </table:table-cell>
          <table:table-cell office:value-type="string" office:string-value="Goblin" calcext:value-type="string">
            <text:p>Goblin</text:p>
          </table:table-cell>
          <table:table-cell office:value-type="string" office:string-value="Pegasus" calcext:value-type="string">
            <text:p>Pegasus</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78"/>
        </table:table-row>
        <table:table-row table:style-name="ro2">
          <table:table-cell office:value-type="float" office:value="7" calcext:value-type="float">
            <text:p>7</text:p>
          </table:table-cell>
          <table:table-cell table:style-name="ce8" table:content-validation-name="val1" office:value-type="string" calcext:value-type="string">
            <text:p>Act Unseen or Unheard</text:p>
          </table:table-cell>
          <table:table-cell table:style-name="ce14" table:content-validation-name="val3" office:value-type="string" calcext:value-type="string">
            <text:p>Crack Shot III</text:p>
          </table:table-cell>
          <table:table-cell table:style-name="ce18" table:content-validation-name="val4" office:value-type="string" calcext:value-type="string">
            <text:p>Systems</text:p>
          </table:table-cell>
          <table:table-cell table:style-name="ce19" table:content-validation-name="val5" office:value-type="string" calcext:value-type="string">
            <text:p>Goblin II</text:p>
          </table:table-cell>
          <table:table-cell table:style-name="ce8" table:content-validation-name="val6"/>
          <table:table-cell table:style-name="ce12"/>
          <table:table-cell/>
          <table:table-cell table:style-name="ce38" table:formula="of:=COUNTIF([.$D$2:.$D12];&quot;Hull&quot;)" office:value-type="float" office:value="2" calcext:value-type="float">
            <text:p>2</text:p>
          </table:table-cell>
          <table:table-cell table:style-name="ce40" table:formula="of:=COUNTIF([.$D$2:.$D12];&quot;Agility&quot;)" office:value-type="float" office:value="4" calcext:value-type="float">
            <text:p>4</text:p>
          </table:table-cell>
          <table:table-cell table:style-name="ce38" table:formula="of:=COUNTIF([.$D$2:.$D12];&quot;Systems&quot;)" office:value-type="float" office:value="3" calcext:value-type="float">
            <text:p>3</text:p>
          </table:table-cell>
          <table:table-cell table:style-name="ce40" table:formula="of:=COUNTIF([.$D$2:.$D12];&quot;Engineering&quot;)" office:value-type="float" office:value="0" calcext:value-type="float">
            <text:p>0</text:p>
          </table:table-cell>
          <table:table-cell/>
          <table:table-cell table:formula="of:=IFERROR(COM.MICROSOFT.XLOOKUP(LOOKUP(2;1/([.$F$2:.$F12]&lt;&gt;&quot;&quot;);[.$F$2:.$F12]);[$Frames.$A$1:.$A$100];[$Frames.D$1:.D$100]);&quot;&quot;)" office:value-type="float" office:value="0.5" calcext:value-type="float">
            <text:p>0.5</text:p>
          </table:table-cell>
          <table:table-cell table:style-name="ce57" table:formula="of:=IFERROR(COM.MICROSOFT.XLOOKUP(LOOKUP(2;1/([.$F$2:.$F12]&lt;&gt;&quot;&quot;);[.$F$2:.$F12]);[$Frames.$A$1:.$A$100];[$Frames.E$1:.E$100]);&quot;&quot;)+CEILING([.A12]/2)+2*[.I12]+[.BC78]" office:value-type="float" office:value="14" calcext:value-type="float">
            <text:p>14</text:p>
          </table:table-cell>
          <table:table-cell table:style-name="ce59" table:formula="of:=MIN(4; IFERROR(COM.MICROSOFT.XLOOKUP(LOOKUP(2;1/([.$F$2:.$F12]&lt;&gt;&quot;&quot;);[.$F$2:.$F12]);[$Frames.$A$1:.$A$100];[$Frames.F$1:.F$100]);&quot;&quot;)+[.BD78])" office:value-type="float" office:value="0" calcext:value-type="float">
            <text:p>0</text:p>
          </table:table-cell>
          <table:table-cell table:style-name="ce57" table:formula="of:=IFERROR(COM.MICROSOFT.XLOOKUP(LOOKUP(2;1/([.$F$2:.$F12]&lt;&gt;&quot;&quot;);[.$F$2:.$F12]);[$Frames.$A$1:.$A$100];[$Frames.G$1:.G$100]);&quot;&quot;)+[.L12]+[.BE78]" office:value-type="float" office:value="5" calcext:value-type="float">
            <text:p>5</text:p>
          </table:table-cell>
          <table:table-cell table:style-name="ce59" table:formula="of:=IFERROR(COM.MICROSOFT.XLOOKUP(LOOKUP(2;1/([.$F$2:.$F12]&lt;&gt;&quot;&quot;);[.$F$2:.$F12]);[$Frames.$A$1:.$A$100];[$Frames.H$1:.H$100]);&quot;&quot;)+[.J12]+[.BF78]" office:value-type="float" office:value="14" calcext:value-type="float">
            <text:p>14</text:p>
          </table:table-cell>
          <table:table-cell table:style-name="ce57" table:formula="of:=IFERROR(COM.MICROSOFT.XLOOKUP(LOOKUP(2;1/([.$F$2:.$F12]&lt;&gt;&quot;&quot;);[.$F$2:.$F12]);[$Frames.$A$1:.$A$100];[$Frames.I$1:.I$100]);&quot;&quot;)+FLOOR([.J12]/2)+[.BG78]" office:value-type="float" office:value="7" calcext:value-type="float">
            <text:p>7</text:p>
          </table:table-cell>
          <table:table-cell table:style-name="ce59" table:formula="of:=IFERROR(COM.MICROSOFT.XLOOKUP(LOOKUP(2;1/([.$F$2:.$F12]&lt;&gt;&quot;&quot;);[.$F$2:.$F12]);[$Frames.$A$1:.$A$100];[$Frames.J$1:.J$100]);&quot;&quot;)+[.K12]+[.BH78]" office:value-type="float" office:value="13" calcext:value-type="float">
            <text:p>13</text:p>
          </table:table-cell>
          <table:table-cell table:style-name="ce57" table:formula="of:=IFERROR(COM.MICROSOFT.XLOOKUP(LOOKUP(2;1/([.$F$2:.$F12]&lt;&gt;&quot;&quot;);[.$F$2:.$F12]);[$Frames.$A$1:.$A$100];[$Frames.K$1:.K$100]);&quot;&quot;)+[.K12]+[.BI78]" office:value-type="float" office:value="4" calcext:value-type="float">
            <text:p>4</text:p>
          </table:table-cell>
          <table:table-cell table:style-name="ce59" table:formula="of:=IFERROR(COM.MICROSOFT.XLOOKUP(LOOKUP(2;1/([.$F$2:.$F12]&lt;&gt;&quot;&quot;);[.$F$2:.$F12]);[$Frames.$A$1:.$A$100];[$Frames.L$1:.L$100]);&quot;&quot;)+[.BJ78]" office:value-type="float" office:value="10" calcext:value-type="float">
            <text:p>10</text:p>
          </table:table-cell>
          <table:table-cell table:style-name="ce57" table:formula="of:=IFERROR(COM.MICROSOFT.XLOOKUP(LOOKUP(2;1/([.$F$2:.$F12]&lt;&gt;&quot;&quot;);[.$F$2:.$F12]);[$Frames.$A$1:.$A$100];[$Frames.M$1:.M$100]);&quot;&quot;)+FLOOR([.I12]/2)+[.BK78]" office:value-type="float" office:value="4" calcext:value-type="float">
            <text:p>4</text:p>
          </table:table-cell>
          <table:table-cell table:style-name="ce59" table:formula="of:=IFERROR(COM.MICROSOFT.XLOOKUP(LOOKUP(2;1/([.$F$2:.$F12]&lt;&gt;&quot;&quot;);[.$F$2:.$F12]);[$Frames.$A$1:.$A$100];[$Frames.N$1:.N$100]);&quot;&quot;)+CEILING([.A12]/2)+[.BL78]" office:value-type="float" office:value="14" calcext:value-type="float">
            <text:p>14</text:p>
          </table:table-cell>
          <table:table-cell table:style-name="ce62" table:formula="of:=IFERROR(COM.MICROSOFT.XLOOKUP(LOOKUP(2;1/([.$F$2:.$F12]&lt;&gt;&quot;&quot;);[.$F$2:.$F12]);[$Frames.$A$1:.$A$100];[$Frames.O$1:.O$100]);&quot;&quot;)+CEILING([.A12]/2)+FLOOR([.K12]/2)+[.BM78]" office:value-type="float" office:value="11" calcext:value-type="float">
            <text:p>11</text:p>
          </table:table-cell>
          <table:table-cell table:formula="of:=1+[.BN78]" office:value-type="float" office:value="1" calcext:value-type="float">
            <text:p>1</text:p>
          </table:table-cell>
          <table:table-cell/>
          <table:table-cell table:style-name="ce71" office:value-type="string" calcext:value-type="string">
            <text:p>Railgun</text:p>
          </table:table-cell>
          <table:table-cell table:style-name="ce71" office:value-type="string" calcext:value-type="string">
            <text:p>Vulture DMR/Nexus (Light)</text:p>
          </table:table-cell>
          <table:table-cell table:style-name="ce71" office:value-type="string" calcext:value-type="string">
            <text:p>Prototype Weapon II</text:p>
          </table:table-cell>
          <table:table-cell table:style-name="ce71" table:number-columns-repeated="3"/>
          <table:table-cell/>
          <table:table-cell table:style-name="ce66" table:formula="of:=COM.MICROSOFT.LET(     _xlpm.weaponText;     COM.MICROSOFT.TEXTJOIN(&quot;/&quot;;1;[.$AB12:.$AG12]);      _xlpm.weaponList;     &quot;¶&quot;&amp;SUBSTITUTE(_xlpm.weaponText;&quot;/&quot;;&quot;§¶&quot;)&amp;&quot;§&quot;;      _xlpm.systemsCost;     SUMPRODUCT(         ([$Systems.$A$11:.$A$300]&lt;&gt;&quot;&quot;)         *         COUNTIF([.$AJ12:.$AX12];[$Systems.$A$11:.$A$300])         *         [$Systems.$E$11:.$E$300]     );      _xlpm.weaponsCost;     SUMPRODUCT(         ([$Weapons.$A$2:.$A$300]&lt;&gt;&quot;&quot;)         *         (             LEN(_xlpm.weaponList)             -             LEN(                 SUBSTITUTE(                     _xlpm.weaponList;                     &quot;¶&quot;&amp;[$Weapons.$A$2:.$A$300]&amp;&quot;§&quot;;                     &quot;&quot;                 )             )         )         /         LEN(&quot;¶&quot;&amp;[$Weapons.$A$2:.$A$300]&amp;&quot;§&quot;)         *         [$Weapons.$H$2:.$H$300]     );      IF(         COUNTA([.$AB12:.$AG12])+COUNTA([.$AJ12:.$AX12]);         _xlpm.systemsCost+_xlpm.weaponsCost;         &quot;&quot;     ) )" office:value-type="float" office:value="10" calcext:value-type="float">
            <text:p>10</text:p>
          </table:table-cell>
          <table:table-cell table:style-name="ce8" table:content-validation-name="val11" office:value-type="string" calcext:value-type="string">
            <text:p>Enlightenment-Class NHP</text:p>
          </table:table-cell>
          <table:table-cell table:style-name="ce8" table:content-validation-name="val11" office:value-type="string" calcext:value-type="string">
            <text:p>Nanocomposite Adaptation</text:p>
          </table:table-cell>
          <table:table-cell table:style-name="ce8" table:content-validation-name="val11" office:value-type="string" calcext:value-type="string">
            <text:p>High-Stress Mag Clamps</text:p>
          </table:table-cell>
          <table:table-cell table:style-name="ce8" table:content-validation-name="val11" office:value-type="string" calcext:value-type="string">
            <text:p>H0R_OS System Upgrade I</text:p>
          </table:table-cell>
          <table:table-cell table:style-name="ce8" table:content-validation-name="val11" office:value-type="string" calcext:value-type="string">
            <text:p>H0R_OS System Upgrade II</text:p>
          </table:table-cell>
          <table:table-cell table:style-name="ce8" table:content-validation-name="val11" office:value-type="string" calcext:value-type="string">
            <text:p>Turret Drones</text:p>
          </table:table-cell>
          <table:table-cell table:style-name="ce8" table:content-validation-name="val11" office:value-type="string" calcext:value-type="string">
            <text:p>Armament Redundancy</text:p>
          </table:table-cell>
          <table:table-cell table:style-name="ce8" table:content-validation-name="val11" table:number-columns-repeated="10"/>
          <table:table-cell table:number-columns-repeated="2"/>
          <table:table-cell table:number-matrix-columns-spanned="52" table:number-matrix-rows-spanned="1" table:formula="of:=TRANSPOSE(     COM.MICROSOFT.FILTER(         [$Frames.$A$2:.$A$100];         ([$Frames.$C$2:.$C$100]=&quot;&quot;)         +         (COUNTIF([$Build.$E$5:.$E15];[$Frames.$C$2:.$C$100])&gt;0);         &quot;&quot;     ) )" office:value-type="string" office:string-value="Everest" calcext:value-type="string">
            <text:p>Everest</text:p>
          </table:table-cell>
          <table:table-cell office:value-type="string" office:string-value="Sagarmatha" calcext:value-type="string">
            <text:p>Sagarmatha</text:p>
          </table:table-cell>
          <table:table-cell office:value-type="string" office:string-value="Chomolungma" calcext:value-type="string">
            <text:p>Chomolungma</text:p>
          </table:table-cell>
          <table:table-cell office:value-type="string" office:string-value="Death’s Head" calcext:value-type="string">
            <text:p>Death’s Head</text:p>
          </table:table-cell>
          <table:table-cell table:content-validation-name="val12" office:value-type="string" office:string-value="Balor" calcext:value-type="string">
            <text:p>Balor</text:p>
          </table:table-cell>
          <table:table-cell office:value-type="string" office:string-value="Hecatoncheires" calcext:value-type="string">
            <text:p>Hecatoncheires</text:p>
          </table:table-cell>
          <table:table-cell office:value-type="string" office:string-value="Goblin" calcext:value-type="string">
            <text:p>Goblin</text:p>
          </table:table-cell>
          <table:table-cell office:value-type="string" office:string-value="Pegasus" calcext:value-type="string">
            <text:p>Pegasus</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78"/>
        </table:table-row>
        <table:table-row table:style-name="ro2">
          <table:table-cell office:value-type="float" office:value="8" calcext:value-type="float">
            <text:p>8</text:p>
          </table:table-cell>
          <table:table-cell table:style-name="ce8" table:content-validation-name="val1" office:value-type="string" calcext:value-type="string">
            <text:p>Read a Situation</text:p>
          </table:table-cell>
          <table:table-cell table:style-name="ce14" table:content-validation-name="val3" office:value-type="string" calcext:value-type="string">
            <text:p>Infiltrator I</text:p>
          </table:table-cell>
          <table:table-cell table:style-name="ce18" table:content-validation-name="val4" office:value-type="string" calcext:value-type="string">
            <text:p>Systems</text:p>
          </table:table-cell>
          <table:table-cell table:style-name="ce19" table:content-validation-name="val5" office:value-type="string" calcext:value-type="string">
            <text:p>Pegasus I</text:p>
          </table:table-cell>
          <table:table-cell table:style-name="ce8" table:content-validation-name="val6" office:value-type="string" calcext:value-type="string">
            <text:p>Balor</text:p>
          </table:table-cell>
          <table:table-cell table:style-name="ce12"/>
          <table:table-cell/>
          <table:table-cell table:style-name="ce38" table:formula="of:=COUNTIF([.$D$2:.$D13];&quot;Hull&quot;)" office:value-type="float" office:value="2" calcext:value-type="float">
            <text:p>2</text:p>
          </table:table-cell>
          <table:table-cell table:style-name="ce40" table:formula="of:=COUNTIF([.$D$2:.$D13];&quot;Agility&quot;)" office:value-type="float" office:value="4" calcext:value-type="float">
            <text:p>4</text:p>
          </table:table-cell>
          <table:table-cell table:style-name="ce38" table:formula="of:=COUNTIF([.$D$2:.$D13];&quot;Systems&quot;)" office:value-type="float" office:value="4" calcext:value-type="float">
            <text:p>4</text:p>
          </table:table-cell>
          <table:table-cell table:style-name="ce40" table:formula="of:=COUNTIF([.$D$2:.$D13];&quot;Engineering&quot;)" office:value-type="float" office:value="0" calcext:value-type="float">
            <text:p>0</text:p>
          </table:table-cell>
          <table:table-cell/>
          <table:table-cell table:formula="of:=IFERROR(COM.MICROSOFT.XLOOKUP(LOOKUP(2;1/([.$F$2:.$F13]&lt;&gt;&quot;&quot;);[.$F$2:.$F13]);[$Frames.$A$1:.$A$100];[$Frames.D$1:.D$100]);&quot;&quot;)" office:value-type="float" office:value="2" calcext:value-type="float">
            <text:p>2</text:p>
          </table:table-cell>
          <table:table-cell table:style-name="ce57" table:formula="of:=IFERROR(COM.MICROSOFT.XLOOKUP(LOOKUP(2;1/([.$F$2:.$F13]&lt;&gt;&quot;&quot;);[.$F$2:.$F13]);[$Frames.$A$1:.$A$100];[$Frames.E$1:.E$100]);&quot;&quot;)+CEILING([.A13]/2)+2*[.I13]+[.BC79]" office:value-type="float" office:value="20" calcext:value-type="float">
            <text:p>20</text:p>
          </table:table-cell>
          <table:table-cell table:style-name="ce59" table:formula="of:=MIN(4; IFERROR(COM.MICROSOFT.XLOOKUP(LOOKUP(2;1/([.$F$2:.$F13]&lt;&gt;&quot;&quot;);[.$F$2:.$F13]);[$Frames.$A$1:.$A$100];[$Frames.F$1:.F$100]);&quot;&quot;)+[.BD79])" office:value-type="float" office:value="0" calcext:value-type="float">
            <text:p>0</text:p>
          </table:table-cell>
          <table:table-cell table:style-name="ce57" table:formula="of:=IFERROR(COM.MICROSOFT.XLOOKUP(LOOKUP(2;1/([.$F$2:.$F13]&lt;&gt;&quot;&quot;);[.$F$2:.$F13]);[$Frames.$A$1:.$A$100];[$Frames.G$1:.G$100]);&quot;&quot;)+[.L13]+[.BE79]" office:value-type="float" office:value="4" calcext:value-type="float">
            <text:p>4</text:p>
          </table:table-cell>
          <table:table-cell table:style-name="ce59" table:formula="of:=IFERROR(COM.MICROSOFT.XLOOKUP(LOOKUP(2;1/([.$F$2:.$F13]&lt;&gt;&quot;&quot;);[.$F$2:.$F13]);[$Frames.$A$1:.$A$100];[$Frames.H$1:.H$100]);&quot;&quot;)+[.J13]+[.BF79]" office:value-type="float" office:value="10" calcext:value-type="float">
            <text:p>10</text:p>
          </table:table-cell>
          <table:table-cell table:style-name="ce57" table:formula="of:=IFERROR(COM.MICROSOFT.XLOOKUP(LOOKUP(2;1/([.$F$2:.$F13]&lt;&gt;&quot;&quot;);[.$F$2:.$F13]);[$Frames.$A$1:.$A$100];[$Frames.I$1:.I$100]);&quot;&quot;)+FLOOR([.J13]/2)+[.BG79]" office:value-type="float" office:value="5" calcext:value-type="float">
            <text:p>5</text:p>
          </table:table-cell>
          <table:table-cell table:style-name="ce59" table:formula="of:=IFERROR(COM.MICROSOFT.XLOOKUP(LOOKUP(2;1/([.$F$2:.$F13]&lt;&gt;&quot;&quot;);[.$F$2:.$F13]);[$Frames.$A$1:.$A$100];[$Frames.J$1:.J$100]);&quot;&quot;)+[.K13]+[.BH79]" office:value-type="float" office:value="14" calcext:value-type="float">
            <text:p>14</text:p>
          </table:table-cell>
          <table:table-cell table:style-name="ce57" table:formula="of:=IFERROR(COM.MICROSOFT.XLOOKUP(LOOKUP(2;1/([.$F$2:.$F13]&lt;&gt;&quot;&quot;);[.$F$2:.$F13]);[$Frames.$A$1:.$A$100];[$Frames.K$1:.K$100]);&quot;&quot;)+[.K13]+[.BI79]" office:value-type="float" office:value="5" calcext:value-type="float">
            <text:p>5</text:p>
          </table:table-cell>
          <table:table-cell table:style-name="ce59" table:formula="of:=IFERROR(COM.MICROSOFT.XLOOKUP(LOOKUP(2;1/([.$F$2:.$F13]&lt;&gt;&quot;&quot;);[.$F$2:.$F13]);[$Frames.$A$1:.$A$100];[$Frames.L$1:.L$100]);&quot;&quot;)+[.BJ79]" office:value-type="float" office:value="5" calcext:value-type="float">
            <text:p>5</text:p>
          </table:table-cell>
          <table:table-cell table:style-name="ce57" table:formula="of:=IFERROR(COM.MICROSOFT.XLOOKUP(LOOKUP(2;1/([.$F$2:.$F13]&lt;&gt;&quot;&quot;);[.$F$2:.$F13]);[$Frames.$A$1:.$A$100];[$Frames.M$1:.M$100]);&quot;&quot;)+FLOOR([.I13]/2)+[.BK79]" office:value-type="float" office:value="5" calcext:value-type="float">
            <text:p>5</text:p>
          </table:table-cell>
          <table:table-cell table:style-name="ce59" table:formula="of:=IFERROR(COM.MICROSOFT.XLOOKUP(LOOKUP(2;1/([.$F$2:.$F13]&lt;&gt;&quot;&quot;);[.$F$2:.$F13]);[$Frames.$A$1:.$A$100];[$Frames.N$1:.N$100]);&quot;&quot;)+CEILING([.A13]/2)+[.BL79]" office:value-type="float" office:value="14" calcext:value-type="float">
            <text:p>14</text:p>
          </table:table-cell>
          <table:table-cell table:style-name="ce62" table:formula="of:=IFERROR(COM.MICROSOFT.XLOOKUP(LOOKUP(2;1/([.$F$2:.$F13]&lt;&gt;&quot;&quot;);[.$F$2:.$F13]);[$Frames.$A$1:.$A$100];[$Frames.O$1:.O$100]);&quot;&quot;)+CEILING([.A13]/2)+FLOOR([.K13]/2)+[.BM79]" office:value-type="float" office:value="12" calcext:value-type="float">
            <text:p>12</text:p>
          </table:table-cell>
          <table:table-cell table:formula="of:=1+[.BN79]" office:value-type="float" office:value="1" calcext:value-type="float">
            <text:p>1</text:p>
          </table:table-cell>
          <table:table-cell/>
          <table:table-cell table:style-name="ce71" office:value-type="string" calcext:value-type="string">
            <text:p>Railgun</text:p>
          </table:table-cell>
          <table:table-cell table:style-name="ce71" office:value-type="string" calcext:value-type="string">
            <text:p>Smartgun/Nexus (Light)</text:p>
          </table:table-cell>
          <table:table-cell table:style-name="ce71" office:value-type="string" calcext:value-type="string">
            <text:p>Prototype Weapon II</text:p>
          </table:table-cell>
          <table:table-cell table:style-name="ce71" table:number-columns-repeated="3"/>
          <table:table-cell/>
          <table:table-cell table:style-name="ce66" table:formula="of:=COM.MICROSOFT.LET(     _xlpm.weaponText;     COM.MICROSOFT.TEXTJOIN(&quot;/&quot;;1;[.$AB13:.$AG13]);      _xlpm.weaponList;     &quot;¶&quot;&amp;SUBSTITUTE(_xlpm.weaponText;&quot;/&quot;;&quot;§¶&quot;)&amp;&quot;§&quot;;      _xlpm.systemsCost;     SUMPRODUCT(         ([$Systems.$A$11:.$A$300]&lt;&gt;&quot;&quot;)         *         COUNTIF([.$AJ13:.$AX13];[$Systems.$A$11:.$A$300])         *         [$Systems.$E$11:.$E$300]     );      _xlpm.weaponsCost;     SUMPRODUCT(         ([$Weapons.$A$2:.$A$300]&lt;&gt;&quot;&quot;)         *         (             LEN(_xlpm.weaponList)             -             LEN(                 SUBSTITUTE(                     _xlpm.weaponList;                     &quot;¶&quot;&amp;[$Weapons.$A$2:.$A$300]&amp;&quot;§&quot;;                     &quot;&quot;                 )             )         )         /         LEN(&quot;¶&quot;&amp;[$Weapons.$A$2:.$A$300]&amp;&quot;§&quot;)         *         [$Weapons.$H$2:.$H$300]     );      IF(         COUNTA([.$AB13:.$AG13])+COUNTA([.$AJ13:.$AX13]);         _xlpm.systemsCost+_xlpm.weaponsCost;         &quot;&quot;     ) )" office:value-type="float" office:value="12" calcext:value-type="float">
            <text:p>12</text:p>
          </table:table-cell>
          <table:table-cell table:style-name="ce8" table:content-validation-name="val11" office:value-type="string" calcext:value-type="string">
            <text:p>Enlightenment-Class NHP</text:p>
          </table:table-cell>
          <table:table-cell table:style-name="ce8" table:content-validation-name="val11" office:value-type="string" calcext:value-type="string">
            <text:p>Nanocomposite Adaptation</text:p>
          </table:table-cell>
          <table:table-cell table:style-name="ce8" table:content-validation-name="val11" office:value-type="string" calcext:value-type="string">
            <text:p>High-Stress Mag Clamps</text:p>
          </table:table-cell>
          <table:table-cell table:style-name="ce8" table:content-validation-name="val11" office:value-type="string" calcext:value-type="string">
            <text:p>H0R_OS System Upgrade I</text:p>
          </table:table-cell>
          <table:table-cell table:style-name="ce8" table:content-validation-name="val11" office:value-type="string" calcext:value-type="string">
            <text:p>H0R_OS System Upgrade II</text:p>
          </table:table-cell>
          <table:table-cell table:style-name="ce8" table:content-validation-name="val11" office:value-type="string" calcext:value-type="string">
            <text:p>Turret Drones</text:p>
          </table:table-cell>
          <table:table-cell table:style-name="ce8" table:content-validation-name="val11" office:value-type="string" calcext:value-type="string">
            <text:p>Armament Redundancy</text:p>
          </table:table-cell>
          <table:table-cell table:style-name="ce8" table:content-validation-name="val11" table:number-columns-repeated="10"/>
          <table:table-cell table:number-columns-repeated="2"/>
          <table:table-cell table:number-matrix-columns-spanned="54" table:number-matrix-rows-spanned="1" table:formula="of:=TRANSPOSE(     COM.MICROSOFT.FILTER(         [$Frames.$A$2:.$A$100];         ([$Frames.$C$2:.$C$100]=&quot;&quot;)         +         (COUNTIF([$Build.$E$5:.$E16];[$Frames.$C$2:.$C$100])&gt;0);         &quot;&quot;     ) )" office:value-type="string" office:string-value="Everest" calcext:value-type="string">
            <text:p>Everest</text:p>
          </table:table-cell>
          <table:table-cell office:value-type="string" office:string-value="Sagarmatha" calcext:value-type="string">
            <text:p>Sagarmatha</text:p>
          </table:table-cell>
          <table:table-cell office:value-type="string" office:string-value="Chomolungma" calcext:value-type="string">
            <text:p>Chomolungma</text:p>
          </table:table-cell>
          <table:table-cell office:value-type="string" office:string-value="Death’s Head" calcext:value-type="string">
            <text:p>Death’s Head</text:p>
          </table:table-cell>
          <table:table-cell table:content-validation-name="val12" office:value-type="string" office:string-value="Swallowtail" calcext:value-type="string">
            <text:p>Swallowtail</text:p>
          </table:table-cell>
          <table:table-cell office:value-type="string" office:string-value="Swallowtail (Ranger Variant)" calcext:value-type="string">
            <text:p>Swallowtail (Ranger Variant)</text:p>
          </table:table-cell>
          <table:table-cell office:value-type="string" office:string-value="Balor" calcext:value-type="string">
            <text:p>Balor</text:p>
          </table:table-cell>
          <table:table-cell office:value-type="string" office:string-value="Hecatoncheires" calcext:value-type="string">
            <text:p>Hecatoncheires</text:p>
          </table:table-cell>
          <table:table-cell office:value-type="string" office:string-value="Goblin" calcext:value-type="string">
            <text:p>Goblin</text:p>
          </table:table-cell>
          <table:table-cell office:value-type="string" office:string-value="Pegasus" calcext:value-type="string">
            <text:p>Pegasus</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76"/>
        </table:table-row>
        <table:table-row table:style-name="ro2">
          <table:table-cell office:value-type="float" office:value="9" calcext:value-type="float">
            <text:p>9</text:p>
          </table:table-cell>
          <table:table-cell table:style-name="ce8" table:content-validation-name="val1" office:value-type="string" calcext:value-type="string">
            <text:p>Spot</text:p>
          </table:table-cell>
          <table:table-cell table:style-name="ce14" table:content-validation-name="val3" office:value-type="string" calcext:value-type="string">
            <text:p>Infiltrator II</text:p>
          </table:table-cell>
          <table:table-cell table:style-name="ce18" table:content-validation-name="val4" office:value-type="string" calcext:value-type="string">
            <text:p>Hull</text:p>
          </table:table-cell>
          <table:table-cell table:style-name="ce19" table:content-validation-name="val5" office:value-type="string" calcext:value-type="string">
            <text:p>Pegasus II</text:p>
          </table:table-cell>
          <table:table-cell table:style-name="ce8" table:content-validation-name="val6" office:value-type="string" calcext:value-type="string">
            <text:p>Pegasus</text:p>
          </table:table-cell>
          <table:table-cell table:style-name="ce27" table:content-validation-name="val9" office:value-type="string" calcext:value-type="string">
            <text:p>Mount Retrofitting</text:p>
          </table:table-cell>
          <table:table-cell/>
          <table:table-cell table:style-name="ce38" table:formula="of:=COUNTIF([.$D$2:.$D14];&quot;Hull&quot;)" office:value-type="float" office:value="3" calcext:value-type="float">
            <text:p>3</text:p>
          </table:table-cell>
          <table:table-cell table:style-name="ce40" table:formula="of:=COUNTIF([.$D$2:.$D14];&quot;Agility&quot;)" office:value-type="float" office:value="4" calcext:value-type="float">
            <text:p>4</text:p>
          </table:table-cell>
          <table:table-cell table:style-name="ce38" table:formula="of:=COUNTIF([.$D$2:.$D14];&quot;Systems&quot;)" office:value-type="float" office:value="4" calcext:value-type="float">
            <text:p>4</text:p>
          </table:table-cell>
          <table:table-cell table:style-name="ce40" table:formula="of:=COUNTIF([.$D$2:.$D14];&quot;Engineering&quot;)" office:value-type="float" office:value="0" calcext:value-type="float">
            <text:p>0</text:p>
          </table:table-cell>
          <table:table-cell/>
          <table:table-cell table:formula="of:=IFERROR(COM.MICROSOFT.XLOOKUP(LOOKUP(2;1/([.$F$2:.$F14]&lt;&gt;&quot;&quot;);[.$F$2:.$F14]);[$Frames.$A$1:.$A$100];[$Frames.D$1:.D$100]);&quot;&quot;)" office:value-type="float" office:value="1" calcext:value-type="float">
            <text:p>1</text:p>
          </table:table-cell>
          <table:table-cell table:style-name="ce57" table:formula="of:=IFERROR(COM.MICROSOFT.XLOOKUP(LOOKUP(2;1/([.$F$2:.$F14]&lt;&gt;&quot;&quot;);[.$F$2:.$F14]);[$Frames.$A$1:.$A$100];[$Frames.E$1:.E$100]);&quot;&quot;)+CEILING([.A14]/2)+2*[.I14]+[.BC80]" office:value-type="float" office:value="19" calcext:value-type="float">
            <text:p>19</text:p>
          </table:table-cell>
          <table:table-cell table:style-name="ce59" table:formula="of:=MIN(4; IFERROR(COM.MICROSOFT.XLOOKUP(LOOKUP(2;1/([.$F$2:.$F14]&lt;&gt;&quot;&quot;);[.$F$2:.$F14]);[$Frames.$A$1:.$A$100];[$Frames.F$1:.F$100]);&quot;&quot;)+[.BD80])" office:value-type="float" office:value="0" calcext:value-type="float">
            <text:p>0</text:p>
          </table:table-cell>
          <table:table-cell table:style-name="ce57" table:formula="of:=IFERROR(COM.MICROSOFT.XLOOKUP(LOOKUP(2;1/([.$F$2:.$F14]&lt;&gt;&quot;&quot;);[.$F$2:.$F14]);[$Frames.$A$1:.$A$100];[$Frames.G$1:.G$100]);&quot;&quot;)+[.L14]+[.BE80]" office:value-type="float" office:value="6" calcext:value-type="float">
            <text:p>6</text:p>
          </table:table-cell>
          <table:table-cell table:style-name="ce59" table:formula="of:=IFERROR(COM.MICROSOFT.XLOOKUP(LOOKUP(2;1/([.$F$2:.$F14]&lt;&gt;&quot;&quot;);[.$F$2:.$F14]);[$Frames.$A$1:.$A$100];[$Frames.H$1:.H$100]);&quot;&quot;)+[.J14]+[.BF80]" office:value-type="float" office:value="12" calcext:value-type="float">
            <text:p>12</text:p>
          </table:table-cell>
          <table:table-cell table:style-name="ce57" table:formula="of:=IFERROR(COM.MICROSOFT.XLOOKUP(LOOKUP(2;1/([.$F$2:.$F14]&lt;&gt;&quot;&quot;);[.$F$2:.$F14]);[$Frames.$A$1:.$A$100];[$Frames.I$1:.I$100]);&quot;&quot;)+FLOOR([.J14]/2)+[.BG80]" office:value-type="float" office:value="6" calcext:value-type="float">
            <text:p>6</text:p>
          </table:table-cell>
          <table:table-cell table:style-name="ce59" table:formula="of:=IFERROR(COM.MICROSOFT.XLOOKUP(LOOKUP(2;1/([.$F$2:.$F14]&lt;&gt;&quot;&quot;);[.$F$2:.$F14]);[$Frames.$A$1:.$A$100];[$Frames.J$1:.J$100]);&quot;&quot;)+[.K14]+[.BH80]" office:value-type="float" office:value="14" calcext:value-type="float">
            <text:p>14</text:p>
          </table:table-cell>
          <table:table-cell table:style-name="ce57" table:formula="of:=IFERROR(COM.MICROSOFT.XLOOKUP(LOOKUP(2;1/([.$F$2:.$F14]&lt;&gt;&quot;&quot;);[.$F$2:.$F14]);[$Frames.$A$1:.$A$100];[$Frames.K$1:.K$100]);&quot;&quot;)+[.K14]+[.BI80]" office:value-type="float" office:value="5" calcext:value-type="float">
            <text:p>5</text:p>
          </table:table-cell>
          <table:table-cell table:style-name="ce59" table:formula="of:=IFERROR(COM.MICROSOFT.XLOOKUP(LOOKUP(2;1/([.$F$2:.$F14]&lt;&gt;&quot;&quot;);[.$F$2:.$F14]);[$Frames.$A$1:.$A$100];[$Frames.L$1:.L$100]);&quot;&quot;)+[.BJ80]" office:value-type="float" office:value="10" calcext:value-type="float">
            <text:p>10</text:p>
          </table:table-cell>
          <table:table-cell table:style-name="ce57" table:formula="of:=IFERROR(COM.MICROSOFT.XLOOKUP(LOOKUP(2;1/([.$F$2:.$F14]&lt;&gt;&quot;&quot;);[.$F$2:.$F14]);[$Frames.$A$1:.$A$100];[$Frames.M$1:.M$100]);&quot;&quot;)+FLOOR([.I14]/2)+[.BK80]" office:value-type="float" office:value="4" calcext:value-type="float">
            <text:p>4</text:p>
          </table:table-cell>
          <table:table-cell table:style-name="ce59" table:formula="of:=IFERROR(COM.MICROSOFT.XLOOKUP(LOOKUP(2;1/([.$F$2:.$F14]&lt;&gt;&quot;&quot;);[.$F$2:.$F14]);[$Frames.$A$1:.$A$100];[$Frames.N$1:.N$100]);&quot;&quot;)+CEILING([.A14]/2)+[.BL80]" office:value-type="float" office:value="15" calcext:value-type="float">
            <text:p>15</text:p>
          </table:table-cell>
          <table:table-cell table:style-name="ce62" table:formula="of:=IFERROR(COM.MICROSOFT.XLOOKUP(LOOKUP(2;1/([.$F$2:.$F14]&lt;&gt;&quot;&quot;);[.$F$2:.$F14]);[$Frames.$A$1:.$A$100];[$Frames.O$1:.O$100]);&quot;&quot;)+CEILING([.A14]/2)+FLOOR([.K14]/2)+[.BM80]" office:value-type="float" office:value="14" calcext:value-type="float">
            <text:p>14</text:p>
          </table:table-cell>
          <table:table-cell table:formula="of:=1+[.BN80]" office:value-type="float" office:value="1" calcext:value-type="float">
            <text:p>1</text:p>
          </table:table-cell>
          <table:table-cell/>
          <table:table-cell table:style-name="ce71" office:value-type="string" calcext:value-type="string">
            <text:p>Railgun</text:p>
          </table:table-cell>
          <table:table-cell table:style-name="ce71" office:value-type="string" calcext:value-type="string">
            <text:p>Smartgun/Nexus (Light)</text:p>
          </table:table-cell>
          <table:table-cell table:style-name="ce71" office:value-type="string" calcext:value-type="string">
            <text:p>Prototype Weapon II</text:p>
          </table:table-cell>
          <table:table-cell table:style-name="ce71" office:value-type="string" calcext:value-type="string">
            <text:p>Autopod</text:p>
          </table:table-cell>
          <table:table-cell table:style-name="ce71" table:number-columns-repeated="2"/>
          <table:table-cell/>
          <table:table-cell table:style-name="ce66" table:formula="of:=COM.MICROSOFT.LET(     _xlpm.weaponText;     COM.MICROSOFT.TEXTJOIN(&quot;/&quot;;1;[.$AB14:.$AG14]);      _xlpm.weaponList;     &quot;¶&quot;&amp;SUBSTITUTE(_xlpm.weaponText;&quot;/&quot;;&quot;§¶&quot;)&amp;&quot;§&quot;;      _xlpm.systemsCost;     SUMPRODUCT(         ([$Systems.$A$11:.$A$300]&lt;&gt;&quot;&quot;)         *         COUNTIF([.$AJ14:.$AX14];[$Systems.$A$11:.$A$300])         *         [$Systems.$E$11:.$E$300]     );      _xlpm.weaponsCost;     SUMPRODUCT(         ([$Weapons.$A$2:.$A$300]&lt;&gt;&quot;&quot;)         *         (             LEN(_xlpm.weaponList)             -             LEN(                 SUBSTITUTE(                     _xlpm.weaponList;                     &quot;¶&quot;&amp;[$Weapons.$A$2:.$A$300]&amp;&quot;§&quot;;                     &quot;&quot;                 )             )         )         /         LEN(&quot;¶&quot;&amp;[$Weapons.$A$2:.$A$300]&amp;&quot;§&quot;)         *         [$Weapons.$H$2:.$H$300]     );      IF(         COUNTA([.$AB14:.$AG14])+COUNTA([.$AJ14:.$AX14]);         _xlpm.systemsCost+_xlpm.weaponsCost;         &quot;&quot;     ) )" office:value-type="float" office:value="13" calcext:value-type="float">
            <text:p>13</text:p>
          </table:table-cell>
          <table:table-cell table:style-name="ce8" table:content-validation-name="val11" office:value-type="string" calcext:value-type="string">
            <text:p>Enlightenment-Class NHP</text:p>
          </table:table-cell>
          <table:table-cell table:style-name="ce8" table:content-validation-name="val11" office:value-type="string" calcext:value-type="string">
            <text:p>Nanocomposite Adaptation</text:p>
          </table:table-cell>
          <table:table-cell table:style-name="ce8" table:content-validation-name="val11" office:value-type="string" calcext:value-type="string">
            <text:p>High-Stress Mag Clamps</text:p>
          </table:table-cell>
          <table:table-cell table:style-name="ce8" table:content-validation-name="val11" office:value-type="string" calcext:value-type="string">
            <text:p>H0R_OS System Upgrade I</text:p>
          </table:table-cell>
          <table:table-cell table:style-name="ce8" table:content-validation-name="val11" office:value-type="string" calcext:value-type="string">
            <text:p>H0R_OS System Upgrade II</text:p>
          </table:table-cell>
          <table:table-cell table:style-name="ce8" table:content-validation-name="val11" office:value-type="string" calcext:value-type="string">
            <text:p>Eye of Horus</text:p>
          </table:table-cell>
          <table:table-cell table:style-name="ce8" table:content-validation-name="val11" table:number-columns-repeated="11"/>
          <table:table-cell table:number-columns-repeated="2"/>
          <table:table-cell table:number-matrix-columns-spanned="54" table:number-matrix-rows-spanned="1" table:formula="of:=TRANSPOSE(     COM.MICROSOFT.FILTER(         [$Frames.$A$2:.$A$100];         ([$Frames.$C$2:.$C$100]=&quot;&quot;)         +         (COUNTIF([$Build.$E$5:.$E17];[$Frames.$C$2:.$C$100])&gt;0);         &quot;&quot;     ) )" office:value-type="string" office:string-value="Everest" calcext:value-type="string">
            <text:p>Everest</text:p>
          </table:table-cell>
          <table:table-cell office:value-type="string" office:string-value="Sagarmatha" calcext:value-type="string">
            <text:p>Sagarmatha</text:p>
          </table:table-cell>
          <table:table-cell office:value-type="string" office:string-value="Chomolungma" calcext:value-type="string">
            <text:p>Chomolungma</text:p>
          </table:table-cell>
          <table:table-cell office:value-type="string" office:string-value="Death’s Head" calcext:value-type="string">
            <text:p>Death’s Head</text:p>
          </table:table-cell>
          <table:table-cell table:content-validation-name="val12" office:value-type="string" office:string-value="Swallowtail" calcext:value-type="string">
            <text:p>Swallowtail</text:p>
          </table:table-cell>
          <table:table-cell office:value-type="string" office:string-value="Swallowtail (Ranger Variant)" calcext:value-type="string">
            <text:p>Swallowtail (Ranger Variant)</text:p>
          </table:table-cell>
          <table:table-cell office:value-type="string" office:string-value="Balor" calcext:value-type="string">
            <text:p>Balor</text:p>
          </table:table-cell>
          <table:table-cell office:value-type="string" office:string-value="Hecatoncheires" calcext:value-type="string">
            <text:p>Hecatoncheires</text:p>
          </table:table-cell>
          <table:table-cell office:value-type="string" office:string-value="Goblin" calcext:value-type="string">
            <text:p>Goblin</text:p>
          </table:table-cell>
          <table:table-cell office:value-type="string" office:string-value="Pegasus" calcext:value-type="string">
            <text:p>Pegasus</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76"/>
        </table:table-row>
        <table:table-row table:style-name="ro2">
          <table:table-cell office:value-type="float" office:value="10" calcext:value-type="float">
            <text:p>10</text:p>
          </table:table-cell>
          <table:table-cell table:style-name="ce8" table:content-validation-name="val1" office:value-type="string" calcext:value-type="string">
            <text:p>Hack or Fix</text:p>
          </table:table-cell>
          <table:table-cell table:style-name="ce14" table:content-validation-name="val3" office:value-type="string" calcext:value-type="string">
            <text:p>Engineer III</text:p>
          </table:table-cell>
          <table:table-cell table:style-name="ce18" table:content-validation-name="val4" office:value-type="string" calcext:value-type="string">
            <text:p>Hull</text:p>
          </table:table-cell>
          <table:table-cell table:style-name="ce19" table:content-validation-name="val5" office:value-type="string" calcext:value-type="string">
            <text:p>Swallowtail I</text:p>
          </table:table-cell>
          <table:table-cell table:style-name="ce8" table:content-validation-name="val6"/>
          <table:table-cell table:style-name="ce12"/>
          <table:table-cell/>
          <table:table-cell table:style-name="ce38" table:formula="of:=COUNTIF([.$D$2:.$D15];&quot;Hull&quot;)" office:value-type="float" office:value="4" calcext:value-type="float">
            <text:p>4</text:p>
          </table:table-cell>
          <table:table-cell table:style-name="ce40" table:formula="of:=COUNTIF([.$D$2:.$D15];&quot;Agility&quot;)" office:value-type="float" office:value="4" calcext:value-type="float">
            <text:p>4</text:p>
          </table:table-cell>
          <table:table-cell table:style-name="ce38" table:formula="of:=COUNTIF([.$D$2:.$D15];&quot;Systems&quot;)" office:value-type="float" office:value="4" calcext:value-type="float">
            <text:p>4</text:p>
          </table:table-cell>
          <table:table-cell table:style-name="ce40" table:formula="of:=COUNTIF([.$D$2:.$D15];&quot;Engineering&quot;)" office:value-type="float" office:value="0" calcext:value-type="float">
            <text:p>0</text:p>
          </table:table-cell>
          <table:table-cell/>
          <table:table-cell table:formula="of:=IFERROR(COM.MICROSOFT.XLOOKUP(LOOKUP(2;1/([.$F$2:.$F15]&lt;&gt;&quot;&quot;);[.$F$2:.$F15]);[$Frames.$A$1:.$A$100];[$Frames.D$1:.D$100]);&quot;&quot;)" office:value-type="float" office:value="1" calcext:value-type="float">
            <text:p>1</text:p>
          </table:table-cell>
          <table:table-cell table:style-name="ce57" table:formula="of:=IFERROR(COM.MICROSOFT.XLOOKUP(LOOKUP(2;1/([.$F$2:.$F15]&lt;&gt;&quot;&quot;);[.$F$2:.$F15]);[$Frames.$A$1:.$A$100];[$Frames.E$1:.E$100]);&quot;&quot;)+CEILING([.A15]/2)+2*[.I15]+[.BC81]" office:value-type="float" office:value="21" calcext:value-type="float">
            <text:p>21</text:p>
          </table:table-cell>
          <table:table-cell table:style-name="ce59" table:formula="of:=MIN(4; IFERROR(COM.MICROSOFT.XLOOKUP(LOOKUP(2;1/([.$F$2:.$F15]&lt;&gt;&quot;&quot;);[.$F$2:.$F15]);[$Frames.$A$1:.$A$100];[$Frames.F$1:.F$100]);&quot;&quot;)+[.BD81])" office:value-type="float" office:value="0" calcext:value-type="float">
            <text:p>0</text:p>
          </table:table-cell>
          <table:table-cell table:style-name="ce57" table:formula="of:=IFERROR(COM.MICROSOFT.XLOOKUP(LOOKUP(2;1/([.$F$2:.$F15]&lt;&gt;&quot;&quot;);[.$F$2:.$F15]);[$Frames.$A$1:.$A$100];[$Frames.G$1:.G$100]);&quot;&quot;)+[.L15]+[.BE81]" office:value-type="float" office:value="6" calcext:value-type="float">
            <text:p>6</text:p>
          </table:table-cell>
          <table:table-cell table:style-name="ce59" table:formula="of:=IFERROR(COM.MICROSOFT.XLOOKUP(LOOKUP(2;1/([.$F$2:.$F15]&lt;&gt;&quot;&quot;);[.$F$2:.$F15]);[$Frames.$A$1:.$A$100];[$Frames.H$1:.H$100]);&quot;&quot;)+[.J15]+[.BF81]" office:value-type="float" office:value="12" calcext:value-type="float">
            <text:p>12</text:p>
          </table:table-cell>
          <table:table-cell table:style-name="ce57" table:formula="of:=IFERROR(COM.MICROSOFT.XLOOKUP(LOOKUP(2;1/([.$F$2:.$F15]&lt;&gt;&quot;&quot;);[.$F$2:.$F15]);[$Frames.$A$1:.$A$100];[$Frames.I$1:.I$100]);&quot;&quot;)+FLOOR([.J15]/2)+[.BG81]" office:value-type="float" office:value="6" calcext:value-type="float">
            <text:p>6</text:p>
          </table:table-cell>
          <table:table-cell table:style-name="ce59" table:formula="of:=IFERROR(COM.MICROSOFT.XLOOKUP(LOOKUP(2;1/([.$F$2:.$F15]&lt;&gt;&quot;&quot;);[.$F$2:.$F15]);[$Frames.$A$1:.$A$100];[$Frames.J$1:.J$100]);&quot;&quot;)+[.K15]+[.BH81]" office:value-type="float" office:value="14" calcext:value-type="float">
            <text:p>14</text:p>
          </table:table-cell>
          <table:table-cell table:style-name="ce57" table:formula="of:=IFERROR(COM.MICROSOFT.XLOOKUP(LOOKUP(2;1/([.$F$2:.$F15]&lt;&gt;&quot;&quot;);[.$F$2:.$F15]);[$Frames.$A$1:.$A$100];[$Frames.K$1:.K$100]);&quot;&quot;)+[.K15]+[.BI81]" office:value-type="float" office:value="5" calcext:value-type="float">
            <text:p>5</text:p>
          </table:table-cell>
          <table:table-cell table:style-name="ce59" table:formula="of:=IFERROR(COM.MICROSOFT.XLOOKUP(LOOKUP(2;1/([.$F$2:.$F15]&lt;&gt;&quot;&quot;);[.$F$2:.$F15]);[$Frames.$A$1:.$A$100];[$Frames.L$1:.L$100]);&quot;&quot;)+[.BJ81]" office:value-type="float" office:value="10" calcext:value-type="float">
            <text:p>10</text:p>
          </table:table-cell>
          <table:table-cell table:style-name="ce57" table:formula="of:=IFERROR(COM.MICROSOFT.XLOOKUP(LOOKUP(2;1/([.$F$2:.$F15]&lt;&gt;&quot;&quot;);[.$F$2:.$F15]);[$Frames.$A$1:.$A$100];[$Frames.M$1:.M$100]);&quot;&quot;)+FLOOR([.I15]/2)+[.BK81]" office:value-type="float" office:value="5" calcext:value-type="float">
            <text:p>5</text:p>
          </table:table-cell>
          <table:table-cell table:style-name="ce59" table:formula="of:=IFERROR(COM.MICROSOFT.XLOOKUP(LOOKUP(2;1/([.$F$2:.$F15]&lt;&gt;&quot;&quot;);[.$F$2:.$F15]);[$Frames.$A$1:.$A$100];[$Frames.N$1:.N$100]);&quot;&quot;)+CEILING([.A15]/2)+[.BL81]" office:value-type="float" office:value="15" calcext:value-type="float">
            <text:p>15</text:p>
          </table:table-cell>
          <table:table-cell table:style-name="ce62" table:formula="of:=IFERROR(COM.MICROSOFT.XLOOKUP(LOOKUP(2;1/([.$F$2:.$F15]&lt;&gt;&quot;&quot;);[.$F$2:.$F15]);[$Frames.$A$1:.$A$100];[$Frames.O$1:.O$100]);&quot;&quot;)+CEILING([.A15]/2)+FLOOR([.K15]/2)+[.BM81]" office:value-type="float" office:value="14" calcext:value-type="float">
            <text:p>14</text:p>
          </table:table-cell>
          <table:table-cell table:formula="of:=1+[.BN81]" office:value-type="float" office:value="1" calcext:value-type="float">
            <text:p>1</text:p>
          </table:table-cell>
          <table:table-cell/>
          <table:table-cell table:style-name="ce71" office:value-type="string" calcext:value-type="string">
            <text:p>Railgun</text:p>
          </table:table-cell>
          <table:table-cell table:style-name="ce71" office:value-type="string" calcext:value-type="string">
            <text:p>Smartgun/Nexus (Light)</text:p>
          </table:table-cell>
          <table:table-cell table:style-name="ce71" office:value-type="string" calcext:value-type="string">
            <text:p>Prototype Weapon II</text:p>
          </table:table-cell>
          <table:table-cell table:style-name="ce71" office:value-type="string" calcext:value-type="string">
            <text:p>Autopod</text:p>
          </table:table-cell>
          <table:table-cell table:style-name="ce71" table:number-columns-repeated="2"/>
          <table:table-cell/>
          <table:table-cell table:style-name="ce66" table:formula="of:=COM.MICROSOFT.LET(     _xlpm.weaponText;     COM.MICROSOFT.TEXTJOIN(&quot;/&quot;;1;[.$AB15:.$AG15]);      _xlpm.weaponList;     &quot;¶&quot;&amp;SUBSTITUTE(_xlpm.weaponText;&quot;/&quot;;&quot;§¶&quot;)&amp;&quot;§&quot;;      _xlpm.systemsCost;     SUMPRODUCT(         ([$Systems.$A$11:.$A$300]&lt;&gt;&quot;&quot;)         *         COUNTIF([.$AJ15:.$AX15];[$Systems.$A$11:.$A$300])         *         [$Systems.$E$11:.$E$300]     );      _xlpm.weaponsCost;     SUMPRODUCT(         ([$Weapons.$A$2:.$A$300]&lt;&gt;&quot;&quot;)         *         (             LEN(_xlpm.weaponList)             -             LEN(                 SUBSTITUTE(                     _xlpm.weaponList;                     &quot;¶&quot;&amp;[$Weapons.$A$2:.$A$300]&amp;&quot;§&quot;;                     &quot;&quot;                 )             )         )         /         LEN(&quot;¶&quot;&amp;[$Weapons.$A$2:.$A$300]&amp;&quot;§&quot;)         *         [$Weapons.$H$2:.$H$300]     );      IF(         COUNTA([.$AB15:.$AG15])+COUNTA([.$AJ15:.$AX15]);         _xlpm.systemsCost+_xlpm.weaponsCost;         &quot;&quot;     ) )" office:value-type="float" office:value="13" calcext:value-type="float">
            <text:p>13</text:p>
          </table:table-cell>
          <table:table-cell table:style-name="ce8" table:content-validation-name="val11" office:value-type="string" calcext:value-type="string">
            <text:p>Enlightenment-Class NHP</text:p>
          </table:table-cell>
          <table:table-cell table:style-name="ce8" table:content-validation-name="val11" office:value-type="string" calcext:value-type="string">
            <text:p>Nanocomposite Adaptation</text:p>
          </table:table-cell>
          <table:table-cell table:style-name="ce8" table:content-validation-name="val11" office:value-type="string" calcext:value-type="string">
            <text:p>High-Stress Mag Clamps</text:p>
          </table:table-cell>
          <table:table-cell table:style-name="ce8" table:content-validation-name="val11" office:value-type="string" calcext:value-type="string">
            <text:p>H0R_OS System Upgrade I</text:p>
          </table:table-cell>
          <table:table-cell table:style-name="ce8" table:content-validation-name="val11" office:value-type="string" calcext:value-type="string">
            <text:p>H0R_OS System Upgrade II</text:p>
          </table:table-cell>
          <table:table-cell table:style-name="ce8" table:content-validation-name="val11" office:value-type="string" calcext:value-type="string">
            <text:p>Eye of Horus</text:p>
          </table:table-cell>
          <table:table-cell table:style-name="ce8" table:content-validation-name="val11" table:number-columns-repeated="11"/>
          <table:table-cell table:number-columns-repeated="6"/>
          <table:table-cell table:content-validation-name="val12"/>
          <table:table-cell table:number-columns-repeated="125"/>
        </table:table-row>
        <table:table-row table:style-name="ro2">
          <table:table-cell office:value-type="float" office:value="11" calcext:value-type="float">
            <text:p>11</text:p>
          </table:table-cell>
          <table:table-cell table:style-name="ce8" table:content-validation-name="val1" office:value-type="string" calcext:value-type="string">
            <text:p>Lead or Inspire</text:p>
          </table:table-cell>
          <table:table-cell table:style-name="ce14" table:content-validation-name="val3" office:value-type="string" calcext:value-type="string">
            <text:p>Leader I</text:p>
          </table:table-cell>
          <table:table-cell table:style-name="ce18" table:content-validation-name="val4" office:value-type="string" calcext:value-type="string">
            <text:p>Systems</text:p>
          </table:table-cell>
          <table:table-cell table:style-name="ce19" table:content-validation-name="val5" office:value-type="string" calcext:value-type="string">
            <text:p>Swallowtail II</text:p>
          </table:table-cell>
          <table:table-cell table:style-name="ce8" table:content-validation-name="val6" office:value-type="string" calcext:value-type="string">
            <text:p>Goblin</text:p>
          </table:table-cell>
          <table:table-cell table:style-name="ce12"/>
          <table:table-cell/>
          <table:table-cell table:style-name="ce38" table:formula="of:=COUNTIF([.$D$2:.$D16];&quot;Hull&quot;)" office:value-type="float" office:value="4" calcext:value-type="float">
            <text:p>4</text:p>
          </table:table-cell>
          <table:table-cell table:style-name="ce40" table:formula="of:=COUNTIF([.$D$2:.$D16];&quot;Agility&quot;)" office:value-type="float" office:value="4" calcext:value-type="float">
            <text:p>4</text:p>
          </table:table-cell>
          <table:table-cell table:style-name="ce38" table:formula="of:=COUNTIF([.$D$2:.$D16];&quot;Systems&quot;)" office:value-type="float" office:value="5" calcext:value-type="float">
            <text:p>5</text:p>
          </table:table-cell>
          <table:table-cell table:style-name="ce40" table:formula="of:=COUNTIF([.$D$2:.$D16];&quot;Engineering&quot;)" office:value-type="float" office:value="0" calcext:value-type="float">
            <text:p>0</text:p>
          </table:table-cell>
          <table:table-cell/>
          <table:table-cell table:formula="of:=IFERROR(COM.MICROSOFT.XLOOKUP(LOOKUP(2;1/([.$F$2:.$F16]&lt;&gt;&quot;&quot;);[.$F$2:.$F16]);[$Frames.$A$1:.$A$100];[$Frames.D$1:.D$100]);&quot;&quot;)" office:value-type="float" office:value="0.5" calcext:value-type="float">
            <text:p>0.5</text:p>
          </table:table-cell>
          <table:table-cell table:style-name="ce57" table:formula="of:=IFERROR(COM.MICROSOFT.XLOOKUP(LOOKUP(2;1/([.$F$2:.$F16]&lt;&gt;&quot;&quot;);[.$F$2:.$F16]);[$Frames.$A$1:.$A$100];[$Frames.E$1:.E$100]);&quot;&quot;)+CEILING([.A16]/2)+2*[.I16]+[.BC82]" office:value-type="float" office:value="20" calcext:value-type="float">
            <text:p>20</text:p>
          </table:table-cell>
          <table:table-cell table:style-name="ce59" table:formula="of:=MIN(4; IFERROR(COM.MICROSOFT.XLOOKUP(LOOKUP(2;1/([.$F$2:.$F16]&lt;&gt;&quot;&quot;);[.$F$2:.$F16]);[$Frames.$A$1:.$A$100];[$Frames.F$1:.F$100]);&quot;&quot;)+[.BD82])" office:value-type="float" office:value="0" calcext:value-type="float">
            <text:p>0</text:p>
          </table:table-cell>
          <table:table-cell table:style-name="ce57" table:formula="of:=IFERROR(COM.MICROSOFT.XLOOKUP(LOOKUP(2;1/([.$F$2:.$F16]&lt;&gt;&quot;&quot;);[.$F$2:.$F16]);[$Frames.$A$1:.$A$100];[$Frames.G$1:.G$100]);&quot;&quot;)+[.L16]+[.BE82]" office:value-type="float" office:value="4" calcext:value-type="float">
            <text:p>4</text:p>
          </table:table-cell>
          <table:table-cell table:style-name="ce59" table:formula="of:=IFERROR(COM.MICROSOFT.XLOOKUP(LOOKUP(2;1/([.$F$2:.$F16]&lt;&gt;&quot;&quot;);[.$F$2:.$F16]);[$Frames.$A$1:.$A$100];[$Frames.H$1:.H$100]);&quot;&quot;)+[.J16]+[.BF82]" office:value-type="float" office:value="14" calcext:value-type="float">
            <text:p>14</text:p>
          </table:table-cell>
          <table:table-cell table:style-name="ce57" table:formula="of:=IFERROR(COM.MICROSOFT.XLOOKUP(LOOKUP(2;1/([.$F$2:.$F16]&lt;&gt;&quot;&quot;);[.$F$2:.$F16]);[$Frames.$A$1:.$A$100];[$Frames.I$1:.I$100]);&quot;&quot;)+FLOOR([.J16]/2)+[.BG82]" office:value-type="float" office:value="7" calcext:value-type="float">
            <text:p>7</text:p>
          </table:table-cell>
          <table:table-cell table:style-name="ce59" table:formula="of:=IFERROR(COM.MICROSOFT.XLOOKUP(LOOKUP(2;1/([.$F$2:.$F16]&lt;&gt;&quot;&quot;);[.$F$2:.$F16]);[$Frames.$A$1:.$A$100];[$Frames.J$1:.J$100]);&quot;&quot;)+[.K16]+[.BH82]" office:value-type="float" office:value="17" calcext:value-type="float">
            <text:p>17</text:p>
          </table:table-cell>
          <table:table-cell table:style-name="ce57" table:formula="of:=IFERROR(COM.MICROSOFT.XLOOKUP(LOOKUP(2;1/([.$F$2:.$F16]&lt;&gt;&quot;&quot;);[.$F$2:.$F16]);[$Frames.$A$1:.$A$100];[$Frames.K$1:.K$100]);&quot;&quot;)+[.K16]+[.BI82]" office:value-type="float" office:value="7" calcext:value-type="float">
            <text:p>7</text:p>
          </table:table-cell>
          <table:table-cell table:style-name="ce59" table:formula="of:=IFERROR(COM.MICROSOFT.XLOOKUP(LOOKUP(2;1/([.$F$2:.$F16]&lt;&gt;&quot;&quot;);[.$F$2:.$F16]);[$Frames.$A$1:.$A$100];[$Frames.L$1:.L$100]);&quot;&quot;)+[.BJ82]" office:value-type="float" office:value="20" calcext:value-type="float">
            <text:p>20</text:p>
          </table:table-cell>
          <table:table-cell table:style-name="ce57" table:formula="of:=IFERROR(COM.MICROSOFT.XLOOKUP(LOOKUP(2;1/([.$F$2:.$F16]&lt;&gt;&quot;&quot;);[.$F$2:.$F16]);[$Frames.$A$1:.$A$100];[$Frames.M$1:.M$100]);&quot;&quot;)+FLOOR([.I16]/2)+[.BK82]" office:value-type="float" office:value="4" calcext:value-type="float">
            <text:p>4</text:p>
          </table:table-cell>
          <table:table-cell table:style-name="ce59" table:formula="of:=IFERROR(COM.MICROSOFT.XLOOKUP(LOOKUP(2;1/([.$F$2:.$F16]&lt;&gt;&quot;&quot;);[.$F$2:.$F16]);[$Frames.$A$1:.$A$100];[$Frames.N$1:.N$100]);&quot;&quot;)+CEILING([.A16]/2)+[.BL82]" office:value-type="float" office:value="17" calcext:value-type="float">
            <text:p>17</text:p>
          </table:table-cell>
          <table:table-cell table:style-name="ce62" table:formula="of:=IFERROR(COM.MICROSOFT.XLOOKUP(LOOKUP(2;1/([.$F$2:.$F16]&lt;&gt;&quot;&quot;);[.$F$2:.$F16]);[$Frames.$A$1:.$A$100];[$Frames.O$1:.O$100]);&quot;&quot;)+CEILING([.A16]/2)+FLOOR([.K16]/2)+[.BM82]" office:value-type="float" office:value="16" calcext:value-type="float">
            <text:p>16</text:p>
          </table:table-cell>
          <table:table-cell table:formula="of:=1+[.BN82]" office:value-type="float" office:value="1" calcext:value-type="float">
            <text:p>1</text:p>
          </table:table-cell>
          <table:table-cell/>
          <table:table-cell table:style-name="ce71" office:value-type="string" calcext:value-type="string">
            <text:p>Railgun</text:p>
          </table:table-cell>
          <table:table-cell table:style-name="ce71" office:value-type="string" calcext:value-type="string">
            <text:p>Smartgun/Oracle LMG-I</text:p>
          </table:table-cell>
          <table:table-cell table:style-name="ce71" office:value-type="string" calcext:value-type="string">
            <text:p>Prototype Weapon II</text:p>
          </table:table-cell>
          <table:table-cell table:style-name="ce71" office:value-type="string" calcext:value-type="string">
            <text:p>Autopod</text:p>
          </table:table-cell>
          <table:table-cell table:style-name="ce71" table:number-columns-repeated="2"/>
          <table:table-cell/>
          <table:table-cell table:style-name="ce66" table:formula="of:=COM.MICROSOFT.LET(     _xlpm.weaponText;     COM.MICROSOFT.TEXTJOIN(&quot;/&quot;;1;[.$AB16:.$AG16]);      _xlpm.weaponList;     &quot;¶&quot;&amp;SUBSTITUTE(_xlpm.weaponText;&quot;/&quot;;&quot;§¶&quot;)&amp;&quot;§&quot;;      _xlpm.systemsCost;     SUMPRODUCT(         ([$Systems.$A$11:.$A$300]&lt;&gt;&quot;&quot;)         *         COUNTIF([.$AJ16:.$AX16];[$Systems.$A$11:.$A$300])         *         [$Systems.$E$11:.$E$300]     );      _xlpm.weaponsCost;     SUMPRODUCT(         ([$Weapons.$A$2:.$A$300]&lt;&gt;&quot;&quot;)         *         (             LEN(_xlpm.weaponList)             -             LEN(                 SUBSTITUTE(                     _xlpm.weaponList;                     &quot;¶&quot;&amp;[$Weapons.$A$2:.$A$300]&amp;&quot;§&quot;;                     &quot;&quot;                 )             )         )         /         LEN(&quot;¶&quot;&amp;[$Weapons.$A$2:.$A$300]&amp;&quot;§&quot;)         *         [$Weapons.$H$2:.$H$300]     );      IF(         COUNTA([.$AB16:.$AG16])+COUNTA([.$AJ16:.$AX16]);         _xlpm.systemsCost+_xlpm.weaponsCost;         &quot;&quot;     ) )" office:value-type="float" office:value="14" calcext:value-type="float">
            <text:p>14</text:p>
          </table:table-cell>
          <table:table-cell table:style-name="ce8" table:content-validation-name="val11" office:value-type="string" calcext:value-type="string">
            <text:p>Enlightenment-Class NHP</text:p>
          </table:table-cell>
          <table:table-cell table:style-name="ce8" table:content-validation-name="val11" office:value-type="string" calcext:value-type="string">
            <text:p>Nanocomposite Adaptation</text:p>
          </table:table-cell>
          <table:table-cell table:style-name="ce8" table:content-validation-name="val11" office:value-type="string" calcext:value-type="string">
            <text:p>High-Stress Mag Clamps</text:p>
          </table:table-cell>
          <table:table-cell table:style-name="ce8" table:content-validation-name="val11" office:value-type="string" calcext:value-type="string">
            <text:p>H0R_OS System Upgrade I</text:p>
          </table:table-cell>
          <table:table-cell table:style-name="ce8" table:content-validation-name="val11" office:value-type="string" calcext:value-type="string">
            <text:p>H0R_OS System Upgrade II</text:p>
          </table:table-cell>
          <table:table-cell table:style-name="ce8" table:content-validation-name="val11" office:value-type="string" calcext:value-type="string">
            <text:p>Eye of Horus</text:p>
          </table:table-cell>
          <table:table-cell table:style-name="ce8" table:content-validation-name="val11" table:number-columns-repeated="11"/>
          <table:table-cell table:number-columns-repeated="2"/>
          <table:table-cell office:value-type="string" calcext:value-type="string">
            <text:p>Valid License Selection</text:p>
          </table:table-cell>
          <table:table-cell table:number-columns-repeated="3"/>
          <table:table-cell table:content-validation-name="val12"/>
          <table:table-cell table:number-columns-repeated="125"/>
        </table:table-row>
        <table:table-row table:style-name="ro2">
          <table:table-cell office:value-type="float" office:value="12" calcext:value-type="float">
            <text:p>12</text:p>
          </table:table-cell>
          <table:table-cell table:style-name="ce8" table:content-validation-name="val1" office:value-type="string" calcext:value-type="string">
            <text:p>Act Unseen or Unheard</text:p>
          </table:table-cell>
          <table:table-cell table:style-name="ce14" table:content-validation-name="val3" office:value-type="string" calcext:value-type="string">
            <text:p>Leader II</text:p>
          </table:table-cell>
          <table:table-cell table:style-name="ce18" table:content-validation-name="val4" office:value-type="string" calcext:value-type="string">
            <text:p>Systems</text:p>
          </table:table-cell>
          <table:table-cell table:style-name="ce19" table:content-validation-name="val5" office:value-type="string" calcext:value-type="string">
            <text:p>Napoleon I</text:p>
          </table:table-cell>
          <table:table-cell table:style-name="ce8" table:content-validation-name="val6" office:value-type="string" calcext:value-type="string">
            <text:p>Death’s Head</text:p>
          </table:table-cell>
          <table:table-cell table:style-name="ce32" table:content-validation-name="val10" office:value-type="string" calcext:value-type="string">
            <text:p>The Lesson of the Open Door</text:p>
          </table:table-cell>
          <table:table-cell/>
          <table:table-cell table:style-name="ce38" table:formula="of:=COUNTIF([.$D$2:.$D17];&quot;Hull&quot;)" office:value-type="float" office:value="4" calcext:value-type="float">
            <text:p>4</text:p>
          </table:table-cell>
          <table:table-cell table:style-name="ce40" table:formula="of:=COUNTIF([.$D$2:.$D17];&quot;Agility&quot;)" office:value-type="float" office:value="4" calcext:value-type="float">
            <text:p>4</text:p>
          </table:table-cell>
          <table:table-cell table:style-name="ce38" table:formula="of:=COUNTIF([.$D$2:.$D17];&quot;Systems&quot;)" office:value-type="float" office:value="6" calcext:value-type="float">
            <text:p>6</text:p>
          </table:table-cell>
          <table:table-cell table:style-name="ce40" table:formula="of:=COUNTIF([.$D$2:.$D17];&quot;Engineering&quot;)" office:value-type="float" office:value="0" calcext:value-type="float">
            <text:p>0</text:p>
          </table:table-cell>
          <table:table-cell/>
          <table:table-cell table:formula="of:=IFERROR(COM.MICROSOFT.XLOOKUP(LOOKUP(2;1/([.$F$2:.$F17]&lt;&gt;&quot;&quot;);[.$F$2:.$F17]);[$Frames.$A$1:.$A$100];[$Frames.D$1:.D$100]);&quot;&quot;)" office:value-type="float" office:value="1" calcext:value-type="float">
            <text:p>1</text:p>
          </table:table-cell>
          <table:table-cell table:style-name="ce57" table:formula="of:=IFERROR(COM.MICROSOFT.XLOOKUP(LOOKUP(2;1/([.$F$2:.$F17]&lt;&gt;&quot;&quot;);[.$F$2:.$F17]);[$Frames.$A$1:.$A$100];[$Frames.E$1:.E$100]);&quot;&quot;)+CEILING([.A17]/2)+2*[.I17]+[.BC83]" office:value-type="float" office:value="22" calcext:value-type="float">
            <text:p>22</text:p>
          </table:table-cell>
          <table:table-cell table:style-name="ce59" table:formula="of:=MIN(4; IFERROR(COM.MICROSOFT.XLOOKUP(LOOKUP(2;1/([.$F$2:.$F17]&lt;&gt;&quot;&quot;);[.$F$2:.$F17]);[$Frames.$A$1:.$A$100];[$Frames.F$1:.F$100]);&quot;&quot;)+[.BD83])" office:value-type="float" office:value="0" calcext:value-type="float">
            <text:p>0</text:p>
          </table:table-cell>
          <table:table-cell table:style-name="ce57" table:formula="of:=IFERROR(COM.MICROSOFT.XLOOKUP(LOOKUP(2;1/([.$F$2:.$F17]&lt;&gt;&quot;&quot;);[.$F$2:.$F17]);[$Frames.$A$1:.$A$100];[$Frames.G$1:.G$100]);&quot;&quot;)+[.L17]+[.BE83]" office:value-type="float" office:value="6" calcext:value-type="float">
            <text:p>6</text:p>
          </table:table-cell>
          <table:table-cell table:style-name="ce59" table:formula="of:=IFERROR(COM.MICROSOFT.XLOOKUP(LOOKUP(2;1/([.$F$2:.$F17]&lt;&gt;&quot;&quot;);[.$F$2:.$F17]);[$Frames.$A$1:.$A$100];[$Frames.H$1:.H$100]);&quot;&quot;)+[.J17]+[.BF83]" office:value-type="float" office:value="14" calcext:value-type="float">
            <text:p>14</text:p>
          </table:table-cell>
          <table:table-cell table:style-name="ce57" table:formula="of:=IFERROR(COM.MICROSOFT.XLOOKUP(LOOKUP(2;1/([.$F$2:.$F17]&lt;&gt;&quot;&quot;);[.$F$2:.$F17]);[$Frames.$A$1:.$A$100];[$Frames.I$1:.I$100]);&quot;&quot;)+FLOOR([.J17]/2)+[.BG83]" office:value-type="float" office:value="7" calcext:value-type="float">
            <text:p>7</text:p>
          </table:table-cell>
          <table:table-cell table:style-name="ce59" table:formula="of:=IFERROR(COM.MICROSOFT.XLOOKUP(LOOKUP(2;1/([.$F$2:.$F17]&lt;&gt;&quot;&quot;);[.$F$2:.$F17]);[$Frames.$A$1:.$A$100];[$Frames.J$1:.J$100]);&quot;&quot;)+[.K17]+[.BH83]" office:value-type="float" office:value="14" calcext:value-type="float">
            <text:p>14</text:p>
          </table:table-cell>
          <table:table-cell table:style-name="ce57" table:formula="of:=IFERROR(COM.MICROSOFT.XLOOKUP(LOOKUP(2;1/([.$F$2:.$F17]&lt;&gt;&quot;&quot;);[.$F$2:.$F17]);[$Frames.$A$1:.$A$100];[$Frames.K$1:.K$100]);&quot;&quot;)+[.K17]+[.BI83]" office:value-type="float" office:value="6" calcext:value-type="float">
            <text:p>6</text:p>
          </table:table-cell>
          <table:table-cell table:style-name="ce59" table:formula="of:=IFERROR(COM.MICROSOFT.XLOOKUP(LOOKUP(2;1/([.$F$2:.$F17]&lt;&gt;&quot;&quot;);[.$F$2:.$F17]);[$Frames.$A$1:.$A$100];[$Frames.L$1:.L$100]);&quot;&quot;)+[.BJ83]" office:value-type="float" office:value="20" calcext:value-type="float">
            <text:p>20</text:p>
          </table:table-cell>
          <table:table-cell table:style-name="ce57" table:formula="of:=IFERROR(COM.MICROSOFT.XLOOKUP(LOOKUP(2;1/([.$F$2:.$F17]&lt;&gt;&quot;&quot;);[.$F$2:.$F17]);[$Frames.$A$1:.$A$100];[$Frames.M$1:.M$100]);&quot;&quot;)+FLOOR([.I17]/2)+[.BK83]" office:value-type="float" office:value="4" calcext:value-type="float">
            <text:p>4</text:p>
          </table:table-cell>
          <table:table-cell table:style-name="ce59" table:formula="of:=IFERROR(COM.MICROSOFT.XLOOKUP(LOOKUP(2;1/([.$F$2:.$F17]&lt;&gt;&quot;&quot;);[.$F$2:.$F17]);[$Frames.$A$1:.$A$100];[$Frames.N$1:.N$100]);&quot;&quot;)+CEILING([.A17]/2)+[.BL83]" office:value-type="float" office:value="18" calcext:value-type="float">
            <text:p>18</text:p>
          </table:table-cell>
          <table:table-cell table:style-name="ce62" table:formula="of:=IFERROR(COM.MICROSOFT.XLOOKUP(LOOKUP(2;1/([.$F$2:.$F17]&lt;&gt;&quot;&quot;);[.$F$2:.$F17]);[$Frames.$A$1:.$A$100];[$Frames.O$1:.O$100]);&quot;&quot;)+CEILING([.A17]/2)+FLOOR([.K17]/2)+[.BM83]" office:value-type="float" office:value="15" calcext:value-type="float">
            <text:p>15</text:p>
          </table:table-cell>
          <table:table-cell table:formula="of:=1+[.BN83]" office:value-type="float" office:value="1" calcext:value-type="float">
            <text:p>1</text:p>
          </table:table-cell>
          <table:table-cell/>
          <table:table-cell table:style-name="ce71" office:value-type="string" calcext:value-type="string">
            <text:p>Railgun</text:p>
          </table:table-cell>
          <table:table-cell table:style-name="ce71" office:value-type="string" calcext:value-type="string">
            <text:p>Smartgun/Oracle LMG-I</text:p>
          </table:table-cell>
          <table:table-cell table:style-name="ce71" office:value-type="string" calcext:value-type="string">
            <text:p>Prototype Weapon II</text:p>
          </table:table-cell>
          <table:table-cell table:style-name="ce71" office:value-type="string" calcext:value-type="string">
            <text:p>Autopod</text:p>
          </table:table-cell>
          <table:table-cell table:style-name="ce71" table:number-columns-repeated="2"/>
          <table:table-cell/>
          <table:table-cell table:style-name="ce66" table:formula="of:=COM.MICROSOFT.LET(     _xlpm.weaponText;     COM.MICROSOFT.TEXTJOIN(&quot;/&quot;;1;[.$AB17:.$AG17]);      _xlpm.weaponList;     &quot;¶&quot;&amp;SUBSTITUTE(_xlpm.weaponText;&quot;/&quot;;&quot;§¶&quot;)&amp;&quot;§&quot;;      _xlpm.systemsCost;     SUMPRODUCT(         ([$Systems.$A$11:.$A$300]&lt;&gt;&quot;&quot;)         *         COUNTIF([.$AJ17:.$AX17];[$Systems.$A$11:.$A$300])         *         [$Systems.$E$11:.$E$300]     );      _xlpm.weaponsCost;     SUMPRODUCT(         ([$Weapons.$A$2:.$A$300]&lt;&gt;&quot;&quot;)         *         (             LEN(_xlpm.weaponList)             -             LEN(                 SUBSTITUTE(                     _xlpm.weaponList;                     &quot;¶&quot;&amp;[$Weapons.$A$2:.$A$300]&amp;&quot;§&quot;;                     &quot;&quot;                 )             )         )         /         LEN(&quot;¶&quot;&amp;[$Weapons.$A$2:.$A$300]&amp;&quot;§&quot;)         *         [$Weapons.$H$2:.$H$300]     );      IF(         COUNTA([.$AB17:.$AG17])+COUNTA([.$AJ17:.$AX17]);         _xlpm.systemsCost+_xlpm.weaponsCost;         &quot;&quot;     ) )" office:value-type="float" office:value="15" calcext:value-type="float">
            <text:p>15</text:p>
          </table:table-cell>
          <table:table-cell table:style-name="ce8" table:content-validation-name="val11" office:value-type="string" calcext:value-type="string">
            <text:p>Enlightenment-Class NHP</text:p>
          </table:table-cell>
          <table:table-cell table:style-name="ce8" table:content-validation-name="val11" office:value-type="string" calcext:value-type="string">
            <text:p>Nanocomposite Adaptation</text:p>
          </table:table-cell>
          <table:table-cell table:style-name="ce8" table:content-validation-name="val11" office:value-type="string" calcext:value-type="string">
            <text:p>High-Stress Mag Clamps</text:p>
          </table:table-cell>
          <table:table-cell table:style-name="ce8" table:content-validation-name="val11" office:value-type="string" calcext:value-type="string">
            <text:p>H0R_OS System Upgrade I</text:p>
          </table:table-cell>
          <table:table-cell table:style-name="ce8" table:content-validation-name="val11" office:value-type="string" calcext:value-type="string">
            <text:p>H0R_OS System Upgrade II</text:p>
          </table:table-cell>
          <table:table-cell table:style-name="ce8" table:content-validation-name="val11" office:value-type="string" calcext:value-type="string">
            <text:p>Eye of Horus</text:p>
          </table:table-cell>
          <table:table-cell table:style-name="ce8" table:content-validation-name="val11" office:value-type="string" calcext:value-type="string">
            <text:p>Stasis Bolt</text:p>
          </table:table-cell>
          <table:table-cell table:style-name="ce8" table:content-validation-name="val11" table:number-columns-repeated="10"/>
          <table:table-cell table:number-columns-repeated="2"/>
          <table:table-cell table:number-matrix-columns-spanned="38" table:number-matrix-rows-spanned="1" table:formula="of:=TRANSPOSE(     COM.MICROSOFT.FILTER(         [$Licenses.$A$2:.$A$200];         ([$Licenses.$A$2:.$A$200]&lt;&gt;&quot;&quot;)         *         (COUNTIF([$Build.$E$5:.$E5];[$Licenses.$A$2:.$A$200])=0)         *         (             ([$Licenses.$B$2:.$B$200]=&quot;&quot;)             +             (COUNTIF([$Build.$E$5:.$E5];[$Licenses.$B$2:.$B$200])&gt;0)         );         &quot;&quot;     ) )" office:value-type="string" office:string-value="Atlas I" calcext:value-type="string">
            <text:p>Atlas I</text:p>
          </table:table-cell>
          <table:table-cell office:value-type="string" office:string-value="Balor I" calcext:value-type="string">
            <text:p>Balor I</text:p>
          </table:table-cell>
          <table:table-cell office:value-type="string" office:string-value="Barbarossa I" calcext:value-type="string">
            <text:p>Barbarossa I</text:p>
          </table:table-cell>
          <table:table-cell office:value-type="string" office:string-value="Black Witch I" calcext:value-type="string">
            <text:p>Black Witch I</text:p>
          </table:table-cell>
          <table:table-cell table:content-validation-name="val12" office:value-type="string" office:string-value="Blackbeard I" calcext:value-type="string">
            <text:p>Blackbeard I</text:p>
          </table:table-cell>
          <table:table-cell office:value-type="string" office:string-value="Caliban I" calcext:value-type="string">
            <text:p>Caliban I</text:p>
          </table:table-cell>
          <table:table-cell office:value-type="string" office:string-value="Death’s Head I" calcext:value-type="string">
            <text:p>Death’s Head I</text:p>
          </table:table-cell>
          <table:table-cell office:value-type="string" office:string-value="Drake I" calcext:value-type="string">
            <text:p>Drake I</text:p>
          </table:table-cell>
          <table:table-cell office:value-type="string" office:string-value="Dusk Wing I" calcext:value-type="string">
            <text:p>Dusk Wing I</text:p>
          </table:table-cell>
          <table:table-cell office:value-type="string" office:string-value="Emperor I" calcext:value-type="string">
            <text:p>Emperor I</text:p>
          </table:table-cell>
          <table:table-cell office:value-type="string" office:string-value="Genghis I" calcext:value-type="string">
            <text:p>Genghis I</text:p>
          </table:table-cell>
          <table:table-cell office:value-type="string" office:string-value="Gilgamesh I" calcext:value-type="string">
            <text:p>Gilgamesh I</text:p>
          </table:table-cell>
          <table:table-cell office:value-type="string" office:string-value="Goblin I" calcext:value-type="string">
            <text:p>Goblin I</text:p>
          </table:table-cell>
          <table:table-cell office:value-type="string" office:string-value="Gorgon I" calcext:value-type="string">
            <text:p>Gorgon I</text:p>
          </table:table-cell>
          <table:table-cell office:value-type="string" office:string-value="Hydra I" calcext:value-type="string">
            <text:p>Hydra I</text:p>
          </table:table-cell>
          <table:table-cell office:value-type="string" office:string-value="Iskander I" calcext:value-type="string">
            <text:p>Iskander I</text:p>
          </table:table-cell>
          <table:table-cell office:value-type="string" office:string-value="Kidd I" calcext:value-type="string">
            <text:p>Kidd I</text:p>
          </table:table-cell>
          <table:table-cell office:value-type="string" office:string-value="Kobold I" calcext:value-type="string">
            <text:p>Kobold I</text:p>
          </table:table-cell>
          <table:table-cell office:value-type="string" office:string-value="Lancaster I" calcext:value-type="string">
            <text:p>Lancaster I</text:p>
          </table:table-cell>
          <table:table-cell office:value-type="string" office:string-value="Lich I" calcext:value-type="string">
            <text:p>Lich I</text:p>
          </table:table-cell>
          <table:table-cell office:value-type="string" office:string-value="Manticore I" calcext:value-type="string">
            <text:p>Manticore I</text:p>
          </table:table-cell>
          <table:table-cell office:value-type="string" office:string-value="Metalmark I" calcext:value-type="string">
            <text:p>Metalmark I</text:p>
          </table:table-cell>
          <table:table-cell office:value-type="string" office:string-value="Minotaur I" calcext:value-type="string">
            <text:p>Minotaur I</text:p>
          </table:table-cell>
          <table:table-cell office:value-type="string" office:string-value="Monarch I" calcext:value-type="string">
            <text:p>Monarch I</text:p>
          </table:table-cell>
          <table:table-cell office:value-type="string" office:string-value="Mourning Cloak I" calcext:value-type="string">
            <text:p>Mourning Cloak I</text:p>
          </table:table-cell>
          <table:table-cell office:value-type="string" office:string-value="Napoleon I" calcext:value-type="string">
            <text:p>Napoleon I</text:p>
          </table:table-cell>
          <table:table-cell office:value-type="string" office:string-value="Nelson I" calcext:value-type="string">
            <text:p>Nelson I</text:p>
          </table:table-cell>
          <table:table-cell office:value-type="string" office:string-value="Pegasus I" calcext:value-type="string">
            <text:p>Pegasus I</text:p>
          </table:table-cell>
          <table:table-cell office:value-type="string" office:string-value="Raleigh I" calcext:value-type="string">
            <text:p>Raleigh I</text:p>
          </table:table-cell>
          <table:table-cell office:value-type="string" office:string-value="Saladin I" calcext:value-type="string">
            <text:p>Saladin I</text:p>
          </table:table-cell>
          <table:table-cell office:value-type="string" office:string-value="Sherman I" calcext:value-type="string">
            <text:p>Sherman I</text:p>
          </table:table-cell>
          <table:table-cell office:value-type="string" office:string-value="Sunzi I" calcext:value-type="string">
            <text:p>Sunzi I</text:p>
          </table:table-cell>
          <table:table-cell office:value-type="string" office:string-value="Swallowtail I" calcext:value-type="string">
            <text:p>Swallowtail I</text:p>
          </table:table-cell>
          <table:table-cell office:value-type="string" office:string-value="Tokugawa I" calcext:value-type="string">
            <text:p>Tokugawa I</text:p>
          </table:table-cell>
          <table:table-cell office:value-type="string" office:string-value="Tortuga I" calcext:value-type="string">
            <text:p>Tortuga I</text:p>
          </table:table-cell>
          <table:table-cell office:value-type="string" office:string-value="Vlad I" calcext:value-type="string">
            <text:p>Vlad I</text:p>
          </table:table-cell>
          <table:table-cell office:value-type="string" office:string-value="White Witch I" calcext:value-type="string">
            <text:p>White Witch I</text:p>
          </table:table-cell>
          <table:table-cell office:value-type="string" office:string-value="Zheng I" calcext:value-type="string">
            <text:p>Zheng I</text:p>
          </table:table-cell>
          <table:table-cell table:number-columns-repeated="92"/>
        </table:table-row>
        <table:table-row table:style-name="ro2">
          <table:table-cell table:number-columns-repeated="54"/>
          <table:table-cell table:number-matrix-columns-spanned="38" table:number-matrix-rows-spanned="1" table:formula="of:=TRANSPOSE(     COM.MICROSOFT.FILTER(         [$Licenses.$A$2:.$A$200];         ([$Licenses.$A$2:.$A$200]&lt;&gt;&quot;&quot;)         *         (COUNTIF([$Build.$E$5:.$E6];[$Licenses.$A$2:.$A$200])=0)         *         (             ([$Licenses.$B$2:.$B$200]=&quot;&quot;)             +             (COUNTIF([$Build.$E$5:.$E6];[$Licenses.$B$2:.$B$200])&gt;0)         );         &quot;&quot;     ) )" office:value-type="string" office:string-value="Atlas I" calcext:value-type="string">
            <text:p>Atlas I</text:p>
          </table:table-cell>
          <table:table-cell office:value-type="string" office:string-value="Balor I" calcext:value-type="string">
            <text:p>Balor I</text:p>
          </table:table-cell>
          <table:table-cell office:value-type="string" office:string-value="Barbarossa I" calcext:value-type="string">
            <text:p>Barbarossa I</text:p>
          </table:table-cell>
          <table:table-cell office:value-type="string" office:string-value="Black Witch I" calcext:value-type="string">
            <text:p>Black Witch I</text:p>
          </table:table-cell>
          <table:table-cell table:content-validation-name="val12" office:value-type="string" office:string-value="Blackbeard I" calcext:value-type="string">
            <text:p>Blackbeard I</text:p>
          </table:table-cell>
          <table:table-cell office:value-type="string" office:string-value="Caliban I" calcext:value-type="string">
            <text:p>Caliban I</text:p>
          </table:table-cell>
          <table:table-cell office:value-type="string" office:string-value="Death’s Head II" calcext:value-type="string">
            <text:p>Death’s Head II</text:p>
          </table:table-cell>
          <table:table-cell office:value-type="string" office:string-value="Drake I" calcext:value-type="string">
            <text:p>Drake I</text:p>
          </table:table-cell>
          <table:table-cell office:value-type="string" office:string-value="Dusk Wing I" calcext:value-type="string">
            <text:p>Dusk Wing I</text:p>
          </table:table-cell>
          <table:table-cell office:value-type="string" office:string-value="Emperor I" calcext:value-type="string">
            <text:p>Emperor I</text:p>
          </table:table-cell>
          <table:table-cell office:value-type="string" office:string-value="Genghis I" calcext:value-type="string">
            <text:p>Genghis I</text:p>
          </table:table-cell>
          <table:table-cell office:value-type="string" office:string-value="Gilgamesh I" calcext:value-type="string">
            <text:p>Gilgamesh I</text:p>
          </table:table-cell>
          <table:table-cell office:value-type="string" office:string-value="Goblin I" calcext:value-type="string">
            <text:p>Goblin I</text:p>
          </table:table-cell>
          <table:table-cell office:value-type="string" office:string-value="Gorgon I" calcext:value-type="string">
            <text:p>Gorgon I</text:p>
          </table:table-cell>
          <table:table-cell office:value-type="string" office:string-value="Hydra I" calcext:value-type="string">
            <text:p>Hydra I</text:p>
          </table:table-cell>
          <table:table-cell office:value-type="string" office:string-value="Iskander I" calcext:value-type="string">
            <text:p>Iskander I</text:p>
          </table:table-cell>
          <table:table-cell office:value-type="string" office:string-value="Kidd I" calcext:value-type="string">
            <text:p>Kidd I</text:p>
          </table:table-cell>
          <table:table-cell office:value-type="string" office:string-value="Kobold I" calcext:value-type="string">
            <text:p>Kobold I</text:p>
          </table:table-cell>
          <table:table-cell office:value-type="string" office:string-value="Lancaster I" calcext:value-type="string">
            <text:p>Lancaster I</text:p>
          </table:table-cell>
          <table:table-cell office:value-type="string" office:string-value="Lich I" calcext:value-type="string">
            <text:p>Lich I</text:p>
          </table:table-cell>
          <table:table-cell office:value-type="string" office:string-value="Manticore I" calcext:value-type="string">
            <text:p>Manticore I</text:p>
          </table:table-cell>
          <table:table-cell office:value-type="string" office:string-value="Metalmark I" calcext:value-type="string">
            <text:p>Metalmark I</text:p>
          </table:table-cell>
          <table:table-cell office:value-type="string" office:string-value="Minotaur I" calcext:value-type="string">
            <text:p>Minotaur I</text:p>
          </table:table-cell>
          <table:table-cell office:value-type="string" office:string-value="Monarch I" calcext:value-type="string">
            <text:p>Monarch I</text:p>
          </table:table-cell>
          <table:table-cell office:value-type="string" office:string-value="Mourning Cloak I" calcext:value-type="string">
            <text:p>Mourning Cloak I</text:p>
          </table:table-cell>
          <table:table-cell office:value-type="string" office:string-value="Napoleon I" calcext:value-type="string">
            <text:p>Napoleon I</text:p>
          </table:table-cell>
          <table:table-cell office:value-type="string" office:string-value="Nelson I" calcext:value-type="string">
            <text:p>Nelson I</text:p>
          </table:table-cell>
          <table:table-cell office:value-type="string" office:string-value="Pegasus I" calcext:value-type="string">
            <text:p>Pegasus I</text:p>
          </table:table-cell>
          <table:table-cell office:value-type="string" office:string-value="Raleigh I" calcext:value-type="string">
            <text:p>Raleigh I</text:p>
          </table:table-cell>
          <table:table-cell office:value-type="string" office:string-value="Saladin I" calcext:value-type="string">
            <text:p>Saladin I</text:p>
          </table:table-cell>
          <table:table-cell office:value-type="string" office:string-value="Sherman I" calcext:value-type="string">
            <text:p>Sherman I</text:p>
          </table:table-cell>
          <table:table-cell office:value-type="string" office:string-value="Sunzi I" calcext:value-type="string">
            <text:p>Sunzi I</text:p>
          </table:table-cell>
          <table:table-cell office:value-type="string" office:string-value="Swallowtail I" calcext:value-type="string">
            <text:p>Swallowtail I</text:p>
          </table:table-cell>
          <table:table-cell office:value-type="string" office:string-value="Tokugawa I" calcext:value-type="string">
            <text:p>Tokugawa I</text:p>
          </table:table-cell>
          <table:table-cell office:value-type="string" office:string-value="Tortuga I" calcext:value-type="string">
            <text:p>Tortuga I</text:p>
          </table:table-cell>
          <table:table-cell office:value-type="string" office:string-value="Vlad I" calcext:value-type="string">
            <text:p>Vlad I</text:p>
          </table:table-cell>
          <table:table-cell office:value-type="string" office:string-value="White Witch I" calcext:value-type="string">
            <text:p>White Witch I</text:p>
          </table:table-cell>
          <table:table-cell office:value-type="string" office:string-value="Zheng I" calcext:value-type="string">
            <text:p>Zheng I</text:p>
          </table:table-cell>
          <table:table-cell table:number-columns-repeated="92"/>
        </table:table-row>
        <table:table-row table:style-name="ro2">
          <table:table-cell table:number-columns-repeated="54"/>
          <table:table-cell table:number-matrix-columns-spanned="38" table:number-matrix-rows-spanned="1" table:formula="of:=TRANSPOSE(     COM.MICROSOFT.FILTER(         [$Licenses.$A$2:.$A$200];         ([$Licenses.$A$2:.$A$200]&lt;&gt;&quot;&quot;)         *         (COUNTIF([$Build.$E$5:.$E7];[$Licenses.$A$2:.$A$200])=0)         *         (             ([$Licenses.$B$2:.$B$200]=&quot;&quot;)             +             (COUNTIF([$Build.$E$5:.$E7];[$Licenses.$B$2:.$B$200])&gt;0)         );         &quot;&quot;     ) )" office:value-type="string" office:string-value="Atlas I" calcext:value-type="string">
            <text:p>Atlas I</text:p>
          </table:table-cell>
          <table:table-cell office:value-type="string" office:string-value="Balor I" calcext:value-type="string">
            <text:p>Balor I</text:p>
          </table:table-cell>
          <table:table-cell office:value-type="string" office:string-value="Barbarossa I" calcext:value-type="string">
            <text:p>Barbarossa I</text:p>
          </table:table-cell>
          <table:table-cell office:value-type="string" office:string-value="Black Witch I" calcext:value-type="string">
            <text:p>Black Witch I</text:p>
          </table:table-cell>
          <table:table-cell office:value-type="string" office:string-value="Blackbeard I" calcext:value-type="string">
            <text:p>Blackbeard I</text:p>
          </table:table-cell>
          <table:table-cell office:value-type="string" office:string-value="Caliban I" calcext:value-type="string">
            <text:p>Caliban I</text:p>
          </table:table-cell>
          <table:table-cell office:value-type="string" office:string-value="Death’s Head III" calcext:value-type="string">
            <text:p>Death’s Head III</text:p>
          </table:table-cell>
          <table:table-cell office:value-type="string" office:string-value="Drake I" calcext:value-type="string">
            <text:p>Drake I</text:p>
          </table:table-cell>
          <table:table-cell office:value-type="string" office:string-value="Dusk Wing I" calcext:value-type="string">
            <text:p>Dusk Wing I</text:p>
          </table:table-cell>
          <table:table-cell office:value-type="string" office:string-value="Emperor I" calcext:value-type="string">
            <text:p>Emperor I</text:p>
          </table:table-cell>
          <table:table-cell office:value-type="string" office:string-value="Genghis I" calcext:value-type="string">
            <text:p>Genghis I</text:p>
          </table:table-cell>
          <table:table-cell office:value-type="string" office:string-value="Gilgamesh I" calcext:value-type="string">
            <text:p>Gilgamesh I</text:p>
          </table:table-cell>
          <table:table-cell office:value-type="string" office:string-value="Goblin I" calcext:value-type="string">
            <text:p>Goblin I</text:p>
          </table:table-cell>
          <table:table-cell office:value-type="string" office:string-value="Gorgon I" calcext:value-type="string">
            <text:p>Gorgon I</text:p>
          </table:table-cell>
          <table:table-cell office:value-type="string" office:string-value="Hydra I" calcext:value-type="string">
            <text:p>Hydra I</text:p>
          </table:table-cell>
          <table:table-cell office:value-type="string" office:string-value="Iskander I" calcext:value-type="string">
            <text:p>Iskander I</text:p>
          </table:table-cell>
          <table:table-cell office:value-type="string" office:string-value="Kidd I" calcext:value-type="string">
            <text:p>Kidd I</text:p>
          </table:table-cell>
          <table:table-cell office:value-type="string" office:string-value="Kobold I" calcext:value-type="string">
            <text:p>Kobold I</text:p>
          </table:table-cell>
          <table:table-cell office:value-type="string" office:string-value="Lancaster I" calcext:value-type="string">
            <text:p>Lancaster I</text:p>
          </table:table-cell>
          <table:table-cell office:value-type="string" office:string-value="Lich I" calcext:value-type="string">
            <text:p>Lich I</text:p>
          </table:table-cell>
          <table:table-cell office:value-type="string" office:string-value="Manticore I" calcext:value-type="string">
            <text:p>Manticore I</text:p>
          </table:table-cell>
          <table:table-cell office:value-type="string" office:string-value="Metalmark I" calcext:value-type="string">
            <text:p>Metalmark I</text:p>
          </table:table-cell>
          <table:table-cell office:value-type="string" office:string-value="Minotaur I" calcext:value-type="string">
            <text:p>Minotaur I</text:p>
          </table:table-cell>
          <table:table-cell office:value-type="string" office:string-value="Monarch I" calcext:value-type="string">
            <text:p>Monarch I</text:p>
          </table:table-cell>
          <table:table-cell office:value-type="string" office:string-value="Mourning Cloak I" calcext:value-type="string">
            <text:p>Mourning Cloak I</text:p>
          </table:table-cell>
          <table:table-cell office:value-type="string" office:string-value="Napoleon I" calcext:value-type="string">
            <text:p>Napoleon I</text:p>
          </table:table-cell>
          <table:table-cell office:value-type="string" office:string-value="Nelson I" calcext:value-type="string">
            <text:p>Nelson I</text:p>
          </table:table-cell>
          <table:table-cell office:value-type="string" office:string-value="Pegasus I" calcext:value-type="string">
            <text:p>Pegasus I</text:p>
          </table:table-cell>
          <table:table-cell office:value-type="string" office:string-value="Raleigh I" calcext:value-type="string">
            <text:p>Raleigh I</text:p>
          </table:table-cell>
          <table:table-cell office:value-type="string" office:string-value="Saladin I" calcext:value-type="string">
            <text:p>Saladin I</text:p>
          </table:table-cell>
          <table:table-cell office:value-type="string" office:string-value="Sherman I" calcext:value-type="string">
            <text:p>Sherman I</text:p>
          </table:table-cell>
          <table:table-cell office:value-type="string" office:string-value="Sunzi I" calcext:value-type="string">
            <text:p>Sunzi I</text:p>
          </table:table-cell>
          <table:table-cell office:value-type="string" office:string-value="Swallowtail I" calcext:value-type="string">
            <text:p>Swallowtail I</text:p>
          </table:table-cell>
          <table:table-cell office:value-type="string" office:string-value="Tokugawa I" calcext:value-type="string">
            <text:p>Tokugawa I</text:p>
          </table:table-cell>
          <table:table-cell office:value-type="string" office:string-value="Tortuga I" calcext:value-type="string">
            <text:p>Tortuga I</text:p>
          </table:table-cell>
          <table:table-cell office:value-type="string" office:string-value="Vlad I" calcext:value-type="string">
            <text:p>Vlad I</text:p>
          </table:table-cell>
          <table:table-cell office:value-type="string" office:string-value="White Witch I" calcext:value-type="string">
            <text:p>White Witch I</text:p>
          </table:table-cell>
          <table:table-cell office:value-type="string" office:string-value="Zheng I" calcext:value-type="string">
            <text:p>Zheng I</text:p>
          </table:table-cell>
          <table:table-cell table:number-columns-repeated="92"/>
        </table:table-row>
        <table:table-row table:style-name="ro2">
          <table:table-cell table:number-columns-repeated="54"/>
          <table:table-cell table:number-matrix-columns-spanned="37" table:number-matrix-rows-spanned="1" table:formula="of:=TRANSPOSE(     COM.MICROSOFT.FILTER(         [$Licenses.$A$2:.$A$200];         ([$Licenses.$A$2:.$A$200]&lt;&gt;&quot;&quot;)         *         (COUNTIF([$Build.$E$5:.$E8];[$Licenses.$A$2:.$A$200])=0)         *         (             ([$Licenses.$B$2:.$B$200]=&quot;&quot;)             +             (COUNTIF([$Build.$E$5:.$E8];[$Licenses.$B$2:.$B$200])&gt;0)         );         &quot;&quot;     ) )" office:value-type="string" office:string-value="Atlas I" calcext:value-type="string">
            <text:p>Atlas I</text:p>
          </table:table-cell>
          <table:table-cell office:value-type="string" office:string-value="Balor I" calcext:value-type="string">
            <text:p>Balor I</text:p>
          </table:table-cell>
          <table:table-cell office:value-type="string" office:string-value="Barbarossa I" calcext:value-type="string">
            <text:p>Barbarossa I</text:p>
          </table:table-cell>
          <table:table-cell office:value-type="string" office:string-value="Black Witch I" calcext:value-type="string">
            <text:p>Black Witch I</text:p>
          </table:table-cell>
          <table:table-cell office:value-type="string" office:string-value="Blackbeard I" calcext:value-type="string">
            <text:p>Blackbeard I</text:p>
          </table:table-cell>
          <table:table-cell office:value-type="string" office:string-value="Caliban I" calcext:value-type="string">
            <text:p>Caliban I</text:p>
          </table:table-cell>
          <table:table-cell office:value-type="string" office:string-value="Drake I" calcext:value-type="string">
            <text:p>Drake I</text:p>
          </table:table-cell>
          <table:table-cell office:value-type="string" office:string-value="Dusk Wing I" calcext:value-type="string">
            <text:p>Dusk Wing I</text:p>
          </table:table-cell>
          <table:table-cell office:value-type="string" office:string-value="Emperor I" calcext:value-type="string">
            <text:p>Emperor I</text:p>
          </table:table-cell>
          <table:table-cell office:value-type="string" office:string-value="Genghis I" calcext:value-type="string">
            <text:p>Genghis I</text:p>
          </table:table-cell>
          <table:table-cell office:value-type="string" office:string-value="Gilgamesh I" calcext:value-type="string">
            <text:p>Gilgamesh I</text:p>
          </table:table-cell>
          <table:table-cell office:value-type="string" office:string-value="Goblin I" calcext:value-type="string">
            <text:p>Goblin I</text:p>
          </table:table-cell>
          <table:table-cell office:value-type="string" office:string-value="Gorgon I" calcext:value-type="string">
            <text:p>Gorgon I</text:p>
          </table:table-cell>
          <table:table-cell office:value-type="string" office:string-value="Hydra I" calcext:value-type="string">
            <text:p>Hydra I</text:p>
          </table:table-cell>
          <table:table-cell office:value-type="string" office:string-value="Iskander I" calcext:value-type="string">
            <text:p>Iskander I</text:p>
          </table:table-cell>
          <table:table-cell office:value-type="string" office:string-value="Kidd I" calcext:value-type="string">
            <text:p>Kidd I</text:p>
          </table:table-cell>
          <table:table-cell office:value-type="string" office:string-value="Kobold I" calcext:value-type="string">
            <text:p>Kobold I</text:p>
          </table:table-cell>
          <table:table-cell office:value-type="string" office:string-value="Lancaster I" calcext:value-type="string">
            <text:p>Lancaster I</text:p>
          </table:table-cell>
          <table:table-cell office:value-type="string" office:string-value="Lich I" calcext:value-type="string">
            <text:p>Lich I</text:p>
          </table:table-cell>
          <table:table-cell office:value-type="string" office:string-value="Manticore I" calcext:value-type="string">
            <text:p>Manticore I</text:p>
          </table:table-cell>
          <table:table-cell office:value-type="string" office:string-value="Metalmark I" calcext:value-type="string">
            <text:p>Metalmark I</text:p>
          </table:table-cell>
          <table:table-cell office:value-type="string" office:string-value="Minotaur I" calcext:value-type="string">
            <text:p>Minotaur I</text:p>
          </table:table-cell>
          <table:table-cell office:value-type="string" office:string-value="Monarch I" calcext:value-type="string">
            <text:p>Monarch I</text:p>
          </table:table-cell>
          <table:table-cell office:value-type="string" office:string-value="Mourning Cloak I" calcext:value-type="string">
            <text:p>Mourning Cloak I</text:p>
          </table:table-cell>
          <table:table-cell office:value-type="string" office:string-value="Napoleon I" calcext:value-type="string">
            <text:p>Napoleon I</text:p>
          </table:table-cell>
          <table:table-cell office:value-type="string" office:string-value="Nelson I" calcext:value-type="string">
            <text:p>Nelson I</text:p>
          </table:table-cell>
          <table:table-cell office:value-type="string" office:string-value="Pegasus I" calcext:value-type="string">
            <text:p>Pegasus I</text:p>
          </table:table-cell>
          <table:table-cell office:value-type="string" office:string-value="Raleigh I" calcext:value-type="string">
            <text:p>Raleigh I</text:p>
          </table:table-cell>
          <table:table-cell office:value-type="string" office:string-value="Saladin I" calcext:value-type="string">
            <text:p>Saladin I</text:p>
          </table:table-cell>
          <table:table-cell office:value-type="string" office:string-value="Sherman I" calcext:value-type="string">
            <text:p>Sherman I</text:p>
          </table:table-cell>
          <table:table-cell office:value-type="string" office:string-value="Sunzi I" calcext:value-type="string">
            <text:p>Sunzi I</text:p>
          </table:table-cell>
          <table:table-cell office:value-type="string" office:string-value="Swallowtail I" calcext:value-type="string">
            <text:p>Swallowtail I</text:p>
          </table:table-cell>
          <table:table-cell office:value-type="string" office:string-value="Tokugawa I" calcext:value-type="string">
            <text:p>Tokugawa I</text:p>
          </table:table-cell>
          <table:table-cell office:value-type="string" office:string-value="Tortuga I" calcext:value-type="string">
            <text:p>Tortuga I</text:p>
          </table:table-cell>
          <table:table-cell office:value-type="string" office:string-value="Vlad I" calcext:value-type="string">
            <text:p>Vlad I</text:p>
          </table:table-cell>
          <table:table-cell office:value-type="string" office:string-value="White Witch I" calcext:value-type="string">
            <text:p>White Witch I</text:p>
          </table:table-cell>
          <table:table-cell office:value-type="string" office:string-value="Zheng I" calcext:value-type="string">
            <text:p>Zheng I</text:p>
          </table:table-cell>
          <table:table-cell table:number-columns-repeated="93"/>
        </table:table-row>
        <table:table-row table:style-name="ro2">
          <table:table-cell table:number-columns-repeated="32"/>
          <table:table-cell table:style-name="ce47"/>
          <table:table-cell table:number-columns-repeated="21"/>
          <table:table-cell table:number-matrix-columns-spanned="37" table:number-matrix-rows-spanned="1" table:formula="of:=TRANSPOSE(     COM.MICROSOFT.FILTER(         [$Licenses.$A$2:.$A$200];         ([$Licenses.$A$2:.$A$200]&lt;&gt;&quot;&quot;)         *         (COUNTIF([$Build.$E$5:.$E9];[$Licenses.$A$2:.$A$200])=0)         *         (             ([$Licenses.$B$2:.$B$200]=&quot;&quot;)             +             (COUNTIF([$Build.$E$5:.$E9];[$Licenses.$B$2:.$B$200])&gt;0)         );         &quot;&quot;     ) )" office:value-type="string" office:string-value="Atlas I" calcext:value-type="string">
            <text:p>Atlas I</text:p>
          </table:table-cell>
          <table:table-cell office:value-type="string" office:string-value="Balor II" calcext:value-type="string">
            <text:p>Balor II</text:p>
          </table:table-cell>
          <table:table-cell office:value-type="string" office:string-value="Barbarossa I" calcext:value-type="string">
            <text:p>Barbarossa I</text:p>
          </table:table-cell>
          <table:table-cell office:value-type="string" office:string-value="Black Witch I" calcext:value-type="string">
            <text:p>Black Witch I</text:p>
          </table:table-cell>
          <table:table-cell office:value-type="string" office:string-value="Blackbeard I" calcext:value-type="string">
            <text:p>Blackbeard I</text:p>
          </table:table-cell>
          <table:table-cell office:value-type="string" office:string-value="Caliban I" calcext:value-type="string">
            <text:p>Caliban I</text:p>
          </table:table-cell>
          <table:table-cell office:value-type="string" office:string-value="Drake I" calcext:value-type="string">
            <text:p>Drake I</text:p>
          </table:table-cell>
          <table:table-cell office:value-type="string" office:string-value="Dusk Wing I" calcext:value-type="string">
            <text:p>Dusk Wing I</text:p>
          </table:table-cell>
          <table:table-cell office:value-type="string" office:string-value="Emperor I" calcext:value-type="string">
            <text:p>Emperor I</text:p>
          </table:table-cell>
          <table:table-cell office:value-type="string" office:string-value="Genghis I" calcext:value-type="string">
            <text:p>Genghis I</text:p>
          </table:table-cell>
          <table:table-cell office:value-type="string" office:string-value="Gilgamesh I" calcext:value-type="string">
            <text:p>Gilgamesh I</text:p>
          </table:table-cell>
          <table:table-cell office:value-type="string" office:string-value="Goblin I" calcext:value-type="string">
            <text:p>Goblin I</text:p>
          </table:table-cell>
          <table:table-cell office:value-type="string" office:string-value="Gorgon I" calcext:value-type="string">
            <text:p>Gorgon I</text:p>
          </table:table-cell>
          <table:table-cell office:value-type="string" office:string-value="Hydra I" calcext:value-type="string">
            <text:p>Hydra I</text:p>
          </table:table-cell>
          <table:table-cell office:value-type="string" office:string-value="Iskander I" calcext:value-type="string">
            <text:p>Iskander I</text:p>
          </table:table-cell>
          <table:table-cell office:value-type="string" office:string-value="Kidd I" calcext:value-type="string">
            <text:p>Kidd I</text:p>
          </table:table-cell>
          <table:table-cell office:value-type="string" office:string-value="Kobold I" calcext:value-type="string">
            <text:p>Kobold I</text:p>
          </table:table-cell>
          <table:table-cell office:value-type="string" office:string-value="Lancaster I" calcext:value-type="string">
            <text:p>Lancaster I</text:p>
          </table:table-cell>
          <table:table-cell office:value-type="string" office:string-value="Lich I" calcext:value-type="string">
            <text:p>Lich I</text:p>
          </table:table-cell>
          <table:table-cell office:value-type="string" office:string-value="Manticore I" calcext:value-type="string">
            <text:p>Manticore I</text:p>
          </table:table-cell>
          <table:table-cell office:value-type="string" office:string-value="Metalmark I" calcext:value-type="string">
            <text:p>Metalmark I</text:p>
          </table:table-cell>
          <table:table-cell office:value-type="string" office:string-value="Minotaur I" calcext:value-type="string">
            <text:p>Minotaur I</text:p>
          </table:table-cell>
          <table:table-cell office:value-type="string" office:string-value="Monarch I" calcext:value-type="string">
            <text:p>Monarch I</text:p>
          </table:table-cell>
          <table:table-cell office:value-type="string" office:string-value="Mourning Cloak I" calcext:value-type="string">
            <text:p>Mourning Cloak I</text:p>
          </table:table-cell>
          <table:table-cell office:value-type="string" office:string-value="Napoleon I" calcext:value-type="string">
            <text:p>Napoleon I</text:p>
          </table:table-cell>
          <table:table-cell office:value-type="string" office:string-value="Nelson I" calcext:value-type="string">
            <text:p>Nelson I</text:p>
          </table:table-cell>
          <table:table-cell office:value-type="string" office:string-value="Pegasus I" calcext:value-type="string">
            <text:p>Pegasus I</text:p>
          </table:table-cell>
          <table:table-cell office:value-type="string" office:string-value="Raleigh I" calcext:value-type="string">
            <text:p>Raleigh I</text:p>
          </table:table-cell>
          <table:table-cell office:value-type="string" office:string-value="Saladin I" calcext:value-type="string">
            <text:p>Saladin I</text:p>
          </table:table-cell>
          <table:table-cell office:value-type="string" office:string-value="Sherman I" calcext:value-type="string">
            <text:p>Sherman I</text:p>
          </table:table-cell>
          <table:table-cell office:value-type="string" office:string-value="Sunzi I" calcext:value-type="string">
            <text:p>Sunzi I</text:p>
          </table:table-cell>
          <table:table-cell office:value-type="string" office:string-value="Swallowtail I" calcext:value-type="string">
            <text:p>Swallowtail I</text:p>
          </table:table-cell>
          <table:table-cell office:value-type="string" office:string-value="Tokugawa I" calcext:value-type="string">
            <text:p>Tokugawa I</text:p>
          </table:table-cell>
          <table:table-cell office:value-type="string" office:string-value="Tortuga I" calcext:value-type="string">
            <text:p>Tortuga I</text:p>
          </table:table-cell>
          <table:table-cell office:value-type="string" office:string-value="Vlad I" calcext:value-type="string">
            <text:p>Vlad I</text:p>
          </table:table-cell>
          <table:table-cell office:value-type="string" office:string-value="White Witch I" calcext:value-type="string">
            <text:p>White Witch I</text:p>
          </table:table-cell>
          <table:table-cell office:value-type="string" office:string-value="Zheng I" calcext:value-type="string">
            <text:p>Zheng I</text:p>
          </table:table-cell>
          <table:table-cell table:number-columns-repeated="93"/>
        </table:table-row>
        <table:table-row table:style-name="ro2">
          <table:table-cell table:number-columns-repeated="32"/>
          <table:table-cell table:style-name="ce47"/>
          <table:table-cell table:number-columns-repeated="21"/>
          <table:table-cell table:number-matrix-columns-spanned="37" table:number-matrix-rows-spanned="1" table:formula="of:=TRANSPOSE(     COM.MICROSOFT.FILTER(         [$Licenses.$A$2:.$A$200];         ([$Licenses.$A$2:.$A$200]&lt;&gt;&quot;&quot;)         *         (COUNTIF([$Build.$E$5:.$E10];[$Licenses.$A$2:.$A$200])=0)         *         (             ([$Licenses.$B$2:.$B$200]=&quot;&quot;)             +             (COUNTIF([$Build.$E$5:.$E10];[$Licenses.$B$2:.$B$200])&gt;0)         );         &quot;&quot;     ) )" office:value-type="string" office:string-value="Atlas I" calcext:value-type="string">
            <text:p>Atlas I</text:p>
          </table:table-cell>
          <table:table-cell office:value-type="string" office:string-value="Balor III" calcext:value-type="string">
            <text:p>Balor III</text:p>
          </table:table-cell>
          <table:table-cell office:value-type="string" office:string-value="Barbarossa I" calcext:value-type="string">
            <text:p>Barbarossa I</text:p>
          </table:table-cell>
          <table:table-cell office:value-type="string" office:string-value="Black Witch I" calcext:value-type="string">
            <text:p>Black Witch I</text:p>
          </table:table-cell>
          <table:table-cell office:value-type="string" office:string-value="Blackbeard I" calcext:value-type="string">
            <text:p>Blackbeard I</text:p>
          </table:table-cell>
          <table:table-cell office:value-type="string" office:string-value="Caliban I" calcext:value-type="string">
            <text:p>Caliban I</text:p>
          </table:table-cell>
          <table:table-cell office:value-type="string" office:string-value="Drake I" calcext:value-type="string">
            <text:p>Drake I</text:p>
          </table:table-cell>
          <table:table-cell office:value-type="string" office:string-value="Dusk Wing I" calcext:value-type="string">
            <text:p>Dusk Wing I</text:p>
          </table:table-cell>
          <table:table-cell office:value-type="string" office:string-value="Emperor I" calcext:value-type="string">
            <text:p>Emperor I</text:p>
          </table:table-cell>
          <table:table-cell office:value-type="string" office:string-value="Genghis I" calcext:value-type="string">
            <text:p>Genghis I</text:p>
          </table:table-cell>
          <table:table-cell office:value-type="string" office:string-value="Gilgamesh I" calcext:value-type="string">
            <text:p>Gilgamesh I</text:p>
          </table:table-cell>
          <table:table-cell office:value-type="string" office:string-value="Goblin I" calcext:value-type="string">
            <text:p>Goblin I</text:p>
          </table:table-cell>
          <table:table-cell office:value-type="string" office:string-value="Gorgon I" calcext:value-type="string">
            <text:p>Gorgon I</text:p>
          </table:table-cell>
          <table:table-cell office:value-type="string" office:string-value="Hydra I" calcext:value-type="string">
            <text:p>Hydra I</text:p>
          </table:table-cell>
          <table:table-cell office:value-type="string" office:string-value="Iskander I" calcext:value-type="string">
            <text:p>Iskander I</text:p>
          </table:table-cell>
          <table:table-cell office:value-type="string" office:string-value="Kidd I" calcext:value-type="string">
            <text:p>Kidd I</text:p>
          </table:table-cell>
          <table:table-cell office:value-type="string" office:string-value="Kobold I" calcext:value-type="string">
            <text:p>Kobold I</text:p>
          </table:table-cell>
          <table:table-cell office:value-type="string" office:string-value="Lancaster I" calcext:value-type="string">
            <text:p>Lancaster I</text:p>
          </table:table-cell>
          <table:table-cell office:value-type="string" office:string-value="Lich I" calcext:value-type="string">
            <text:p>Lich I</text:p>
          </table:table-cell>
          <table:table-cell office:value-type="string" office:string-value="Manticore I" calcext:value-type="string">
            <text:p>Manticore I</text:p>
          </table:table-cell>
          <table:table-cell office:value-type="string" office:string-value="Metalmark I" calcext:value-type="string">
            <text:p>Metalmark I</text:p>
          </table:table-cell>
          <table:table-cell office:value-type="string" office:string-value="Minotaur I" calcext:value-type="string">
            <text:p>Minotaur I</text:p>
          </table:table-cell>
          <table:table-cell office:value-type="string" office:string-value="Monarch I" calcext:value-type="string">
            <text:p>Monarch I</text:p>
          </table:table-cell>
          <table:table-cell office:value-type="string" office:string-value="Mourning Cloak I" calcext:value-type="string">
            <text:p>Mourning Cloak I</text:p>
          </table:table-cell>
          <table:table-cell office:value-type="string" office:string-value="Napoleon I" calcext:value-type="string">
            <text:p>Napoleon I</text:p>
          </table:table-cell>
          <table:table-cell office:value-type="string" office:string-value="Nelson I" calcext:value-type="string">
            <text:p>Nelson I</text:p>
          </table:table-cell>
          <table:table-cell office:value-type="string" office:string-value="Pegasus I" calcext:value-type="string">
            <text:p>Pegasus I</text:p>
          </table:table-cell>
          <table:table-cell office:value-type="string" office:string-value="Raleigh I" calcext:value-type="string">
            <text:p>Raleigh I</text:p>
          </table:table-cell>
          <table:table-cell office:value-type="string" office:string-value="Saladin I" calcext:value-type="string">
            <text:p>Saladin I</text:p>
          </table:table-cell>
          <table:table-cell office:value-type="string" office:string-value="Sherman I" calcext:value-type="string">
            <text:p>Sherman I</text:p>
          </table:table-cell>
          <table:table-cell office:value-type="string" office:string-value="Sunzi I" calcext:value-type="string">
            <text:p>Sunzi I</text:p>
          </table:table-cell>
          <table:table-cell office:value-type="string" office:string-value="Swallowtail I" calcext:value-type="string">
            <text:p>Swallowtail I</text:p>
          </table:table-cell>
          <table:table-cell office:value-type="string" office:string-value="Tokugawa I" calcext:value-type="string">
            <text:p>Tokugawa I</text:p>
          </table:table-cell>
          <table:table-cell office:value-type="string" office:string-value="Tortuga I" calcext:value-type="string">
            <text:p>Tortuga I</text:p>
          </table:table-cell>
          <table:table-cell office:value-type="string" office:string-value="Vlad I" calcext:value-type="string">
            <text:p>Vlad I</text:p>
          </table:table-cell>
          <table:table-cell office:value-type="string" office:string-value="White Witch I" calcext:value-type="string">
            <text:p>White Witch I</text:p>
          </table:table-cell>
          <table:table-cell office:value-type="string" office:string-value="Zheng I" calcext:value-type="string">
            <text:p>Zheng I</text:p>
          </table:table-cell>
          <table:table-cell table:number-columns-repeated="93"/>
        </table:table-row>
        <table:table-row table:style-name="ro2">
          <table:table-cell table:number-columns-repeated="54"/>
          <table:table-cell table:number-matrix-columns-spanned="37" table:number-matrix-rows-spanned="1" table:formula="of:=TRANSPOSE(     COM.MICROSOFT.FILTER(         [$Licenses.$A$2:.$A$200];         ([$Licenses.$A$2:.$A$200]&lt;&gt;&quot;&quot;)         *         (COUNTIF([$Build.$E$5:.$E11];[$Licenses.$A$2:.$A$200])=0)         *         (             ([$Licenses.$B$2:.$B$200]=&quot;&quot;)             +             (COUNTIF([$Build.$E$5:.$E11];[$Licenses.$B$2:.$B$200])&gt;0)         );         &quot;&quot;     ) )" office:value-type="string" office:string-value="Atlas I" calcext:value-type="string">
            <text:p>Atlas I</text:p>
          </table:table-cell>
          <table:table-cell office:value-type="string" office:string-value="Balor III" calcext:value-type="string">
            <text:p>Balor III</text:p>
          </table:table-cell>
          <table:table-cell office:value-type="string" office:string-value="Barbarossa I" calcext:value-type="string">
            <text:p>Barbarossa I</text:p>
          </table:table-cell>
          <table:table-cell office:value-type="string" office:string-value="Black Witch I" calcext:value-type="string">
            <text:p>Black Witch I</text:p>
          </table:table-cell>
          <table:table-cell office:value-type="string" office:string-value="Blackbeard I" calcext:value-type="string">
            <text:p>Blackbeard I</text:p>
          </table:table-cell>
          <table:table-cell office:value-type="string" office:string-value="Caliban I" calcext:value-type="string">
            <text:p>Caliban I</text:p>
          </table:table-cell>
          <table:table-cell office:value-type="string" office:string-value="Drake I" calcext:value-type="string">
            <text:p>Drake I</text:p>
          </table:table-cell>
          <table:table-cell office:value-type="string" office:string-value="Dusk Wing I" calcext:value-type="string">
            <text:p>Dusk Wing I</text:p>
          </table:table-cell>
          <table:table-cell office:value-type="string" office:string-value="Emperor I" calcext:value-type="string">
            <text:p>Emperor I</text:p>
          </table:table-cell>
          <table:table-cell office:value-type="string" office:string-value="Genghis I" calcext:value-type="string">
            <text:p>Genghis I</text:p>
          </table:table-cell>
          <table:table-cell office:value-type="string" office:string-value="Gilgamesh I" calcext:value-type="string">
            <text:p>Gilgamesh I</text:p>
          </table:table-cell>
          <table:table-cell office:value-type="string" office:string-value="Goblin II" calcext:value-type="string">
            <text:p>Goblin II</text:p>
          </table:table-cell>
          <table:table-cell office:value-type="string" office:string-value="Gorgon I" calcext:value-type="string">
            <text:p>Gorgon I</text:p>
          </table:table-cell>
          <table:table-cell office:value-type="string" office:string-value="Hydra I" calcext:value-type="string">
            <text:p>Hydra I</text:p>
          </table:table-cell>
          <table:table-cell office:value-type="string" office:string-value="Iskander I" calcext:value-type="string">
            <text:p>Iskander I</text:p>
          </table:table-cell>
          <table:table-cell office:value-type="string" office:string-value="Kidd I" calcext:value-type="string">
            <text:p>Kidd I</text:p>
          </table:table-cell>
          <table:table-cell office:value-type="string" office:string-value="Kobold I" calcext:value-type="string">
            <text:p>Kobold I</text:p>
          </table:table-cell>
          <table:table-cell office:value-type="string" office:string-value="Lancaster I" calcext:value-type="string">
            <text:p>Lancaster I</text:p>
          </table:table-cell>
          <table:table-cell office:value-type="string" office:string-value="Lich I" calcext:value-type="string">
            <text:p>Lich I</text:p>
          </table:table-cell>
          <table:table-cell office:value-type="string" office:string-value="Manticore I" calcext:value-type="string">
            <text:p>Manticore I</text:p>
          </table:table-cell>
          <table:table-cell office:value-type="string" office:string-value="Metalmark I" calcext:value-type="string">
            <text:p>Metalmark I</text:p>
          </table:table-cell>
          <table:table-cell office:value-type="string" office:string-value="Minotaur I" calcext:value-type="string">
            <text:p>Minotaur I</text:p>
          </table:table-cell>
          <table:table-cell office:value-type="string" office:string-value="Monarch I" calcext:value-type="string">
            <text:p>Monarch I</text:p>
          </table:table-cell>
          <table:table-cell office:value-type="string" office:string-value="Mourning Cloak I" calcext:value-type="string">
            <text:p>Mourning Cloak I</text:p>
          </table:table-cell>
          <table:table-cell office:value-type="string" office:string-value="Napoleon I" calcext:value-type="string">
            <text:p>Napoleon I</text:p>
          </table:table-cell>
          <table:table-cell office:value-type="string" office:string-value="Nelson I" calcext:value-type="string">
            <text:p>Nelson I</text:p>
          </table:table-cell>
          <table:table-cell office:value-type="string" office:string-value="Pegasus I" calcext:value-type="string">
            <text:p>Pegasus I</text:p>
          </table:table-cell>
          <table:table-cell office:value-type="string" office:string-value="Raleigh I" calcext:value-type="string">
            <text:p>Raleigh I</text:p>
          </table:table-cell>
          <table:table-cell office:value-type="string" office:string-value="Saladin I" calcext:value-type="string">
            <text:p>Saladin I</text:p>
          </table:table-cell>
          <table:table-cell office:value-type="string" office:string-value="Sherman I" calcext:value-type="string">
            <text:p>Sherman I</text:p>
          </table:table-cell>
          <table:table-cell office:value-type="string" office:string-value="Sunzi I" calcext:value-type="string">
            <text:p>Sunzi I</text:p>
          </table:table-cell>
          <table:table-cell office:value-type="string" office:string-value="Swallowtail I" calcext:value-type="string">
            <text:p>Swallowtail I</text:p>
          </table:table-cell>
          <table:table-cell office:value-type="string" office:string-value="Tokugawa I" calcext:value-type="string">
            <text:p>Tokugawa I</text:p>
          </table:table-cell>
          <table:table-cell office:value-type="string" office:string-value="Tortuga I" calcext:value-type="string">
            <text:p>Tortuga I</text:p>
          </table:table-cell>
          <table:table-cell office:value-type="string" office:string-value="Vlad I" calcext:value-type="string">
            <text:p>Vlad I</text:p>
          </table:table-cell>
          <table:table-cell office:value-type="string" office:string-value="White Witch I" calcext:value-type="string">
            <text:p>White Witch I</text:p>
          </table:table-cell>
          <table:table-cell office:value-type="string" office:string-value="Zheng I" calcext:value-type="string">
            <text:p>Zheng I</text:p>
          </table:table-cell>
          <table:table-cell table:number-columns-repeated="93"/>
        </table:table-row>
        <table:table-row table:style-name="ro2">
          <table:table-cell table:number-columns-repeated="54"/>
          <table:table-cell table:number-matrix-columns-spanned="37" table:number-matrix-rows-spanned="1" table:formula="of:=TRANSPOSE(     COM.MICROSOFT.FILTER(         [$Licenses.$A$2:.$A$200];         ([$Licenses.$A$2:.$A$200]&lt;&gt;&quot;&quot;)         *         (COUNTIF([$Build.$E$5:.$E12];[$Licenses.$A$2:.$A$200])=0)         *         (             ([$Licenses.$B$2:.$B$200]=&quot;&quot;)             +             (COUNTIF([$Build.$E$5:.$E12];[$Licenses.$B$2:.$B$200])&gt;0)         );         &quot;&quot;     ) )" office:value-type="string" office:string-value="Atlas I" calcext:value-type="string">
            <text:p>Atlas I</text:p>
          </table:table-cell>
          <table:table-cell office:value-type="string" office:string-value="Balor III" calcext:value-type="string">
            <text:p>Balor III</text:p>
          </table:table-cell>
          <table:table-cell office:value-type="string" office:string-value="Barbarossa I" calcext:value-type="string">
            <text:p>Barbarossa I</text:p>
          </table:table-cell>
          <table:table-cell office:value-type="string" office:string-value="Black Witch I" calcext:value-type="string">
            <text:p>Black Witch I</text:p>
          </table:table-cell>
          <table:table-cell office:value-type="string" office:string-value="Blackbeard I" calcext:value-type="string">
            <text:p>Blackbeard I</text:p>
          </table:table-cell>
          <table:table-cell office:value-type="string" office:string-value="Caliban I" calcext:value-type="string">
            <text:p>Caliban I</text:p>
          </table:table-cell>
          <table:table-cell office:value-type="string" office:string-value="Drake I" calcext:value-type="string">
            <text:p>Drake I</text:p>
          </table:table-cell>
          <table:table-cell office:value-type="string" office:string-value="Dusk Wing I" calcext:value-type="string">
            <text:p>Dusk Wing I</text:p>
          </table:table-cell>
          <table:table-cell office:value-type="string" office:string-value="Emperor I" calcext:value-type="string">
            <text:p>Emperor I</text:p>
          </table:table-cell>
          <table:table-cell office:value-type="string" office:string-value="Genghis I" calcext:value-type="string">
            <text:p>Genghis I</text:p>
          </table:table-cell>
          <table:table-cell office:value-type="string" office:string-value="Gilgamesh I" calcext:value-type="string">
            <text:p>Gilgamesh I</text:p>
          </table:table-cell>
          <table:table-cell office:value-type="string" office:string-value="Goblin III" calcext:value-type="string">
            <text:p>Goblin III</text:p>
          </table:table-cell>
          <table:table-cell office:value-type="string" office:string-value="Gorgon I" calcext:value-type="string">
            <text:p>Gorgon I</text:p>
          </table:table-cell>
          <table:table-cell office:value-type="string" office:string-value="Hydra I" calcext:value-type="string">
            <text:p>Hydra I</text:p>
          </table:table-cell>
          <table:table-cell office:value-type="string" office:string-value="Iskander I" calcext:value-type="string">
            <text:p>Iskander I</text:p>
          </table:table-cell>
          <table:table-cell office:value-type="string" office:string-value="Kidd I" calcext:value-type="string">
            <text:p>Kidd I</text:p>
          </table:table-cell>
          <table:table-cell office:value-type="string" office:string-value="Kobold I" calcext:value-type="string">
            <text:p>Kobold I</text:p>
          </table:table-cell>
          <table:table-cell office:value-type="string" office:string-value="Lancaster I" calcext:value-type="string">
            <text:p>Lancaster I</text:p>
          </table:table-cell>
          <table:table-cell office:value-type="string" office:string-value="Lich I" calcext:value-type="string">
            <text:p>Lich I</text:p>
          </table:table-cell>
          <table:table-cell office:value-type="string" office:string-value="Manticore I" calcext:value-type="string">
            <text:p>Manticore I</text:p>
          </table:table-cell>
          <table:table-cell office:value-type="string" office:string-value="Metalmark I" calcext:value-type="string">
            <text:p>Metalmark I</text:p>
          </table:table-cell>
          <table:table-cell office:value-type="string" office:string-value="Minotaur I" calcext:value-type="string">
            <text:p>Minotaur I</text:p>
          </table:table-cell>
          <table:table-cell office:value-type="string" office:string-value="Monarch I" calcext:value-type="string">
            <text:p>Monarch I</text:p>
          </table:table-cell>
          <table:table-cell office:value-type="string" office:string-value="Mourning Cloak I" calcext:value-type="string">
            <text:p>Mourning Cloak I</text:p>
          </table:table-cell>
          <table:table-cell office:value-type="string" office:string-value="Napoleon I" calcext:value-type="string">
            <text:p>Napoleon I</text:p>
          </table:table-cell>
          <table:table-cell office:value-type="string" office:string-value="Nelson I" calcext:value-type="string">
            <text:p>Nelson I</text:p>
          </table:table-cell>
          <table:table-cell office:value-type="string" office:string-value="Pegasus I" calcext:value-type="string">
            <text:p>Pegasus I</text:p>
          </table:table-cell>
          <table:table-cell office:value-type="string" office:string-value="Raleigh I" calcext:value-type="string">
            <text:p>Raleigh I</text:p>
          </table:table-cell>
          <table:table-cell office:value-type="string" office:string-value="Saladin I" calcext:value-type="string">
            <text:p>Saladin I</text:p>
          </table:table-cell>
          <table:table-cell office:value-type="string" office:string-value="Sherman I" calcext:value-type="string">
            <text:p>Sherman I</text:p>
          </table:table-cell>
          <table:table-cell office:value-type="string" office:string-value="Sunzi I" calcext:value-type="string">
            <text:p>Sunzi I</text:p>
          </table:table-cell>
          <table:table-cell office:value-type="string" office:string-value="Swallowtail I" calcext:value-type="string">
            <text:p>Swallowtail I</text:p>
          </table:table-cell>
          <table:table-cell office:value-type="string" office:string-value="Tokugawa I" calcext:value-type="string">
            <text:p>Tokugawa I</text:p>
          </table:table-cell>
          <table:table-cell office:value-type="string" office:string-value="Tortuga I" calcext:value-type="string">
            <text:p>Tortuga I</text:p>
          </table:table-cell>
          <table:table-cell office:value-type="string" office:string-value="Vlad I" calcext:value-type="string">
            <text:p>Vlad I</text:p>
          </table:table-cell>
          <table:table-cell office:value-type="string" office:string-value="White Witch I" calcext:value-type="string">
            <text:p>White Witch I</text:p>
          </table:table-cell>
          <table:table-cell office:value-type="string" office:string-value="Zheng I" calcext:value-type="string">
            <text:p>Zheng I</text:p>
          </table:table-cell>
          <table:table-cell table:number-columns-repeated="93"/>
        </table:table-row>
        <table:table-row table:style-name="ro2">
          <table:table-cell table:number-columns-repeated="54"/>
          <table:table-cell table:number-matrix-columns-spanned="37" table:number-matrix-rows-spanned="1" table:formula="of:=TRANSPOSE(     COM.MICROSOFT.FILTER(         [$Licenses.$A$2:.$A$200];         ([$Licenses.$A$2:.$A$200]&lt;&gt;&quot;&quot;)         *         (COUNTIF([$Build.$E$5:.$E13];[$Licenses.$A$2:.$A$200])=0)         *         (             ([$Licenses.$B$2:.$B$200]=&quot;&quot;)             +             (COUNTIF([$Build.$E$5:.$E13];[$Licenses.$B$2:.$B$200])&gt;0)         );         &quot;&quot;     ) )" office:value-type="string" office:string-value="Atlas I" calcext:value-type="string">
            <text:p>Atlas I</text:p>
          </table:table-cell>
          <table:table-cell office:value-type="string" office:string-value="Balor III" calcext:value-type="string">
            <text:p>Balor III</text:p>
          </table:table-cell>
          <table:table-cell office:value-type="string" office:string-value="Barbarossa I" calcext:value-type="string">
            <text:p>Barbarossa I</text:p>
          </table:table-cell>
          <table:table-cell office:value-type="string" office:string-value="Black Witch I" calcext:value-type="string">
            <text:p>Black Witch I</text:p>
          </table:table-cell>
          <table:table-cell office:value-type="string" office:string-value="Blackbeard I" calcext:value-type="string">
            <text:p>Blackbeard I</text:p>
          </table:table-cell>
          <table:table-cell office:value-type="string" office:string-value="Caliban I" calcext:value-type="string">
            <text:p>Caliban I</text:p>
          </table:table-cell>
          <table:table-cell office:value-type="string" office:string-value="Drake I" calcext:value-type="string">
            <text:p>Drake I</text:p>
          </table:table-cell>
          <table:table-cell office:value-type="string" office:string-value="Dusk Wing I" calcext:value-type="string">
            <text:p>Dusk Wing I</text:p>
          </table:table-cell>
          <table:table-cell office:value-type="string" office:string-value="Emperor I" calcext:value-type="string">
            <text:p>Emperor I</text:p>
          </table:table-cell>
          <table:table-cell office:value-type="string" office:string-value="Genghis I" calcext:value-type="string">
            <text:p>Genghis I</text:p>
          </table:table-cell>
          <table:table-cell office:value-type="string" office:string-value="Gilgamesh I" calcext:value-type="string">
            <text:p>Gilgamesh I</text:p>
          </table:table-cell>
          <table:table-cell office:value-type="string" office:string-value="Goblin III" calcext:value-type="string">
            <text:p>Goblin III</text:p>
          </table:table-cell>
          <table:table-cell office:value-type="string" office:string-value="Gorgon I" calcext:value-type="string">
            <text:p>Gorgon I</text:p>
          </table:table-cell>
          <table:table-cell office:value-type="string" office:string-value="Hydra I" calcext:value-type="string">
            <text:p>Hydra I</text:p>
          </table:table-cell>
          <table:table-cell office:value-type="string" office:string-value="Iskander I" calcext:value-type="string">
            <text:p>Iskander I</text:p>
          </table:table-cell>
          <table:table-cell office:value-type="string" office:string-value="Kidd I" calcext:value-type="string">
            <text:p>Kidd I</text:p>
          </table:table-cell>
          <table:table-cell office:value-type="string" office:string-value="Kobold I" calcext:value-type="string">
            <text:p>Kobold I</text:p>
          </table:table-cell>
          <table:table-cell office:value-type="string" office:string-value="Lancaster I" calcext:value-type="string">
            <text:p>Lancaster I</text:p>
          </table:table-cell>
          <table:table-cell office:value-type="string" office:string-value="Lich I" calcext:value-type="string">
            <text:p>Lich I</text:p>
          </table:table-cell>
          <table:table-cell office:value-type="string" office:string-value="Manticore I" calcext:value-type="string">
            <text:p>Manticore I</text:p>
          </table:table-cell>
          <table:table-cell office:value-type="string" office:string-value="Metalmark I" calcext:value-type="string">
            <text:p>Metalmark I</text:p>
          </table:table-cell>
          <table:table-cell office:value-type="string" office:string-value="Minotaur I" calcext:value-type="string">
            <text:p>Minotaur I</text:p>
          </table:table-cell>
          <table:table-cell office:value-type="string" office:string-value="Monarch I" calcext:value-type="string">
            <text:p>Monarch I</text:p>
          </table:table-cell>
          <table:table-cell office:value-type="string" office:string-value="Mourning Cloak I" calcext:value-type="string">
            <text:p>Mourning Cloak I</text:p>
          </table:table-cell>
          <table:table-cell office:value-type="string" office:string-value="Napoleon I" calcext:value-type="string">
            <text:p>Napoleon I</text:p>
          </table:table-cell>
          <table:table-cell office:value-type="string" office:string-value="Nelson I" calcext:value-type="string">
            <text:p>Nelson I</text:p>
          </table:table-cell>
          <table:table-cell office:value-type="string" office:string-value="Pegasus II" calcext:value-type="string">
            <text:p>Pegasus II</text:p>
          </table:table-cell>
          <table:table-cell office:value-type="string" office:string-value="Raleigh I" calcext:value-type="string">
            <text:p>Raleigh I</text:p>
          </table:table-cell>
          <table:table-cell office:value-type="string" office:string-value="Saladin I" calcext:value-type="string">
            <text:p>Saladin I</text:p>
          </table:table-cell>
          <table:table-cell office:value-type="string" office:string-value="Sherman I" calcext:value-type="string">
            <text:p>Sherman I</text:p>
          </table:table-cell>
          <table:table-cell office:value-type="string" office:string-value="Sunzi I" calcext:value-type="string">
            <text:p>Sunzi I</text:p>
          </table:table-cell>
          <table:table-cell office:value-type="string" office:string-value="Swallowtail I" calcext:value-type="string">
            <text:p>Swallowtail I</text:p>
          </table:table-cell>
          <table:table-cell office:value-type="string" office:string-value="Tokugawa I" calcext:value-type="string">
            <text:p>Tokugawa I</text:p>
          </table:table-cell>
          <table:table-cell office:value-type="string" office:string-value="Tortuga I" calcext:value-type="string">
            <text:p>Tortuga I</text:p>
          </table:table-cell>
          <table:table-cell office:value-type="string" office:string-value="Vlad I" calcext:value-type="string">
            <text:p>Vlad I</text:p>
          </table:table-cell>
          <table:table-cell office:value-type="string" office:string-value="White Witch I" calcext:value-type="string">
            <text:p>White Witch I</text:p>
          </table:table-cell>
          <table:table-cell office:value-type="string" office:string-value="Zheng I" calcext:value-type="string">
            <text:p>Zheng I</text:p>
          </table:table-cell>
          <table:table-cell table:number-columns-repeated="93"/>
        </table:table-row>
        <table:table-row table:style-name="ro2">
          <table:table-cell table:number-columns-repeated="54"/>
          <table:table-cell table:number-matrix-columns-spanned="37" table:number-matrix-rows-spanned="1" table:formula="of:=TRANSPOSE(     COM.MICROSOFT.FILTER(         [$Licenses.$A$2:.$A$200];         ([$Licenses.$A$2:.$A$200]&lt;&gt;&quot;&quot;)         *         (COUNTIF([$Build.$E$5:.$E14];[$Licenses.$A$2:.$A$200])=0)         *         (             ([$Licenses.$B$2:.$B$200]=&quot;&quot;)             +             (COUNTIF([$Build.$E$5:.$E14];[$Licenses.$B$2:.$B$200])&gt;0)         );         &quot;&quot;     ) )" office:value-type="string" office:string-value="Atlas I" calcext:value-type="string">
            <text:p>Atlas I</text:p>
          </table:table-cell>
          <table:table-cell office:value-type="string" office:string-value="Balor III" calcext:value-type="string">
            <text:p>Balor III</text:p>
          </table:table-cell>
          <table:table-cell office:value-type="string" office:string-value="Barbarossa I" calcext:value-type="string">
            <text:p>Barbarossa I</text:p>
          </table:table-cell>
          <table:table-cell office:value-type="string" office:string-value="Black Witch I" calcext:value-type="string">
            <text:p>Black Witch I</text:p>
          </table:table-cell>
          <table:table-cell office:value-type="string" office:string-value="Blackbeard I" calcext:value-type="string">
            <text:p>Blackbeard I</text:p>
          </table:table-cell>
          <table:table-cell office:value-type="string" office:string-value="Caliban I" calcext:value-type="string">
            <text:p>Caliban I</text:p>
          </table:table-cell>
          <table:table-cell office:value-type="string" office:string-value="Drake I" calcext:value-type="string">
            <text:p>Drake I</text:p>
          </table:table-cell>
          <table:table-cell office:value-type="string" office:string-value="Dusk Wing I" calcext:value-type="string">
            <text:p>Dusk Wing I</text:p>
          </table:table-cell>
          <table:table-cell office:value-type="string" office:string-value="Emperor I" calcext:value-type="string">
            <text:p>Emperor I</text:p>
          </table:table-cell>
          <table:table-cell office:value-type="string" office:string-value="Genghis I" calcext:value-type="string">
            <text:p>Genghis I</text:p>
          </table:table-cell>
          <table:table-cell office:value-type="string" office:string-value="Gilgamesh I" calcext:value-type="string">
            <text:p>Gilgamesh I</text:p>
          </table:table-cell>
          <table:table-cell office:value-type="string" office:string-value="Goblin III" calcext:value-type="string">
            <text:p>Goblin III</text:p>
          </table:table-cell>
          <table:table-cell office:value-type="string" office:string-value="Gorgon I" calcext:value-type="string">
            <text:p>Gorgon I</text:p>
          </table:table-cell>
          <table:table-cell office:value-type="string" office:string-value="Hydra I" calcext:value-type="string">
            <text:p>Hydra I</text:p>
          </table:table-cell>
          <table:table-cell office:value-type="string" office:string-value="Iskander I" calcext:value-type="string">
            <text:p>Iskander I</text:p>
          </table:table-cell>
          <table:table-cell office:value-type="string" office:string-value="Kidd I" calcext:value-type="string">
            <text:p>Kidd I</text:p>
          </table:table-cell>
          <table:table-cell office:value-type="string" office:string-value="Kobold I" calcext:value-type="string">
            <text:p>Kobold I</text:p>
          </table:table-cell>
          <table:table-cell office:value-type="string" office:string-value="Lancaster I" calcext:value-type="string">
            <text:p>Lancaster I</text:p>
          </table:table-cell>
          <table:table-cell office:value-type="string" office:string-value="Lich I" calcext:value-type="string">
            <text:p>Lich I</text:p>
          </table:table-cell>
          <table:table-cell office:value-type="string" office:string-value="Manticore I" calcext:value-type="string">
            <text:p>Manticore I</text:p>
          </table:table-cell>
          <table:table-cell office:value-type="string" office:string-value="Metalmark I" calcext:value-type="string">
            <text:p>Metalmark I</text:p>
          </table:table-cell>
          <table:table-cell office:value-type="string" office:string-value="Minotaur I" calcext:value-type="string">
            <text:p>Minotaur I</text:p>
          </table:table-cell>
          <table:table-cell office:value-type="string" office:string-value="Monarch I" calcext:value-type="string">
            <text:p>Monarch I</text:p>
          </table:table-cell>
          <table:table-cell office:value-type="string" office:string-value="Mourning Cloak I" calcext:value-type="string">
            <text:p>Mourning Cloak I</text:p>
          </table:table-cell>
          <table:table-cell office:value-type="string" office:string-value="Napoleon I" calcext:value-type="string">
            <text:p>Napoleon I</text:p>
          </table:table-cell>
          <table:table-cell office:value-type="string" office:string-value="Nelson I" calcext:value-type="string">
            <text:p>Nelson I</text:p>
          </table:table-cell>
          <table:table-cell office:value-type="string" office:string-value="Pegasus III" calcext:value-type="string">
            <text:p>Pegasus III</text:p>
          </table:table-cell>
          <table:table-cell office:value-type="string" office:string-value="Raleigh I" calcext:value-type="string">
            <text:p>Raleigh I</text:p>
          </table:table-cell>
          <table:table-cell office:value-type="string" office:string-value="Saladin I" calcext:value-type="string">
            <text:p>Saladin I</text:p>
          </table:table-cell>
          <table:table-cell office:value-type="string" office:string-value="Sherman I" calcext:value-type="string">
            <text:p>Sherman I</text:p>
          </table:table-cell>
          <table:table-cell office:value-type="string" office:string-value="Sunzi I" calcext:value-type="string">
            <text:p>Sunzi I</text:p>
          </table:table-cell>
          <table:table-cell office:value-type="string" office:string-value="Swallowtail I" calcext:value-type="string">
            <text:p>Swallowtail I</text:p>
          </table:table-cell>
          <table:table-cell office:value-type="string" office:string-value="Tokugawa I" calcext:value-type="string">
            <text:p>Tokugawa I</text:p>
          </table:table-cell>
          <table:table-cell office:value-type="string" office:string-value="Tortuga I" calcext:value-type="string">
            <text:p>Tortuga I</text:p>
          </table:table-cell>
          <table:table-cell office:value-type="string" office:string-value="Vlad I" calcext:value-type="string">
            <text:p>Vlad I</text:p>
          </table:table-cell>
          <table:table-cell office:value-type="string" office:string-value="White Witch I" calcext:value-type="string">
            <text:p>White Witch I</text:p>
          </table:table-cell>
          <table:table-cell office:value-type="string" office:string-value="Zheng I" calcext:value-type="string">
            <text:p>Zheng I</text:p>
          </table:table-cell>
          <table:table-cell table:number-columns-repeated="93"/>
        </table:table-row>
        <table:table-row table:style-name="ro2">
          <table:table-cell table:number-columns-repeated="54"/>
          <table:table-cell table:number-matrix-columns-spanned="37" table:number-matrix-rows-spanned="1" table:formula="of:=TRANSPOSE(     COM.MICROSOFT.FILTER(         [$Licenses.$A$2:.$A$200];         ([$Licenses.$A$2:.$A$200]&lt;&gt;&quot;&quot;)         *         (COUNTIF([$Build.$E$5:.$E15];[$Licenses.$A$2:.$A$200])=0)         *         (             ([$Licenses.$B$2:.$B$200]=&quot;&quot;)             +             (COUNTIF([$Build.$E$5:.$E15];[$Licenses.$B$2:.$B$200])&gt;0)         );         &quot;&quot;     ) )" office:value-type="string" office:string-value="Atlas I" calcext:value-type="string">
            <text:p>Atlas I</text:p>
          </table:table-cell>
          <table:table-cell office:value-type="string" office:string-value="Balor III" calcext:value-type="string">
            <text:p>Balor III</text:p>
          </table:table-cell>
          <table:table-cell office:value-type="string" office:string-value="Barbarossa I" calcext:value-type="string">
            <text:p>Barbarossa I</text:p>
          </table:table-cell>
          <table:table-cell office:value-type="string" office:string-value="Black Witch I" calcext:value-type="string">
            <text:p>Black Witch I</text:p>
          </table:table-cell>
          <table:table-cell office:value-type="string" office:string-value="Blackbeard I" calcext:value-type="string">
            <text:p>Blackbeard I</text:p>
          </table:table-cell>
          <table:table-cell office:value-type="string" office:string-value="Caliban I" calcext:value-type="string">
            <text:p>Caliban I</text:p>
          </table:table-cell>
          <table:table-cell office:value-type="string" office:string-value="Drake I" calcext:value-type="string">
            <text:p>Drake I</text:p>
          </table:table-cell>
          <table:table-cell office:value-type="string" office:string-value="Dusk Wing I" calcext:value-type="string">
            <text:p>Dusk Wing I</text:p>
          </table:table-cell>
          <table:table-cell office:value-type="string" office:string-value="Emperor I" calcext:value-type="string">
            <text:p>Emperor I</text:p>
          </table:table-cell>
          <table:table-cell office:value-type="string" office:string-value="Genghis I" calcext:value-type="string">
            <text:p>Genghis I</text:p>
          </table:table-cell>
          <table:table-cell office:value-type="string" office:string-value="Gilgamesh I" calcext:value-type="string">
            <text:p>Gilgamesh I</text:p>
          </table:table-cell>
          <table:table-cell office:value-type="string" office:string-value="Goblin III" calcext:value-type="string">
            <text:p>Goblin III</text:p>
          </table:table-cell>
          <table:table-cell office:value-type="string" office:string-value="Gorgon I" calcext:value-type="string">
            <text:p>Gorgon I</text:p>
          </table:table-cell>
          <table:table-cell office:value-type="string" office:string-value="Hydra I" calcext:value-type="string">
            <text:p>Hydra I</text:p>
          </table:table-cell>
          <table:table-cell office:value-type="string" office:string-value="Iskander I" calcext:value-type="string">
            <text:p>Iskander I</text:p>
          </table:table-cell>
          <table:table-cell office:value-type="string" office:string-value="Kidd I" calcext:value-type="string">
            <text:p>Kidd I</text:p>
          </table:table-cell>
          <table:table-cell office:value-type="string" office:string-value="Kobold I" calcext:value-type="string">
            <text:p>Kobold I</text:p>
          </table:table-cell>
          <table:table-cell office:value-type="string" office:string-value="Lancaster I" calcext:value-type="string">
            <text:p>Lancaster I</text:p>
          </table:table-cell>
          <table:table-cell office:value-type="string" office:string-value="Lich I" calcext:value-type="string">
            <text:p>Lich I</text:p>
          </table:table-cell>
          <table:table-cell office:value-type="string" office:string-value="Manticore I" calcext:value-type="string">
            <text:p>Manticore I</text:p>
          </table:table-cell>
          <table:table-cell office:value-type="string" office:string-value="Metalmark I" calcext:value-type="string">
            <text:p>Metalmark I</text:p>
          </table:table-cell>
          <table:table-cell office:value-type="string" office:string-value="Minotaur I" calcext:value-type="string">
            <text:p>Minotaur I</text:p>
          </table:table-cell>
          <table:table-cell office:value-type="string" office:string-value="Monarch I" calcext:value-type="string">
            <text:p>Monarch I</text:p>
          </table:table-cell>
          <table:table-cell office:value-type="string" office:string-value="Mourning Cloak I" calcext:value-type="string">
            <text:p>Mourning Cloak I</text:p>
          </table:table-cell>
          <table:table-cell office:value-type="string" office:string-value="Napoleon I" calcext:value-type="string">
            <text:p>Napoleon I</text:p>
          </table:table-cell>
          <table:table-cell office:value-type="string" office:string-value="Nelson I" calcext:value-type="string">
            <text:p>Nelson I</text:p>
          </table:table-cell>
          <table:table-cell office:value-type="string" office:string-value="Pegasus III" calcext:value-type="string">
            <text:p>Pegasus III</text:p>
          </table:table-cell>
          <table:table-cell office:value-type="string" office:string-value="Raleigh I" calcext:value-type="string">
            <text:p>Raleigh I</text:p>
          </table:table-cell>
          <table:table-cell office:value-type="string" office:string-value="Saladin I" calcext:value-type="string">
            <text:p>Saladin I</text:p>
          </table:table-cell>
          <table:table-cell office:value-type="string" office:string-value="Sherman I" calcext:value-type="string">
            <text:p>Sherman I</text:p>
          </table:table-cell>
          <table:table-cell office:value-type="string" office:string-value="Sunzi I" calcext:value-type="string">
            <text:p>Sunzi I</text:p>
          </table:table-cell>
          <table:table-cell office:value-type="string" office:string-value="Swallowtail II" calcext:value-type="string">
            <text:p>Swallowtail II</text:p>
          </table:table-cell>
          <table:table-cell office:value-type="string" office:string-value="Tokugawa I" calcext:value-type="string">
            <text:p>Tokugawa I</text:p>
          </table:table-cell>
          <table:table-cell office:value-type="string" office:string-value="Tortuga I" calcext:value-type="string">
            <text:p>Tortuga I</text:p>
          </table:table-cell>
          <table:table-cell office:value-type="string" office:string-value="Vlad I" calcext:value-type="string">
            <text:p>Vlad I</text:p>
          </table:table-cell>
          <table:table-cell office:value-type="string" office:string-value="White Witch I" calcext:value-type="string">
            <text:p>White Witch I</text:p>
          </table:table-cell>
          <table:table-cell office:value-type="string" office:string-value="Zheng I" calcext:value-type="string">
            <text:p>Zheng I</text:p>
          </table:table-cell>
          <table:table-cell table:number-columns-repeated="93"/>
        </table:table-row>
        <table:table-row table:style-name="ro2">
          <table:table-cell table:number-columns-repeated="54"/>
          <table:table-cell table:number-matrix-columns-spanned="37" table:number-matrix-rows-spanned="1" table:formula="of:=TRANSPOSE(     COM.MICROSOFT.FILTER(         [$Licenses.$A$2:.$A$200];         ([$Licenses.$A$2:.$A$200]&lt;&gt;&quot;&quot;)         *         (COUNTIF([$Build.$E$5:.$E16];[$Licenses.$A$2:.$A$200])=0)         *         (             ([$Licenses.$B$2:.$B$200]=&quot;&quot;)             +             (COUNTIF([$Build.$E$5:.$E16];[$Licenses.$B$2:.$B$200])&gt;0)         );         &quot;&quot;     ) )" office:value-type="string" office:string-value="Atlas I" calcext:value-type="string">
            <text:p>Atlas I</text:p>
          </table:table-cell>
          <table:table-cell office:value-type="string" office:string-value="Balor III" calcext:value-type="string">
            <text:p>Balor III</text:p>
          </table:table-cell>
          <table:table-cell office:value-type="string" office:string-value="Barbarossa I" calcext:value-type="string">
            <text:p>Barbarossa I</text:p>
          </table:table-cell>
          <table:table-cell office:value-type="string" office:string-value="Black Witch I" calcext:value-type="string">
            <text:p>Black Witch I</text:p>
          </table:table-cell>
          <table:table-cell office:value-type="string" office:string-value="Blackbeard I" calcext:value-type="string">
            <text:p>Blackbeard I</text:p>
          </table:table-cell>
          <table:table-cell office:value-type="string" office:string-value="Caliban I" calcext:value-type="string">
            <text:p>Caliban I</text:p>
          </table:table-cell>
          <table:table-cell office:value-type="string" office:string-value="Drake I" calcext:value-type="string">
            <text:p>Drake I</text:p>
          </table:table-cell>
          <table:table-cell office:value-type="string" office:string-value="Dusk Wing I" calcext:value-type="string">
            <text:p>Dusk Wing I</text:p>
          </table:table-cell>
          <table:table-cell office:value-type="string" office:string-value="Emperor I" calcext:value-type="string">
            <text:p>Emperor I</text:p>
          </table:table-cell>
          <table:table-cell office:value-type="string" office:string-value="Genghis I" calcext:value-type="string">
            <text:p>Genghis I</text:p>
          </table:table-cell>
          <table:table-cell office:value-type="string" office:string-value="Gilgamesh I" calcext:value-type="string">
            <text:p>Gilgamesh I</text:p>
          </table:table-cell>
          <table:table-cell office:value-type="string" office:string-value="Goblin III" calcext:value-type="string">
            <text:p>Goblin III</text:p>
          </table:table-cell>
          <table:table-cell office:value-type="string" office:string-value="Gorgon I" calcext:value-type="string">
            <text:p>Gorgon I</text:p>
          </table:table-cell>
          <table:table-cell office:value-type="string" office:string-value="Hydra I" calcext:value-type="string">
            <text:p>Hydra I</text:p>
          </table:table-cell>
          <table:table-cell office:value-type="string" office:string-value="Iskander I" calcext:value-type="string">
            <text:p>Iskander I</text:p>
          </table:table-cell>
          <table:table-cell office:value-type="string" office:string-value="Kidd I" calcext:value-type="string">
            <text:p>Kidd I</text:p>
          </table:table-cell>
          <table:table-cell office:value-type="string" office:string-value="Kobold I" calcext:value-type="string">
            <text:p>Kobold I</text:p>
          </table:table-cell>
          <table:table-cell office:value-type="string" office:string-value="Lancaster I" calcext:value-type="string">
            <text:p>Lancaster I</text:p>
          </table:table-cell>
          <table:table-cell office:value-type="string" office:string-value="Lich I" calcext:value-type="string">
            <text:p>Lich I</text:p>
          </table:table-cell>
          <table:table-cell office:value-type="string" office:string-value="Manticore I" calcext:value-type="string">
            <text:p>Manticore I</text:p>
          </table:table-cell>
          <table:table-cell office:value-type="string" office:string-value="Metalmark I" calcext:value-type="string">
            <text:p>Metalmark I</text:p>
          </table:table-cell>
          <table:table-cell office:value-type="string" office:string-value="Minotaur I" calcext:value-type="string">
            <text:p>Minotaur I</text:p>
          </table:table-cell>
          <table:table-cell office:value-type="string" office:string-value="Monarch I" calcext:value-type="string">
            <text:p>Monarch I</text:p>
          </table:table-cell>
          <table:table-cell office:value-type="string" office:string-value="Mourning Cloak I" calcext:value-type="string">
            <text:p>Mourning Cloak I</text:p>
          </table:table-cell>
          <table:table-cell office:value-type="string" office:string-value="Napoleon I" calcext:value-type="string">
            <text:p>Napoleon I</text:p>
          </table:table-cell>
          <table:table-cell office:value-type="string" office:string-value="Nelson I" calcext:value-type="string">
            <text:p>Nelson I</text:p>
          </table:table-cell>
          <table:table-cell office:value-type="string" office:string-value="Pegasus III" calcext:value-type="string">
            <text:p>Pegasus III</text:p>
          </table:table-cell>
          <table:table-cell office:value-type="string" office:string-value="Raleigh I" calcext:value-type="string">
            <text:p>Raleigh I</text:p>
          </table:table-cell>
          <table:table-cell office:value-type="string" office:string-value="Saladin I" calcext:value-type="string">
            <text:p>Saladin I</text:p>
          </table:table-cell>
          <table:table-cell office:value-type="string" office:string-value="Sherman I" calcext:value-type="string">
            <text:p>Sherman I</text:p>
          </table:table-cell>
          <table:table-cell office:value-type="string" office:string-value="Sunzi I" calcext:value-type="string">
            <text:p>Sunzi I</text:p>
          </table:table-cell>
          <table:table-cell office:value-type="string" office:string-value="Swallowtail III" calcext:value-type="string">
            <text:p>Swallowtail III</text:p>
          </table:table-cell>
          <table:table-cell office:value-type="string" office:string-value="Tokugawa I" calcext:value-type="string">
            <text:p>Tokugawa I</text:p>
          </table:table-cell>
          <table:table-cell office:value-type="string" office:string-value="Tortuga I" calcext:value-type="string">
            <text:p>Tortuga I</text:p>
          </table:table-cell>
          <table:table-cell office:value-type="string" office:string-value="Vlad I" calcext:value-type="string">
            <text:p>Vlad I</text:p>
          </table:table-cell>
          <table:table-cell office:value-type="string" office:string-value="White Witch I" calcext:value-type="string">
            <text:p>White Witch I</text:p>
          </table:table-cell>
          <table:table-cell office:value-type="string" office:string-value="Zheng I" calcext:value-type="string">
            <text:p>Zheng I</text:p>
          </table:table-cell>
          <table:table-cell table:number-columns-repeated="93"/>
        </table:table-row>
        <table:table-row table:style-name="ro2">
          <table:table-cell table:number-columns-repeated="184"/>
        </table:table-row>
        <table:table-row table:style-name="ro2">
          <table:table-cell table:number-columns-repeated="54"/>
          <table:table-cell office:value-type="string" calcext:value-type="string">
            <text:p>Valid Talent Selection</text:p>
          </table:table-cell>
          <table:table-cell table:number-columns-repeated="129"/>
        </table:table-row>
        <table:table-row table:style-name="ro2">
          <table:table-cell table:number-columns-repeated="54"/>
          <table:table-cell table:number-matrix-columns-spanned="37" table:number-matrix-rows-spanned="1" table:formula="of:=TRANSPOSE(&#10; COM.MICROSOFT.FILTER(&#10;  [$Talents.$A$2:.$A$200];&#10;  ([$Talents.$A$2:.$A$200]&lt;&gt;&quot;&quot;)&#10;  *&#10;  ([$Talents.$B$2:.$B$200]=&quot;&quot;);&#10;  &quot;&quot;&#10; )&#10;)" office:value-type="string" office:string-value="Ace I" calcext:value-type="string">
            <text:p>Ace I</text:p>
          </table:table-cell>
          <table:table-cell office:value-type="string" office:string-value="Black Thumb I" calcext:value-type="string">
            <text:p>Black Thumb I</text:p>
          </table:table-cell>
          <table:table-cell office:value-type="string" office:string-value="Bonded I" calcext:value-type="string">
            <text:p>Bonded I</text:p>
          </table:table-cell>
          <table:table-cell office:value-type="string" office:string-value="Brawler I" calcext:value-type="string">
            <text:p>Brawler I</text:p>
          </table:table-cell>
          <table:table-cell office:value-type="string" office:string-value="Brutal I" calcext:value-type="string">
            <text:p>Brutal I</text:p>
          </table:table-cell>
          <table:table-cell office:value-type="string" office:string-value="Centimane I" calcext:value-type="string">
            <text:p>Centimane I</text:p>
          </table:table-cell>
          <table:table-cell office:value-type="string" office:string-value="Combined Arms I" calcext:value-type="string">
            <text:p>Combined Arms I</text:p>
          </table:table-cell>
          <table:table-cell office:value-type="string" office:string-value="Crack Shot I" calcext:value-type="string">
            <text:p>Crack Shot I</text:p>
          </table:table-cell>
          <table:table-cell office:value-type="string" office:string-value="Demolitionist I" calcext:value-type="string">
            <text:p>Demolitionist I</text:p>
          </table:table-cell>
          <table:table-cell office:value-type="string" office:string-value="Drone Commander I" calcext:value-type="string">
            <text:p>Drone Commander I</text:p>
          </table:table-cell>
          <table:table-cell office:value-type="string" office:string-value="Duelist I" calcext:value-type="string">
            <text:p>Duelist I</text:p>
          </table:table-cell>
          <table:table-cell office:value-type="string" office:string-value="Empath I" calcext:value-type="string">
            <text:p>Empath I</text:p>
          </table:table-cell>
          <table:table-cell office:value-type="string" office:string-value="Engineer I" calcext:value-type="string">
            <text:p>Engineer I</text:p>
          </table:table-cell>
          <table:table-cell office:value-type="string" office:string-value="Executioner I" calcext:value-type="string">
            <text:p>Executioner I</text:p>
          </table:table-cell>
          <table:table-cell office:value-type="string" office:string-value="Exemplar I" calcext:value-type="string">
            <text:p>Exemplar I</text:p>
          </table:table-cell>
          <table:table-cell office:value-type="string" office:string-value="Field Analyst I" calcext:value-type="string">
            <text:p>Field Analyst I</text:p>
          </table:table-cell>
          <table:table-cell office:value-type="string" office:string-value="Grease Monkey I" calcext:value-type="string">
            <text:p>Grease Monkey I</text:p>
          </table:table-cell>
          <table:table-cell office:value-type="string" office:string-value="Gunslinger I" calcext:value-type="string">
            <text:p>Gunslinger I</text:p>
          </table:table-cell>
          <table:table-cell office:value-type="string" office:string-value="Hacker I" calcext:value-type="string">
            <text:p>Hacker I</text:p>
          </table:table-cell>
          <table:table-cell office:value-type="string" office:string-value="Heavy Gunner I" calcext:value-type="string">
            <text:p>Heavy Gunner I</text:p>
          </table:table-cell>
          <table:table-cell office:value-type="string" office:string-value="Hunter I" calcext:value-type="string">
            <text:p>Hunter I</text:p>
          </table:table-cell>
          <table:table-cell office:value-type="string" office:string-value="Iconoclast I" calcext:value-type="string">
            <text:p>Iconoclast I</text:p>
          </table:table-cell>
          <table:table-cell office:value-type="string" office:string-value="Infiltrator I" calcext:value-type="string">
            <text:p>Infiltrator I</text:p>
          </table:table-cell>
          <table:table-cell office:value-type="string" office:string-value="Juggernaut I" calcext:value-type="string">
            <text:p>Juggernaut I</text:p>
          </table:table-cell>
          <table:table-cell office:value-type="string" office:string-value="Leader I" calcext:value-type="string">
            <text:p>Leader I</text:p>
          </table:table-cell>
          <table:table-cell office:value-type="string" office:string-value="Nuclear Cavalier I" calcext:value-type="string">
            <text:p>Nuclear Cavalier I</text:p>
          </table:table-cell>
          <table:table-cell office:value-type="string" office:string-value="Prospector I" calcext:value-type="string">
            <text:p>Prospector I</text:p>
          </table:table-cell>
          <table:table-cell office:value-type="string" office:string-value="Siege Specialist I" calcext:value-type="string">
            <text:p>Siege Specialist I</text:p>
          </table:table-cell>
          <table:table-cell office:value-type="string" office:string-value="Skirmisher I" calcext:value-type="string">
            <text:p>Skirmisher I</text:p>
          </table:table-cell>
          <table:table-cell office:value-type="string" office:string-value="Spaceborn I" calcext:value-type="string">
            <text:p>Spaceborn I</text:p>
          </table:table-cell>
          <table:table-cell office:value-type="string" office:string-value="Spotter I" calcext:value-type="string">
            <text:p>Spotter I</text:p>
          </table:table-cell>
          <table:table-cell office:value-type="string" office:string-value="Stormbringer I" calcext:value-type="string">
            <text:p>Stormbringer I</text:p>
          </table:table-cell>
          <table:table-cell office:value-type="string" office:string-value="Sysop I" calcext:value-type="string">
            <text:p>Sysop I</text:p>
          </table:table-cell>
          <table:table-cell office:value-type="string" office:string-value="Tactician I" calcext:value-type="string">
            <text:p>Tactician I</text:p>
          </table:table-cell>
          <table:table-cell office:value-type="string" office:string-value="Technophile I" calcext:value-type="string">
            <text:p>Technophile I</text:p>
          </table:table-cell>
          <table:table-cell office:value-type="string" office:string-value="Vanguard I" calcext:value-type="string">
            <text:p>Vanguard I</text:p>
          </table:table-cell>
          <table:table-cell office:value-type="string" office:string-value="Walking Armory I" calcext:value-type="string">
            <text:p>Walking Armory I</text:p>
          </table:table-cell>
          <table:table-cell table:number-columns-repeated="93"/>
        </table:table-row>
        <table:table-row table:style-name="ro2">
          <table:table-cell table:number-columns-repeated="54"/>
          <table:table-cell table:number-matrix-columns-spanned="36" table:number-matrix-rows-spanned="1" table:formula="of:=TRANSPOSE(  COM.MICROSOFT.FILTER(   [$Talents.$A$2:.$A$200];   ([$Talents.$A$2:.$A$200]&lt;&gt;&quot;&quot;)   *   (COUNTIF([$Build.$C$2:.$C2];[$Talents.$A$2:.$A$200])=0)   *   ([$Talents.$B$2:.$B$200]=&quot;&quot;);   &quot;&quot;  ) )" office:value-type="string" office:string-value="Ace I" calcext:value-type="string">
            <text:p>Ace I</text:p>
          </table:table-cell>
          <table:table-cell office:value-type="string" office:string-value="Black Thumb I" calcext:value-type="string">
            <text:p>Black Thumb I</text:p>
          </table:table-cell>
          <table:table-cell office:value-type="string" office:string-value="Bonded I" calcext:value-type="string">
            <text:p>Bonded I</text:p>
          </table:table-cell>
          <table:table-cell office:value-type="string" office:string-value="Brawler I" calcext:value-type="string">
            <text:p>Brawler I</text:p>
          </table:table-cell>
          <table:table-cell office:value-type="string" office:string-value="Brutal I" calcext:value-type="string">
            <text:p>Brutal I</text:p>
          </table:table-cell>
          <table:table-cell office:value-type="string" office:string-value="Centimane I" calcext:value-type="string">
            <text:p>Centimane I</text:p>
          </table:table-cell>
          <table:table-cell office:value-type="string" office:string-value="Combined Arms I" calcext:value-type="string">
            <text:p>Combined Arms I</text:p>
          </table:table-cell>
          <table:table-cell office:value-type="string" office:string-value="Crack Shot I" calcext:value-type="string">
            <text:p>Crack Shot I</text:p>
          </table:table-cell>
          <table:table-cell office:value-type="string" office:string-value="Demolitionist I" calcext:value-type="string">
            <text:p>Demolitionist I</text:p>
          </table:table-cell>
          <table:table-cell office:value-type="string" office:string-value="Drone Commander I" calcext:value-type="string">
            <text:p>Drone Commander I</text:p>
          </table:table-cell>
          <table:table-cell office:value-type="string" office:string-value="Duelist I" calcext:value-type="string">
            <text:p>Duelist I</text:p>
          </table:table-cell>
          <table:table-cell office:value-type="string" office:string-value="Empath I" calcext:value-type="string">
            <text:p>Empath I</text:p>
          </table:table-cell>
          <table:table-cell office:value-type="string" office:string-value="Engineer I" calcext:value-type="string">
            <text:p>Engineer I</text:p>
          </table:table-cell>
          <table:table-cell office:value-type="string" office:string-value="Executioner I" calcext:value-type="string">
            <text:p>Executioner I</text:p>
          </table:table-cell>
          <table:table-cell office:value-type="string" office:string-value="Exemplar I" calcext:value-type="string">
            <text:p>Exemplar I</text:p>
          </table:table-cell>
          <table:table-cell office:value-type="string" office:string-value="Field Analyst I" calcext:value-type="string">
            <text:p>Field Analyst I</text:p>
          </table:table-cell>
          <table:table-cell office:value-type="string" office:string-value="Grease Monkey I" calcext:value-type="string">
            <text:p>Grease Monkey I</text:p>
          </table:table-cell>
          <table:table-cell office:value-type="string" office:string-value="Gunslinger I" calcext:value-type="string">
            <text:p>Gunslinger I</text:p>
          </table:table-cell>
          <table:table-cell office:value-type="string" office:string-value="Hacker I" calcext:value-type="string">
            <text:p>Hacker I</text:p>
          </table:table-cell>
          <table:table-cell office:value-type="string" office:string-value="Heavy Gunner I" calcext:value-type="string">
            <text:p>Heavy Gunner I</text:p>
          </table:table-cell>
          <table:table-cell office:value-type="string" office:string-value="Hunter I" calcext:value-type="string">
            <text:p>Hunter I</text:p>
          </table:table-cell>
          <table:table-cell office:value-type="string" office:string-value="Iconoclast I" calcext:value-type="string">
            <text:p>Iconoclast I</text:p>
          </table:table-cell>
          <table:table-cell office:value-type="string" office:string-value="Infiltrator I" calcext:value-type="string">
            <text:p>Infiltrator I</text:p>
          </table:table-cell>
          <table:table-cell office:value-type="string" office:string-value="Juggernaut I" calcext:value-type="string">
            <text:p>Juggernaut I</text:p>
          </table:table-cell>
          <table:table-cell office:value-type="string" office:string-value="Leader I" calcext:value-type="string">
            <text:p>Leader I</text:p>
          </table:table-cell>
          <table:table-cell office:value-type="string" office:string-value="Nuclear Cavalier I" calcext:value-type="string">
            <text:p>Nuclear Cavalier I</text:p>
          </table:table-cell>
          <table:table-cell office:value-type="string" office:string-value="Prospector I" calcext:value-type="string">
            <text:p>Prospector I</text:p>
          </table:table-cell>
          <table:table-cell office:value-type="string" office:string-value="Siege Specialist I" calcext:value-type="string">
            <text:p>Siege Specialist I</text:p>
          </table:table-cell>
          <table:table-cell office:value-type="string" office:string-value="Skirmisher I" calcext:value-type="string">
            <text:p>Skirmisher I</text:p>
          </table:table-cell>
          <table:table-cell office:value-type="string" office:string-value="Spaceborn I" calcext:value-type="string">
            <text:p>Spaceborn I</text:p>
          </table:table-cell>
          <table:table-cell office:value-type="string" office:string-value="Spotter I" calcext:value-type="string">
            <text:p>Spotter I</text:p>
          </table:table-cell>
          <table:table-cell office:value-type="string" office:string-value="Stormbringer I" calcext:value-type="string">
            <text:p>Stormbringer I</text:p>
          </table:table-cell>
          <table:table-cell office:value-type="string" office:string-value="Sysop I" calcext:value-type="string">
            <text:p>Sysop I</text:p>
          </table:table-cell>
          <table:table-cell office:value-type="string" office:string-value="Tactician I" calcext:value-type="string">
            <text:p>Tactician I</text:p>
          </table:table-cell>
          <table:table-cell office:value-type="string" office:string-value="Vanguard I" calcext:value-type="string">
            <text:p>Vanguard I</text:p>
          </table:table-cell>
          <table:table-cell office:value-type="string" office:string-value="Walking Armory I" calcext:value-type="string">
            <text:p>Walking Armory I</text:p>
          </table:table-cell>
          <table:table-cell table:number-columns-repeated="94"/>
        </table:table-row>
        <table:table-row table:style-name="ro2">
          <table:table-cell table:number-columns-repeated="54"/>
          <table:table-cell table:number-matrix-columns-spanned="35" table:number-matrix-rows-spanned="1" table:formula="of:=TRANSPOSE(  COM.MICROSOFT.FILTER(   [$Talents.$A$2:.$A$200];   ([$Talents.$A$2:.$A$200]&lt;&gt;&quot;&quot;)   *   (COUNTIF([$Build.$C$2:.$C3];[$Talents.$A$2:.$A$200])=0)   *   ([$Talents.$B$2:.$B$200]=&quot;&quot;);   &quot;&quot;  ) )" office:value-type="string" office:string-value="Ace I" calcext:value-type="string">
            <text:p>Ace I</text:p>
          </table:table-cell>
          <table:table-cell office:value-type="string" office:string-value="Black Thumb I" calcext:value-type="string">
            <text:p>Black Thumb I</text:p>
          </table:table-cell>
          <table:table-cell office:value-type="string" office:string-value="Bonded I" calcext:value-type="string">
            <text:p>Bonded I</text:p>
          </table:table-cell>
          <table:table-cell office:value-type="string" office:string-value="Brawler I" calcext:value-type="string">
            <text:p>Brawler I</text:p>
          </table:table-cell>
          <table:table-cell office:value-type="string" office:string-value="Brutal I" calcext:value-type="string">
            <text:p>Brutal I</text:p>
          </table:table-cell>
          <table:table-cell office:value-type="string" office:string-value="Centimane I" calcext:value-type="string">
            <text:p>Centimane I</text:p>
          </table:table-cell>
          <table:table-cell office:value-type="string" office:string-value="Combined Arms I" calcext:value-type="string">
            <text:p>Combined Arms I</text:p>
          </table:table-cell>
          <table:table-cell office:value-type="string" office:string-value="Crack Shot I" calcext:value-type="string">
            <text:p>Crack Shot I</text:p>
          </table:table-cell>
          <table:table-cell office:value-type="string" office:string-value="Demolitionist I" calcext:value-type="string">
            <text:p>Demolitionist I</text:p>
          </table:table-cell>
          <table:table-cell office:value-type="string" office:string-value="Drone Commander I" calcext:value-type="string">
            <text:p>Drone Commander I</text:p>
          </table:table-cell>
          <table:table-cell office:value-type="string" office:string-value="Duelist I" calcext:value-type="string">
            <text:p>Duelist I</text:p>
          </table:table-cell>
          <table:table-cell office:value-type="string" office:string-value="Empath I" calcext:value-type="string">
            <text:p>Empath I</text:p>
          </table:table-cell>
          <table:table-cell office:value-type="string" office:string-value="Executioner I" calcext:value-type="string">
            <text:p>Executioner I</text:p>
          </table:table-cell>
          <table:table-cell office:value-type="string" office:string-value="Exemplar I" calcext:value-type="string">
            <text:p>Exemplar I</text:p>
          </table:table-cell>
          <table:table-cell office:value-type="string" office:string-value="Field Analyst I" calcext:value-type="string">
            <text:p>Field Analyst I</text:p>
          </table:table-cell>
          <table:table-cell office:value-type="string" office:string-value="Grease Monkey I" calcext:value-type="string">
            <text:p>Grease Monkey I</text:p>
          </table:table-cell>
          <table:table-cell office:value-type="string" office:string-value="Gunslinger I" calcext:value-type="string">
            <text:p>Gunslinger I</text:p>
          </table:table-cell>
          <table:table-cell office:value-type="string" office:string-value="Hacker I" calcext:value-type="string">
            <text:p>Hacker I</text:p>
          </table:table-cell>
          <table:table-cell office:value-type="string" office:string-value="Heavy Gunner I" calcext:value-type="string">
            <text:p>Heavy Gunner I</text:p>
          </table:table-cell>
          <table:table-cell office:value-type="string" office:string-value="Hunter I" calcext:value-type="string">
            <text:p>Hunter I</text:p>
          </table:table-cell>
          <table:table-cell office:value-type="string" office:string-value="Iconoclast I" calcext:value-type="string">
            <text:p>Iconoclast I</text:p>
          </table:table-cell>
          <table:table-cell office:value-type="string" office:string-value="Infiltrator I" calcext:value-type="string">
            <text:p>Infiltrator I</text:p>
          </table:table-cell>
          <table:table-cell office:value-type="string" office:string-value="Juggernaut I" calcext:value-type="string">
            <text:p>Juggernaut I</text:p>
          </table:table-cell>
          <table:table-cell office:value-type="string" office:string-value="Leader I" calcext:value-type="string">
            <text:p>Leader I</text:p>
          </table:table-cell>
          <table:table-cell office:value-type="string" office:string-value="Nuclear Cavalier I" calcext:value-type="string">
            <text:p>Nuclear Cavalier I</text:p>
          </table:table-cell>
          <table:table-cell office:value-type="string" office:string-value="Prospector I" calcext:value-type="string">
            <text:p>Prospector I</text:p>
          </table:table-cell>
          <table:table-cell office:value-type="string" office:string-value="Siege Specialist I" calcext:value-type="string">
            <text:p>Siege Specialist I</text:p>
          </table:table-cell>
          <table:table-cell office:value-type="string" office:string-value="Skirmisher I" calcext:value-type="string">
            <text:p>Skirmisher I</text:p>
          </table:table-cell>
          <table:table-cell office:value-type="string" office:string-value="Spaceborn I" calcext:value-type="string">
            <text:p>Spaceborn I</text:p>
          </table:table-cell>
          <table:table-cell office:value-type="string" office:string-value="Spotter I" calcext:value-type="string">
            <text:p>Spotter I</text:p>
          </table:table-cell>
          <table:table-cell office:value-type="string" office:string-value="Stormbringer I" calcext:value-type="string">
            <text:p>Stormbringer I</text:p>
          </table:table-cell>
          <table:table-cell office:value-type="string" office:string-value="Sysop I" calcext:value-type="string">
            <text:p>Sysop I</text:p>
          </table:table-cell>
          <table:table-cell office:value-type="string" office:string-value="Tactician I" calcext:value-type="string">
            <text:p>Tactician I</text:p>
          </table:table-cell>
          <table:table-cell office:value-type="string" office:string-value="Vanguard I" calcext:value-type="string">
            <text:p>Vanguard I</text:p>
          </table:table-cell>
          <table:table-cell office:value-type="string" office:string-value="Walking Armory I" calcext:value-type="string">
            <text:p>Walking Armory I</text:p>
          </table:table-cell>
          <table:table-cell table:number-columns-repeated="95"/>
        </table:table-row>
        <table:table-row table:style-name="ro2">
          <table:table-cell table:number-columns-repeated="54"/>
          <table:table-cell table:style-name="ce70" table:number-matrix-columns-spanned="37" table:number-matrix-rows-spanned="1" table:formula="of:=TRANSPOSE(     COM.MICROSOFT.FILTER(         [$Talents.$A$2:.$A$200];         ([$Talents.$A$2:.$A$200]&lt;&gt;&quot;&quot;)         *         (COUNTIF([$Build.$C$2:.$C5];[$Talents.$A$2:.$A$200])=0)         *         (             ([$Talents.$B$2:.$B$200]=&quot;&quot;)             +             (COUNTIF([$Build.$C$2:.$C5];[$Talents.$B$2:.$B$200])&gt;0)         );         &quot;&quot;     ) )" office:value-type="string" office:string-value="Ace I" calcext:value-type="string">
            <text:p>Ace I</text:p>
          </table:table-cell>
          <table:table-cell office:value-type="string" office:string-value="Black Thumb I" calcext:value-type="string">
            <text:p>Black Thumb I</text:p>
          </table:table-cell>
          <table:table-cell office:value-type="string" office:string-value="Bonded I" calcext:value-type="string">
            <text:p>Bonded I</text:p>
          </table:table-cell>
          <table:table-cell office:value-type="string" office:string-value="Brawler I" calcext:value-type="string">
            <text:p>Brawler I</text:p>
          </table:table-cell>
          <table:table-cell office:value-type="string" office:string-value="Brutal I" calcext:value-type="string">
            <text:p>Brutal I</text:p>
          </table:table-cell>
          <table:table-cell office:value-type="string" office:string-value="Centimane I" calcext:value-type="string">
            <text:p>Centimane I</text:p>
          </table:table-cell>
          <table:table-cell office:value-type="string" office:string-value="Combined Arms I" calcext:value-type="string">
            <text:p>Combined Arms I</text:p>
          </table:table-cell>
          <table:table-cell office:value-type="string" office:string-value="Crack Shot II" calcext:value-type="string">
            <text:p>Crack Shot II</text:p>
          </table:table-cell>
          <table:table-cell office:value-type="string" office:string-value="Demolitionist I" calcext:value-type="string">
            <text:p>Demolitionist I</text:p>
          </table:table-cell>
          <table:table-cell office:value-type="string" office:string-value="Drone Commander I" calcext:value-type="string">
            <text:p>Drone Commander I</text:p>
          </table:table-cell>
          <table:table-cell office:value-type="string" office:string-value="Duelist I" calcext:value-type="string">
            <text:p>Duelist I</text:p>
          </table:table-cell>
          <table:table-cell office:value-type="string" office:string-value="Empath I" calcext:value-type="string">
            <text:p>Empath I</text:p>
          </table:table-cell>
          <table:table-cell office:value-type="string" office:string-value="Engineer II" calcext:value-type="string">
            <text:p>Engineer II</text:p>
          </table:table-cell>
          <table:table-cell office:value-type="string" office:string-value="Executioner I" calcext:value-type="string">
            <text:p>Executioner I</text:p>
          </table:table-cell>
          <table:table-cell office:value-type="string" office:string-value="Exemplar I" calcext:value-type="string">
            <text:p>Exemplar I</text:p>
          </table:table-cell>
          <table:table-cell office:value-type="string" office:string-value="Field Analyst I" calcext:value-type="string">
            <text:p>Field Analyst I</text:p>
          </table:table-cell>
          <table:table-cell office:value-type="string" office:string-value="Grease Monkey I" calcext:value-type="string">
            <text:p>Grease Monkey I</text:p>
          </table:table-cell>
          <table:table-cell office:value-type="string" office:string-value="Gunslinger I" calcext:value-type="string">
            <text:p>Gunslinger I</text:p>
          </table:table-cell>
          <table:table-cell office:value-type="string" office:string-value="Hacker I" calcext:value-type="string">
            <text:p>Hacker I</text:p>
          </table:table-cell>
          <table:table-cell office:value-type="string" office:string-value="Heavy Gunner I" calcext:value-type="string">
            <text:p>Heavy Gunner I</text:p>
          </table:table-cell>
          <table:table-cell office:value-type="string" office:string-value="Hunter I" calcext:value-type="string">
            <text:p>Hunter I</text:p>
          </table:table-cell>
          <table:table-cell office:value-type="string" office:string-value="Iconoclast I" calcext:value-type="string">
            <text:p>Iconoclast I</text:p>
          </table:table-cell>
          <table:table-cell office:value-type="string" office:string-value="Infiltrator I" calcext:value-type="string">
            <text:p>Infiltrator I</text:p>
          </table:table-cell>
          <table:table-cell office:value-type="string" office:string-value="Juggernaut I" calcext:value-type="string">
            <text:p>Juggernaut I</text:p>
          </table:table-cell>
          <table:table-cell office:value-type="string" office:string-value="Leader I" calcext:value-type="string">
            <text:p>Leader I</text:p>
          </table:table-cell>
          <table:table-cell office:value-type="string" office:string-value="Nuclear Cavalier I" calcext:value-type="string">
            <text:p>Nuclear Cavalier I</text:p>
          </table:table-cell>
          <table:table-cell office:value-type="string" office:string-value="Prospector I" calcext:value-type="string">
            <text:p>Prospector I</text:p>
          </table:table-cell>
          <table:table-cell office:value-type="string" office:string-value="Siege Specialist I" calcext:value-type="string">
            <text:p>Siege Specialist I</text:p>
          </table:table-cell>
          <table:table-cell office:value-type="string" office:string-value="Skirmisher I" calcext:value-type="string">
            <text:p>Skirmisher I</text:p>
          </table:table-cell>
          <table:table-cell office:value-type="string" office:string-value="Spaceborn I" calcext:value-type="string">
            <text:p>Spaceborn I</text:p>
          </table:table-cell>
          <table:table-cell office:value-type="string" office:string-value="Spotter I" calcext:value-type="string">
            <text:p>Spotter I</text:p>
          </table:table-cell>
          <table:table-cell office:value-type="string" office:string-value="Stormbringer I" calcext:value-type="string">
            <text:p>Stormbringer I</text:p>
          </table:table-cell>
          <table:table-cell office:value-type="string" office:string-value="Sysop I" calcext:value-type="string">
            <text:p>Sysop I</text:p>
          </table:table-cell>
          <table:table-cell office:value-type="string" office:string-value="Tactician I" calcext:value-type="string">
            <text:p>Tactician I</text:p>
          </table:table-cell>
          <table:table-cell office:value-type="string" office:string-value="Technophile II" calcext:value-type="string">
            <text:p>Technophile II</text:p>
          </table:table-cell>
          <table:table-cell office:value-type="string" office:string-value="Vanguard I" calcext:value-type="string">
            <text:p>Vanguard I</text:p>
          </table:table-cell>
          <table:table-cell office:value-type="string" office:string-value="Walking Armory I" calcext:value-type="string">
            <text:p>Walking Armory I</text:p>
          </table:table-cell>
          <table:table-cell table:number-columns-repeated="93"/>
        </table:table-row>
        <table:table-row table:style-name="ro2">
          <table:table-cell table:number-columns-repeated="54"/>
          <table:table-cell table:number-matrix-columns-spanned="37" table:number-matrix-rows-spanned="1" table:formula="of:=TRANSPOSE(     COM.MICROSOFT.FILTER(         [$Talents.$A$2:.$A$200];         ([$Talents.$A$2:.$A$200]&lt;&gt;&quot;&quot;)         *         (COUNTIF([$Build.$C$2:.$C6];[$Talents.$A$2:.$A$200])=0)         *         (             ([$Talents.$B$2:.$B$200]=&quot;&quot;)             +             (COUNTIF([$Build.$C$2:.$C6];[$Talents.$B$2:.$B$200])&gt;0)         );         &quot;&quot;     ) )" office:value-type="string" office:string-value="Ace I" calcext:value-type="string">
            <text:p>Ace I</text:p>
          </table:table-cell>
          <table:table-cell office:value-type="string" office:string-value="Black Thumb I" calcext:value-type="string">
            <text:p>Black Thumb I</text:p>
          </table:table-cell>
          <table:table-cell office:value-type="string" office:string-value="Bonded I" calcext:value-type="string">
            <text:p>Bonded I</text:p>
          </table:table-cell>
          <table:table-cell office:value-type="string" office:string-value="Brawler I" calcext:value-type="string">
            <text:p>Brawler I</text:p>
          </table:table-cell>
          <table:table-cell office:value-type="string" office:string-value="Brutal I" calcext:value-type="string">
            <text:p>Brutal I</text:p>
          </table:table-cell>
          <table:table-cell office:value-type="string" office:string-value="Centimane I" calcext:value-type="string">
            <text:p>Centimane I</text:p>
          </table:table-cell>
          <table:table-cell office:value-type="string" office:string-value="Combined Arms I" calcext:value-type="string">
            <text:p>Combined Arms I</text:p>
          </table:table-cell>
          <table:table-cell office:value-type="string" office:string-value="Crack Shot II" calcext:value-type="string">
            <text:p>Crack Shot II</text:p>
          </table:table-cell>
          <table:table-cell office:value-type="string" office:string-value="Demolitionist I" calcext:value-type="string">
            <text:p>Demolitionist I</text:p>
          </table:table-cell>
          <table:table-cell office:value-type="string" office:string-value="Drone Commander I" calcext:value-type="string">
            <text:p>Drone Commander I</text:p>
          </table:table-cell>
          <table:table-cell office:value-type="string" office:string-value="Duelist I" calcext:value-type="string">
            <text:p>Duelist I</text:p>
          </table:table-cell>
          <table:table-cell office:value-type="string" office:string-value="Empath I" calcext:value-type="string">
            <text:p>Empath I</text:p>
          </table:table-cell>
          <table:table-cell office:value-type="string" office:string-value="Engineer II" calcext:value-type="string">
            <text:p>Engineer II</text:p>
          </table:table-cell>
          <table:table-cell office:value-type="string" office:string-value="Executioner I" calcext:value-type="string">
            <text:p>Executioner I</text:p>
          </table:table-cell>
          <table:table-cell office:value-type="string" office:string-value="Exemplar I" calcext:value-type="string">
            <text:p>Exemplar I</text:p>
          </table:table-cell>
          <table:table-cell office:value-type="string" office:string-value="Field Analyst I" calcext:value-type="string">
            <text:p>Field Analyst I</text:p>
          </table:table-cell>
          <table:table-cell office:value-type="string" office:string-value="Grease Monkey I" calcext:value-type="string">
            <text:p>Grease Monkey I</text:p>
          </table:table-cell>
          <table:table-cell office:value-type="string" office:string-value="Gunslinger I" calcext:value-type="string">
            <text:p>Gunslinger I</text:p>
          </table:table-cell>
          <table:table-cell office:value-type="string" office:string-value="Hacker I" calcext:value-type="string">
            <text:p>Hacker I</text:p>
          </table:table-cell>
          <table:table-cell office:value-type="string" office:string-value="Heavy Gunner I" calcext:value-type="string">
            <text:p>Heavy Gunner I</text:p>
          </table:table-cell>
          <table:table-cell office:value-type="string" office:string-value="Hunter I" calcext:value-type="string">
            <text:p>Hunter I</text:p>
          </table:table-cell>
          <table:table-cell office:value-type="string" office:string-value="Iconoclast I" calcext:value-type="string">
            <text:p>Iconoclast I</text:p>
          </table:table-cell>
          <table:table-cell office:value-type="string" office:string-value="Infiltrator I" calcext:value-type="string">
            <text:p>Infiltrator I</text:p>
          </table:table-cell>
          <table:table-cell office:value-type="string" office:string-value="Juggernaut I" calcext:value-type="string">
            <text:p>Juggernaut I</text:p>
          </table:table-cell>
          <table:table-cell office:value-type="string" office:string-value="Leader I" calcext:value-type="string">
            <text:p>Leader I</text:p>
          </table:table-cell>
          <table:table-cell office:value-type="string" office:string-value="Nuclear Cavalier I" calcext:value-type="string">
            <text:p>Nuclear Cavalier I</text:p>
          </table:table-cell>
          <table:table-cell office:value-type="string" office:string-value="Prospector I" calcext:value-type="string">
            <text:p>Prospector I</text:p>
          </table:table-cell>
          <table:table-cell office:value-type="string" office:string-value="Siege Specialist I" calcext:value-type="string">
            <text:p>Siege Specialist I</text:p>
          </table:table-cell>
          <table:table-cell office:value-type="string" office:string-value="Skirmisher I" calcext:value-type="string">
            <text:p>Skirmisher I</text:p>
          </table:table-cell>
          <table:table-cell office:value-type="string" office:string-value="Spaceborn I" calcext:value-type="string">
            <text:p>Spaceborn I</text:p>
          </table:table-cell>
          <table:table-cell office:value-type="string" office:string-value="Spotter I" calcext:value-type="string">
            <text:p>Spotter I</text:p>
          </table:table-cell>
          <table:table-cell office:value-type="string" office:string-value="Stormbringer I" calcext:value-type="string">
            <text:p>Stormbringer I</text:p>
          </table:table-cell>
          <table:table-cell office:value-type="string" office:string-value="Sysop I" calcext:value-type="string">
            <text:p>Sysop I</text:p>
          </table:table-cell>
          <table:table-cell office:value-type="string" office:string-value="Tactician I" calcext:value-type="string">
            <text:p>Tactician I</text:p>
          </table:table-cell>
          <table:table-cell office:value-type="string" office:string-value="Technophile III" calcext:value-type="string">
            <text:p>Technophile III</text:p>
          </table:table-cell>
          <table:table-cell office:value-type="string" office:string-value="Vanguard I" calcext:value-type="string">
            <text:p>Vanguard I</text:p>
          </table:table-cell>
          <table:table-cell office:value-type="string" office:string-value="Walking Armory I" calcext:value-type="string">
            <text:p>Walking Armory I</text:p>
          </table:table-cell>
          <table:table-cell table:number-columns-repeated="93"/>
        </table:table-row>
        <table:table-row table:style-name="ro2">
          <table:table-cell table:number-columns-repeated="54"/>
          <table:table-cell table:number-matrix-columns-spanned="36" table:number-matrix-rows-spanned="1" table:formula="of:=TRANSPOSE(     COM.MICROSOFT.FILTER(         [$Talents.$A$2:.$A$200];         ([$Talents.$A$2:.$A$200]&lt;&gt;&quot;&quot;)         *         (COUNTIF([$Build.$C$2:.$C7];[$Talents.$A$2:.$A$200])=0)         *         (             ([$Talents.$B$2:.$B$200]=&quot;&quot;)             +             (COUNTIF([$Build.$C$2:.$C7];[$Talents.$B$2:.$B$200])&gt;0)         );         &quot;&quot;     ) )" office:value-type="string" office:string-value="Ace I" calcext:value-type="string">
            <text:p>Ace I</text:p>
          </table:table-cell>
          <table:table-cell office:value-type="string" office:string-value="Black Thumb I" calcext:value-type="string">
            <text:p>Black Thumb I</text:p>
          </table:table-cell>
          <table:table-cell office:value-type="string" office:string-value="Bonded I" calcext:value-type="string">
            <text:p>Bonded I</text:p>
          </table:table-cell>
          <table:table-cell office:value-type="string" office:string-value="Brawler I" calcext:value-type="string">
            <text:p>Brawler I</text:p>
          </table:table-cell>
          <table:table-cell office:value-type="string" office:string-value="Brutal I" calcext:value-type="string">
            <text:p>Brutal I</text:p>
          </table:table-cell>
          <table:table-cell office:value-type="string" office:string-value="Centimane I" calcext:value-type="string">
            <text:p>Centimane I</text:p>
          </table:table-cell>
          <table:table-cell office:value-type="string" office:string-value="Combined Arms I" calcext:value-type="string">
            <text:p>Combined Arms I</text:p>
          </table:table-cell>
          <table:table-cell office:value-type="string" office:string-value="Crack Shot II" calcext:value-type="string">
            <text:p>Crack Shot II</text:p>
          </table:table-cell>
          <table:table-cell office:value-type="string" office:string-value="Demolitionist I" calcext:value-type="string">
            <text:p>Demolitionist I</text:p>
          </table:table-cell>
          <table:table-cell office:value-type="string" office:string-value="Drone Commander I" calcext:value-type="string">
            <text:p>Drone Commander I</text:p>
          </table:table-cell>
          <table:table-cell office:value-type="string" office:string-value="Duelist I" calcext:value-type="string">
            <text:p>Duelist I</text:p>
          </table:table-cell>
          <table:table-cell office:value-type="string" office:string-value="Empath I" calcext:value-type="string">
            <text:p>Empath I</text:p>
          </table:table-cell>
          <table:table-cell office:value-type="string" office:string-value="Engineer II" calcext:value-type="string">
            <text:p>Engineer II</text:p>
          </table:table-cell>
          <table:table-cell office:value-type="string" office:string-value="Executioner I" calcext:value-type="string">
            <text:p>Executioner I</text:p>
          </table:table-cell>
          <table:table-cell office:value-type="string" office:string-value="Exemplar I" calcext:value-type="string">
            <text:p>Exemplar I</text:p>
          </table:table-cell>
          <table:table-cell office:value-type="string" office:string-value="Field Analyst I" calcext:value-type="string">
            <text:p>Field Analyst I</text:p>
          </table:table-cell>
          <table:table-cell office:value-type="string" office:string-value="Grease Monkey I" calcext:value-type="string">
            <text:p>Grease Monkey I</text:p>
          </table:table-cell>
          <table:table-cell office:value-type="string" office:string-value="Gunslinger I" calcext:value-type="string">
            <text:p>Gunslinger I</text:p>
          </table:table-cell>
          <table:table-cell office:value-type="string" office:string-value="Hacker I" calcext:value-type="string">
            <text:p>Hacker I</text:p>
          </table:table-cell>
          <table:table-cell office:value-type="string" office:string-value="Heavy Gunner I" calcext:value-type="string">
            <text:p>Heavy Gunner I</text:p>
          </table:table-cell>
          <table:table-cell office:value-type="string" office:string-value="Hunter I" calcext:value-type="string">
            <text:p>Hunter I</text:p>
          </table:table-cell>
          <table:table-cell office:value-type="string" office:string-value="Iconoclast I" calcext:value-type="string">
            <text:p>Iconoclast I</text:p>
          </table:table-cell>
          <table:table-cell office:value-type="string" office:string-value="Infiltrator I" calcext:value-type="string">
            <text:p>Infiltrator I</text:p>
          </table:table-cell>
          <table:table-cell office:value-type="string" office:string-value="Juggernaut I" calcext:value-type="string">
            <text:p>Juggernaut I</text:p>
          </table:table-cell>
          <table:table-cell office:value-type="string" office:string-value="Leader I" calcext:value-type="string">
            <text:p>Leader I</text:p>
          </table:table-cell>
          <table:table-cell office:value-type="string" office:string-value="Nuclear Cavalier I" calcext:value-type="string">
            <text:p>Nuclear Cavalier I</text:p>
          </table:table-cell>
          <table:table-cell office:value-type="string" office:string-value="Prospector I" calcext:value-type="string">
            <text:p>Prospector I</text:p>
          </table:table-cell>
          <table:table-cell office:value-type="string" office:string-value="Siege Specialist I" calcext:value-type="string">
            <text:p>Siege Specialist I</text:p>
          </table:table-cell>
          <table:table-cell office:value-type="string" office:string-value="Skirmisher I" calcext:value-type="string">
            <text:p>Skirmisher I</text:p>
          </table:table-cell>
          <table:table-cell office:value-type="string" office:string-value="Spaceborn I" calcext:value-type="string">
            <text:p>Spaceborn I</text:p>
          </table:table-cell>
          <table:table-cell office:value-type="string" office:string-value="Spotter I" calcext:value-type="string">
            <text:p>Spotter I</text:p>
          </table:table-cell>
          <table:table-cell office:value-type="string" office:string-value="Stormbringer I" calcext:value-type="string">
            <text:p>Stormbringer I</text:p>
          </table:table-cell>
          <table:table-cell office:value-type="string" office:string-value="Sysop I" calcext:value-type="string">
            <text:p>Sysop I</text:p>
          </table:table-cell>
          <table:table-cell office:value-type="string" office:string-value="Tactician I" calcext:value-type="string">
            <text:p>Tactician I</text:p>
          </table:table-cell>
          <table:table-cell office:value-type="string" office:string-value="Vanguard I" calcext:value-type="string">
            <text:p>Vanguard I</text:p>
          </table:table-cell>
          <table:table-cell office:value-type="string" office:string-value="Walking Armory I" calcext:value-type="string">
            <text:p>Walking Armory I</text:p>
          </table:table-cell>
          <table:table-cell table:number-columns-repeated="94"/>
        </table:table-row>
        <table:table-row table:style-name="ro2">
          <table:table-cell table:number-columns-repeated="54"/>
          <table:table-cell table:number-matrix-columns-spanned="36" table:number-matrix-rows-spanned="1" table:formula="of:=TRANSPOSE(     COM.MICROSOFT.FILTER(         [$Talents.$A$2:.$A$200];         ([$Talents.$A$2:.$A$200]&lt;&gt;&quot;&quot;)         *         (COUNTIF([$Build.$C$2:.$C8];[$Talents.$A$2:.$A$200])=0)         *         (             ([$Talents.$B$2:.$B$200]=&quot;&quot;)             +             (COUNTIF([$Build.$C$2:.$C8];[$Talents.$B$2:.$B$200])&gt;0)         );         &quot;&quot;     ) )" office:value-type="string" office:string-value="Ace I" calcext:value-type="string">
            <text:p>Ace I</text:p>
          </table:table-cell>
          <table:table-cell office:value-type="string" office:string-value="Black Thumb II" calcext:value-type="string">
            <text:p>Black Thumb II</text:p>
          </table:table-cell>
          <table:table-cell office:value-type="string" office:string-value="Bonded I" calcext:value-type="string">
            <text:p>Bonded I</text:p>
          </table:table-cell>
          <table:table-cell office:value-type="string" office:string-value="Brawler I" calcext:value-type="string">
            <text:p>Brawler I</text:p>
          </table:table-cell>
          <table:table-cell office:value-type="string" office:string-value="Brutal I" calcext:value-type="string">
            <text:p>Brutal I</text:p>
          </table:table-cell>
          <table:table-cell office:value-type="string" office:string-value="Centimane I" calcext:value-type="string">
            <text:p>Centimane I</text:p>
          </table:table-cell>
          <table:table-cell office:value-type="string" office:string-value="Combined Arms I" calcext:value-type="string">
            <text:p>Combined Arms I</text:p>
          </table:table-cell>
          <table:table-cell office:value-type="string" office:string-value="Crack Shot II" calcext:value-type="string">
            <text:p>Crack Shot II</text:p>
          </table:table-cell>
          <table:table-cell office:value-type="string" office:string-value="Demolitionist I" calcext:value-type="string">
            <text:p>Demolitionist I</text:p>
          </table:table-cell>
          <table:table-cell office:value-type="string" office:string-value="Drone Commander I" calcext:value-type="string">
            <text:p>Drone Commander I</text:p>
          </table:table-cell>
          <table:table-cell office:value-type="string" office:string-value="Duelist I" calcext:value-type="string">
            <text:p>Duelist I</text:p>
          </table:table-cell>
          <table:table-cell office:value-type="string" office:string-value="Empath I" calcext:value-type="string">
            <text:p>Empath I</text:p>
          </table:table-cell>
          <table:table-cell office:value-type="string" office:string-value="Engineer II" calcext:value-type="string">
            <text:p>Engineer II</text:p>
          </table:table-cell>
          <table:table-cell office:value-type="string" office:string-value="Executioner I" calcext:value-type="string">
            <text:p>Executioner I</text:p>
          </table:table-cell>
          <table:table-cell office:value-type="string" office:string-value="Exemplar I" calcext:value-type="string">
            <text:p>Exemplar I</text:p>
          </table:table-cell>
          <table:table-cell office:value-type="string" office:string-value="Field Analyst I" calcext:value-type="string">
            <text:p>Field Analyst I</text:p>
          </table:table-cell>
          <table:table-cell office:value-type="string" office:string-value="Grease Monkey I" calcext:value-type="string">
            <text:p>Grease Monkey I</text:p>
          </table:table-cell>
          <table:table-cell office:value-type="string" office:string-value="Gunslinger I" calcext:value-type="string">
            <text:p>Gunslinger I</text:p>
          </table:table-cell>
          <table:table-cell office:value-type="string" office:string-value="Hacker I" calcext:value-type="string">
            <text:p>Hacker I</text:p>
          </table:table-cell>
          <table:table-cell office:value-type="string" office:string-value="Heavy Gunner I" calcext:value-type="string">
            <text:p>Heavy Gunner I</text:p>
          </table:table-cell>
          <table:table-cell office:value-type="string" office:string-value="Hunter I" calcext:value-type="string">
            <text:p>Hunter I</text:p>
          </table:table-cell>
          <table:table-cell office:value-type="string" office:string-value="Iconoclast I" calcext:value-type="string">
            <text:p>Iconoclast I</text:p>
          </table:table-cell>
          <table:table-cell office:value-type="string" office:string-value="Infiltrator I" calcext:value-type="string">
            <text:p>Infiltrator I</text:p>
          </table:table-cell>
          <table:table-cell office:value-type="string" office:string-value="Juggernaut I" calcext:value-type="string">
            <text:p>Juggernaut I</text:p>
          </table:table-cell>
          <table:table-cell office:value-type="string" office:string-value="Leader I" calcext:value-type="string">
            <text:p>Leader I</text:p>
          </table:table-cell>
          <table:table-cell office:value-type="string" office:string-value="Nuclear Cavalier I" calcext:value-type="string">
            <text:p>Nuclear Cavalier I</text:p>
          </table:table-cell>
          <table:table-cell office:value-type="string" office:string-value="Prospector I" calcext:value-type="string">
            <text:p>Prospector I</text:p>
          </table:table-cell>
          <table:table-cell office:value-type="string" office:string-value="Siege Specialist I" calcext:value-type="string">
            <text:p>Siege Specialist I</text:p>
          </table:table-cell>
          <table:table-cell office:value-type="string" office:string-value="Skirmisher I" calcext:value-type="string">
            <text:p>Skirmisher I</text:p>
          </table:table-cell>
          <table:table-cell office:value-type="string" office:string-value="Spaceborn I" calcext:value-type="string">
            <text:p>Spaceborn I</text:p>
          </table:table-cell>
          <table:table-cell office:value-type="string" office:string-value="Spotter I" calcext:value-type="string">
            <text:p>Spotter I</text:p>
          </table:table-cell>
          <table:table-cell office:value-type="string" office:string-value="Stormbringer I" calcext:value-type="string">
            <text:p>Stormbringer I</text:p>
          </table:table-cell>
          <table:table-cell office:value-type="string" office:string-value="Sysop I" calcext:value-type="string">
            <text:p>Sysop I</text:p>
          </table:table-cell>
          <table:table-cell office:value-type="string" office:string-value="Tactician I" calcext:value-type="string">
            <text:p>Tactician I</text:p>
          </table:table-cell>
          <table:table-cell office:value-type="string" office:string-value="Vanguard I" calcext:value-type="string">
            <text:p>Vanguard I</text:p>
          </table:table-cell>
          <table:table-cell office:value-type="string" office:string-value="Walking Armory I" calcext:value-type="string">
            <text:p>Walking Armory I</text:p>
          </table:table-cell>
          <table:table-cell table:number-columns-repeated="94"/>
        </table:table-row>
        <table:table-row table:style-name="ro2">
          <table:table-cell table:number-columns-repeated="54"/>
          <table:table-cell table:number-matrix-columns-spanned="36" table:number-matrix-rows-spanned="1" table:formula="of:=TRANSPOSE(     COM.MICROSOFT.FILTER(         [$Talents.$A$2:.$A$200];         ([$Talents.$A$2:.$A$200]&lt;&gt;&quot;&quot;)         *         (COUNTIF([$Build.$C$2:.$C9];[$Talents.$A$2:.$A$200])=0)         *         (             ([$Talents.$B$2:.$B$200]=&quot;&quot;)             +             (COUNTIF([$Build.$C$2:.$C9];[$Talents.$B$2:.$B$200])&gt;0)         );         &quot;&quot;     ) )" office:value-type="string" office:string-value="Ace I" calcext:value-type="string">
            <text:p>Ace I</text:p>
          </table:table-cell>
          <table:table-cell office:value-type="string" office:string-value="Black Thumb III" calcext:value-type="string">
            <text:p>Black Thumb III</text:p>
          </table:table-cell>
          <table:table-cell office:value-type="string" office:string-value="Bonded I" calcext:value-type="string">
            <text:p>Bonded I</text:p>
          </table:table-cell>
          <table:table-cell office:value-type="string" office:string-value="Brawler I" calcext:value-type="string">
            <text:p>Brawler I</text:p>
          </table:table-cell>
          <table:table-cell office:value-type="string" office:string-value="Brutal I" calcext:value-type="string">
            <text:p>Brutal I</text:p>
          </table:table-cell>
          <table:table-cell office:value-type="string" office:string-value="Centimane I" calcext:value-type="string">
            <text:p>Centimane I</text:p>
          </table:table-cell>
          <table:table-cell office:value-type="string" office:string-value="Combined Arms I" calcext:value-type="string">
            <text:p>Combined Arms I</text:p>
          </table:table-cell>
          <table:table-cell office:value-type="string" office:string-value="Crack Shot II" calcext:value-type="string">
            <text:p>Crack Shot II</text:p>
          </table:table-cell>
          <table:table-cell office:value-type="string" office:string-value="Demolitionist I" calcext:value-type="string">
            <text:p>Demolitionist I</text:p>
          </table:table-cell>
          <table:table-cell office:value-type="string" office:string-value="Drone Commander I" calcext:value-type="string">
            <text:p>Drone Commander I</text:p>
          </table:table-cell>
          <table:table-cell office:value-type="string" office:string-value="Duelist I" calcext:value-type="string">
            <text:p>Duelist I</text:p>
          </table:table-cell>
          <table:table-cell office:value-type="string" office:string-value="Empath I" calcext:value-type="string">
            <text:p>Empath I</text:p>
          </table:table-cell>
          <table:table-cell office:value-type="string" office:string-value="Engineer II" calcext:value-type="string">
            <text:p>Engineer II</text:p>
          </table:table-cell>
          <table:table-cell office:value-type="string" office:string-value="Executioner I" calcext:value-type="string">
            <text:p>Executioner I</text:p>
          </table:table-cell>
          <table:table-cell office:value-type="string" office:string-value="Exemplar I" calcext:value-type="string">
            <text:p>Exemplar I</text:p>
          </table:table-cell>
          <table:table-cell office:value-type="string" office:string-value="Field Analyst I" calcext:value-type="string">
            <text:p>Field Analyst I</text:p>
          </table:table-cell>
          <table:table-cell office:value-type="string" office:string-value="Grease Monkey I" calcext:value-type="string">
            <text:p>Grease Monkey I</text:p>
          </table:table-cell>
          <table:table-cell office:value-type="string" office:string-value="Gunslinger I" calcext:value-type="string">
            <text:p>Gunslinger I</text:p>
          </table:table-cell>
          <table:table-cell office:value-type="string" office:string-value="Hacker I" calcext:value-type="string">
            <text:p>Hacker I</text:p>
          </table:table-cell>
          <table:table-cell office:value-type="string" office:string-value="Heavy Gunner I" calcext:value-type="string">
            <text:p>Heavy Gunner I</text:p>
          </table:table-cell>
          <table:table-cell office:value-type="string" office:string-value="Hunter I" calcext:value-type="string">
            <text:p>Hunter I</text:p>
          </table:table-cell>
          <table:table-cell office:value-type="string" office:string-value="Iconoclast I" calcext:value-type="string">
            <text:p>Iconoclast I</text:p>
          </table:table-cell>
          <table:table-cell office:value-type="string" office:string-value="Infiltrator I" calcext:value-type="string">
            <text:p>Infiltrator I</text:p>
          </table:table-cell>
          <table:table-cell office:value-type="string" office:string-value="Juggernaut I" calcext:value-type="string">
            <text:p>Juggernaut I</text:p>
          </table:table-cell>
          <table:table-cell office:value-type="string" office:string-value="Leader I" calcext:value-type="string">
            <text:p>Leader I</text:p>
          </table:table-cell>
          <table:table-cell office:value-type="string" office:string-value="Nuclear Cavalier I" calcext:value-type="string">
            <text:p>Nuclear Cavalier I</text:p>
          </table:table-cell>
          <table:table-cell office:value-type="string" office:string-value="Prospector I" calcext:value-type="string">
            <text:p>Prospector I</text:p>
          </table:table-cell>
          <table:table-cell office:value-type="string" office:string-value="Siege Specialist I" calcext:value-type="string">
            <text:p>Siege Specialist I</text:p>
          </table:table-cell>
          <table:table-cell office:value-type="string" office:string-value="Skirmisher I" calcext:value-type="string">
            <text:p>Skirmisher I</text:p>
          </table:table-cell>
          <table:table-cell office:value-type="string" office:string-value="Spaceborn I" calcext:value-type="string">
            <text:p>Spaceborn I</text:p>
          </table:table-cell>
          <table:table-cell office:value-type="string" office:string-value="Spotter I" calcext:value-type="string">
            <text:p>Spotter I</text:p>
          </table:table-cell>
          <table:table-cell office:value-type="string" office:string-value="Stormbringer I" calcext:value-type="string">
            <text:p>Stormbringer I</text:p>
          </table:table-cell>
          <table:table-cell office:value-type="string" office:string-value="Sysop I" calcext:value-type="string">
            <text:p>Sysop I</text:p>
          </table:table-cell>
          <table:table-cell office:value-type="string" office:string-value="Tactician I" calcext:value-type="string">
            <text:p>Tactician I</text:p>
          </table:table-cell>
          <table:table-cell office:value-type="string" office:string-value="Vanguard I" calcext:value-type="string">
            <text:p>Vanguard I</text:p>
          </table:table-cell>
          <table:table-cell office:value-type="string" office:string-value="Walking Armory I" calcext:value-type="string">
            <text:p>Walking Armory I</text:p>
          </table:table-cell>
          <table:table-cell table:number-columns-repeated="94"/>
        </table:table-row>
        <table:table-row table:style-name="ro2">
          <table:table-cell table:number-columns-repeated="54"/>
          <table:table-cell table:number-matrix-columns-spanned="36" table:number-matrix-rows-spanned="1" table:formula="of:=TRANSPOSE(     COM.MICROSOFT.FILTER(         [$Talents.$A$2:.$A$200];         ([$Talents.$A$2:.$A$200]&lt;&gt;&quot;&quot;)         *         (COUNTIF([$Build.$C$2:.$C10];[$Talents.$A$2:.$A$200])=0)         *         (             ([$Talents.$B$2:.$B$200]=&quot;&quot;)             +             (COUNTIF([$Build.$C$2:.$C10];[$Talents.$B$2:.$B$200])&gt;0)         );         &quot;&quot;     ) )" office:value-type="string" office:string-value="Ace I" calcext:value-type="string">
            <text:p>Ace I</text:p>
          </table:table-cell>
          <table:table-cell office:value-type="string" office:string-value="Black Thumb III" calcext:value-type="string">
            <text:p>Black Thumb III</text:p>
          </table:table-cell>
          <table:table-cell office:value-type="string" office:string-value="Bonded I" calcext:value-type="string">
            <text:p>Bonded I</text:p>
          </table:table-cell>
          <table:table-cell office:value-type="string" office:string-value="Brawler I" calcext:value-type="string">
            <text:p>Brawler I</text:p>
          </table:table-cell>
          <table:table-cell office:value-type="string" office:string-value="Brutal I" calcext:value-type="string">
            <text:p>Brutal I</text:p>
          </table:table-cell>
          <table:table-cell office:value-type="string" office:string-value="Centimane I" calcext:value-type="string">
            <text:p>Centimane I</text:p>
          </table:table-cell>
          <table:table-cell office:value-type="string" office:string-value="Combined Arms I" calcext:value-type="string">
            <text:p>Combined Arms I</text:p>
          </table:table-cell>
          <table:table-cell office:value-type="string" office:string-value="Crack Shot III" calcext:value-type="string">
            <text:p>Crack Shot III</text:p>
          </table:table-cell>
          <table:table-cell office:value-type="string" office:string-value="Demolitionist I" calcext:value-type="string">
            <text:p>Demolitionist I</text:p>
          </table:table-cell>
          <table:table-cell office:value-type="string" office:string-value="Drone Commander I" calcext:value-type="string">
            <text:p>Drone Commander I</text:p>
          </table:table-cell>
          <table:table-cell office:value-type="string" office:string-value="Duelist I" calcext:value-type="string">
            <text:p>Duelist I</text:p>
          </table:table-cell>
          <table:table-cell office:value-type="string" office:string-value="Empath I" calcext:value-type="string">
            <text:p>Empath I</text:p>
          </table:table-cell>
          <table:table-cell office:value-type="string" office:string-value="Engineer II" calcext:value-type="string">
            <text:p>Engineer II</text:p>
          </table:table-cell>
          <table:table-cell office:value-type="string" office:string-value="Executioner I" calcext:value-type="string">
            <text:p>Executioner I</text:p>
          </table:table-cell>
          <table:table-cell office:value-type="string" office:string-value="Exemplar I" calcext:value-type="string">
            <text:p>Exemplar I</text:p>
          </table:table-cell>
          <table:table-cell office:value-type="string" office:string-value="Field Analyst I" calcext:value-type="string">
            <text:p>Field Analyst I</text:p>
          </table:table-cell>
          <table:table-cell office:value-type="string" office:string-value="Grease Monkey I" calcext:value-type="string">
            <text:p>Grease Monkey I</text:p>
          </table:table-cell>
          <table:table-cell office:value-type="string" office:string-value="Gunslinger I" calcext:value-type="string">
            <text:p>Gunslinger I</text:p>
          </table:table-cell>
          <table:table-cell office:value-type="string" office:string-value="Hacker I" calcext:value-type="string">
            <text:p>Hacker I</text:p>
          </table:table-cell>
          <table:table-cell office:value-type="string" office:string-value="Heavy Gunner I" calcext:value-type="string">
            <text:p>Heavy Gunner I</text:p>
          </table:table-cell>
          <table:table-cell office:value-type="string" office:string-value="Hunter I" calcext:value-type="string">
            <text:p>Hunter I</text:p>
          </table:table-cell>
          <table:table-cell office:value-type="string" office:string-value="Iconoclast I" calcext:value-type="string">
            <text:p>Iconoclast I</text:p>
          </table:table-cell>
          <table:table-cell office:value-type="string" office:string-value="Infiltrator I" calcext:value-type="string">
            <text:p>Infiltrator I</text:p>
          </table:table-cell>
          <table:table-cell office:value-type="string" office:string-value="Juggernaut I" calcext:value-type="string">
            <text:p>Juggernaut I</text:p>
          </table:table-cell>
          <table:table-cell office:value-type="string" office:string-value="Leader I" calcext:value-type="string">
            <text:p>Leader I</text:p>
          </table:table-cell>
          <table:table-cell office:value-type="string" office:string-value="Nuclear Cavalier I" calcext:value-type="string">
            <text:p>Nuclear Cavalier I</text:p>
          </table:table-cell>
          <table:table-cell office:value-type="string" office:string-value="Prospector I" calcext:value-type="string">
            <text:p>Prospector I</text:p>
          </table:table-cell>
          <table:table-cell office:value-type="string" office:string-value="Siege Specialist I" calcext:value-type="string">
            <text:p>Siege Specialist I</text:p>
          </table:table-cell>
          <table:table-cell office:value-type="string" office:string-value="Skirmisher I" calcext:value-type="string">
            <text:p>Skirmisher I</text:p>
          </table:table-cell>
          <table:table-cell office:value-type="string" office:string-value="Spaceborn I" calcext:value-type="string">
            <text:p>Spaceborn I</text:p>
          </table:table-cell>
          <table:table-cell office:value-type="string" office:string-value="Spotter I" calcext:value-type="string">
            <text:p>Spotter I</text:p>
          </table:table-cell>
          <table:table-cell office:value-type="string" office:string-value="Stormbringer I" calcext:value-type="string">
            <text:p>Stormbringer I</text:p>
          </table:table-cell>
          <table:table-cell office:value-type="string" office:string-value="Sysop I" calcext:value-type="string">
            <text:p>Sysop I</text:p>
          </table:table-cell>
          <table:table-cell office:value-type="string" office:string-value="Tactician I" calcext:value-type="string">
            <text:p>Tactician I</text:p>
          </table:table-cell>
          <table:table-cell office:value-type="string" office:string-value="Vanguard I" calcext:value-type="string">
            <text:p>Vanguard I</text:p>
          </table:table-cell>
          <table:table-cell office:value-type="string" office:string-value="Walking Armory I" calcext:value-type="string">
            <text:p>Walking Armory I</text:p>
          </table:table-cell>
          <table:table-cell table:number-columns-repeated="94"/>
        </table:table-row>
        <table:table-row table:style-name="ro2">
          <table:table-cell table:number-columns-repeated="54"/>
          <table:table-cell table:number-matrix-columns-spanned="36" table:number-matrix-rows-spanned="1" table:formula="of:=TRANSPOSE(     COM.MICROSOFT.FILTER(         [$Talents.$A$2:.$A$200];         ([$Talents.$A$2:.$A$200]&lt;&gt;&quot;&quot;)         *         (COUNTIF([$Build.$C$2:.$C11];[$Talents.$A$2:.$A$200])=0)         *         (             ([$Talents.$B$2:.$B$200]=&quot;&quot;)             +             (COUNTIF([$Build.$C$2:.$C11];[$Talents.$B$2:.$B$200])&gt;0)         );         &quot;&quot;     ) )" office:value-type="string" office:string-value="Ace I" calcext:value-type="string">
            <text:p>Ace I</text:p>
          </table:table-cell>
          <table:table-cell office:value-type="string" office:string-value="Black Thumb III" calcext:value-type="string">
            <text:p>Black Thumb III</text:p>
          </table:table-cell>
          <table:table-cell office:value-type="string" office:string-value="Bonded I" calcext:value-type="string">
            <text:p>Bonded I</text:p>
          </table:table-cell>
          <table:table-cell office:value-type="string" office:string-value="Brawler I" calcext:value-type="string">
            <text:p>Brawler I</text:p>
          </table:table-cell>
          <table:table-cell office:value-type="string" office:string-value="Brutal I" calcext:value-type="string">
            <text:p>Brutal I</text:p>
          </table:table-cell>
          <table:table-cell office:value-type="string" office:string-value="Centimane I" calcext:value-type="string">
            <text:p>Centimane I</text:p>
          </table:table-cell>
          <table:table-cell office:value-type="string" office:string-value="Combined Arms I" calcext:value-type="string">
            <text:p>Combined Arms I</text:p>
          </table:table-cell>
          <table:table-cell office:value-type="string" office:string-value="Crack Shot III" calcext:value-type="string">
            <text:p>Crack Shot III</text:p>
          </table:table-cell>
          <table:table-cell office:value-type="string" office:string-value="Demolitionist I" calcext:value-type="string">
            <text:p>Demolitionist I</text:p>
          </table:table-cell>
          <table:table-cell office:value-type="string" office:string-value="Drone Commander I" calcext:value-type="string">
            <text:p>Drone Commander I</text:p>
          </table:table-cell>
          <table:table-cell office:value-type="string" office:string-value="Duelist I" calcext:value-type="string">
            <text:p>Duelist I</text:p>
          </table:table-cell>
          <table:table-cell office:value-type="string" office:string-value="Empath I" calcext:value-type="string">
            <text:p>Empath I</text:p>
          </table:table-cell>
          <table:table-cell office:value-type="string" office:string-value="Engineer III" calcext:value-type="string">
            <text:p>Engineer III</text:p>
          </table:table-cell>
          <table:table-cell office:value-type="string" office:string-value="Executioner I" calcext:value-type="string">
            <text:p>Executioner I</text:p>
          </table:table-cell>
          <table:table-cell office:value-type="string" office:string-value="Exemplar I" calcext:value-type="string">
            <text:p>Exemplar I</text:p>
          </table:table-cell>
          <table:table-cell office:value-type="string" office:string-value="Field Analyst I" calcext:value-type="string">
            <text:p>Field Analyst I</text:p>
          </table:table-cell>
          <table:table-cell office:value-type="string" office:string-value="Grease Monkey I" calcext:value-type="string">
            <text:p>Grease Monkey I</text:p>
          </table:table-cell>
          <table:table-cell office:value-type="string" office:string-value="Gunslinger I" calcext:value-type="string">
            <text:p>Gunslinger I</text:p>
          </table:table-cell>
          <table:table-cell office:value-type="string" office:string-value="Hacker I" calcext:value-type="string">
            <text:p>Hacker I</text:p>
          </table:table-cell>
          <table:table-cell office:value-type="string" office:string-value="Heavy Gunner I" calcext:value-type="string">
            <text:p>Heavy Gunner I</text:p>
          </table:table-cell>
          <table:table-cell office:value-type="string" office:string-value="Hunter I" calcext:value-type="string">
            <text:p>Hunter I</text:p>
          </table:table-cell>
          <table:table-cell office:value-type="string" office:string-value="Iconoclast I" calcext:value-type="string">
            <text:p>Iconoclast I</text:p>
          </table:table-cell>
          <table:table-cell office:value-type="string" office:string-value="Infiltrator I" calcext:value-type="string">
            <text:p>Infiltrator I</text:p>
          </table:table-cell>
          <table:table-cell office:value-type="string" office:string-value="Juggernaut I" calcext:value-type="string">
            <text:p>Juggernaut I</text:p>
          </table:table-cell>
          <table:table-cell office:value-type="string" office:string-value="Leader I" calcext:value-type="string">
            <text:p>Leader I</text:p>
          </table:table-cell>
          <table:table-cell office:value-type="string" office:string-value="Nuclear Cavalier I" calcext:value-type="string">
            <text:p>Nuclear Cavalier I</text:p>
          </table:table-cell>
          <table:table-cell office:value-type="string" office:string-value="Prospector I" calcext:value-type="string">
            <text:p>Prospector I</text:p>
          </table:table-cell>
          <table:table-cell office:value-type="string" office:string-value="Siege Specialist I" calcext:value-type="string">
            <text:p>Siege Specialist I</text:p>
          </table:table-cell>
          <table:table-cell office:value-type="string" office:string-value="Skirmisher I" calcext:value-type="string">
            <text:p>Skirmisher I</text:p>
          </table:table-cell>
          <table:table-cell office:value-type="string" office:string-value="Spaceborn I" calcext:value-type="string">
            <text:p>Spaceborn I</text:p>
          </table:table-cell>
          <table:table-cell office:value-type="string" office:string-value="Spotter I" calcext:value-type="string">
            <text:p>Spotter I</text:p>
          </table:table-cell>
          <table:table-cell office:value-type="string" office:string-value="Stormbringer I" calcext:value-type="string">
            <text:p>Stormbringer I</text:p>
          </table:table-cell>
          <table:table-cell office:value-type="string" office:string-value="Sysop I" calcext:value-type="string">
            <text:p>Sysop I</text:p>
          </table:table-cell>
          <table:table-cell office:value-type="string" office:string-value="Tactician I" calcext:value-type="string">
            <text:p>Tactician I</text:p>
          </table:table-cell>
          <table:table-cell office:value-type="string" office:string-value="Vanguard I" calcext:value-type="string">
            <text:p>Vanguard I</text:p>
          </table:table-cell>
          <table:table-cell office:value-type="string" office:string-value="Walking Armory I" calcext:value-type="string">
            <text:p>Walking Armory I</text:p>
          </table:table-cell>
          <table:table-cell table:number-columns-repeated="94"/>
        </table:table-row>
        <table:table-row table:style-name="ro2">
          <table:table-cell table:number-columns-repeated="54"/>
          <table:table-cell table:number-matrix-columns-spanned="35" table:number-matrix-rows-spanned="1" table:formula="of:=TRANSPOSE(     COM.MICROSOFT.FILTER(         [$Talents.$A$2:.$A$200];         ([$Talents.$A$2:.$A$200]&lt;&gt;&quot;&quot;)         *         (COUNTIF([$Build.$C$2:.$C12];[$Talents.$A$2:.$A$200])=0)         *         (             ([$Talents.$B$2:.$B$200]=&quot;&quot;)             +             (COUNTIF([$Build.$C$2:.$C12];[$Talents.$B$2:.$B$200])&gt;0)         );         &quot;&quot;     ) )" office:value-type="string" office:string-value="Ace I" calcext:value-type="string">
            <text:p>Ace I</text:p>
          </table:table-cell>
          <table:table-cell office:value-type="string" office:string-value="Black Thumb III" calcext:value-type="string">
            <text:p>Black Thumb III</text:p>
          </table:table-cell>
          <table:table-cell office:value-type="string" office:string-value="Bonded I" calcext:value-type="string">
            <text:p>Bonded I</text:p>
          </table:table-cell>
          <table:table-cell office:value-type="string" office:string-value="Brawler I" calcext:value-type="string">
            <text:p>Brawler I</text:p>
          </table:table-cell>
          <table:table-cell office:value-type="string" office:string-value="Brutal I" calcext:value-type="string">
            <text:p>Brutal I</text:p>
          </table:table-cell>
          <table:table-cell office:value-type="string" office:string-value="Centimane I" calcext:value-type="string">
            <text:p>Centimane I</text:p>
          </table:table-cell>
          <table:table-cell office:value-type="string" office:string-value="Combined Arms I" calcext:value-type="string">
            <text:p>Combined Arms I</text:p>
          </table:table-cell>
          <table:table-cell office:value-type="string" office:string-value="Demolitionist I" calcext:value-type="string">
            <text:p>Demolitionist I</text:p>
          </table:table-cell>
          <table:table-cell office:value-type="string" office:string-value="Drone Commander I" calcext:value-type="string">
            <text:p>Drone Commander I</text:p>
          </table:table-cell>
          <table:table-cell office:value-type="string" office:string-value="Duelist I" calcext:value-type="string">
            <text:p>Duelist I</text:p>
          </table:table-cell>
          <table:table-cell office:value-type="string" office:string-value="Empath I" calcext:value-type="string">
            <text:p>Empath I</text:p>
          </table:table-cell>
          <table:table-cell office:value-type="string" office:string-value="Engineer III" calcext:value-type="string">
            <text:p>Engineer III</text:p>
          </table:table-cell>
          <table:table-cell office:value-type="string" office:string-value="Executioner I" calcext:value-type="string">
            <text:p>Executioner I</text:p>
          </table:table-cell>
          <table:table-cell office:value-type="string" office:string-value="Exemplar I" calcext:value-type="string">
            <text:p>Exemplar I</text:p>
          </table:table-cell>
          <table:table-cell office:value-type="string" office:string-value="Field Analyst I" calcext:value-type="string">
            <text:p>Field Analyst I</text:p>
          </table:table-cell>
          <table:table-cell office:value-type="string" office:string-value="Grease Monkey I" calcext:value-type="string">
            <text:p>Grease Monkey I</text:p>
          </table:table-cell>
          <table:table-cell office:value-type="string" office:string-value="Gunslinger I" calcext:value-type="string">
            <text:p>Gunslinger I</text:p>
          </table:table-cell>
          <table:table-cell office:value-type="string" office:string-value="Hacker I" calcext:value-type="string">
            <text:p>Hacker I</text:p>
          </table:table-cell>
          <table:table-cell office:value-type="string" office:string-value="Heavy Gunner I" calcext:value-type="string">
            <text:p>Heavy Gunner I</text:p>
          </table:table-cell>
          <table:table-cell office:value-type="string" office:string-value="Hunter I" calcext:value-type="string">
            <text:p>Hunter I</text:p>
          </table:table-cell>
          <table:table-cell office:value-type="string" office:string-value="Iconoclast I" calcext:value-type="string">
            <text:p>Iconoclast I</text:p>
          </table:table-cell>
          <table:table-cell office:value-type="string" office:string-value="Infiltrator I" calcext:value-type="string">
            <text:p>Infiltrator I</text:p>
          </table:table-cell>
          <table:table-cell office:value-type="string" office:string-value="Juggernaut I" calcext:value-type="string">
            <text:p>Juggernaut I</text:p>
          </table:table-cell>
          <table:table-cell office:value-type="string" office:string-value="Leader I" calcext:value-type="string">
            <text:p>Leader I</text:p>
          </table:table-cell>
          <table:table-cell office:value-type="string" office:string-value="Nuclear Cavalier I" calcext:value-type="string">
            <text:p>Nuclear Cavalier I</text:p>
          </table:table-cell>
          <table:table-cell office:value-type="string" office:string-value="Prospector I" calcext:value-type="string">
            <text:p>Prospector I</text:p>
          </table:table-cell>
          <table:table-cell office:value-type="string" office:string-value="Siege Specialist I" calcext:value-type="string">
            <text:p>Siege Specialist I</text:p>
          </table:table-cell>
          <table:table-cell office:value-type="string" office:string-value="Skirmisher I" calcext:value-type="string">
            <text:p>Skirmisher I</text:p>
          </table:table-cell>
          <table:table-cell office:value-type="string" office:string-value="Spaceborn I" calcext:value-type="string">
            <text:p>Spaceborn I</text:p>
          </table:table-cell>
          <table:table-cell office:value-type="string" office:string-value="Spotter I" calcext:value-type="string">
            <text:p>Spotter I</text:p>
          </table:table-cell>
          <table:table-cell office:value-type="string" office:string-value="Stormbringer I" calcext:value-type="string">
            <text:p>Stormbringer I</text:p>
          </table:table-cell>
          <table:table-cell office:value-type="string" office:string-value="Sysop I" calcext:value-type="string">
            <text:p>Sysop I</text:p>
          </table:table-cell>
          <table:table-cell office:value-type="string" office:string-value="Tactician I" calcext:value-type="string">
            <text:p>Tactician I</text:p>
          </table:table-cell>
          <table:table-cell office:value-type="string" office:string-value="Vanguard I" calcext:value-type="string">
            <text:p>Vanguard I</text:p>
          </table:table-cell>
          <table:table-cell office:value-type="string" office:string-value="Walking Armory I" calcext:value-type="string">
            <text:p>Walking Armory I</text:p>
          </table:table-cell>
          <table:table-cell table:number-columns-repeated="95"/>
        </table:table-row>
        <table:table-row table:style-name="ro2">
          <table:table-cell table:number-columns-repeated="54"/>
          <table:table-cell table:number-matrix-columns-spanned="35" table:number-matrix-rows-spanned="1" table:formula="of:=TRANSPOSE(     COM.MICROSOFT.FILTER(         [$Talents.$A$2:.$A$200];         ([$Talents.$A$2:.$A$200]&lt;&gt;&quot;&quot;)         *         (COUNTIF([$Build.$C$2:.$C13];[$Talents.$A$2:.$A$200])=0)         *         (             ([$Talents.$B$2:.$B$200]=&quot;&quot;)             +             (COUNTIF([$Build.$C$2:.$C13];[$Talents.$B$2:.$B$200])&gt;0)         );         &quot;&quot;     ) )" office:value-type="string" office:string-value="Ace I" calcext:value-type="string">
            <text:p>Ace I</text:p>
          </table:table-cell>
          <table:table-cell office:value-type="string" office:string-value="Black Thumb III" calcext:value-type="string">
            <text:p>Black Thumb III</text:p>
          </table:table-cell>
          <table:table-cell office:value-type="string" office:string-value="Bonded I" calcext:value-type="string">
            <text:p>Bonded I</text:p>
          </table:table-cell>
          <table:table-cell office:value-type="string" office:string-value="Brawler I" calcext:value-type="string">
            <text:p>Brawler I</text:p>
          </table:table-cell>
          <table:table-cell office:value-type="string" office:string-value="Brutal I" calcext:value-type="string">
            <text:p>Brutal I</text:p>
          </table:table-cell>
          <table:table-cell office:value-type="string" office:string-value="Centimane I" calcext:value-type="string">
            <text:p>Centimane I</text:p>
          </table:table-cell>
          <table:table-cell office:value-type="string" office:string-value="Combined Arms I" calcext:value-type="string">
            <text:p>Combined Arms I</text:p>
          </table:table-cell>
          <table:table-cell office:value-type="string" office:string-value="Demolitionist I" calcext:value-type="string">
            <text:p>Demolitionist I</text:p>
          </table:table-cell>
          <table:table-cell office:value-type="string" office:string-value="Drone Commander I" calcext:value-type="string">
            <text:p>Drone Commander I</text:p>
          </table:table-cell>
          <table:table-cell office:value-type="string" office:string-value="Duelist I" calcext:value-type="string">
            <text:p>Duelist I</text:p>
          </table:table-cell>
          <table:table-cell office:value-type="string" office:string-value="Empath I" calcext:value-type="string">
            <text:p>Empath I</text:p>
          </table:table-cell>
          <table:table-cell office:value-type="string" office:string-value="Engineer III" calcext:value-type="string">
            <text:p>Engineer III</text:p>
          </table:table-cell>
          <table:table-cell office:value-type="string" office:string-value="Executioner I" calcext:value-type="string">
            <text:p>Executioner I</text:p>
          </table:table-cell>
          <table:table-cell office:value-type="string" office:string-value="Exemplar I" calcext:value-type="string">
            <text:p>Exemplar I</text:p>
          </table:table-cell>
          <table:table-cell office:value-type="string" office:string-value="Field Analyst I" calcext:value-type="string">
            <text:p>Field Analyst I</text:p>
          </table:table-cell>
          <table:table-cell office:value-type="string" office:string-value="Grease Monkey I" calcext:value-type="string">
            <text:p>Grease Monkey I</text:p>
          </table:table-cell>
          <table:table-cell office:value-type="string" office:string-value="Gunslinger I" calcext:value-type="string">
            <text:p>Gunslinger I</text:p>
          </table:table-cell>
          <table:table-cell office:value-type="string" office:string-value="Hacker I" calcext:value-type="string">
            <text:p>Hacker I</text:p>
          </table:table-cell>
          <table:table-cell office:value-type="string" office:string-value="Heavy Gunner I" calcext:value-type="string">
            <text:p>Heavy Gunner I</text:p>
          </table:table-cell>
          <table:table-cell office:value-type="string" office:string-value="Hunter I" calcext:value-type="string">
            <text:p>Hunter I</text:p>
          </table:table-cell>
          <table:table-cell office:value-type="string" office:string-value="Iconoclast I" calcext:value-type="string">
            <text:p>Iconoclast I</text:p>
          </table:table-cell>
          <table:table-cell office:value-type="string" office:string-value="Infiltrator II" calcext:value-type="string">
            <text:p>Infiltrator II</text:p>
          </table:table-cell>
          <table:table-cell office:value-type="string" office:string-value="Juggernaut I" calcext:value-type="string">
            <text:p>Juggernaut I</text:p>
          </table:table-cell>
          <table:table-cell office:value-type="string" office:string-value="Leader I" calcext:value-type="string">
            <text:p>Leader I</text:p>
          </table:table-cell>
          <table:table-cell office:value-type="string" office:string-value="Nuclear Cavalier I" calcext:value-type="string">
            <text:p>Nuclear Cavalier I</text:p>
          </table:table-cell>
          <table:table-cell office:value-type="string" office:string-value="Prospector I" calcext:value-type="string">
            <text:p>Prospector I</text:p>
          </table:table-cell>
          <table:table-cell office:value-type="string" office:string-value="Siege Specialist I" calcext:value-type="string">
            <text:p>Siege Specialist I</text:p>
          </table:table-cell>
          <table:table-cell office:value-type="string" office:string-value="Skirmisher I" calcext:value-type="string">
            <text:p>Skirmisher I</text:p>
          </table:table-cell>
          <table:table-cell office:value-type="string" office:string-value="Spaceborn I" calcext:value-type="string">
            <text:p>Spaceborn I</text:p>
          </table:table-cell>
          <table:table-cell office:value-type="string" office:string-value="Spotter I" calcext:value-type="string">
            <text:p>Spotter I</text:p>
          </table:table-cell>
          <table:table-cell office:value-type="string" office:string-value="Stormbringer I" calcext:value-type="string">
            <text:p>Stormbringer I</text:p>
          </table:table-cell>
          <table:table-cell office:value-type="string" office:string-value="Sysop I" calcext:value-type="string">
            <text:p>Sysop I</text:p>
          </table:table-cell>
          <table:table-cell office:value-type="string" office:string-value="Tactician I" calcext:value-type="string">
            <text:p>Tactician I</text:p>
          </table:table-cell>
          <table:table-cell office:value-type="string" office:string-value="Vanguard I" calcext:value-type="string">
            <text:p>Vanguard I</text:p>
          </table:table-cell>
          <table:table-cell office:value-type="string" office:string-value="Walking Armory I" calcext:value-type="string">
            <text:p>Walking Armory I</text:p>
          </table:table-cell>
          <table:table-cell table:number-columns-repeated="95"/>
        </table:table-row>
        <table:table-row table:style-name="ro2">
          <table:table-cell table:number-columns-repeated="54"/>
          <table:table-cell table:number-matrix-columns-spanned="35" table:number-matrix-rows-spanned="1" table:formula="of:=TRANSPOSE(     COM.MICROSOFT.FILTER(         [$Talents.$A$2:.$A$200];         ([$Talents.$A$2:.$A$200]&lt;&gt;&quot;&quot;)         *         (COUNTIF([$Build.$C$2:.$C14];[$Talents.$A$2:.$A$200])=0)         *         (             ([$Talents.$B$2:.$B$200]=&quot;&quot;)             +             (COUNTIF([$Build.$C$2:.$C14];[$Talents.$B$2:.$B$200])&gt;0)         );         &quot;&quot;     ) )" office:value-type="string" office:string-value="Ace I" calcext:value-type="string">
            <text:p>Ace I</text:p>
          </table:table-cell>
          <table:table-cell office:value-type="string" office:string-value="Black Thumb III" calcext:value-type="string">
            <text:p>Black Thumb III</text:p>
          </table:table-cell>
          <table:table-cell office:value-type="string" office:string-value="Bonded I" calcext:value-type="string">
            <text:p>Bonded I</text:p>
          </table:table-cell>
          <table:table-cell office:value-type="string" office:string-value="Brawler I" calcext:value-type="string">
            <text:p>Brawler I</text:p>
          </table:table-cell>
          <table:table-cell office:value-type="string" office:string-value="Brutal I" calcext:value-type="string">
            <text:p>Brutal I</text:p>
          </table:table-cell>
          <table:table-cell office:value-type="string" office:string-value="Centimane I" calcext:value-type="string">
            <text:p>Centimane I</text:p>
          </table:table-cell>
          <table:table-cell office:value-type="string" office:string-value="Combined Arms I" calcext:value-type="string">
            <text:p>Combined Arms I</text:p>
          </table:table-cell>
          <table:table-cell office:value-type="string" office:string-value="Demolitionist I" calcext:value-type="string">
            <text:p>Demolitionist I</text:p>
          </table:table-cell>
          <table:table-cell office:value-type="string" office:string-value="Drone Commander I" calcext:value-type="string">
            <text:p>Drone Commander I</text:p>
          </table:table-cell>
          <table:table-cell office:value-type="string" office:string-value="Duelist I" calcext:value-type="string">
            <text:p>Duelist I</text:p>
          </table:table-cell>
          <table:table-cell office:value-type="string" office:string-value="Empath I" calcext:value-type="string">
            <text:p>Empath I</text:p>
          </table:table-cell>
          <table:table-cell office:value-type="string" office:string-value="Engineer III" calcext:value-type="string">
            <text:p>Engineer III</text:p>
          </table:table-cell>
          <table:table-cell office:value-type="string" office:string-value="Executioner I" calcext:value-type="string">
            <text:p>Executioner I</text:p>
          </table:table-cell>
          <table:table-cell office:value-type="string" office:string-value="Exemplar I" calcext:value-type="string">
            <text:p>Exemplar I</text:p>
          </table:table-cell>
          <table:table-cell office:value-type="string" office:string-value="Field Analyst I" calcext:value-type="string">
            <text:p>Field Analyst I</text:p>
          </table:table-cell>
          <table:table-cell office:value-type="string" office:string-value="Grease Monkey I" calcext:value-type="string">
            <text:p>Grease Monkey I</text:p>
          </table:table-cell>
          <table:table-cell office:value-type="string" office:string-value="Gunslinger I" calcext:value-type="string">
            <text:p>Gunslinger I</text:p>
          </table:table-cell>
          <table:table-cell office:value-type="string" office:string-value="Hacker I" calcext:value-type="string">
            <text:p>Hacker I</text:p>
          </table:table-cell>
          <table:table-cell office:value-type="string" office:string-value="Heavy Gunner I" calcext:value-type="string">
            <text:p>Heavy Gunner I</text:p>
          </table:table-cell>
          <table:table-cell office:value-type="string" office:string-value="Hunter I" calcext:value-type="string">
            <text:p>Hunter I</text:p>
          </table:table-cell>
          <table:table-cell office:value-type="string" office:string-value="Iconoclast I" calcext:value-type="string">
            <text:p>Iconoclast I</text:p>
          </table:table-cell>
          <table:table-cell office:value-type="string" office:string-value="Infiltrator III" calcext:value-type="string">
            <text:p>Infiltrator III</text:p>
          </table:table-cell>
          <table:table-cell office:value-type="string" office:string-value="Juggernaut I" calcext:value-type="string">
            <text:p>Juggernaut I</text:p>
          </table:table-cell>
          <table:table-cell office:value-type="string" office:string-value="Leader I" calcext:value-type="string">
            <text:p>Leader I</text:p>
          </table:table-cell>
          <table:table-cell office:value-type="string" office:string-value="Nuclear Cavalier I" calcext:value-type="string">
            <text:p>Nuclear Cavalier I</text:p>
          </table:table-cell>
          <table:table-cell office:value-type="string" office:string-value="Prospector I" calcext:value-type="string">
            <text:p>Prospector I</text:p>
          </table:table-cell>
          <table:table-cell office:value-type="string" office:string-value="Siege Specialist I" calcext:value-type="string">
            <text:p>Siege Specialist I</text:p>
          </table:table-cell>
          <table:table-cell office:value-type="string" office:string-value="Skirmisher I" calcext:value-type="string">
            <text:p>Skirmisher I</text:p>
          </table:table-cell>
          <table:table-cell office:value-type="string" office:string-value="Spaceborn I" calcext:value-type="string">
            <text:p>Spaceborn I</text:p>
          </table:table-cell>
          <table:table-cell office:value-type="string" office:string-value="Spotter I" calcext:value-type="string">
            <text:p>Spotter I</text:p>
          </table:table-cell>
          <table:table-cell office:value-type="string" office:string-value="Stormbringer I" calcext:value-type="string">
            <text:p>Stormbringer I</text:p>
          </table:table-cell>
          <table:table-cell office:value-type="string" office:string-value="Sysop I" calcext:value-type="string">
            <text:p>Sysop I</text:p>
          </table:table-cell>
          <table:table-cell office:value-type="string" office:string-value="Tactician I" calcext:value-type="string">
            <text:p>Tactician I</text:p>
          </table:table-cell>
          <table:table-cell office:value-type="string" office:string-value="Vanguard I" calcext:value-type="string">
            <text:p>Vanguard I</text:p>
          </table:table-cell>
          <table:table-cell office:value-type="string" office:string-value="Walking Armory I" calcext:value-type="string">
            <text:p>Walking Armory I</text:p>
          </table:table-cell>
          <table:table-cell table:number-columns-repeated="95"/>
        </table:table-row>
        <table:table-row table:style-name="ro2">
          <table:table-cell table:number-columns-repeated="54"/>
          <table:table-cell table:number-matrix-columns-spanned="34" table:number-matrix-rows-spanned="1" table:formula="of:=TRANSPOSE(     COM.MICROSOFT.FILTER(         [$Talents.$A$2:.$A$200];         ([$Talents.$A$2:.$A$200]&lt;&gt;&quot;&quot;)         *         (COUNTIF([$Build.$C$2:.$C15];[$Talents.$A$2:.$A$200])=0)         *         (             ([$Talents.$B$2:.$B$200]=&quot;&quot;)             +             (COUNTIF([$Build.$C$2:.$C15];[$Talents.$B$2:.$B$200])&gt;0)         );         &quot;&quot;     ) )" office:value-type="string" office:string-value="Ace I" calcext:value-type="string">
            <text:p>Ace I</text:p>
          </table:table-cell>
          <table:table-cell office:value-type="string" office:string-value="Black Thumb III" calcext:value-type="string">
            <text:p>Black Thumb III</text:p>
          </table:table-cell>
          <table:table-cell office:value-type="string" office:string-value="Bonded I" calcext:value-type="string">
            <text:p>Bonded I</text:p>
          </table:table-cell>
          <table:table-cell office:value-type="string" office:string-value="Brawler I" calcext:value-type="string">
            <text:p>Brawler I</text:p>
          </table:table-cell>
          <table:table-cell office:value-type="string" office:string-value="Brutal I" calcext:value-type="string">
            <text:p>Brutal I</text:p>
          </table:table-cell>
          <table:table-cell office:value-type="string" office:string-value="Centimane I" calcext:value-type="string">
            <text:p>Centimane I</text:p>
          </table:table-cell>
          <table:table-cell office:value-type="string" office:string-value="Combined Arms I" calcext:value-type="string">
            <text:p>Combined Arms I</text:p>
          </table:table-cell>
          <table:table-cell office:value-type="string" office:string-value="Demolitionist I" calcext:value-type="string">
            <text:p>Demolitionist I</text:p>
          </table:table-cell>
          <table:table-cell office:value-type="string" office:string-value="Drone Commander I" calcext:value-type="string">
            <text:p>Drone Commander I</text:p>
          </table:table-cell>
          <table:table-cell office:value-type="string" office:string-value="Duelist I" calcext:value-type="string">
            <text:p>Duelist I</text:p>
          </table:table-cell>
          <table:table-cell office:value-type="string" office:string-value="Empath I" calcext:value-type="string">
            <text:p>Empath I</text:p>
          </table:table-cell>
          <table:table-cell office:value-type="string" office:string-value="Executioner I" calcext:value-type="string">
            <text:p>Executioner I</text:p>
          </table:table-cell>
          <table:table-cell office:value-type="string" office:string-value="Exemplar I" calcext:value-type="string">
            <text:p>Exemplar I</text:p>
          </table:table-cell>
          <table:table-cell office:value-type="string" office:string-value="Field Analyst I" calcext:value-type="string">
            <text:p>Field Analyst I</text:p>
          </table:table-cell>
          <table:table-cell office:value-type="string" office:string-value="Grease Monkey I" calcext:value-type="string">
            <text:p>Grease Monkey I</text:p>
          </table:table-cell>
          <table:table-cell office:value-type="string" office:string-value="Gunslinger I" calcext:value-type="string">
            <text:p>Gunslinger I</text:p>
          </table:table-cell>
          <table:table-cell office:value-type="string" office:string-value="Hacker I" calcext:value-type="string">
            <text:p>Hacker I</text:p>
          </table:table-cell>
          <table:table-cell office:value-type="string" office:string-value="Heavy Gunner I" calcext:value-type="string">
            <text:p>Heavy Gunner I</text:p>
          </table:table-cell>
          <table:table-cell office:value-type="string" office:string-value="Hunter I" calcext:value-type="string">
            <text:p>Hunter I</text:p>
          </table:table-cell>
          <table:table-cell office:value-type="string" office:string-value="Iconoclast I" calcext:value-type="string">
            <text:p>Iconoclast I</text:p>
          </table:table-cell>
          <table:table-cell office:value-type="string" office:string-value="Infiltrator III" calcext:value-type="string">
            <text:p>Infiltrator III</text:p>
          </table:table-cell>
          <table:table-cell office:value-type="string" office:string-value="Juggernaut I" calcext:value-type="string">
            <text:p>Juggernaut I</text:p>
          </table:table-cell>
          <table:table-cell office:value-type="string" office:string-value="Leader I" calcext:value-type="string">
            <text:p>Leader I</text:p>
          </table:table-cell>
          <table:table-cell office:value-type="string" office:string-value="Nuclear Cavalier I" calcext:value-type="string">
            <text:p>Nuclear Cavalier I</text:p>
          </table:table-cell>
          <table:table-cell office:value-type="string" office:string-value="Prospector I" calcext:value-type="string">
            <text:p>Prospector I</text:p>
          </table:table-cell>
          <table:table-cell office:value-type="string" office:string-value="Siege Specialist I" calcext:value-type="string">
            <text:p>Siege Specialist I</text:p>
          </table:table-cell>
          <table:table-cell office:value-type="string" office:string-value="Skirmisher I" calcext:value-type="string">
            <text:p>Skirmisher I</text:p>
          </table:table-cell>
          <table:table-cell office:value-type="string" office:string-value="Spaceborn I" calcext:value-type="string">
            <text:p>Spaceborn I</text:p>
          </table:table-cell>
          <table:table-cell office:value-type="string" office:string-value="Spotter I" calcext:value-type="string">
            <text:p>Spotter I</text:p>
          </table:table-cell>
          <table:table-cell office:value-type="string" office:string-value="Stormbringer I" calcext:value-type="string">
            <text:p>Stormbringer I</text:p>
          </table:table-cell>
          <table:table-cell office:value-type="string" office:string-value="Sysop I" calcext:value-type="string">
            <text:p>Sysop I</text:p>
          </table:table-cell>
          <table:table-cell office:value-type="string" office:string-value="Tactician I" calcext:value-type="string">
            <text:p>Tactician I</text:p>
          </table:table-cell>
          <table:table-cell office:value-type="string" office:string-value="Vanguard I" calcext:value-type="string">
            <text:p>Vanguard I</text:p>
          </table:table-cell>
          <table:table-cell office:value-type="string" office:string-value="Walking Armory I" calcext:value-type="string">
            <text:p>Walking Armory I</text:p>
          </table:table-cell>
          <table:table-cell table:number-columns-repeated="96"/>
        </table:table-row>
        <table:table-row table:style-name="ro2">
          <table:table-cell table:number-columns-repeated="54"/>
          <table:table-cell table:number-matrix-columns-spanned="34" table:number-matrix-rows-spanned="1" table:formula="of:=TRANSPOSE(     COM.MICROSOFT.FILTER(         [$Talents.$A$2:.$A$200];         ([$Talents.$A$2:.$A$200]&lt;&gt;&quot;&quot;)         *         (COUNTIF([$Build.$C$2:.$C16];[$Talents.$A$2:.$A$200])=0)         *         (             ([$Talents.$B$2:.$B$200]=&quot;&quot;)             +             (COUNTIF([$Build.$C$2:.$C16];[$Talents.$B$2:.$B$200])&gt;0)         );         &quot;&quot;     ) )" office:value-type="string" office:string-value="Ace I" calcext:value-type="string">
            <text:p>Ace I</text:p>
          </table:table-cell>
          <table:table-cell office:value-type="string" office:string-value="Black Thumb III" calcext:value-type="string">
            <text:p>Black Thumb III</text:p>
          </table:table-cell>
          <table:table-cell office:value-type="string" office:string-value="Bonded I" calcext:value-type="string">
            <text:p>Bonded I</text:p>
          </table:table-cell>
          <table:table-cell office:value-type="string" office:string-value="Brawler I" calcext:value-type="string">
            <text:p>Brawler I</text:p>
          </table:table-cell>
          <table:table-cell office:value-type="string" office:string-value="Brutal I" calcext:value-type="string">
            <text:p>Brutal I</text:p>
          </table:table-cell>
          <table:table-cell office:value-type="string" office:string-value="Centimane I" calcext:value-type="string">
            <text:p>Centimane I</text:p>
          </table:table-cell>
          <table:table-cell office:value-type="string" office:string-value="Combined Arms I" calcext:value-type="string">
            <text:p>Combined Arms I</text:p>
          </table:table-cell>
          <table:table-cell office:value-type="string" office:string-value="Demolitionist I" calcext:value-type="string">
            <text:p>Demolitionist I</text:p>
          </table:table-cell>
          <table:table-cell office:value-type="string" office:string-value="Drone Commander I" calcext:value-type="string">
            <text:p>Drone Commander I</text:p>
          </table:table-cell>
          <table:table-cell office:value-type="string" office:string-value="Duelist I" calcext:value-type="string">
            <text:p>Duelist I</text:p>
          </table:table-cell>
          <table:table-cell office:value-type="string" office:string-value="Empath I" calcext:value-type="string">
            <text:p>Empath I</text:p>
          </table:table-cell>
          <table:table-cell office:value-type="string" office:string-value="Executioner I" calcext:value-type="string">
            <text:p>Executioner I</text:p>
          </table:table-cell>
          <table:table-cell office:value-type="string" office:string-value="Exemplar I" calcext:value-type="string">
            <text:p>Exemplar I</text:p>
          </table:table-cell>
          <table:table-cell office:value-type="string" office:string-value="Field Analyst I" calcext:value-type="string">
            <text:p>Field Analyst I</text:p>
          </table:table-cell>
          <table:table-cell office:value-type="string" office:string-value="Grease Monkey I" calcext:value-type="string">
            <text:p>Grease Monkey I</text:p>
          </table:table-cell>
          <table:table-cell office:value-type="string" office:string-value="Gunslinger I" calcext:value-type="string">
            <text:p>Gunslinger I</text:p>
          </table:table-cell>
          <table:table-cell office:value-type="string" office:string-value="Hacker I" calcext:value-type="string">
            <text:p>Hacker I</text:p>
          </table:table-cell>
          <table:table-cell office:value-type="string" office:string-value="Heavy Gunner I" calcext:value-type="string">
            <text:p>Heavy Gunner I</text:p>
          </table:table-cell>
          <table:table-cell office:value-type="string" office:string-value="Hunter I" calcext:value-type="string">
            <text:p>Hunter I</text:p>
          </table:table-cell>
          <table:table-cell office:value-type="string" office:string-value="Iconoclast I" calcext:value-type="string">
            <text:p>Iconoclast I</text:p>
          </table:table-cell>
          <table:table-cell office:value-type="string" office:string-value="Infiltrator III" calcext:value-type="string">
            <text:p>Infiltrator III</text:p>
          </table:table-cell>
          <table:table-cell office:value-type="string" office:string-value="Juggernaut I" calcext:value-type="string">
            <text:p>Juggernaut I</text:p>
          </table:table-cell>
          <table:table-cell office:value-type="string" office:string-value="Leader II" calcext:value-type="string">
            <text:p>Leader II</text:p>
          </table:table-cell>
          <table:table-cell office:value-type="string" office:string-value="Nuclear Cavalier I" calcext:value-type="string">
            <text:p>Nuclear Cavalier I</text:p>
          </table:table-cell>
          <table:table-cell office:value-type="string" office:string-value="Prospector I" calcext:value-type="string">
            <text:p>Prospector I</text:p>
          </table:table-cell>
          <table:table-cell office:value-type="string" office:string-value="Siege Specialist I" calcext:value-type="string">
            <text:p>Siege Specialist I</text:p>
          </table:table-cell>
          <table:table-cell office:value-type="string" office:string-value="Skirmisher I" calcext:value-type="string">
            <text:p>Skirmisher I</text:p>
          </table:table-cell>
          <table:table-cell office:value-type="string" office:string-value="Spaceborn I" calcext:value-type="string">
            <text:p>Spaceborn I</text:p>
          </table:table-cell>
          <table:table-cell office:value-type="string" office:string-value="Spotter I" calcext:value-type="string">
            <text:p>Spotter I</text:p>
          </table:table-cell>
          <table:table-cell office:value-type="string" office:string-value="Stormbringer I" calcext:value-type="string">
            <text:p>Stormbringer I</text:p>
          </table:table-cell>
          <table:table-cell office:value-type="string" office:string-value="Sysop I" calcext:value-type="string">
            <text:p>Sysop I</text:p>
          </table:table-cell>
          <table:table-cell office:value-type="string" office:string-value="Tactician I" calcext:value-type="string">
            <text:p>Tactician I</text:p>
          </table:table-cell>
          <table:table-cell office:value-type="string" office:string-value="Vanguard I" calcext:value-type="string">
            <text:p>Vanguard I</text:p>
          </table:table-cell>
          <table:table-cell office:value-type="string" office:string-value="Walking Armory I" calcext:value-type="string">
            <text:p>Walking Armory I</text:p>
          </table:table-cell>
          <table:table-cell table:number-columns-repeated="96"/>
        </table:table-row>
        <table:table-row table:style-name="ro2">
          <table:table-cell table:number-columns-repeated="184"/>
        </table:table-row>
        <table:table-row table:style-name="ro2">
          <table:table-cell table:number-columns-repeated="54"/>
          <table:table-cell office:value-type="string" calcext:value-type="string">
            <text:p>Valid Core Bonus Selection</text:p>
          </table:table-cell>
          <table:table-cell table:number-columns-repeated="129"/>
        </table:table-row>
        <table:table-row table:style-name="ro2">
          <table:table-cell table:number-columns-repeated="54"/>
          <table:table-cell office:value-type="string" calcext:value-type="string">
            <text:p>IPS-N</text:p>
          </table:table-cell>
          <table:table-cell office:value-type="string" calcext:value-type="string">
            <text:p>SSC</text:p>
          </table:table-cell>
          <table:table-cell office:value-type="string" calcext:value-type="string">
            <text:p>HORUS</text:p>
          </table:table-cell>
          <table:table-cell office:value-type="string" calcext:value-type="string">
            <text:p>HA</text:p>
          </table:table-cell>
          <table:table-cell table:number-columns-repeated="126"/>
        </table:table-row>
        <table:table-row table:style-name="ro2">
          <table:table-cell table:number-columns-repeated="54"/>
          <table:table-cell table:formula="of:=SUMPRODUCT(     COUNTIF([$Build.$E$5:.$E$8];[$Licenses.$A$2:.$A$200])     *     ([$Licenses.$C$2:.$C$200]=[.BC$48]) )" office:value-type="float" office:value="0" calcext:value-type="float">
            <text:p>0</text:p>
          </table:table-cell>
          <table:table-cell table:formula="of:=SUMPRODUCT(     COUNTIF([$Build.$E$5:.$E$8];[$Licenses.$A$2:.$A$200])     *     ([$Licenses.$C$2:.$C$200]=[.BD$48]) )" office:value-type="float" office:value="3" calcext:value-type="float">
            <text:p>3</text:p>
          </table:table-cell>
          <table:table-cell table:formula="of:=SUMPRODUCT(     COUNTIF([$Build.$E$5:.$E$8];[$Licenses.$A$2:.$A$200])     *     ([$Licenses.$C$2:.$C$200]=[.BE$48]) )" office:value-type="float" office:value="0" calcext:value-type="float">
            <text:p>0</text:p>
          </table:table-cell>
          <table:table-cell table:formula="of:=SUMPRODUCT(     COUNTIF([$Build.$E$5:.$E$8];[$Licenses.$A$2:.$A$200])     *     ([$Licenses.$C$2:.$C$200]=[.BF$48]) )" office:value-type="float" office:value="0" calcext:value-type="float">
            <text:p>0</text:p>
          </table:table-cell>
          <table:table-cell table:formula="of:=IFERROR(COM.MICROSOFT.XLOOKUP([$Build.$G$8]; [$'Core Bonuses'.$A$2:.$A$100]; [$'Core Bonuses'.$B$2:.$B$100]);&quot;&quot;)" office:value-type="string" office:string-value="GMS" calcext:value-type="string">
            <text:p>GMS</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office:value-type="string" office:string-value="Auto-Stabilizing Hardpoints" calcext:value-type="string">
            <text:p>Auto-Stabilizing Hardpoints</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office:value-type="string" office:string-value="Overpower Caliber" calcext:value-type="string">
            <text:p>Overpower Caliber</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office:value-type="string" office:string-value="Improved Armament" calcext:value-type="string">
            <text:p>Improved Armament</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office:value-type="string" office:string-value="Integrated Weapon" calcext:value-type="string">
            <text:p>Integrated Weapon</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office:value-type="string" office:string-value="Mount Retrofitting" calcext:value-type="string">
            <text:p>Mount Retrofitting</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office:value-type="string" office:string-value="Universal Compatibility" calcext:value-type="string">
            <text:p>Universal Compatibility</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office:value-type="string" office:string-value="Superheavy Mounting" calcext:value-type="string">
            <text:p>Superheavy Mounting</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office:value-type="string" office:string-value="All-Theater Movement Suite" calcext:value-type="string">
            <text:p>All-Theater Movement Suite</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office:value-type="string" office:string-value="Full Subjectivity Sync" calcext:value-type="string">
            <text:p>Full Subjectivity Sync</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office:value-type="string" office:string-value="Ghostweave" calcext:value-type="string">
            <text:p>Ghostweave</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office:value-type="string" office:string-value="Integrated Nerveweave" calcext:value-type="string">
            <text:p>Integrated Nerveweave</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office:value-type="string" office:string-value="Kai Bioplating" calcext:value-type="string">
            <text:p>Kai Bioplating</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office:value-type="string" office:string-value="Neurolink Targeting" calcext:value-type="string">
            <text:p>Neurolink Targeting</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formula="of:=IFERROR(     INDEX(         COM.MICROSOFT.FILTER(             [$'Core Bonuses'.$A$2:.$A$32];             ([$'Core Bonuses'.$A$2:.$A$32]&lt;&gt;&quot;&quot;)             *             (                 COUNTIF(                     [$Build.$G$2:.$G$7];                     [$'Core Bonuses'.$A$2:.$A$32]                 )=0             )             *             (                 ([$'Core Bonuses'.$B$2:.$B$32]=&quot;GMS&quot;)                 +                 COUNTIF(                     [.$BC$48];                     [$'Core Bonuses'.$B$2:.$B$32]                 )*([.$BC49]&gt;=3)                 +                 COUNTIF(                     [.$BD$48];                     [$'Core Bonuses'.$B$2:.$B$32]                 )*([.$BD49]&gt;=3)                 +                 COUNTIF(                     [.$BE$48];                     [$'Core Bonuses'.$B$2:.$B$32]                 )*([.$BE49]&gt;=3)                 +                 COUNTIF(                     [.$BF$48];                     [$'Core Bonuses'.$B$2:.$B$32]                 )*([.$BF49]&gt;=3)             )         );         COLUMN()-COLUMN([.$BH49])+1     );     &quot;&quot; )">
            <text:p/>
          </table:table-cell>
          <table:table-cell table:number-columns-repeated="93"/>
        </table:table-row>
        <table:table-row table:style-name="ro2">
          <table:table-cell table:number-columns-repeated="54"/>
          <table:table-cell table:formula="of:=SUMPRODUCT(     COUNTIF([$Build.$E$5:.$E$11];[$Licenses.$A$2:.$A$200])     *     ([$Licenses.$C$2:.$C$200]=[.BC$48]) ) - 3*COUNTIF([.$BG$49:.$BG49]; [.BC$48])" office:value-type="float" office:value="0" calcext:value-type="float">
            <text:p>0</text:p>
          </table:table-cell>
          <table:table-cell table:formula="of:=SUMPRODUCT(     COUNTIF([$Build.$E$5:.$E$11];[$Licenses.$A$2:.$A$200])     *     ([$Licenses.$C$2:.$C$200]=[.BD$48]) ) - 3*COUNTIF([.$BG$49:.$BG49]; [.BD$48])" office:value-type="float" office:value="3" calcext:value-type="float">
            <text:p>3</text:p>
          </table:table-cell>
          <table:table-cell table:formula="of:=SUMPRODUCT(     COUNTIF([$Build.$E$5:.$E$11];[$Licenses.$A$2:.$A$200])     *     ([$Licenses.$C$2:.$C$200]=[.BE$48]) ) - 3*COUNTIF([.$BG$49:.$BG49]; [.BE$48])" office:value-type="float" office:value="3" calcext:value-type="float">
            <text:p>3</text:p>
          </table:table-cell>
          <table:table-cell table:formula="of:=SUMPRODUCT(     COUNTIF([$Build.$E$5:.$E$11];[$Licenses.$A$2:.$A$200])     *     ([$Licenses.$C$2:.$C$200]=[.BF$48]) ) - 3*COUNTIF([.$BG$49:.$BG49]; [.BF$48])" office:value-type="float" office:value="0" calcext:value-type="float">
            <text:p>0</text:p>
          </table:table-cell>
          <table:table-cell table:formula="of:=IFERROR(COM.MICROSOFT.XLOOKUP([$Build.$G$11]; [$'Core Bonuses'.$A$2:.$A$100]; [$'Core Bonuses'.$B$2:.$B$100]);&quot;&quot;)" office:value-type="string" office:string-value="HORUS" calcext:value-type="string">
            <text:p>HORUS</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Auto-Stabilizing Hardpoints" calcext:value-type="string">
            <text:p>Auto-Stabilizing Hardpoints</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Overpower Caliber" calcext:value-type="string">
            <text:p>Overpower Caliber</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Integrated Weapon" calcext:value-type="string">
            <text:p>Integrated Weapon</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Mount Retrofitting" calcext:value-type="string">
            <text:p>Mount Retrofitting</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Universal Compatibility" calcext:value-type="string">
            <text:p>Universal Compatibility</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Superheavy Mounting" calcext:value-type="string">
            <text:p>Superheavy Mounting</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All-Theater Movement Suite" calcext:value-type="string">
            <text:p>All-Theater Movement Suite</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Full Subjectivity Sync" calcext:value-type="string">
            <text:p>Full Subjectivity Sync</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Ghostweave" calcext:value-type="string">
            <text:p>Ghostweave</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Integrated Nerveweave" calcext:value-type="string">
            <text:p>Integrated Nerveweave</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Kai Bioplating" calcext:value-type="string">
            <text:p>Kai Bioplating</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Neurolink Targeting" calcext:value-type="string">
            <text:p>Neurolink Targeting</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The Lesson of Disbelief" calcext:value-type="string">
            <text:p>The Lesson of Disbelief</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The Lesson of the Open Door" calcext:value-type="string">
            <text:p>The Lesson of the Open Door</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The Lesson of the Held Image" calcext:value-type="string">
            <text:p>The Lesson of the Held Image</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The Lesson of Thinking-Tomorrow’s-Thought" calcext:value-type="string">
            <text:p>The Lesson of Thinking-Tomorrow’s-Thought</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The Lesson of Transubstantiation" calcext:value-type="string">
            <text:p>The Lesson of Transubstantiation</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office:value-type="string" office:string-value="The Lesson of Shaping" calcext:value-type="string">
            <text:p>The Lesson of Shaping</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text:p/>
          </table:table-cell>
          <table:table-cell table:formula="of:=IFERROR(     INDEX(         COM.MICROSOFT.FILTER(             [$'Core Bonuses'.$A$2:.$A$32];             ([$'Core Bonuses'.$A$2:.$A$32]&lt;&gt;&quot;&quot;)             *             (                 COUNTIF(                     [$Build.$G$2:.$G$10];                     [$'Core Bonuses'.$A$2:.$A$32]                 )=0             )             *             (                 ([$'Core Bonuses'.$B$2:.$B$32]=&quot;GMS&quot;)                 +                 COUNTIF(                     [.$BC$48];                     [$'Core Bonuses'.$B$2:.$B$32]                 )*([.$BC50]&gt;=3)                 +                 COUNTIF(                     [.$BD$48];                     [$'Core Bonuses'.$B$2:.$B$32]                 )*([.$BD50]&gt;=3)                 +                 COUNTIF(                     [.$BE$48];                     [$'Core Bonuses'.$B$2:.$B$32]                 )*([.$BE50]&gt;=3)                 +                 COUNTIF(                     [.$BF$48];                     [$'Core Bonuses'.$B$2:.$B$32]                 )*([.$BF50]&gt;=3)             )         );         COLUMN()-COLUMN([.$BH50])+1     );     &quot;&quot; )">
            <text:p/>
          </table:table-cell>
          <table:table-cell table:number-columns-repeated="93"/>
        </table:table-row>
        <table:table-row table:style-name="ro2">
          <table:table-cell table:number-columns-repeated="54"/>
          <table:table-cell table:formula="of:=SUMPRODUCT(     COUNTIF([$Build.$E$5:.$E$14];[$Licenses.$A$2:.$A$200])     *     ([$Licenses.$C$2:.$C$200]=[.BC$48]) ) - 3*COUNTIF([.$BG$49:.$BG50]; [.BC$48])" office:value-type="float" office:value="0" calcext:value-type="float">
            <text:p>0</text:p>
          </table:table-cell>
          <table:table-cell table:formula="of:=SUMPRODUCT(     COUNTIF([$Build.$E$5:.$E$14];[$Licenses.$A$2:.$A$200])     *     ([$Licenses.$C$2:.$C$200]=[.BD$48]) ) - 3*COUNTIF([.$BG$49:.$BG50]; [.BD$48])" office:value-type="float" office:value="3" calcext:value-type="float">
            <text:p>3</text:p>
          </table:table-cell>
          <table:table-cell table:formula="of:=SUMPRODUCT(     COUNTIF([$Build.$E$5:.$E$14];[$Licenses.$A$2:.$A$200])     *     ([$Licenses.$C$2:.$C$200]=[.BE$48]) ) - 3*COUNTIF([.$BG$49:.$BG50]; [.BE$48])" office:value-type="float" office:value="3" calcext:value-type="float">
            <text:p>3</text:p>
          </table:table-cell>
          <table:table-cell table:formula="of:=SUMPRODUCT(     COUNTIF([$Build.$E$5:.$E$14];[$Licenses.$A$2:.$A$200])     *     ([$Licenses.$C$2:.$C$200]=[.BF$48]) ) - 3*COUNTIF([.$BG$49:.$BG50]; [.BF$48])" office:value-type="float" office:value="0" calcext:value-type="float">
            <text:p>0</text:p>
          </table:table-cell>
          <table:table-cell table:formula="of:=IFERROR(COM.MICROSOFT.XLOOKUP([$Build.$G$14]; [$'Core Bonuses'.$A$2:.$A$100]; [$'Core Bonuses'.$B$2:.$B$100]);&quot;&quot;)" office:value-type="string" office:string-value="GMS" calcext:value-type="string">
            <text:p>GMS</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Auto-Stabilizing Hardpoints" calcext:value-type="string">
            <text:p>Auto-Stabilizing Hardpoints</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Overpower Caliber" calcext:value-type="string">
            <text:p>Overpower Caliber</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Integrated Weapon" calcext:value-type="string">
            <text:p>Integrated Weapon</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Mount Retrofitting" calcext:value-type="string">
            <text:p>Mount Retrofitting</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Universal Compatibility" calcext:value-type="string">
            <text:p>Universal Compatibility</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Superheavy Mounting" calcext:value-type="string">
            <text:p>Superheavy Mounting</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All-Theater Movement Suite" calcext:value-type="string">
            <text:p>All-Theater Movement Suite</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Full Subjectivity Sync" calcext:value-type="string">
            <text:p>Full Subjectivity Sync</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Ghostweave" calcext:value-type="string">
            <text:p>Ghostweave</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Integrated Nerveweave" calcext:value-type="string">
            <text:p>Integrated Nerveweave</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Kai Bioplating" calcext:value-type="string">
            <text:p>Kai Bioplating</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Neurolink Targeting" calcext:value-type="string">
            <text:p>Neurolink Targeting</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The Lesson of Disbelief" calcext:value-type="string">
            <text:p>The Lesson of Disbelief</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The Lesson of the Open Door" calcext:value-type="string">
            <text:p>The Lesson of the Open Door</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The Lesson of Thinking-Tomorrow’s-Thought" calcext:value-type="string">
            <text:p>The Lesson of Thinking-Tomorrow’s-Thought</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The Lesson of Transubstantiation" calcext:value-type="string">
            <text:p>The Lesson of Transubstantiation</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office:value-type="string" office:string-value="The Lesson of Shaping" calcext:value-type="string">
            <text:p>The Lesson of Shaping</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text:p/>
          </table:table-cell>
          <table:table-cell table:formula="of:=IFERROR(     INDEX(         COM.MICROSOFT.FILTER(             [$'Core Bonuses'.$A$2:.$A$32];             ([$'Core Bonuses'.$A$2:.$A$32]&lt;&gt;&quot;&quot;)             *             (                 COUNTIF(                     [$Build.$G$2:.$G$13];                     [$'Core Bonuses'.$A$2:.$A$32]                 )=0             )             *             (                 ([$'Core Bonuses'.$B$2:.$B$32]=&quot;GMS&quot;)                 +                 COUNTIF(                     [.$BC$48];                     [$'Core Bonuses'.$B$2:.$B$32]                 )*([.$BC51]&gt;=3)                 +                 COUNTIF(                     [.$BD$48];                     [$'Core Bonuses'.$B$2:.$B$32]                 )*([.$BD51]&gt;=3)                 +                 COUNTIF(                     [.$BE$48];                     [$'Core Bonuses'.$B$2:.$B$32]                 )*([.$BE51]&gt;=3)                 +                 COUNTIF(                     [.$BF$48];                     [$'Core Bonuses'.$B$2:.$B$32]                 )*([.$BF51]&gt;=3)             )         );         COLUMN()-COLUMN([.$BH51])+1     );     &quot;&quot; )">
            <text:p/>
          </table:table-cell>
          <table:table-cell table:number-columns-repeated="93"/>
        </table:table-row>
        <table:table-row table:style-name="ro2">
          <table:table-cell table:number-columns-repeated="54"/>
          <table:table-cell table:formula="of:=SUMPRODUCT(     COUNTIF([$Build.$E$5:.$E$17];[$Licenses.$A$2:.$A$200])     *     ([$Licenses.$C$2:.$C$200]=[.BC$48]) ) - 3*COUNTIF([.$BG$49:.$BG51]; [.BC$48])" office:value-type="float" office:value="0" calcext:value-type="float">
            <text:p>0</text:p>
          </table:table-cell>
          <table:table-cell table:formula="of:=SUMPRODUCT(     COUNTIF([$Build.$E$5:.$E$17];[$Licenses.$A$2:.$A$200])     *     ([$Licenses.$C$2:.$C$200]=[.BD$48]) ) - 3*COUNTIF([.$BG$49:.$BG51]; [.BD$48])" office:value-type="float" office:value="5" calcext:value-type="float">
            <text:p>5</text:p>
          </table:table-cell>
          <table:table-cell table:formula="of:=SUMPRODUCT(     COUNTIF([$Build.$E$5:.$E$17];[$Licenses.$A$2:.$A$200])     *     ([$Licenses.$C$2:.$C$200]=[.BE$48]) ) - 3*COUNTIF([.$BG$49:.$BG51]; [.BE$48])" office:value-type="float" office:value="3" calcext:value-type="float">
            <text:p>3</text:p>
          </table:table-cell>
          <table:table-cell table:formula="of:=SUMPRODUCT(     COUNTIF([$Build.$E$5:.$E$17];[$Licenses.$A$2:.$A$200])     *     ([$Licenses.$C$2:.$C$200]=[.BF$48]) ) - 3*COUNTIF([.$BG$49:.$BG51]; [.BF$48])" office:value-type="float" office:value="1" calcext:value-type="float">
            <text:p>1</text:p>
          </table:table-cell>
          <table:table-cell table:formula="of:=IFERROR(COM.MICROSOFT.XLOOKUP([$Build.$G$17]; [$'Core Bonuses'.$A$2:.$A$100]; [$'Core Bonuses'.$B$2:.$B$100]);&quot;&quot;)" office:value-type="string" office:string-value="HORUS" calcext:value-type="string">
            <text:p>HORUS</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Auto-Stabilizing Hardpoints" calcext:value-type="string">
            <text:p>Auto-Stabilizing Hardpoints</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Overpower Caliber" calcext:value-type="string">
            <text:p>Overpower Caliber</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Integrated Weapon" calcext:value-type="string">
            <text:p>Integrated Weapon</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Universal Compatibility" calcext:value-type="string">
            <text:p>Universal Compatibility</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Superheavy Mounting" calcext:value-type="string">
            <text:p>Superheavy Mounting</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All-Theater Movement Suite" calcext:value-type="string">
            <text:p>All-Theater Movement Suite</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Full Subjectivity Sync" calcext:value-type="string">
            <text:p>Full Subjectivity Sync</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Ghostweave" calcext:value-type="string">
            <text:p>Ghostweave</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Integrated Nerveweave" calcext:value-type="string">
            <text:p>Integrated Nerveweave</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Kai Bioplating" calcext:value-type="string">
            <text:p>Kai Bioplating</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Neurolink Targeting" calcext:value-type="string">
            <text:p>Neurolink Targeting</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The Lesson of Disbelief" calcext:value-type="string">
            <text:p>The Lesson of Disbelief</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The Lesson of the Open Door" calcext:value-type="string">
            <text:p>The Lesson of the Open Door</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The Lesson of Thinking-Tomorrow’s-Thought" calcext:value-type="string">
            <text:p>The Lesson of Thinking-Tomorrow’s-Thought</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The Lesson of Transubstantiation" calcext:value-type="string">
            <text:p>The Lesson of Transubstantiation</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office:value-type="string" office:string-value="The Lesson of Shaping" calcext:value-type="string">
            <text:p>The Lesson of Shaping</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formula="of:=IFERROR(     INDEX(         COM.MICROSOFT.FILTER(             [$'Core Bonuses'.$A$2:.$A$32];             ([$'Core Bonuses'.$A$2:.$A$32]&lt;&gt;&quot;&quot;)             *             (                 COUNTIF(                     [$Build.$G$2:.$G$16];                     [$'Core Bonuses'.$A$2:.$A$32]                 )=0             )             *             (                 ([$'Core Bonuses'.$B$2:.$B$32]=&quot;GMS&quot;)                 +                 COUNTIF(                     [.$BC$48];                     [$'Core Bonuses'.$B$2:.$B$32]                 )*([.$BC52]&gt;=3)                 +                 COUNTIF(                     [.$BD$48];                     [$'Core Bonuses'.$B$2:.$B$32]                 )*([.$BD52]&gt;=3)                 +                 COUNTIF(                     [.$BE$48];                     [$'Core Bonuses'.$B$2:.$B$32]                 )*([.$BE52]&gt;=3)                 +                 COUNTIF(                     [.$BF$48];                     [$'Core Bonuses'.$B$2:.$B$32]                 )*([.$BF52]&gt;=3)             )         );         COLUMN()-COLUMN([.$BH52])+1     );     &quot;&quot; )">
            <text:p/>
          </table:table-cell>
          <table:table-cell table:number-columns-repeated="93"/>
        </table:table-row>
        <table:table-row table:style-name="ro2">
          <table:table-cell table:number-columns-repeated="184"/>
        </table:table-row>
        <table:table-row table:style-name="ro2">
          <table:table-cell table:number-columns-repeated="54"/>
          <table:table-cell office:value-type="string" calcext:value-type="string">
            <text:p>Valid System Selection</text:p>
          </table:table-cell>
          <table:table-cell table:number-columns-repeated="129"/>
        </table:table-row>
        <table:table-row table:style-name="ro2">
          <table:table-cell table:number-columns-repeated="54"/>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IF(ISNUMBER([$Build.$AI5]); [$Build.$AI5]; 0))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BC55])+1  );  &quot;&quot; )">
            <text:p/>
          </table:table-cell>
          <table:table-cell table:formula="of:=IFERROR(  INDEX(   COM.MICROSOFT.FILTER(    [$Systems.$A$2:.$A$176];    ([$Systems.$A$2:.$A$176]&lt;&gt;&quot;&quot;)    *    ([$Systems.$E$2:.$E$176]&lt;=[$Build.$Y5]-[$Build.$AI5])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A55])+1  );  &quot;&quot; )">
            <text:p/>
          </table:table-cell>
          <table:table-cell table:formula="of:=IFERROR(  INDEX(   COM.MICROSOFT.FILTER(    [$Systems.$A$2:.$A$176];    ([$Systems.$A$2:.$A$176]&lt;&gt;&quot;&quot;)    *    ([$Systems.$E$2:.$E$176]&lt;=[$Build.$Y5]-[$Build.$AI5])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A55])+1  );  &quot;&quot; )">
            <text:p/>
          </table:table-cell>
          <table:table-cell table:formula="of:=IFERROR(  INDEX(   COM.MICROSOFT.FILTER(    [$Systems.$A$2:.$A$176];    ([$Systems.$A$2:.$A$176]&lt;&gt;&quot;&quot;)    *    ([$Systems.$E$2:.$E$176]&lt;=[$Build.$Y5]-[$Build.$AI5])    *    (     ([$Systems.$B$2:.$B$176]=&quot;&quot;)     +     (      COUNTIF(       [$Build.$E$5:.$E5];       [$Systems.$B$2:.$B$176]      )&gt;0     )    )    *    (     ([$Systems.$C$2:.$C$176]=&quot;&quot;)     +     ([$Systems.$C$2:.$C$176]=[$Build.$F5])    )    *    (     ([$Systems.$D$2:.$D$176]=&quot;&quot;)     +     (      COUNTIF(       [$Build.$C$2:.$C5];       [$Systems.$D$2:.$D$176]      )&gt;0     )    )    *    (     ([$Systems.$G$2:.$G$176]=&quot;&quot;)     +     (      COUNTIF(       [$Build.$AJ5:.$BB5];       [$Systems.$A$2:.$A$176]      )=0     )    )*    (     ([$Systems.$H$2:.$H$176]=&quot;&quot;)     +     (      SUMPRODUCT(       COUNTIF(        [$Build.$AJ5:.$BB5];        [$Systems.$A$2:.$A$176]       )       *       ([$Systems.$H$2:.$H$176]&lt;&gt;&quot;&quot;)      )      &lt;      [$Build.$Z5]     )    )         );   COLUMN()-COLUMN([.$A55])+1  );  &quot;&quot; )">
            <text:p/>
          </table:table-cell>
        </table:table-row>
        <table:table-row table:style-name="ro2">
          <table:table-cell table:number-columns-repeated="54"/>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office:value-type="string" office:string-value="Servant-Class NHP" calcext:value-type="string">
            <text:p>Servant-Class NHP</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IF(ISNUMBER([$Build.$AI6]); [$Build.$AI6]; 0))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BC56])+1  );  &quot;&quot; )">
            <text:p/>
          </table:table-cell>
          <table:table-cell table:formula="of:=IFERROR(  INDEX(   COM.MICROSOFT.FILTER(    [$Systems.$A$2:.$A$176];    ([$Systems.$A$2:.$A$176]&lt;&gt;&quot;&quot;)    *    ([$Systems.$E$2:.$E$176]&lt;=[$Build.$Y6]-[$Build.$AI6])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A56])+1  );  &quot;&quot; )">
            <text:p/>
          </table:table-cell>
          <table:table-cell table:formula="of:=IFERROR(  INDEX(   COM.MICROSOFT.FILTER(    [$Systems.$A$2:.$A$176];    ([$Systems.$A$2:.$A$176]&lt;&gt;&quot;&quot;)    *    ([$Systems.$E$2:.$E$176]&lt;=[$Build.$Y6]-[$Build.$AI6])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A56])+1  );  &quot;&quot; )">
            <text:p/>
          </table:table-cell>
          <table:table-cell table:formula="of:=IFERROR(  INDEX(   COM.MICROSOFT.FILTER(    [$Systems.$A$2:.$A$176];    ([$Systems.$A$2:.$A$176]&lt;&gt;&quot;&quot;)    *    ([$Systems.$E$2:.$E$176]&lt;=[$Build.$Y6]-[$Build.$AI6])    *    (     ([$Systems.$B$2:.$B$176]=&quot;&quot;)     +     (      COUNTIF(       [$Build.$E$5:.$E6];       [$Systems.$B$2:.$B$176]      )&gt;0     )    )    *    (     ([$Systems.$C$2:.$C$176]=&quot;&quot;)     +     ([$Systems.$C$2:.$C$176]=[$Build.$F6])    )    *    (     ([$Systems.$D$2:.$D$176]=&quot;&quot;)     +     (      COUNTIF(       [$Build.$C$2:.$C6];       [$Systems.$D$2:.$D$176]      )&gt;0     )    )    *    (     ([$Systems.$G$2:.$G$176]=&quot;&quot;)     +     (      COUNTIF(       [$Build.$AJ6:.$BB6];       [$Systems.$A$2:.$A$176]      )=0     )    )*    (     ([$Systems.$H$2:.$H$176]=&quot;&quot;)     +     (      SUMPRODUCT(       COUNTIF(        [$Build.$AJ6:.$BB6];        [$Systems.$A$2:.$A$176]       )       *       ([$Systems.$H$2:.$H$176]&lt;&gt;&quot;&quot;)      )      &lt;      [$Build.$Z6]     )    )         );   COLUMN()-COLUMN([.$A56])+1  );  &quot;&quot; )">
            <text:p/>
          </table:table-cell>
        </table:table-row>
        <table:table-row table:style-name="ro2">
          <table:table-cell table:number-columns-repeated="54"/>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office:value-type="string" office:string-value="Servant-Class NHP" calcext:value-type="string">
            <text:p>Servant-Class NHP</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office:value-type="string" office:string-value="Student-Class NHP" calcext:value-type="string">
            <text:p>Student-Class NHP</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IF(ISNUMBER([$Build.$AI7]); [$Build.$AI7]; 0))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BC57])+1  );  &quot;&quot; )">
            <text:p/>
          </table:table-cell>
          <table:table-cell table:formula="of:=IFERROR(  INDEX(   COM.MICROSOFT.FILTER(    [$Systems.$A$2:.$A$176];    ([$Systems.$A$2:.$A$176]&lt;&gt;&quot;&quot;)    *    ([$Systems.$E$2:.$E$176]&lt;=[$Build.$Y7]-[$Build.$AI7])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A57])+1  );  &quot;&quot; )">
            <text:p/>
          </table:table-cell>
          <table:table-cell table:formula="of:=IFERROR(  INDEX(   COM.MICROSOFT.FILTER(    [$Systems.$A$2:.$A$176];    ([$Systems.$A$2:.$A$176]&lt;&gt;&quot;&quot;)    *    ([$Systems.$E$2:.$E$176]&lt;=[$Build.$Y7]-[$Build.$AI7])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A57])+1  );  &quot;&quot; )">
            <text:p/>
          </table:table-cell>
          <table:table-cell table:formula="of:=IFERROR(  INDEX(   COM.MICROSOFT.FILTER(    [$Systems.$A$2:.$A$176];    ([$Systems.$A$2:.$A$176]&lt;&gt;&quot;&quot;)    *    ([$Systems.$E$2:.$E$176]&lt;=[$Build.$Y7]-[$Build.$AI7])    *    (     ([$Systems.$B$2:.$B$176]=&quot;&quot;)     +     (      COUNTIF(       [$Build.$E$5:.$E7];       [$Systems.$B$2:.$B$176]      )&gt;0     )    )    *    (     ([$Systems.$C$2:.$C$176]=&quot;&quot;)     +     ([$Systems.$C$2:.$C$176]=[$Build.$F7])    )    *    (     ([$Systems.$D$2:.$D$176]=&quot;&quot;)     +     (      COUNTIF(       [$Build.$C$2:.$C7];       [$Systems.$D$2:.$D$176]      )&gt;0     )    )    *    (     ([$Systems.$G$2:.$G$176]=&quot;&quot;)     +     (      COUNTIF(       [$Build.$AJ7:.$BB7];       [$Systems.$A$2:.$A$176]      )=0     )    )*    (     ([$Systems.$H$2:.$H$176]=&quot;&quot;)     +     (      SUMPRODUCT(       COUNTIF(        [$Build.$AJ7:.$BB7];        [$Systems.$A$2:.$A$176]       )       *       ([$Systems.$H$2:.$H$176]&lt;&gt;&quot;&quot;)      )      &lt;      [$Build.$Z7]     )    )         );   COLUMN()-COLUMN([.$A57])+1  );  &quot;&quot; )">
            <text:p/>
          </table:table-cell>
        </table:table-row>
        <table:table-row table:style-name="ro2">
          <table:table-cell table:number-columns-repeated="54"/>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office:value-type="string" office:string-value="Servant-Class NHP" calcext:value-type="string">
            <text:p>Servant-Class NHP</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office:value-type="string" office:string-value="Student-Class NHP" calcext:value-type="string">
            <text:p>Student-Class NHP</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IF(ISNUMBER([$Build.$AI8]); [$Build.$AI8]; 0))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BC58])+1  );  &quot;&quot; )">
            <text:p/>
          </table:table-cell>
          <table:table-cell table:formula="of:=IFERROR(  INDEX(   COM.MICROSOFT.FILTER(    [$Systems.$A$2:.$A$176];    ([$Systems.$A$2:.$A$176]&lt;&gt;&quot;&quot;)    *    ([$Systems.$E$2:.$E$176]&lt;=[$Build.$Y8]-[$Build.$AI8])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A58])+1  );  &quot;&quot; )">
            <text:p/>
          </table:table-cell>
          <table:table-cell table:formula="of:=IFERROR(  INDEX(   COM.MICROSOFT.FILTER(    [$Systems.$A$2:.$A$176];    ([$Systems.$A$2:.$A$176]&lt;&gt;&quot;&quot;)    *    ([$Systems.$E$2:.$E$176]&lt;=[$Build.$Y8]-[$Build.$AI8])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A58])+1  );  &quot;&quot; )">
            <text:p/>
          </table:table-cell>
          <table:table-cell table:formula="of:=IFERROR(  INDEX(   COM.MICROSOFT.FILTER(    [$Systems.$A$2:.$A$176];    ([$Systems.$A$2:.$A$176]&lt;&gt;&quot;&quot;)    *    ([$Systems.$E$2:.$E$176]&lt;=[$Build.$Y8]-[$Build.$AI8])    *    (     ([$Systems.$B$2:.$B$176]=&quot;&quot;)     +     (      COUNTIF(       [$Build.$E$5:.$E8];       [$Systems.$B$2:.$B$176]      )&gt;0     )    )    *    (     ([$Systems.$C$2:.$C$176]=&quot;&quot;)     +     ([$Systems.$C$2:.$C$176]=[$Build.$F8])    )    *    (     ([$Systems.$D$2:.$D$176]=&quot;&quot;)     +     (      COUNTIF(       [$Build.$C$2:.$C8];       [$Systems.$D$2:.$D$176]      )&gt;0     )    )    *    (     ([$Systems.$G$2:.$G$176]=&quot;&quot;)     +     (      COUNTIF(       [$Build.$AJ8:.$BB8];       [$Systems.$A$2:.$A$176]      )=0     )    )*    (     ([$Systems.$H$2:.$H$176]=&quot;&quot;)     +     (      SUMPRODUCT(       COUNTIF(        [$Build.$AJ8:.$BB8];        [$Systems.$A$2:.$A$176]       )       *       ([$Systems.$H$2:.$H$176]&lt;&gt;&quot;&quot;)      )      &lt;      [$Build.$Z8]     )    )         );   COLUMN()-COLUMN([.$A58])+1  );  &quot;&quot; )">
            <text:p/>
          </table:table-cell>
        </table:table-row>
        <table:table-row table:style-name="ro2">
          <table:table-cell table:number-columns-repeated="54"/>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office:value-type="string" office:string-value="Servant-Class NHP" calcext:value-type="string">
            <text:p>Servant-Class NHP</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office:value-type="string" office:string-value="Student-Class NHP" calcext:value-type="string">
            <text:p>Student-Class NHP</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IF(ISNUMBER([$Build.$AI9]); [$Build.$AI9]; 0))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BC59])+1  );  &quot;&quot; )">
            <text:p/>
          </table:table-cell>
          <table:table-cell table:formula="of:=IFERROR(  INDEX(   COM.MICROSOFT.FILTER(    [$Systems.$A$2:.$A$176];    ([$Systems.$A$2:.$A$176]&lt;&gt;&quot;&quot;)    *    ([$Systems.$E$2:.$E$176]&lt;=[$Build.$Y9]-[$Build.$AI9])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A59])+1  );  &quot;&quot; )">
            <text:p/>
          </table:table-cell>
          <table:table-cell table:formula="of:=IFERROR(  INDEX(   COM.MICROSOFT.FILTER(    [$Systems.$A$2:.$A$176];    ([$Systems.$A$2:.$A$176]&lt;&gt;&quot;&quot;)    *    ([$Systems.$E$2:.$E$176]&lt;=[$Build.$Y9]-[$Build.$AI9])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A59])+1  );  &quot;&quot; )">
            <text:p/>
          </table:table-cell>
          <table:table-cell table:formula="of:=IFERROR(  INDEX(   COM.MICROSOFT.FILTER(    [$Systems.$A$2:.$A$176];    ([$Systems.$A$2:.$A$176]&lt;&gt;&quot;&quot;)    *    ([$Systems.$E$2:.$E$176]&lt;=[$Build.$Y9]-[$Build.$AI9])    *    (     ([$Systems.$B$2:.$B$176]=&quot;&quot;)     +     (      COUNTIF(       [$Build.$E$5:.$E9];       [$Systems.$B$2:.$B$176]      )&gt;0     )    )    *    (     ([$Systems.$C$2:.$C$176]=&quot;&quot;)     +     ([$Systems.$C$2:.$C$176]=[$Build.$F9])    )    *    (     ([$Systems.$D$2:.$D$176]=&quot;&quot;)     +     (      COUNTIF(       [$Build.$C$2:.$C9];       [$Systems.$D$2:.$D$176]      )&gt;0     )    )    *    (     ([$Systems.$G$2:.$G$176]=&quot;&quot;)     +     (      COUNTIF(       [$Build.$AJ9:.$BB9];       [$Systems.$A$2:.$A$176]      )=0     )    )*    (     ([$Systems.$H$2:.$H$176]=&quot;&quot;)     +     (      SUMPRODUCT(       COUNTIF(        [$Build.$AJ9:.$BB9];        [$Systems.$A$2:.$A$176]       )       *       ([$Systems.$H$2:.$H$176]&lt;&gt;&quot;&quot;)      )      &lt;      [$Build.$Z9]     )    )         );   COLUMN()-COLUMN([.$A59])+1  );  &quot;&quot; )">
            <text:p/>
          </table:table-cell>
        </table:table-row>
        <table:table-row table:style-name="ro2">
          <table:table-cell table:number-columns-repeated="54"/>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office:value-type="string" office:string-value="Servant-Class NHP" calcext:value-type="string">
            <text:p>Servant-Class NHP</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office:value-type="string" office:string-value="Student-Class NHP" calcext:value-type="string">
            <text:p>Student-Class NHP</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office:value-type="string" office:string-value="Custom Paint Job" calcext:value-type="string">
            <text:p>Custom Paint Job</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office:value-type="string" office:string-value="EVA Module" calcext:value-type="string">
            <text:p>EVA Module</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office:value-type="string" office:string-value="Expanded Compartment" calcext:value-type="string">
            <text:p>Expanded Compartment</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office:value-type="string" office:string-value="Manipulators" calcext:value-type="string">
            <text:p>Manipulators</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office:value-type="string" office:string-value="Personalizations" calcext:value-type="string">
            <text:p>Personalizations</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office:value-type="string" office:string-value="Scanner Swarm" calcext:value-type="string">
            <text:p>Scanner Swarm</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IF(ISNUMBER([$Build.$AI10]); [$Build.$AI10]; 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BC60])+1  );  &quot;&quot; )">
            <text:p/>
          </table:table-cell>
          <table:table-cell table:formula="of:=IFERROR(  INDEX(   COM.MICROSOFT.FILTER(    [$Systems.$A$2:.$A$176];    ([$Systems.$A$2:.$A$176]&lt;&gt;&quot;&quot;)    *    ([$Systems.$E$2:.$E$176]&lt;=[$Build.$Y10]-[$Build.$AI1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A60])+1  );  &quot;&quot; )">
            <text:p/>
          </table:table-cell>
          <table:table-cell table:formula="of:=IFERROR(  INDEX(   COM.MICROSOFT.FILTER(    [$Systems.$A$2:.$A$176];    ([$Systems.$A$2:.$A$176]&lt;&gt;&quot;&quot;)    *    ([$Systems.$E$2:.$E$176]&lt;=[$Build.$Y10]-[$Build.$AI1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A60])+1  );  &quot;&quot; )">
            <text:p/>
          </table:table-cell>
          <table:table-cell table:formula="of:=IFERROR(  INDEX(   COM.MICROSOFT.FILTER(    [$Systems.$A$2:.$A$176];    ([$Systems.$A$2:.$A$176]&lt;&gt;&quot;&quot;)    *    ([$Systems.$E$2:.$E$176]&lt;=[$Build.$Y10]-[$Build.$AI10])    *    (     ([$Systems.$B$2:.$B$176]=&quot;&quot;)     +     (      COUNTIF(       [$Build.$E$5:.$E10];       [$Systems.$B$2:.$B$176]      )&gt;0     )    )    *    (     ([$Systems.$C$2:.$C$176]=&quot;&quot;)     +     ([$Systems.$C$2:.$C$176]=[$Build.$F10])    )    *    (     ([$Systems.$D$2:.$D$176]=&quot;&quot;)     +     (      COUNTIF(       [$Build.$C$2:.$C10];       [$Systems.$D$2:.$D$176]      )&gt;0     )    )    *    (     ([$Systems.$G$2:.$G$176]=&quot;&quot;)     +     (      COUNTIF(       [$Build.$AJ10:.$BB10];       [$Systems.$A$2:.$A$176]      )=0     )    )*    (     ([$Systems.$H$2:.$H$176]=&quot;&quot;)     +     (      SUMPRODUCT(       COUNTIF(        [$Build.$AJ10:.$BB10];        [$Systems.$A$2:.$A$176]       )       *       ([$Systems.$H$2:.$H$176]&lt;&gt;&quot;&quot;)      )      &lt;      [$Build.$Z10]     )    )         );   COLUMN()-COLUMN([.$A60])+1  );  &quot;&quot; )">
            <text:p/>
          </table:table-cell>
        </table:table-row>
        <table:table-row table:style-name="ro2">
          <table:table-cell table:number-columns-repeated="54"/>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office:value-type="string" office:string-value="Servant-Class NHP" calcext:value-type="string">
            <text:p>Servant-Class NHP</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office:value-type="string" office:string-value="Student-Class NHP" calcext:value-type="string">
            <text:p>Student-Class NHP</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IF(ISNUMBER([$Build.$AI11]); [$Build.$AI11]; 0))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BC61])+1  );  &quot;&quot; )">
            <text:p/>
          </table:table-cell>
          <table:table-cell table:formula="of:=IFERROR(  INDEX(   COM.MICROSOFT.FILTER(    [$Systems.$A$2:.$A$176];    ([$Systems.$A$2:.$A$176]&lt;&gt;&quot;&quot;)    *    ([$Systems.$E$2:.$E$176]&lt;=[$Build.$Y11]-[$Build.$AI11])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A61])+1  );  &quot;&quot; )">
            <text:p/>
          </table:table-cell>
          <table:table-cell table:formula="of:=IFERROR(  INDEX(   COM.MICROSOFT.FILTER(    [$Systems.$A$2:.$A$176];    ([$Systems.$A$2:.$A$176]&lt;&gt;&quot;&quot;)    *    ([$Systems.$E$2:.$E$176]&lt;=[$Build.$Y11]-[$Build.$AI11])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A61])+1  );  &quot;&quot; )">
            <text:p/>
          </table:table-cell>
          <table:table-cell table:formula="of:=IFERROR(  INDEX(   COM.MICROSOFT.FILTER(    [$Systems.$A$2:.$A$176];    ([$Systems.$A$2:.$A$176]&lt;&gt;&quot;&quot;)    *    ([$Systems.$E$2:.$E$176]&lt;=[$Build.$Y11]-[$Build.$AI11])    *    (     ([$Systems.$B$2:.$B$176]=&quot;&quot;)     +     (      COUNTIF(       [$Build.$E$5:.$E11];       [$Systems.$B$2:.$B$176]      )&gt;0     )    )    *    (     ([$Systems.$C$2:.$C$176]=&quot;&quot;)     +     ([$Systems.$C$2:.$C$176]=[$Build.$F11])    )    *    (     ([$Systems.$D$2:.$D$176]=&quot;&quot;)     +     (      COUNTIF(       [$Build.$C$2:.$C11];       [$Systems.$D$2:.$D$176]      )&gt;0     )    )    *    (     ([$Systems.$G$2:.$G$176]=&quot;&quot;)     +     (      COUNTIF(       [$Build.$AJ11:.$BB11];       [$Systems.$A$2:.$A$176]      )=0     )    )*    (     ([$Systems.$H$2:.$H$176]=&quot;&quot;)     +     (      SUMPRODUCT(       COUNTIF(        [$Build.$AJ11:.$BB11];        [$Systems.$A$2:.$A$176]       )       *       ([$Systems.$H$2:.$H$176]&lt;&gt;&quot;&quot;)      )      &lt;      [$Build.$Z11]     )    )         );   COLUMN()-COLUMN([.$A61])+1  );  &quot;&quot; )">
            <text:p/>
          </table:table-cell>
        </table:table-row>
        <table:table-row table:style-name="ro2">
          <table:table-cell table:number-columns-repeated="54"/>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office:value-type="string" office:string-value="Servant-Class NHP" calcext:value-type="string">
            <text:p>Servant-Class NHP</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office:value-type="string" office:string-value="Student-Class NHP" calcext:value-type="string">
            <text:p>Student-Class NHP</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office:value-type="string" office:string-value="Custom Paint Job" calcext:value-type="string">
            <text:p>Custom Paint Job</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office:value-type="string" office:string-value="EVA Module" calcext:value-type="string">
            <text:p>EVA Module</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office:value-type="string" office:string-value="Expanded Compartment" calcext:value-type="string">
            <text:p>Expanded Compartment</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office:value-type="string" office:string-value="Manipulators" calcext:value-type="string">
            <text:p>Manipulators</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office:value-type="string" office:string-value="Personalizations" calcext:value-type="string">
            <text:p>Personalizations</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office:value-type="string" office:string-value="Scanner Swarm" calcext:value-type="string">
            <text:p>Scanner Swarm</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IF(ISNUMBER([$Build.$AI12]); [$Build.$AI12]; 0))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BC62])+1  );  &quot;&quot; )">
            <text:p/>
          </table:table-cell>
          <table:table-cell table:formula="of:=IFERROR(  INDEX(   COM.MICROSOFT.FILTER(    [$Systems.$A$2:.$A$176];    ([$Systems.$A$2:.$A$176]&lt;&gt;&quot;&quot;)    *    ([$Systems.$E$2:.$E$176]&lt;=[$Build.$Y12]-[$Build.$AI12])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A62])+1  );  &quot;&quot; )">
            <text:p/>
          </table:table-cell>
          <table:table-cell table:formula="of:=IFERROR(  INDEX(   COM.MICROSOFT.FILTER(    [$Systems.$A$2:.$A$176];    ([$Systems.$A$2:.$A$176]&lt;&gt;&quot;&quot;)    *    ([$Systems.$E$2:.$E$176]&lt;=[$Build.$Y12]-[$Build.$AI12])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A62])+1  );  &quot;&quot; )">
            <text:p/>
          </table:table-cell>
          <table:table-cell table:formula="of:=IFERROR(  INDEX(   COM.MICROSOFT.FILTER(    [$Systems.$A$2:.$A$176];    ([$Systems.$A$2:.$A$176]&lt;&gt;&quot;&quot;)    *    ([$Systems.$E$2:.$E$176]&lt;=[$Build.$Y12]-[$Build.$AI12])    *    (     ([$Systems.$B$2:.$B$176]=&quot;&quot;)     +     (      COUNTIF(       [$Build.$E$5:.$E12];       [$Systems.$B$2:.$B$176]      )&gt;0     )    )    *    (     ([$Systems.$C$2:.$C$176]=&quot;&quot;)     +     ([$Systems.$C$2:.$C$176]=[$Build.$F12])    )    *    (     ([$Systems.$D$2:.$D$176]=&quot;&quot;)     +     (      COUNTIF(       [$Build.$C$2:.$C12];       [$Systems.$D$2:.$D$176]      )&gt;0     )    )    *    (     ([$Systems.$G$2:.$G$176]=&quot;&quot;)     +     (      COUNTIF(       [$Build.$AJ12:.$BB12];       [$Systems.$A$2:.$A$176]      )=0     )    )*    (     ([$Systems.$H$2:.$H$176]=&quot;&quot;)     +     (      SUMPRODUCT(       COUNTIF(        [$Build.$AJ12:.$BB12];        [$Systems.$A$2:.$A$176]       )       *       ([$Systems.$H$2:.$H$176]&lt;&gt;&quot;&quot;)      )      &lt;      [$Build.$Z12]     )    )         );   COLUMN()-COLUMN([.$A62])+1  );  &quot;&quot; )">
            <text:p/>
          </table:table-cell>
        </table:table-row>
        <table:table-row table:style-name="ro2">
          <table:table-cell table:number-columns-repeated="54"/>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office:value-type="string" office:string-value="Servant-Class NHP" calcext:value-type="string">
            <text:p>Servant-Class NHP</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office:value-type="string" office:string-value="Student-Class NHP" calcext:value-type="string">
            <text:p>Student-Class NHP</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IF(ISNUMBER([$Build.$AI13]); [$Build.$AI13]; 0))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BC63])+1  );  &quot;&quot; )">
            <text:p/>
          </table:table-cell>
          <table:table-cell table:formula="of:=IFERROR(  INDEX(   COM.MICROSOFT.FILTER(    [$Systems.$A$2:.$A$176];    ([$Systems.$A$2:.$A$176]&lt;&gt;&quot;&quot;)    *    ([$Systems.$E$2:.$E$176]&lt;=[$Build.$Y13]-[$Build.$AI13])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A63])+1  );  &quot;&quot; )">
            <text:p/>
          </table:table-cell>
          <table:table-cell table:formula="of:=IFERROR(  INDEX(   COM.MICROSOFT.FILTER(    [$Systems.$A$2:.$A$176];    ([$Systems.$A$2:.$A$176]&lt;&gt;&quot;&quot;)    *    ([$Systems.$E$2:.$E$176]&lt;=[$Build.$Y13]-[$Build.$AI13])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A63])+1  );  &quot;&quot; )">
            <text:p/>
          </table:table-cell>
          <table:table-cell table:formula="of:=IFERROR(  INDEX(   COM.MICROSOFT.FILTER(    [$Systems.$A$2:.$A$176];    ([$Systems.$A$2:.$A$176]&lt;&gt;&quot;&quot;)    *    ([$Systems.$E$2:.$E$176]&lt;=[$Build.$Y13]-[$Build.$AI13])    *    (     ([$Systems.$B$2:.$B$176]=&quot;&quot;)     +     (      COUNTIF(       [$Build.$E$5:.$E13];       [$Systems.$B$2:.$B$176]      )&gt;0     )    )    *    (     ([$Systems.$C$2:.$C$176]=&quot;&quot;)     +     ([$Systems.$C$2:.$C$176]=[$Build.$F13])    )    *    (     ([$Systems.$D$2:.$D$176]=&quot;&quot;)     +     (      COUNTIF(       [$Build.$C$2:.$C13];       [$Systems.$D$2:.$D$176]      )&gt;0     )    )    *    (     ([$Systems.$G$2:.$G$176]=&quot;&quot;)     +     (      COUNTIF(       [$Build.$AJ13:.$BB13];       [$Systems.$A$2:.$A$176]      )=0     )    )*    (     ([$Systems.$H$2:.$H$176]=&quot;&quot;)     +     (      SUMPRODUCT(       COUNTIF(        [$Build.$AJ13:.$BB13];        [$Systems.$A$2:.$A$176]       )       *       ([$Systems.$H$2:.$H$176]&lt;&gt;&quot;&quot;)      )      &lt;      [$Build.$Z13]     )    )         );   COLUMN()-COLUMN([.$A63])+1  );  &quot;&quot; )">
            <text:p/>
          </table:table-cell>
        </table:table-row>
        <table:table-row table:style-name="ro2">
          <table:table-cell table:number-columns-repeated="54"/>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office:value-type="string" office:string-value="Servant-Class NHP" calcext:value-type="string">
            <text:p>Servant-Class NHP</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office:value-type="string" office:string-value="Student-Class NHP" calcext:value-type="string">
            <text:p>Student-Class NHP</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office:value-type="string" office:string-value="Armament Redundancy" calcext:value-type="string">
            <text:p>Armament Redundancy</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office:value-type="string" office:string-value="Custom Paint Job" calcext:value-type="string">
            <text:p>Custom Paint Job</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office:value-type="string" office:string-value="EVA Module" calcext:value-type="string">
            <text:p>EVA Module</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office:value-type="string" office:string-value="Expanded Compartment" calcext:value-type="string">
            <text:p>Expanded Compartment</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office:value-type="string" office:string-value="Manipulators" calcext:value-type="string">
            <text:p>Manipulators</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office:value-type="string" office:string-value="Personalizations" calcext:value-type="string">
            <text:p>Personalizations</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office:value-type="string" office:string-value="Scanner Swarm" calcext:value-type="string">
            <text:p>Scanner Swarm</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IF(ISNUMBER([$Build.$AI14]); [$Build.$AI14]; 0))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BC64])+1  );  &quot;&quot; )">
            <text:p/>
          </table:table-cell>
          <table:table-cell table:formula="of:=IFERROR(  INDEX(   COM.MICROSOFT.FILTER(    [$Systems.$A$2:.$A$176];    ([$Systems.$A$2:.$A$176]&lt;&gt;&quot;&quot;)    *    ([$Systems.$E$2:.$E$176]&lt;=[$Build.$Y14]-[$Build.$AI14])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A64])+1  );  &quot;&quot; )">
            <text:p/>
          </table:table-cell>
          <table:table-cell table:formula="of:=IFERROR(  INDEX(   COM.MICROSOFT.FILTER(    [$Systems.$A$2:.$A$176];    ([$Systems.$A$2:.$A$176]&lt;&gt;&quot;&quot;)    *    ([$Systems.$E$2:.$E$176]&lt;=[$Build.$Y14]-[$Build.$AI14])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A64])+1  );  &quot;&quot; )">
            <text:p/>
          </table:table-cell>
          <table:table-cell table:formula="of:=IFERROR(  INDEX(   COM.MICROSOFT.FILTER(    [$Systems.$A$2:.$A$176];    ([$Systems.$A$2:.$A$176]&lt;&gt;&quot;&quot;)    *    ([$Systems.$E$2:.$E$176]&lt;=[$Build.$Y14]-[$Build.$AI14])    *    (     ([$Systems.$B$2:.$B$176]=&quot;&quot;)     +     (      COUNTIF(       [$Build.$E$5:.$E14];       [$Systems.$B$2:.$B$176]      )&gt;0     )    )    *    (     ([$Systems.$C$2:.$C$176]=&quot;&quot;)     +     ([$Systems.$C$2:.$C$176]=[$Build.$F14])    )    *    (     ([$Systems.$D$2:.$D$176]=&quot;&quot;)     +     (      COUNTIF(       [$Build.$C$2:.$C14];       [$Systems.$D$2:.$D$176]      )&gt;0     )    )    *    (     ([$Systems.$G$2:.$G$176]=&quot;&quot;)     +     (      COUNTIF(       [$Build.$AJ14:.$BB14];       [$Systems.$A$2:.$A$176]      )=0     )    )*    (     ([$Systems.$H$2:.$H$176]=&quot;&quot;)     +     (      SUMPRODUCT(       COUNTIF(        [$Build.$AJ14:.$BB14];        [$Systems.$A$2:.$A$176]       )       *       ([$Systems.$H$2:.$H$176]&lt;&gt;&quot;&quot;)      )      &lt;      [$Build.$Z14]     )    )         );   COLUMN()-COLUMN([.$A64])+1  );  &quot;&quot; )">
            <text:p/>
          </table:table-cell>
        </table:table-row>
        <table:table-row table:style-name="ro2">
          <table:table-cell table:number-columns-repeated="54"/>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office:value-type="string" office:string-value="Servant-Class NHP" calcext:value-type="string">
            <text:p>Servant-Class NHP</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office:value-type="string" office:string-value="Student-Class NHP" calcext:value-type="string">
            <text:p>Student-Class NHP</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office:value-type="string" office:string-value="Armament Redundancy" calcext:value-type="string">
            <text:p>Armament Redundancy</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office:value-type="string" office:string-value="Custom Paint Job" calcext:value-type="string">
            <text:p>Custom Paint Job</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office:value-type="string" office:string-value="EVA Module" calcext:value-type="string">
            <text:p>EVA Module</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office:value-type="string" office:string-value="Expanded Compartment" calcext:value-type="string">
            <text:p>Expanded Compartment</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office:value-type="string" office:string-value="Manipulators" calcext:value-type="string">
            <text:p>Manipulators</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office:value-type="string" office:string-value="Personalizations" calcext:value-type="string">
            <text:p>Personalizations</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office:value-type="string" office:string-value="Scanner Swarm" calcext:value-type="string">
            <text:p>Scanner Swarm</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IF(ISNUMBER([$Build.$AI15]); [$Build.$AI15]; 0))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BC65])+1  );  &quot;&quot; )">
            <text:p/>
          </table:table-cell>
          <table:table-cell table:formula="of:=IFERROR(  INDEX(   COM.MICROSOFT.FILTER(    [$Systems.$A$2:.$A$176];    ([$Systems.$A$2:.$A$176]&lt;&gt;&quot;&quot;)    *    ([$Systems.$E$2:.$E$176]&lt;=[$Build.$Y15]-[$Build.$AI15])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A65])+1  );  &quot;&quot; )">
            <text:p/>
          </table:table-cell>
          <table:table-cell table:formula="of:=IFERROR(  INDEX(   COM.MICROSOFT.FILTER(    [$Systems.$A$2:.$A$176];    ([$Systems.$A$2:.$A$176]&lt;&gt;&quot;&quot;)    *    ([$Systems.$E$2:.$E$176]&lt;=[$Build.$Y15]-[$Build.$AI15])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A65])+1  );  &quot;&quot; )">
            <text:p/>
          </table:table-cell>
          <table:table-cell table:formula="of:=IFERROR(  INDEX(   COM.MICROSOFT.FILTER(    [$Systems.$A$2:.$A$176];    ([$Systems.$A$2:.$A$176]&lt;&gt;&quot;&quot;)    *    ([$Systems.$E$2:.$E$176]&lt;=[$Build.$Y15]-[$Build.$AI15])    *    (     ([$Systems.$B$2:.$B$176]=&quot;&quot;)     +     (      COUNTIF(       [$Build.$E$5:.$E15];       [$Systems.$B$2:.$B$176]      )&gt;0     )    )    *    (     ([$Systems.$C$2:.$C$176]=&quot;&quot;)     +     ([$Systems.$C$2:.$C$176]=[$Build.$F15])    )    *    (     ([$Systems.$D$2:.$D$176]=&quot;&quot;)     +     (      COUNTIF(       [$Build.$C$2:.$C15];       [$Systems.$D$2:.$D$176]      )&gt;0     )    )    *    (     ([$Systems.$G$2:.$G$176]=&quot;&quot;)     +     (      COUNTIF(       [$Build.$AJ15:.$BB15];       [$Systems.$A$2:.$A$176]      )=0     )    )*    (     ([$Systems.$H$2:.$H$176]=&quot;&quot;)     +     (      SUMPRODUCT(       COUNTIF(        [$Build.$AJ15:.$BB15];        [$Systems.$A$2:.$A$176]       )       *       ([$Systems.$H$2:.$H$176]&lt;&gt;&quot;&quot;)      )      &lt;      [$Build.$Z15]     )    )         );   COLUMN()-COLUMN([.$A65])+1  );  &quot;&quot; )">
            <text:p/>
          </table:table-cell>
        </table:table-row>
        <table:table-row table:style-name="ro2">
          <table:table-cell table:number-columns-repeated="54"/>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Servant-Class NHP" calcext:value-type="string">
            <text:p>Servant-Class NHP</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Student-Class NHP" calcext:value-type="string">
            <text:p>Student-Class NHP</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Armament Redundancy" calcext:value-type="string">
            <text:p>Armament Redundancy</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COMP/CON-Class Assistant Unit" calcext:value-type="string">
            <text:p>COMP/CON-Class Assistant Unit</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Custom Paint Job" calcext:value-type="string">
            <text:p>Custom Paint Job</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EVA Module" calcext:value-type="string">
            <text:p>EVA Module</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Expanded Compartment" calcext:value-type="string">
            <text:p>Expanded Compartment</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Manipulators" calcext:value-type="string">
            <text:p>Manipulators</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Pattern-A Jericho Deployable Cover" calcext:value-type="string">
            <text:p>Pattern-A Jericho Deployable Cover</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Pattern-A Smoke Charges" calcext:value-type="string">
            <text:p>Pattern-A Smoke Charges</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Pattern-B Hex Charges" calcext:value-type="string">
            <text:p>Pattern-B Hex Charges</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Personalizations" calcext:value-type="string">
            <text:p>Personalizations</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Rapid Burst Jump Jet Systems" calcext:value-type="string">
            <text:p>Rapid Burst Jump Jet Systems</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Stable Structure" calcext:value-type="string">
            <text:p>Stable Structure</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Turret Drones" calcext:value-type="string">
            <text:p>Turret Drones</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Type-3 Projected Shield" calcext:value-type="string">
            <text:p>Type-3 Projected Shield</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Hive Drone" calcext:value-type="string">
            <text:p>Hive Drone</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Nanocomposite Adaptation" calcext:value-type="string">
            <text:p>Nanocomposite Adaptation</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Scanner Swarm" calcext:value-type="string">
            <text:p>Scanner Swarm</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Core Siphon" calcext:value-type="string">
            <text:p>Core Siphon</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Kinetic Compensator" calcext:value-type="string">
            <text:p>Kinetic Compensator</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Tracking Bug" calcext:value-type="string">
            <text:p>Tracking Bug</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Metahook" calcext:value-type="string">
            <text:p>Metahook</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Hunter Lock" calcext:value-type="string">
            <text:p>Hunter Lock</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Lotus Projector" calcext:value-type="string">
            <text:p>Lotus Projector</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Markerlight" calcext:value-type="string">
            <text:p>Markerlight</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office:value-type="string" office:string-value="Retractable Profile" calcext:value-type="string">
            <text:p>Retractable Profile</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IF(ISNUMBER([$Build.$AI16]); [$Build.$AI16]; 0))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BC66])+1  );  &quot;&quot; )">
            <text:p/>
          </table:table-cell>
          <table:table-cell table:formula="of:=IFERROR(  INDEX(   COM.MICROSOFT.FILTER(    [$Systems.$A$2:.$A$176];    ([$Systems.$A$2:.$A$176]&lt;&gt;&quot;&quot;)    *    ([$Systems.$E$2:.$E$176]&lt;=[$Build.$Y16]-[$Build.$AI16])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A66])+1  );  &quot;&quot; )">
            <text:p/>
          </table:table-cell>
          <table:table-cell table:formula="of:=IFERROR(  INDEX(   COM.MICROSOFT.FILTER(    [$Systems.$A$2:.$A$176];    ([$Systems.$A$2:.$A$176]&lt;&gt;&quot;&quot;)    *    ([$Systems.$E$2:.$E$176]&lt;=[$Build.$Y16]-[$Build.$AI16])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A66])+1  );  &quot;&quot; )">
            <text:p/>
          </table:table-cell>
          <table:table-cell table:formula="of:=IFERROR(  INDEX(   COM.MICROSOFT.FILTER(    [$Systems.$A$2:.$A$176];    ([$Systems.$A$2:.$A$176]&lt;&gt;&quot;&quot;)    *    ([$Systems.$E$2:.$E$176]&lt;=[$Build.$Y16]-[$Build.$AI16])    *    (     ([$Systems.$B$2:.$B$176]=&quot;&quot;)     +     (      COUNTIF(       [$Build.$E$5:.$E16];       [$Systems.$B$2:.$B$176]      )&gt;0     )    )    *    (     ([$Systems.$C$2:.$C$176]=&quot;&quot;)     +     ([$Systems.$C$2:.$C$176]=[$Build.$F16])    )    *    (     ([$Systems.$D$2:.$D$176]=&quot;&quot;)     +     (      COUNTIF(       [$Build.$C$2:.$C16];       [$Systems.$D$2:.$D$176]      )&gt;0     )    )    *    (     ([$Systems.$G$2:.$G$176]=&quot;&quot;)     +     (      COUNTIF(       [$Build.$AJ16:.$BB16];       [$Systems.$A$2:.$A$176]      )=0     )    )*    (     ([$Systems.$H$2:.$H$176]=&quot;&quot;)     +     (      SUMPRODUCT(       COUNTIF(        [$Build.$AJ16:.$BB16];        [$Systems.$A$2:.$A$176]       )       *       ([$Systems.$H$2:.$H$176]&lt;&gt;&quot;&quot;)      )      &lt;      [$Build.$Z16]     )    )         );   COLUMN()-COLUMN([.$A66])+1  );  &quot;&quot; )">
            <text:p/>
          </table:table-cell>
        </table:table-row>
        <table:table-row table:style-name="ro2">
          <table:table-cell table:number-columns-repeated="54"/>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office:value-type="string" office:string-value="Servant-Class NHP" calcext:value-type="string">
            <text:p>Servant-Class NHP</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office:value-type="string" office:string-value="Student-Class NHP" calcext:value-type="string">
            <text:p>Student-Class NHP</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IF(ISNUMBER([$Build.$AI17]); [$Build.$AI17]; 0))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BC67])+1  );  &quot;&quot; )">
            <text:p/>
          </table:table-cell>
          <table:table-cell table:formula="of:=IFERROR(  INDEX(   COM.MICROSOFT.FILTER(    [$Systems.$A$2:.$A$176];    ([$Systems.$A$2:.$A$176]&lt;&gt;&quot;&quot;)    *    ([$Systems.$E$2:.$E$176]&lt;=[$Build.$Y17]-[$Build.$AI17])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A67])+1  );  &quot;&quot; )">
            <text:p/>
          </table:table-cell>
          <table:table-cell table:formula="of:=IFERROR(  INDEX(   COM.MICROSOFT.FILTER(    [$Systems.$A$2:.$A$176];    ([$Systems.$A$2:.$A$176]&lt;&gt;&quot;&quot;)    *    ([$Systems.$E$2:.$E$176]&lt;=[$Build.$Y17]-[$Build.$AI17])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A67])+1  );  &quot;&quot; )">
            <text:p/>
          </table:table-cell>
          <table:table-cell table:formula="of:=IFERROR(  INDEX(   COM.MICROSOFT.FILTER(    [$Systems.$A$2:.$A$176];    ([$Systems.$A$2:.$A$176]&lt;&gt;&quot;&quot;)    *    ([$Systems.$E$2:.$E$176]&lt;=[$Build.$Y17]-[$Build.$AI17])    *    (     ([$Systems.$B$2:.$B$176]=&quot;&quot;)     +     (      COUNTIF(       [$Build.$E$5:.$E17];       [$Systems.$B$2:.$B$176]      )&gt;0     )    )    *    (     ([$Systems.$C$2:.$C$176]=&quot;&quot;)     +     ([$Systems.$C$2:.$C$176]=[$Build.$F17])    )    *    (     ([$Systems.$D$2:.$D$176]=&quot;&quot;)     +     (      COUNTIF(       [$Build.$C$2:.$C17];       [$Systems.$D$2:.$D$176]      )&gt;0     )    )    *    (     ([$Systems.$G$2:.$G$176]=&quot;&quot;)     +     (      COUNTIF(       [$Build.$AJ17:.$BB17];       [$Systems.$A$2:.$A$176]      )=0     )    )*    (     ([$Systems.$H$2:.$H$176]=&quot;&quot;)     +     (      SUMPRODUCT(       COUNTIF(        [$Build.$AJ17:.$BB17];        [$Systems.$A$2:.$A$176]       )       *       ([$Systems.$H$2:.$H$176]&lt;&gt;&quot;&quot;)      )      &lt;      [$Build.$Z17]     )    )         );   COLUMN()-COLUMN([.$A67])+1  );  &quot;&quot; )">
            <text:p/>
          </table:table-cell>
        </table:table-row>
        <table:table-row table:style-name="ro2">
          <table:table-cell table:number-columns-repeated="184"/>
        </table:table-row>
        <table:table-row table:style-name="ro2">
          <table:table-cell table:number-columns-repeated="54"/>
          <table:table-cell office:value-type="string" calcext:value-type="string">
            <text:p>Bonus Management</text:p>
          </table:table-cell>
          <table:table-cell table:number-columns-repeated="129"/>
        </table:table-row>
        <table:table-row table:style-name="ro2">
          <table:table-cell table:number-columns-repeated="54"/>
          <table:table-cell table:style-name="ce47" office:value-type="string" calcext:value-type="string">
            <text:p>HP-Bonus</text:p>
          </table:table-cell>
          <table:table-cell office:value-type="string" calcext:value-type="string">
            <text:p>Armor-Bonus</text:p>
          </table:table-cell>
          <table:table-cell office:value-type="string" calcext:value-type="string">
            <text:p>Heat-Cap-Bonus</text:p>
          </table:table-cell>
          <table:table-cell table:style-name="ce47" office:value-type="string" calcext:value-type="string">
            <text:p>Evasion-Bonus</text:p>
          </table:table-cell>
          <table:table-cell office:value-type="string" calcext:value-type="string">
            <text:p>Speed-Bonus</text:p>
          </table:table-cell>
          <table:table-cell office:value-type="string" calcext:value-type="string">
            <text:p>E-Def-Bonus</text:p>
          </table:table-cell>
          <table:table-cell office:value-type="string" calcext:value-type="string">
            <text:p>Tech-Atk-Bonus</text:p>
          </table:table-cell>
          <table:table-cell office:value-type="string" calcext:value-type="string">
            <text:p>Sensors-Bonus</text:p>
          </table:table-cell>
          <table:table-cell office:value-type="string" calcext:value-type="string">
            <text:p>Rep-Cap-Bonus</text:p>
          </table:table-cell>
          <table:table-cell office:value-type="string" calcext:value-type="string">
            <text:p>Save-Tgt-Bonus</text:p>
          </table:table-cell>
          <table:table-cell office:value-type="string" calcext:value-type="string">
            <text:p>SP-Bonus</text:p>
          </table:table-cell>
          <table:table-cell office:value-type="string" calcext:value-type="string">
            <text:p>AI-Cap-Bonus</text:p>
          </table:table-cell>
          <table:table-cell table:number-columns-repeated="118"/>
        </table:table-row>
        <table:table-row table:style-name="ro2">
          <table:table-cell table:number-columns-repeated="54"/>
          <table:table-cell table:style-name="ce47" table:formula="of:=SUMIFS([$'Core Bonuses'.$F$2:.$F$200]; [$'Core Bonuses'.$E$2:.$E$200]; [.BC$70]; [$'Core Bonuses'.$A$2:.$A$200]; &quot;^(&quot;&amp;COM.MICROSOFT.TEXTJOIN(&quot;|&quot;;1;[$Build.$G$2:.$G5])&amp;&quot;)$&quot;)+&#10;SUMIFS([$Systems.$M$2:.$M$200]; [$Systems.$L$2:.$L$200]; [.BC$70]; [$Systems.$A$2:.$A$200]; &quot;^(&quot;&amp;COM.MICROSOFT.TEXTJOIN(&quot;|&quot;;1;[$Build.$AJ5:.$AZ5])&amp;&quot;)$&quot;)" office:value-type="float" office:value="0" calcext:value-type="float">
            <text:p>0</text:p>
          </table:table-cell>
          <table:table-cell table:style-name="ce47" table:formula="of:=SUMIFS([$'Core Bonuses'.$F$2:.$F$200]; [$'Core Bonuses'.$E$2:.$E$200]; [.BD$70]; [$'Core Bonuses'.$A$2:.$A$200]; &quot;^(&quot;&amp;COM.MICROSOFT.TEXTJOIN(&quot;|&quot;;1;[$Build.$G$2:.$G5])&amp;&quot;)$&quot;)+&#10;SUMIFS([$Systems.$M$2:.$M$200]; [$Systems.$L$2:.$L$200]; [.BD$70]; [$Systems.$A$2:.$A$200]; &quot;^(&quot;&amp;COM.MICROSOFT.TEXTJOIN(&quot;|&quot;;1;[$Build.$AJ5:.$AZ5])&amp;&quot;)$&quot;)" office:value-type="float" office:value="0" calcext:value-type="float">
            <text:p>0</text:p>
          </table:table-cell>
          <table:table-cell table:style-name="ce47" table:formula="of:=SUMIFS([$'Core Bonuses'.$F$2:.$F$200]; [$'Core Bonuses'.$E$2:.$E$200]; [.BE$70]; [$'Core Bonuses'.$A$2:.$A$200]; &quot;^(&quot;&amp;COM.MICROSOFT.TEXTJOIN(&quot;|&quot;;1;[$Build.$G$2:.$G5])&amp;&quot;)$&quot;)+&#10;SUMIFS([$Systems.$M$2:.$M$200]; [$Systems.$L$2:.$L$200]; [.BE$70]; [$Systems.$A$2:.$A$200]; &quot;^(&quot;&amp;COM.MICROSOFT.TEXTJOIN(&quot;|&quot;;1;[$Build.$AJ5:.$AZ5])&amp;&quot;)$&quot;)" office:value-type="float" office:value="0" calcext:value-type="float">
            <text:p>0</text:p>
          </table:table-cell>
          <table:table-cell table:style-name="ce47" table:formula="of:=SUMIFS([$'Core Bonuses'.$F$2:.$F$200]; [$'Core Bonuses'.$E$2:.$E$200]; [.BF$70]; [$'Core Bonuses'.$A$2:.$A$200]; &quot;^(&quot;&amp;COM.MICROSOFT.TEXTJOIN(&quot;|&quot;;1;[$Build.$G$2:.$G5])&amp;&quot;)$&quot;)+&#10;SUMIFS([$Systems.$M$2:.$M$200]; [$Systems.$L$2:.$L$200]; [.BF$70]; [$Systems.$A$2:.$A$200]; &quot;^(&quot;&amp;COM.MICROSOFT.TEXTJOIN(&quot;|&quot;;1;[$Build.$AJ5:.$AZ5])&amp;&quot;)$&quot;)" office:value-type="float" office:value="0" calcext:value-type="float">
            <text:p>0</text:p>
          </table:table-cell>
          <table:table-cell table:style-name="ce47" table:formula="of:=SUMIFS([$'Core Bonuses'.$F$2:.$F$200]; [$'Core Bonuses'.$E$2:.$E$200]; [.BG$70]; [$'Core Bonuses'.$A$2:.$A$200]; &quot;^(&quot;&amp;COM.MICROSOFT.TEXTJOIN(&quot;|&quot;;1;[$Build.$G$2:.$G5])&amp;&quot;)$&quot;)+&#10;SUMIFS([$Systems.$M$2:.$M$200]; [$Systems.$L$2:.$L$200]; [.BG$70]; [$Systems.$A$2:.$A$200]; &quot;^(&quot;&amp;COM.MICROSOFT.TEXTJOIN(&quot;|&quot;;1;[$Build.$AJ5:.$AZ5])&amp;&quot;)$&quot;)" office:value-type="float" office:value="0" calcext:value-type="float">
            <text:p>0</text:p>
          </table:table-cell>
          <table:table-cell table:style-name="ce47" table:formula="of:=SUMIFS([$'Core Bonuses'.$F$2:.$F$200]; [$'Core Bonuses'.$E$2:.$E$200]; [.BH$70]; [$'Core Bonuses'.$A$2:.$A$200]; &quot;^(&quot;&amp;COM.MICROSOFT.TEXTJOIN(&quot;|&quot;;1;[$Build.$G$2:.$G5])&amp;&quot;)$&quot;)+&#10;SUMIFS([$Systems.$M$2:.$M$200]; [$Systems.$L$2:.$L$200]; [.BH$70]; [$Systems.$A$2:.$A$200]; &quot;^(&quot;&amp;COM.MICROSOFT.TEXTJOIN(&quot;|&quot;;1;[$Build.$AJ5:.$AZ5])&amp;&quot;)$&quot;)" office:value-type="float" office:value="0" calcext:value-type="float">
            <text:p>0</text:p>
          </table:table-cell>
          <table:table-cell table:style-name="ce47" table:formula="of:=SUMIFS([$'Core Bonuses'.$F$2:.$F$200]; [$'Core Bonuses'.$E$2:.$E$200]; [.BI$70]; [$'Core Bonuses'.$A$2:.$A$200]; &quot;^(&quot;&amp;COM.MICROSOFT.TEXTJOIN(&quot;|&quot;;1;[$Build.$G$2:.$G5])&amp;&quot;)$&quot;)+&#10;SUMIFS([$Systems.$M$2:.$M$200]; [$Systems.$L$2:.$L$200]; [.BI$70]; [$Systems.$A$2:.$A$200]; &quot;^(&quot;&amp;COM.MICROSOFT.TEXTJOIN(&quot;|&quot;;1;[$Build.$AJ5:.$AZ5])&amp;&quot;)$&quot;)" office:value-type="float" office:value="0" calcext:value-type="float">
            <text:p>0</text:p>
          </table:table-cell>
          <table:table-cell table:style-name="ce47" table:formula="of:=SUMIFS([$'Core Bonuses'.$F$2:.$F$200]; [$'Core Bonuses'.$E$2:.$E$200]; [.BJ$70]; [$'Core Bonuses'.$A$2:.$A$200]; &quot;^(&quot;&amp;COM.MICROSOFT.TEXTJOIN(&quot;|&quot;;1;[$Build.$G$2:.$G5])&amp;&quot;)$&quot;)+&#10;SUMIFS([$Systems.$M$2:.$M$200]; [$Systems.$L$2:.$L$200]; [.BJ$70]; [$Systems.$A$2:.$A$200]; &quot;^(&quot;&amp;COM.MICROSOFT.TEXTJOIN(&quot;|&quot;;1;[$Build.$AJ5:.$AZ5])&amp;&quot;)$&quot;)" office:value-type="float" office:value="0" calcext:value-type="float">
            <text:p>0</text:p>
          </table:table-cell>
          <table:table-cell table:style-name="ce47" table:formula="of:=SUMIFS([$'Core Bonuses'.$F$2:.$F$200]; [$'Core Bonuses'.$E$2:.$E$200]; [.BK$70]; [$'Core Bonuses'.$A$2:.$A$200]; &quot;^(&quot;&amp;COM.MICROSOFT.TEXTJOIN(&quot;|&quot;;1;[$Build.$G$2:.$G5])&amp;&quot;)$&quot;)+&#10;SUMIFS([$Systems.$M$2:.$M$200]; [$Systems.$L$2:.$L$200]; [.BK$70]; [$Systems.$A$2:.$A$200]; &quot;^(&quot;&amp;COM.MICROSOFT.TEXTJOIN(&quot;|&quot;;1;[$Build.$AJ5:.$AZ5])&amp;&quot;)$&quot;)" office:value-type="float" office:value="0" calcext:value-type="float">
            <text:p>0</text:p>
          </table:table-cell>
          <table:table-cell table:style-name="ce47" table:formula="of:=SUMIFS([$'Core Bonuses'.$F$2:.$F$200]; [$'Core Bonuses'.$E$2:.$E$200]; [.BL$70]; [$'Core Bonuses'.$A$2:.$A$200]; &quot;^(&quot;&amp;COM.MICROSOFT.TEXTJOIN(&quot;|&quot;;1;[$Build.$G$2:.$G5])&amp;&quot;)$&quot;)+&#10;SUMIFS([$Systems.$M$2:.$M$200]; [$Systems.$L$2:.$L$200]; [.BL$70]; [$Systems.$A$2:.$A$200]; &quot;^(&quot;&amp;COM.MICROSOFT.TEXTJOIN(&quot;|&quot;;1;[$Build.$AJ5:.$AZ5])&amp;&quot;)$&quot;)" office:value-type="float" office:value="0" calcext:value-type="float">
            <text:p>0</text:p>
          </table:table-cell>
          <table:table-cell table:style-name="ce47" table:formula="of:=SUMIFS([$'Core Bonuses'.$F$2:.$F$200]; [$'Core Bonuses'.$E$2:.$E$200]; [.BM$70]; [$'Core Bonuses'.$A$2:.$A$200]; &quot;^(&quot;&amp;COM.MICROSOFT.TEXTJOIN(&quot;|&quot;;1;[$Build.$G$2:.$G5])&amp;&quot;)$&quot;)+&#10;SUMIFS([$Systems.$M$2:.$M$200]; [$Systems.$L$2:.$L$200]; [.BM$70]; [$Systems.$A$2:.$A$200]; &quot;^(&quot;&amp;COM.MICROSOFT.TEXTJOIN(&quot;|&quot;;1;[$Build.$AJ5:.$AZ5])&amp;&quot;)$&quot;)" office:value-type="float" office:value="0" calcext:value-type="float">
            <text:p>0</text:p>
          </table:table-cell>
          <table:table-cell table:style-name="ce47" table:formula="of:=SUMIFS([$'Core Bonuses'.$F$2:.$F$200]; [$'Core Bonuses'.$E$2:.$E$200]; [.BN$70]; [$'Core Bonuses'.$A$2:.$A$200]; &quot;^(&quot;&amp;COM.MICROSOFT.TEXTJOIN(&quot;|&quot;;1;[$Build.$G$2:.$G5])&amp;&quot;)$&quot;)+&#10;SUMIFS([$Systems.$M$2:.$M$200]; [$Systems.$L$2:.$L$200]; [.BN$70]; [$Systems.$A$2:.$A$200]; &quot;^(&quot;&amp;COM.MICROSOFT.TEXTJOIN(&quot;|&quot;;1;[$Build.$AJ5:.$AZ5])&amp;&quot;)$&quot;)" office:value-type="float" office:value="0" calcext:value-type="float">
            <text:p>0</text:p>
          </table:table-cell>
          <table:table-cell table:style-name="ce47" table:number-columns-repeated="2"/>
          <table:table-cell table:number-columns-repeated="116"/>
        </table:table-row>
        <table:table-row table:style-name="ro2">
          <table:table-cell table:number-columns-repeated="54"/>
          <table:table-cell table:style-name="ce47" table:formula="of:=SUMIFS([$'Core Bonuses'.$F$2:.$F$200]; [$'Core Bonuses'.$E$2:.$E$200]; [.BC$70]; [$'Core Bonuses'.$A$2:.$A$200]; &quot;^(&quot;&amp;COM.MICROSOFT.TEXTJOIN(&quot;|&quot;;1;[$Build.$G$2:.$G6])&amp;&quot;)$&quot;)+&#10;SUMIFS([$Systems.$M$2:.$M$200]; [$Systems.$L$2:.$L$200]; [.BC$70]; [$Systems.$A$2:.$A$200]; &quot;^(&quot;&amp;COM.MICROSOFT.TEXTJOIN(&quot;|&quot;;1;[$Build.$AJ6:.$AZ6])&amp;&quot;)$&quot;)" office:value-type="float" office:value="0" calcext:value-type="float">
            <text:p>0</text:p>
          </table:table-cell>
          <table:table-cell table:style-name="ce47" table:formula="of:=SUMIFS([$'Core Bonuses'.$F$2:.$F$200]; [$'Core Bonuses'.$E$2:.$E$200]; [.BD$70]; [$'Core Bonuses'.$A$2:.$A$200]; &quot;^(&quot;&amp;COM.MICROSOFT.TEXTJOIN(&quot;|&quot;;1;[$Build.$G$2:.$G6])&amp;&quot;)$&quot;)+&#10;SUMIFS([$Systems.$M$2:.$M$200]; [$Systems.$L$2:.$L$200]; [.BD$70]; [$Systems.$A$2:.$A$200]; &quot;^(&quot;&amp;COM.MICROSOFT.TEXTJOIN(&quot;|&quot;;1;[$Build.$AJ6:.$AZ6])&amp;&quot;)$&quot;)" office:value-type="float" office:value="0" calcext:value-type="float">
            <text:p>0</text:p>
          </table:table-cell>
          <table:table-cell table:style-name="ce47" table:formula="of:=SUMIFS([$'Core Bonuses'.$F$2:.$F$200]; [$'Core Bonuses'.$E$2:.$E$200]; [.BE$70]; [$'Core Bonuses'.$A$2:.$A$200]; &quot;^(&quot;&amp;COM.MICROSOFT.TEXTJOIN(&quot;|&quot;;1;[$Build.$G$2:.$G6])&amp;&quot;)$&quot;)+&#10;SUMIFS([$Systems.$M$2:.$M$200]; [$Systems.$L$2:.$L$200]; [.BE$70]; [$Systems.$A$2:.$A$200]; &quot;^(&quot;&amp;COM.MICROSOFT.TEXTJOIN(&quot;|&quot;;1;[$Build.$AJ6:.$AZ6])&amp;&quot;)$&quot;)" office:value-type="float" office:value="0" calcext:value-type="float">
            <text:p>0</text:p>
          </table:table-cell>
          <table:table-cell table:style-name="ce47" table:formula="of:=SUMIFS([$'Core Bonuses'.$F$2:.$F$200]; [$'Core Bonuses'.$E$2:.$E$200]; [.BF$70]; [$'Core Bonuses'.$A$2:.$A$200]; &quot;^(&quot;&amp;COM.MICROSOFT.TEXTJOIN(&quot;|&quot;;1;[$Build.$G$2:.$G6])&amp;&quot;)$&quot;)+&#10;SUMIFS([$Systems.$M$2:.$M$200]; [$Systems.$L$2:.$L$200]; [.BF$70]; [$Systems.$A$2:.$A$200]; &quot;^(&quot;&amp;COM.MICROSOFT.TEXTJOIN(&quot;|&quot;;1;[$Build.$AJ6:.$AZ6])&amp;&quot;)$&quot;)" office:value-type="float" office:value="0" calcext:value-type="float">
            <text:p>0</text:p>
          </table:table-cell>
          <table:table-cell table:style-name="ce47" table:formula="of:=SUMIFS([$'Core Bonuses'.$F$2:.$F$200]; [$'Core Bonuses'.$E$2:.$E$200]; [.BG$70]; [$'Core Bonuses'.$A$2:.$A$200]; &quot;^(&quot;&amp;COM.MICROSOFT.TEXTJOIN(&quot;|&quot;;1;[$Build.$G$2:.$G6])&amp;&quot;)$&quot;)+&#10;SUMIFS([$Systems.$M$2:.$M$200]; [$Systems.$L$2:.$L$200]; [.BG$70]; [$Systems.$A$2:.$A$200]; &quot;^(&quot;&amp;COM.MICROSOFT.TEXTJOIN(&quot;|&quot;;1;[$Build.$AJ6:.$AZ6])&amp;&quot;)$&quot;)" office:value-type="float" office:value="0" calcext:value-type="float">
            <text:p>0</text:p>
          </table:table-cell>
          <table:table-cell table:style-name="ce47" table:formula="of:=SUMIFS([$'Core Bonuses'.$F$2:.$F$200]; [$'Core Bonuses'.$E$2:.$E$200]; [.BH$70]; [$'Core Bonuses'.$A$2:.$A$200]; &quot;^(&quot;&amp;COM.MICROSOFT.TEXTJOIN(&quot;|&quot;;1;[$Build.$G$2:.$G6])&amp;&quot;)$&quot;)+&#10;SUMIFS([$Systems.$M$2:.$M$200]; [$Systems.$L$2:.$L$200]; [.BH$70]; [$Systems.$A$2:.$A$200]; &quot;^(&quot;&amp;COM.MICROSOFT.TEXTJOIN(&quot;|&quot;;1;[$Build.$AJ6:.$AZ6])&amp;&quot;)$&quot;)" office:value-type="float" office:value="0" calcext:value-type="float">
            <text:p>0</text:p>
          </table:table-cell>
          <table:table-cell table:style-name="ce47" table:formula="of:=SUMIFS([$'Core Bonuses'.$F$2:.$F$200]; [$'Core Bonuses'.$E$2:.$E$200]; [.BI$70]; [$'Core Bonuses'.$A$2:.$A$200]; &quot;^(&quot;&amp;COM.MICROSOFT.TEXTJOIN(&quot;|&quot;;1;[$Build.$G$2:.$G6])&amp;&quot;)$&quot;)+&#10;SUMIFS([$Systems.$M$2:.$M$200]; [$Systems.$L$2:.$L$200]; [.BI$70]; [$Systems.$A$2:.$A$200]; &quot;^(&quot;&amp;COM.MICROSOFT.TEXTJOIN(&quot;|&quot;;1;[$Build.$AJ6:.$AZ6])&amp;&quot;)$&quot;)" office:value-type="float" office:value="0" calcext:value-type="float">
            <text:p>0</text:p>
          </table:table-cell>
          <table:table-cell table:style-name="ce47" table:formula="of:=SUMIFS([$'Core Bonuses'.$F$2:.$F$200]; [$'Core Bonuses'.$E$2:.$E$200]; [.BJ$70]; [$'Core Bonuses'.$A$2:.$A$200]; &quot;^(&quot;&amp;COM.MICROSOFT.TEXTJOIN(&quot;|&quot;;1;[$Build.$G$2:.$G6])&amp;&quot;)$&quot;)+&#10;SUMIFS([$Systems.$M$2:.$M$200]; [$Systems.$L$2:.$L$200]; [.BJ$70]; [$Systems.$A$2:.$A$200]; &quot;^(&quot;&amp;COM.MICROSOFT.TEXTJOIN(&quot;|&quot;;1;[$Build.$AJ6:.$AZ6])&amp;&quot;)$&quot;)" office:value-type="float" office:value="0" calcext:value-type="float">
            <text:p>0</text:p>
          </table:table-cell>
          <table:table-cell table:style-name="ce47" table:formula="of:=SUMIFS([$'Core Bonuses'.$F$2:.$F$200]; [$'Core Bonuses'.$E$2:.$E$200]; [.BK$70]; [$'Core Bonuses'.$A$2:.$A$200]; &quot;^(&quot;&amp;COM.MICROSOFT.TEXTJOIN(&quot;|&quot;;1;[$Build.$G$2:.$G6])&amp;&quot;)$&quot;)+&#10;SUMIFS([$Systems.$M$2:.$M$200]; [$Systems.$L$2:.$L$200]; [.BK$70]; [$Systems.$A$2:.$A$200]; &quot;^(&quot;&amp;COM.MICROSOFT.TEXTJOIN(&quot;|&quot;;1;[$Build.$AJ6:.$AZ6])&amp;&quot;)$&quot;)" office:value-type="float" office:value="0" calcext:value-type="float">
            <text:p>0</text:p>
          </table:table-cell>
          <table:table-cell table:style-name="ce47" table:formula="of:=SUMIFS([$'Core Bonuses'.$F$2:.$F$200]; [$'Core Bonuses'.$E$2:.$E$200]; [.BL$70]; [$'Core Bonuses'.$A$2:.$A$200]; &quot;^(&quot;&amp;COM.MICROSOFT.TEXTJOIN(&quot;|&quot;;1;[$Build.$G$2:.$G6])&amp;&quot;)$&quot;)+&#10;SUMIFS([$Systems.$M$2:.$M$200]; [$Systems.$L$2:.$L$200]; [.BL$70]; [$Systems.$A$2:.$A$200]; &quot;^(&quot;&amp;COM.MICROSOFT.TEXTJOIN(&quot;|&quot;;1;[$Build.$AJ6:.$AZ6])&amp;&quot;)$&quot;)" office:value-type="float" office:value="0" calcext:value-type="float">
            <text:p>0</text:p>
          </table:table-cell>
          <table:table-cell table:style-name="ce47" table:formula="of:=SUMIFS([$'Core Bonuses'.$F$2:.$F$200]; [$'Core Bonuses'.$E$2:.$E$200]; [.BM$70]; [$'Core Bonuses'.$A$2:.$A$200]; &quot;^(&quot;&amp;COM.MICROSOFT.TEXTJOIN(&quot;|&quot;;1;[$Build.$G$2:.$G6])&amp;&quot;)$&quot;)+&#10;SUMIFS([$Systems.$M$2:.$M$200]; [$Systems.$L$2:.$L$200]; [.BM$70]; [$Systems.$A$2:.$A$200]; &quot;^(&quot;&amp;COM.MICROSOFT.TEXTJOIN(&quot;|&quot;;1;[$Build.$AJ6:.$AZ6])&amp;&quot;)$&quot;)" office:value-type="float" office:value="0" calcext:value-type="float">
            <text:p>0</text:p>
          </table:table-cell>
          <table:table-cell table:style-name="ce47" table:formula="of:=SUMIFS([$'Core Bonuses'.$F$2:.$F$200]; [$'Core Bonuses'.$E$2:.$E$200]; [.BN$70]; [$'Core Bonuses'.$A$2:.$A$200]; &quot;^(&quot;&amp;COM.MICROSOFT.TEXTJOIN(&quot;|&quot;;1;[$Build.$G$2:.$G6])&amp;&quot;)$&quot;)+&#10;SUMIFS([$Systems.$M$2:.$M$200]; [$Systems.$L$2:.$L$200]; [.BN$70]; [$Systems.$A$2:.$A$200]; &quot;^(&quot;&amp;COM.MICROSOFT.TEXTJOIN(&quot;|&quot;;1;[$Build.$AJ6:.$AZ6])&amp;&quot;)$&quot;)" office:value-type="float" office:value="0" calcext:value-type="float">
            <text:p>0</text:p>
          </table:table-cell>
          <table:table-cell table:style-name="ce47" table:number-columns-repeated="2"/>
          <table:table-cell table:number-columns-repeated="116"/>
        </table:table-row>
        <table:table-row table:style-name="ro2">
          <table:table-cell table:number-columns-repeated="54"/>
          <table:table-cell table:style-name="ce47" table:formula="of:=SUMIFS([$'Core Bonuses'.$F$2:.$F$200]; [$'Core Bonuses'.$E$2:.$E$200]; [.BC$70]; [$'Core Bonuses'.$A$2:.$A$200]; &quot;^(&quot;&amp;COM.MICROSOFT.TEXTJOIN(&quot;|&quot;;1;[$Build.$G$2:.$G7])&amp;&quot;)$&quot;)+&#10;SUMIFS([$Systems.$M$2:.$M$200]; [$Systems.$L$2:.$L$200]; [.BC$70]; [$Systems.$A$2:.$A$200]; &quot;^(&quot;&amp;COM.MICROSOFT.TEXTJOIN(&quot;|&quot;;1;[$Build.$AJ7:.$AZ7])&amp;&quot;)$&quot;)" office:value-type="float" office:value="0" calcext:value-type="float">
            <text:p>0</text:p>
          </table:table-cell>
          <table:table-cell table:style-name="ce47" table:formula="of:=SUMIFS([$'Core Bonuses'.$F$2:.$F$200]; [$'Core Bonuses'.$E$2:.$E$200]; [.BD$70]; [$'Core Bonuses'.$A$2:.$A$200]; &quot;^(&quot;&amp;COM.MICROSOFT.TEXTJOIN(&quot;|&quot;;1;[$Build.$G$2:.$G7])&amp;&quot;)$&quot;)+&#10;SUMIFS([$Systems.$M$2:.$M$200]; [$Systems.$L$2:.$L$200]; [.BD$70]; [$Systems.$A$2:.$A$200]; &quot;^(&quot;&amp;COM.MICROSOFT.TEXTJOIN(&quot;|&quot;;1;[$Build.$AJ7:.$AZ7])&amp;&quot;)$&quot;)" office:value-type="float" office:value="0" calcext:value-type="float">
            <text:p>0</text:p>
          </table:table-cell>
          <table:table-cell table:style-name="ce47" table:formula="of:=SUMIFS([$'Core Bonuses'.$F$2:.$F$200]; [$'Core Bonuses'.$E$2:.$E$200]; [.BE$70]; [$'Core Bonuses'.$A$2:.$A$200]; &quot;^(&quot;&amp;COM.MICROSOFT.TEXTJOIN(&quot;|&quot;;1;[$Build.$G$2:.$G7])&amp;&quot;)$&quot;)+&#10;SUMIFS([$Systems.$M$2:.$M$200]; [$Systems.$L$2:.$L$200]; [.BE$70]; [$Systems.$A$2:.$A$200]; &quot;^(&quot;&amp;COM.MICROSOFT.TEXTJOIN(&quot;|&quot;;1;[$Build.$AJ7:.$AZ7])&amp;&quot;)$&quot;)" office:value-type="float" office:value="0" calcext:value-type="float">
            <text:p>0</text:p>
          </table:table-cell>
          <table:table-cell table:style-name="ce47" table:formula="of:=SUMIFS([$'Core Bonuses'.$F$2:.$F$200]; [$'Core Bonuses'.$E$2:.$E$200]; [.BF$70]; [$'Core Bonuses'.$A$2:.$A$200]; &quot;^(&quot;&amp;COM.MICROSOFT.TEXTJOIN(&quot;|&quot;;1;[$Build.$G$2:.$G7])&amp;&quot;)$&quot;)+&#10;SUMIFS([$Systems.$M$2:.$M$200]; [$Systems.$L$2:.$L$200]; [.BF$70]; [$Systems.$A$2:.$A$200]; &quot;^(&quot;&amp;COM.MICROSOFT.TEXTJOIN(&quot;|&quot;;1;[$Build.$AJ7:.$AZ7])&amp;&quot;)$&quot;)" office:value-type="float" office:value="0" calcext:value-type="float">
            <text:p>0</text:p>
          </table:table-cell>
          <table:table-cell table:style-name="ce47" table:formula="of:=SUMIFS([$'Core Bonuses'.$F$2:.$F$200]; [$'Core Bonuses'.$E$2:.$E$200]; [.BG$70]; [$'Core Bonuses'.$A$2:.$A$200]; &quot;^(&quot;&amp;COM.MICROSOFT.TEXTJOIN(&quot;|&quot;;1;[$Build.$G$2:.$G7])&amp;&quot;)$&quot;)+&#10;SUMIFS([$Systems.$M$2:.$M$200]; [$Systems.$L$2:.$L$200]; [.BG$70]; [$Systems.$A$2:.$A$200]; &quot;^(&quot;&amp;COM.MICROSOFT.TEXTJOIN(&quot;|&quot;;1;[$Build.$AJ7:.$AZ7])&amp;&quot;)$&quot;)" office:value-type="float" office:value="0" calcext:value-type="float">
            <text:p>0</text:p>
          </table:table-cell>
          <table:table-cell table:style-name="ce47" table:formula="of:=SUMIFS([$'Core Bonuses'.$F$2:.$F$200]; [$'Core Bonuses'.$E$2:.$E$200]; [.BH$70]; [$'Core Bonuses'.$A$2:.$A$200]; &quot;^(&quot;&amp;COM.MICROSOFT.TEXTJOIN(&quot;|&quot;;1;[$Build.$G$2:.$G7])&amp;&quot;)$&quot;)+&#10;SUMIFS([$Systems.$M$2:.$M$200]; [$Systems.$L$2:.$L$200]; [.BH$70]; [$Systems.$A$2:.$A$200]; &quot;^(&quot;&amp;COM.MICROSOFT.TEXTJOIN(&quot;|&quot;;1;[$Build.$AJ7:.$AZ7])&amp;&quot;)$&quot;)" office:value-type="float" office:value="0" calcext:value-type="float">
            <text:p>0</text:p>
          </table:table-cell>
          <table:table-cell table:style-name="ce47" table:formula="of:=SUMIFS([$'Core Bonuses'.$F$2:.$F$200]; [$'Core Bonuses'.$E$2:.$E$200]; [.BI$70]; [$'Core Bonuses'.$A$2:.$A$200]; &quot;^(&quot;&amp;COM.MICROSOFT.TEXTJOIN(&quot;|&quot;;1;[$Build.$G$2:.$G7])&amp;&quot;)$&quot;)+&#10;SUMIFS([$Systems.$M$2:.$M$200]; [$Systems.$L$2:.$L$200]; [.BI$70]; [$Systems.$A$2:.$A$200]; &quot;^(&quot;&amp;COM.MICROSOFT.TEXTJOIN(&quot;|&quot;;1;[$Build.$AJ7:.$AZ7])&amp;&quot;)$&quot;)" office:value-type="float" office:value="0" calcext:value-type="float">
            <text:p>0</text:p>
          </table:table-cell>
          <table:table-cell table:style-name="ce47" table:formula="of:=SUMIFS([$'Core Bonuses'.$F$2:.$F$200]; [$'Core Bonuses'.$E$2:.$E$200]; [.BJ$70]; [$'Core Bonuses'.$A$2:.$A$200]; &quot;^(&quot;&amp;COM.MICROSOFT.TEXTJOIN(&quot;|&quot;;1;[$Build.$G$2:.$G7])&amp;&quot;)$&quot;)+&#10;SUMIFS([$Systems.$M$2:.$M$200]; [$Systems.$L$2:.$L$200]; [.BJ$70]; [$Systems.$A$2:.$A$200]; &quot;^(&quot;&amp;COM.MICROSOFT.TEXTJOIN(&quot;|&quot;;1;[$Build.$AJ7:.$AZ7])&amp;&quot;)$&quot;)" office:value-type="float" office:value="0" calcext:value-type="float">
            <text:p>0</text:p>
          </table:table-cell>
          <table:table-cell table:style-name="ce47" table:formula="of:=SUMIFS([$'Core Bonuses'.$F$2:.$F$200]; [$'Core Bonuses'.$E$2:.$E$200]; [.BK$70]; [$'Core Bonuses'.$A$2:.$A$200]; &quot;^(&quot;&amp;COM.MICROSOFT.TEXTJOIN(&quot;|&quot;;1;[$Build.$G$2:.$G7])&amp;&quot;)$&quot;)+&#10;SUMIFS([$Systems.$M$2:.$M$200]; [$Systems.$L$2:.$L$200]; [.BK$70]; [$Systems.$A$2:.$A$200]; &quot;^(&quot;&amp;COM.MICROSOFT.TEXTJOIN(&quot;|&quot;;1;[$Build.$AJ7:.$AZ7])&amp;&quot;)$&quot;)" office:value-type="float" office:value="0" calcext:value-type="float">
            <text:p>0</text:p>
          </table:table-cell>
          <table:table-cell table:style-name="ce47" table:formula="of:=SUMIFS([$'Core Bonuses'.$F$2:.$F$200]; [$'Core Bonuses'.$E$2:.$E$200]; [.BL$70]; [$'Core Bonuses'.$A$2:.$A$200]; &quot;^(&quot;&amp;COM.MICROSOFT.TEXTJOIN(&quot;|&quot;;1;[$Build.$G$2:.$G7])&amp;&quot;)$&quot;)+&#10;SUMIFS([$Systems.$M$2:.$M$200]; [$Systems.$L$2:.$L$200]; [.BL$70]; [$Systems.$A$2:.$A$200]; &quot;^(&quot;&amp;COM.MICROSOFT.TEXTJOIN(&quot;|&quot;;1;[$Build.$AJ7:.$AZ7])&amp;&quot;)$&quot;)" office:value-type="float" office:value="0" calcext:value-type="float">
            <text:p>0</text:p>
          </table:table-cell>
          <table:table-cell table:style-name="ce47" table:formula="of:=SUMIFS([$'Core Bonuses'.$F$2:.$F$200]; [$'Core Bonuses'.$E$2:.$E$200]; [.BM$70]; [$'Core Bonuses'.$A$2:.$A$200]; &quot;^(&quot;&amp;COM.MICROSOFT.TEXTJOIN(&quot;|&quot;;1;[$Build.$G$2:.$G7])&amp;&quot;)$&quot;)+&#10;SUMIFS([$Systems.$M$2:.$M$200]; [$Systems.$L$2:.$L$200]; [.BM$70]; [$Systems.$A$2:.$A$200]; &quot;^(&quot;&amp;COM.MICROSOFT.TEXTJOIN(&quot;|&quot;;1;[$Build.$AJ7:.$AZ7])&amp;&quot;)$&quot;)" office:value-type="float" office:value="0" calcext:value-type="float">
            <text:p>0</text:p>
          </table:table-cell>
          <table:table-cell table:style-name="ce47" table:formula="of:=SUMIFS([$'Core Bonuses'.$F$2:.$F$200]; [$'Core Bonuses'.$E$2:.$E$200]; [.BN$70]; [$'Core Bonuses'.$A$2:.$A$200]; &quot;^(&quot;&amp;COM.MICROSOFT.TEXTJOIN(&quot;|&quot;;1;[$Build.$G$2:.$G7])&amp;&quot;)$&quot;)+&#10;SUMIFS([$Systems.$M$2:.$M$200]; [$Systems.$L$2:.$L$200]; [.BN$70]; [$Systems.$A$2:.$A$200]; &quot;^(&quot;&amp;COM.MICROSOFT.TEXTJOIN(&quot;|&quot;;1;[$Build.$AJ7:.$AZ7])&amp;&quot;)$&quot;)" office:value-type="float" office:value="0" calcext:value-type="float">
            <text:p>0</text:p>
          </table:table-cell>
          <table:table-cell table:style-name="ce47" table:number-columns-repeated="2"/>
          <table:table-cell table:number-columns-repeated="116"/>
        </table:table-row>
        <table:table-row table:style-name="ro2">
          <table:table-cell table:number-columns-repeated="54"/>
          <table:table-cell table:style-name="ce47" table:formula="of:=SUMIFS([$'Core Bonuses'.$F$2:.$F$200]; [$'Core Bonuses'.$E$2:.$E$200]; [.BC$70]; [$'Core Bonuses'.$A$2:.$A$200]; &quot;^(&quot;&amp;COM.MICROSOFT.TEXTJOIN(&quot;|&quot;;1;[$Build.$G$2:.$G8])&amp;&quot;)$&quot;)+&#10;SUMIFS([$Systems.$M$2:.$M$200]; [$Systems.$L$2:.$L$200]; [.BC$70]; [$Systems.$A$2:.$A$200]; &quot;^(&quot;&amp;COM.MICROSOFT.TEXTJOIN(&quot;|&quot;;1;[$Build.$AJ8:.$AZ8])&amp;&quot;)$&quot;)" office:value-type="float" office:value="0" calcext:value-type="float">
            <text:p>0</text:p>
          </table:table-cell>
          <table:table-cell table:style-name="ce47" table:formula="of:=SUMIFS([$'Core Bonuses'.$F$2:.$F$200]; [$'Core Bonuses'.$E$2:.$E$200]; [.BD$70]; [$'Core Bonuses'.$A$2:.$A$200]; &quot;^(&quot;&amp;COM.MICROSOFT.TEXTJOIN(&quot;|&quot;;1;[$Build.$G$2:.$G8])&amp;&quot;)$&quot;)+&#10;SUMIFS([$Systems.$M$2:.$M$200]; [$Systems.$L$2:.$L$200]; [.BD$70]; [$Systems.$A$2:.$A$200]; &quot;^(&quot;&amp;COM.MICROSOFT.TEXTJOIN(&quot;|&quot;;1;[$Build.$AJ8:.$AZ8])&amp;&quot;)$&quot;)" office:value-type="float" office:value="0" calcext:value-type="float">
            <text:p>0</text:p>
          </table:table-cell>
          <table:table-cell table:style-name="ce47" table:formula="of:=SUMIFS([$'Core Bonuses'.$F$2:.$F$200]; [$'Core Bonuses'.$E$2:.$E$200]; [.BE$70]; [$'Core Bonuses'.$A$2:.$A$200]; &quot;^(&quot;&amp;COM.MICROSOFT.TEXTJOIN(&quot;|&quot;;1;[$Build.$G$2:.$G8])&amp;&quot;)$&quot;)+&#10;SUMIFS([$Systems.$M$2:.$M$200]; [$Systems.$L$2:.$L$200]; [.BE$70]; [$Systems.$A$2:.$A$200]; &quot;^(&quot;&amp;COM.MICROSOFT.TEXTJOIN(&quot;|&quot;;1;[$Build.$AJ8:.$AZ8])&amp;&quot;)$&quot;)" office:value-type="float" office:value="0" calcext:value-type="float">
            <text:p>0</text:p>
          </table:table-cell>
          <table:table-cell table:style-name="ce47" table:formula="of:=SUMIFS([$'Core Bonuses'.$F$2:.$F$200]; [$'Core Bonuses'.$E$2:.$E$200]; [.BF$70]; [$'Core Bonuses'.$A$2:.$A$200]; &quot;^(&quot;&amp;COM.MICROSOFT.TEXTJOIN(&quot;|&quot;;1;[$Build.$G$2:.$G8])&amp;&quot;)$&quot;)+&#10;SUMIFS([$Systems.$M$2:.$M$200]; [$Systems.$L$2:.$L$200]; [.BF$70]; [$Systems.$A$2:.$A$200]; &quot;^(&quot;&amp;COM.MICROSOFT.TEXTJOIN(&quot;|&quot;;1;[$Build.$AJ8:.$AZ8])&amp;&quot;)$&quot;)" office:value-type="float" office:value="0" calcext:value-type="float">
            <text:p>0</text:p>
          </table:table-cell>
          <table:table-cell table:style-name="ce47" table:formula="of:=SUMIFS([$'Core Bonuses'.$F$2:.$F$200]; [$'Core Bonuses'.$E$2:.$E$200]; [.BG$70]; [$'Core Bonuses'.$A$2:.$A$200]; &quot;^(&quot;&amp;COM.MICROSOFT.TEXTJOIN(&quot;|&quot;;1;[$Build.$G$2:.$G8])&amp;&quot;)$&quot;)+&#10;SUMIFS([$Systems.$M$2:.$M$200]; [$Systems.$L$2:.$L$200]; [.BG$70]; [$Systems.$A$2:.$A$200]; &quot;^(&quot;&amp;COM.MICROSOFT.TEXTJOIN(&quot;|&quot;;1;[$Build.$AJ8:.$AZ8])&amp;&quot;)$&quot;)" office:value-type="float" office:value="0" calcext:value-type="float">
            <text:p>0</text:p>
          </table:table-cell>
          <table:table-cell table:style-name="ce47" table:formula="of:=SUMIFS([$'Core Bonuses'.$F$2:.$F$200]; [$'Core Bonuses'.$E$2:.$E$200]; [.BH$70]; [$'Core Bonuses'.$A$2:.$A$200]; &quot;^(&quot;&amp;COM.MICROSOFT.TEXTJOIN(&quot;|&quot;;1;[$Build.$G$2:.$G8])&amp;&quot;)$&quot;)+&#10;SUMIFS([$Systems.$M$2:.$M$200]; [$Systems.$L$2:.$L$200]; [.BH$70]; [$Systems.$A$2:.$A$200]; &quot;^(&quot;&amp;COM.MICROSOFT.TEXTJOIN(&quot;|&quot;;1;[$Build.$AJ8:.$AZ8])&amp;&quot;)$&quot;)" office:value-type="float" office:value="0" calcext:value-type="float">
            <text:p>0</text:p>
          </table:table-cell>
          <table:table-cell table:style-name="ce47" table:formula="of:=SUMIFS([$'Core Bonuses'.$F$2:.$F$200]; [$'Core Bonuses'.$E$2:.$E$200]; [.BI$70]; [$'Core Bonuses'.$A$2:.$A$200]; &quot;^(&quot;&amp;COM.MICROSOFT.TEXTJOIN(&quot;|&quot;;1;[$Build.$G$2:.$G8])&amp;&quot;)$&quot;)+&#10;SUMIFS([$Systems.$M$2:.$M$200]; [$Systems.$L$2:.$L$200]; [.BI$70]; [$Systems.$A$2:.$A$200]; &quot;^(&quot;&amp;COM.MICROSOFT.TEXTJOIN(&quot;|&quot;;1;[$Build.$AJ8:.$AZ8])&amp;&quot;)$&quot;)" office:value-type="float" office:value="0" calcext:value-type="float">
            <text:p>0</text:p>
          </table:table-cell>
          <table:table-cell table:style-name="ce47" table:formula="of:=SUMIFS([$'Core Bonuses'.$F$2:.$F$200]; [$'Core Bonuses'.$E$2:.$E$200]; [.BJ$70]; [$'Core Bonuses'.$A$2:.$A$200]; &quot;^(&quot;&amp;COM.MICROSOFT.TEXTJOIN(&quot;|&quot;;1;[$Build.$G$2:.$G8])&amp;&quot;)$&quot;)+&#10;SUMIFS([$Systems.$M$2:.$M$200]; [$Systems.$L$2:.$L$200]; [.BJ$70]; [$Systems.$A$2:.$A$200]; &quot;^(&quot;&amp;COM.MICROSOFT.TEXTJOIN(&quot;|&quot;;1;[$Build.$AJ8:.$AZ8])&amp;&quot;)$&quot;)" office:value-type="float" office:value="0" calcext:value-type="float">
            <text:p>0</text:p>
          </table:table-cell>
          <table:table-cell table:style-name="ce47" table:formula="of:=SUMIFS([$'Core Bonuses'.$F$2:.$F$200]; [$'Core Bonuses'.$E$2:.$E$200]; [.BK$70]; [$'Core Bonuses'.$A$2:.$A$200]; &quot;^(&quot;&amp;COM.MICROSOFT.TEXTJOIN(&quot;|&quot;;1;[$Build.$G$2:.$G8])&amp;&quot;)$&quot;)+&#10;SUMIFS([$Systems.$M$2:.$M$200]; [$Systems.$L$2:.$L$200]; [.BK$70]; [$Systems.$A$2:.$A$200]; &quot;^(&quot;&amp;COM.MICROSOFT.TEXTJOIN(&quot;|&quot;;1;[$Build.$AJ8:.$AZ8])&amp;&quot;)$&quot;)" office:value-type="float" office:value="0" calcext:value-type="float">
            <text:p>0</text:p>
          </table:table-cell>
          <table:table-cell table:style-name="ce47" table:formula="of:=SUMIFS([$'Core Bonuses'.$F$2:.$F$200]; [$'Core Bonuses'.$E$2:.$E$200]; [.BL$70]; [$'Core Bonuses'.$A$2:.$A$200]; &quot;^(&quot;&amp;COM.MICROSOFT.TEXTJOIN(&quot;|&quot;;1;[$Build.$G$2:.$G8])&amp;&quot;)$&quot;)+&#10;SUMIFS([$Systems.$M$2:.$M$200]; [$Systems.$L$2:.$L$200]; [.BL$70]; [$Systems.$A$2:.$A$200]; &quot;^(&quot;&amp;COM.MICROSOFT.TEXTJOIN(&quot;|&quot;;1;[$Build.$AJ8:.$AZ8])&amp;&quot;)$&quot;)" office:value-type="float" office:value="0" calcext:value-type="float">
            <text:p>0</text:p>
          </table:table-cell>
          <table:table-cell table:style-name="ce47" table:formula="of:=SUMIFS([$'Core Bonuses'.$F$2:.$F$200]; [$'Core Bonuses'.$E$2:.$E$200]; [.BM$70]; [$'Core Bonuses'.$A$2:.$A$200]; &quot;^(&quot;&amp;COM.MICROSOFT.TEXTJOIN(&quot;|&quot;;1;[$Build.$G$2:.$G8])&amp;&quot;)$&quot;)+&#10;SUMIFS([$Systems.$M$2:.$M$200]; [$Systems.$L$2:.$L$200]; [.BM$70]; [$Systems.$A$2:.$A$200]; &quot;^(&quot;&amp;COM.MICROSOFT.TEXTJOIN(&quot;|&quot;;1;[$Build.$AJ8:.$AZ8])&amp;&quot;)$&quot;)" office:value-type="float" office:value="0" calcext:value-type="float">
            <text:p>0</text:p>
          </table:table-cell>
          <table:table-cell table:style-name="ce47" table:formula="of:=SUMIFS([$'Core Bonuses'.$F$2:.$F$200]; [$'Core Bonuses'.$E$2:.$E$200]; [.BN$70]; [$'Core Bonuses'.$A$2:.$A$200]; &quot;^(&quot;&amp;COM.MICROSOFT.TEXTJOIN(&quot;|&quot;;1;[$Build.$G$2:.$G8])&amp;&quot;)$&quot;)+&#10;SUMIFS([$Systems.$M$2:.$M$200]; [$Systems.$L$2:.$L$200]; [.BN$70]; [$Systems.$A$2:.$A$200]; &quot;^(&quot;&amp;COM.MICROSOFT.TEXTJOIN(&quot;|&quot;;1;[$Build.$AJ8:.$AZ8])&amp;&quot;)$&quot;)" office:value-type="float" office:value="0" calcext:value-type="float">
            <text:p>0</text:p>
          </table:table-cell>
          <table:table-cell table:style-name="ce47" table:number-columns-repeated="2"/>
          <table:table-cell table:number-columns-repeated="116"/>
        </table:table-row>
        <table:table-row table:style-name="ro2">
          <table:table-cell table:number-columns-repeated="54"/>
          <table:table-cell table:style-name="ce47" table:formula="of:=SUMIFS([$'Core Bonuses'.$F$2:.$F$200]; [$'Core Bonuses'.$E$2:.$E$200]; [.BC$70]; [$'Core Bonuses'.$A$2:.$A$200]; &quot;^(&quot;&amp;COM.MICROSOFT.TEXTJOIN(&quot;|&quot;;1;[$Build.$G$2:.$G9])&amp;&quot;)$&quot;)+&#10;SUMIFS([$Systems.$M$2:.$M$200]; [$Systems.$L$2:.$L$200]; [.BC$70]; [$Systems.$A$2:.$A$200]; &quot;^(&quot;&amp;COM.MICROSOFT.TEXTJOIN(&quot;|&quot;;1;[$Build.$AJ9:.$AZ9])&amp;&quot;)$&quot;)" office:value-type="float" office:value="0" calcext:value-type="float">
            <text:p>0</text:p>
          </table:table-cell>
          <table:table-cell table:style-name="ce47" table:formula="of:=SUMIFS([$'Core Bonuses'.$F$2:.$F$200]; [$'Core Bonuses'.$E$2:.$E$200]; [.BD$70]; [$'Core Bonuses'.$A$2:.$A$200]; &quot;^(&quot;&amp;COM.MICROSOFT.TEXTJOIN(&quot;|&quot;;1;[$Build.$G$2:.$G9])&amp;&quot;)$&quot;)+&#10;SUMIFS([$Systems.$M$2:.$M$200]; [$Systems.$L$2:.$L$200]; [.BD$70]; [$Systems.$A$2:.$A$200]; &quot;^(&quot;&amp;COM.MICROSOFT.TEXTJOIN(&quot;|&quot;;1;[$Build.$AJ9:.$AZ9])&amp;&quot;)$&quot;)" office:value-type="float" office:value="0" calcext:value-type="float">
            <text:p>0</text:p>
          </table:table-cell>
          <table:table-cell table:style-name="ce47" table:formula="of:=SUMIFS([$'Core Bonuses'.$F$2:.$F$200]; [$'Core Bonuses'.$E$2:.$E$200]; [.BE$70]; [$'Core Bonuses'.$A$2:.$A$200]; &quot;^(&quot;&amp;COM.MICROSOFT.TEXTJOIN(&quot;|&quot;;1;[$Build.$G$2:.$G9])&amp;&quot;)$&quot;)+&#10;SUMIFS([$Systems.$M$2:.$M$200]; [$Systems.$L$2:.$L$200]; [.BE$70]; [$Systems.$A$2:.$A$200]; &quot;^(&quot;&amp;COM.MICROSOFT.TEXTJOIN(&quot;|&quot;;1;[$Build.$AJ9:.$AZ9])&amp;&quot;)$&quot;)" office:value-type="float" office:value="0" calcext:value-type="float">
            <text:p>0</text:p>
          </table:table-cell>
          <table:table-cell table:style-name="ce47" table:formula="of:=SUMIFS([$'Core Bonuses'.$F$2:.$F$200]; [$'Core Bonuses'.$E$2:.$E$200]; [.BF$70]; [$'Core Bonuses'.$A$2:.$A$200]; &quot;^(&quot;&amp;COM.MICROSOFT.TEXTJOIN(&quot;|&quot;;1;[$Build.$G$2:.$G9])&amp;&quot;)$&quot;)+&#10;SUMIFS([$Systems.$M$2:.$M$200]; [$Systems.$L$2:.$L$200]; [.BF$70]; [$Systems.$A$2:.$A$200]; &quot;^(&quot;&amp;COM.MICROSOFT.TEXTJOIN(&quot;|&quot;;1;[$Build.$AJ9:.$AZ9])&amp;&quot;)$&quot;)" office:value-type="float" office:value="0" calcext:value-type="float">
            <text:p>0</text:p>
          </table:table-cell>
          <table:table-cell table:style-name="ce47" table:formula="of:=SUMIFS([$'Core Bonuses'.$F$2:.$F$200]; [$'Core Bonuses'.$E$2:.$E$200]; [.BG$70]; [$'Core Bonuses'.$A$2:.$A$200]; &quot;^(&quot;&amp;COM.MICROSOFT.TEXTJOIN(&quot;|&quot;;1;[$Build.$G$2:.$G9])&amp;&quot;)$&quot;)+&#10;SUMIFS([$Systems.$M$2:.$M$200]; [$Systems.$L$2:.$L$200]; [.BG$70]; [$Systems.$A$2:.$A$200]; &quot;^(&quot;&amp;COM.MICROSOFT.TEXTJOIN(&quot;|&quot;;1;[$Build.$AJ9:.$AZ9])&amp;&quot;)$&quot;)" office:value-type="float" office:value="0" calcext:value-type="float">
            <text:p>0</text:p>
          </table:table-cell>
          <table:table-cell table:style-name="ce47" table:formula="of:=SUMIFS([$'Core Bonuses'.$F$2:.$F$200]; [$'Core Bonuses'.$E$2:.$E$200]; [.BH$70]; [$'Core Bonuses'.$A$2:.$A$200]; &quot;^(&quot;&amp;COM.MICROSOFT.TEXTJOIN(&quot;|&quot;;1;[$Build.$G$2:.$G9])&amp;&quot;)$&quot;)+&#10;SUMIFS([$Systems.$M$2:.$M$200]; [$Systems.$L$2:.$L$200]; [.BH$70]; [$Systems.$A$2:.$A$200]; &quot;^(&quot;&amp;COM.MICROSOFT.TEXTJOIN(&quot;|&quot;;1;[$Build.$AJ9:.$AZ9])&amp;&quot;)$&quot;)" office:value-type="float" office:value="0" calcext:value-type="float">
            <text:p>0</text:p>
          </table:table-cell>
          <table:table-cell table:style-name="ce47" table:formula="of:=SUMIFS([$'Core Bonuses'.$F$2:.$F$200]; [$'Core Bonuses'.$E$2:.$E$200]; [.BI$70]; [$'Core Bonuses'.$A$2:.$A$200]; &quot;^(&quot;&amp;COM.MICROSOFT.TEXTJOIN(&quot;|&quot;;1;[$Build.$G$2:.$G9])&amp;&quot;)$&quot;)+&#10;SUMIFS([$Systems.$M$2:.$M$200]; [$Systems.$L$2:.$L$200]; [.BI$70]; [$Systems.$A$2:.$A$200]; &quot;^(&quot;&amp;COM.MICROSOFT.TEXTJOIN(&quot;|&quot;;1;[$Build.$AJ9:.$AZ9])&amp;&quot;)$&quot;)" office:value-type="float" office:value="0" calcext:value-type="float">
            <text:p>0</text:p>
          </table:table-cell>
          <table:table-cell table:style-name="ce47" table:formula="of:=SUMIFS([$'Core Bonuses'.$F$2:.$F$200]; [$'Core Bonuses'.$E$2:.$E$200]; [.BJ$70]; [$'Core Bonuses'.$A$2:.$A$200]; &quot;^(&quot;&amp;COM.MICROSOFT.TEXTJOIN(&quot;|&quot;;1;[$Build.$G$2:.$G9])&amp;&quot;)$&quot;)+&#10;SUMIFS([$Systems.$M$2:.$M$200]; [$Systems.$L$2:.$L$200]; [.BJ$70]; [$Systems.$A$2:.$A$200]; &quot;^(&quot;&amp;COM.MICROSOFT.TEXTJOIN(&quot;|&quot;;1;[$Build.$AJ9:.$AZ9])&amp;&quot;)$&quot;)" office:value-type="float" office:value="0" calcext:value-type="float">
            <text:p>0</text:p>
          </table:table-cell>
          <table:table-cell table:style-name="ce47" table:formula="of:=SUMIFS([$'Core Bonuses'.$F$2:.$F$200]; [$'Core Bonuses'.$E$2:.$E$200]; [.BK$70]; [$'Core Bonuses'.$A$2:.$A$200]; &quot;^(&quot;&amp;COM.MICROSOFT.TEXTJOIN(&quot;|&quot;;1;[$Build.$G$2:.$G9])&amp;&quot;)$&quot;)+&#10;SUMIFS([$Systems.$M$2:.$M$200]; [$Systems.$L$2:.$L$200]; [.BK$70]; [$Systems.$A$2:.$A$200]; &quot;^(&quot;&amp;COM.MICROSOFT.TEXTJOIN(&quot;|&quot;;1;[$Build.$AJ9:.$AZ9])&amp;&quot;)$&quot;)" office:value-type="float" office:value="0" calcext:value-type="float">
            <text:p>0</text:p>
          </table:table-cell>
          <table:table-cell table:style-name="ce47" table:formula="of:=SUMIFS([$'Core Bonuses'.$F$2:.$F$200]; [$'Core Bonuses'.$E$2:.$E$200]; [.BL$70]; [$'Core Bonuses'.$A$2:.$A$200]; &quot;^(&quot;&amp;COM.MICROSOFT.TEXTJOIN(&quot;|&quot;;1;[$Build.$G$2:.$G9])&amp;&quot;)$&quot;)+&#10;SUMIFS([$Systems.$M$2:.$M$200]; [$Systems.$L$2:.$L$200]; [.BL$70]; [$Systems.$A$2:.$A$200]; &quot;^(&quot;&amp;COM.MICROSOFT.TEXTJOIN(&quot;|&quot;;1;[$Build.$AJ9:.$AZ9])&amp;&quot;)$&quot;)" office:value-type="float" office:value="0" calcext:value-type="float">
            <text:p>0</text:p>
          </table:table-cell>
          <table:table-cell table:style-name="ce47" table:formula="of:=SUMIFS([$'Core Bonuses'.$F$2:.$F$200]; [$'Core Bonuses'.$E$2:.$E$200]; [.BM$70]; [$'Core Bonuses'.$A$2:.$A$200]; &quot;^(&quot;&amp;COM.MICROSOFT.TEXTJOIN(&quot;|&quot;;1;[$Build.$G$2:.$G9])&amp;&quot;)$&quot;)+&#10;SUMIFS([$Systems.$M$2:.$M$200]; [$Systems.$L$2:.$L$200]; [.BM$70]; [$Systems.$A$2:.$A$200]; &quot;^(&quot;&amp;COM.MICROSOFT.TEXTJOIN(&quot;|&quot;;1;[$Build.$AJ9:.$AZ9])&amp;&quot;)$&quot;)" office:value-type="float" office:value="0" calcext:value-type="float">
            <text:p>0</text:p>
          </table:table-cell>
          <table:table-cell table:style-name="ce47" table:formula="of:=SUMIFS([$'Core Bonuses'.$F$2:.$F$200]; [$'Core Bonuses'.$E$2:.$E$200]; [.BN$70]; [$'Core Bonuses'.$A$2:.$A$200]; &quot;^(&quot;&amp;COM.MICROSOFT.TEXTJOIN(&quot;|&quot;;1;[$Build.$G$2:.$G9])&amp;&quot;)$&quot;)+&#10;SUMIFS([$Systems.$M$2:.$M$200]; [$Systems.$L$2:.$L$200]; [.BN$70]; [$Systems.$A$2:.$A$200]; &quot;^(&quot;&amp;COM.MICROSOFT.TEXTJOIN(&quot;|&quot;;1;[$Build.$AJ9:.$AZ9])&amp;&quot;)$&quot;)" office:value-type="float" office:value="0" calcext:value-type="float">
            <text:p>0</text:p>
          </table:table-cell>
          <table:table-cell table:style-name="ce47" table:number-columns-repeated="2"/>
          <table:table-cell table:number-columns-repeated="116"/>
        </table:table-row>
        <table:table-row table:style-name="ro2">
          <table:table-cell table:number-columns-repeated="54"/>
          <table:table-cell table:style-name="ce47" table:formula="of:=SUMIFS([$'Core Bonuses'.$F$2:.$F$200]; [$'Core Bonuses'.$E$2:.$E$200]; [.BC$70]; [$'Core Bonuses'.$A$2:.$A$200]; &quot;^(&quot;&amp;COM.MICROSOFT.TEXTJOIN(&quot;|&quot;;1;[$Build.$G$2:.$G10])&amp;&quot;)$&quot;)+&#10;SUMIFS([$Systems.$M$2:.$M$200]; [$Systems.$L$2:.$L$200]; [.BC$70]; [$Systems.$A$2:.$A$200]; &quot;^(&quot;&amp;COM.MICROSOFT.TEXTJOIN(&quot;|&quot;;1;[$Build.$AJ10:.$AZ10])&amp;&quot;)$&quot;)" office:value-type="float" office:value="0" calcext:value-type="float">
            <text:p>0</text:p>
          </table:table-cell>
          <table:table-cell table:style-name="ce47" table:formula="of:=SUMIFS([$'Core Bonuses'.$F$2:.$F$200]; [$'Core Bonuses'.$E$2:.$E$200]; [.BD$70]; [$'Core Bonuses'.$A$2:.$A$200]; &quot;^(&quot;&amp;COM.MICROSOFT.TEXTJOIN(&quot;|&quot;;1;[$Build.$G$2:.$G10])&amp;&quot;)$&quot;)+&#10;SUMIFS([$Systems.$M$2:.$M$200]; [$Systems.$L$2:.$L$200]; [.BD$70]; [$Systems.$A$2:.$A$200]; &quot;^(&quot;&amp;COM.MICROSOFT.TEXTJOIN(&quot;|&quot;;1;[$Build.$AJ10:.$AZ10])&amp;&quot;)$&quot;)" office:value-type="float" office:value="0" calcext:value-type="float">
            <text:p>0</text:p>
          </table:table-cell>
          <table:table-cell table:style-name="ce47" table:formula="of:=SUMIFS([$'Core Bonuses'.$F$2:.$F$200]; [$'Core Bonuses'.$E$2:.$E$200]; [.BE$70]; [$'Core Bonuses'.$A$2:.$A$200]; &quot;^(&quot;&amp;COM.MICROSOFT.TEXTJOIN(&quot;|&quot;;1;[$Build.$G$2:.$G10])&amp;&quot;)$&quot;)+&#10;SUMIFS([$Systems.$M$2:.$M$200]; [$Systems.$L$2:.$L$200]; [.BE$70]; [$Systems.$A$2:.$A$200]; &quot;^(&quot;&amp;COM.MICROSOFT.TEXTJOIN(&quot;|&quot;;1;[$Build.$AJ10:.$AZ10])&amp;&quot;)$&quot;)" office:value-type="float" office:value="0" calcext:value-type="float">
            <text:p>0</text:p>
          </table:table-cell>
          <table:table-cell table:style-name="ce47" table:formula="of:=SUMIFS([$'Core Bonuses'.$F$2:.$F$200]; [$'Core Bonuses'.$E$2:.$E$200]; [.BF$70]; [$'Core Bonuses'.$A$2:.$A$200]; &quot;^(&quot;&amp;COM.MICROSOFT.TEXTJOIN(&quot;|&quot;;1;[$Build.$G$2:.$G10])&amp;&quot;)$&quot;)+&#10;SUMIFS([$Systems.$M$2:.$M$200]; [$Systems.$L$2:.$L$200]; [.BF$70]; [$Systems.$A$2:.$A$200]; &quot;^(&quot;&amp;COM.MICROSOFT.TEXTJOIN(&quot;|&quot;;1;[$Build.$AJ10:.$AZ10])&amp;&quot;)$&quot;)" office:value-type="float" office:value="0" calcext:value-type="float">
            <text:p>0</text:p>
          </table:table-cell>
          <table:table-cell table:style-name="ce47" table:formula="of:=SUMIFS([$'Core Bonuses'.$F$2:.$F$200]; [$'Core Bonuses'.$E$2:.$E$200]; [.BG$70]; [$'Core Bonuses'.$A$2:.$A$200]; &quot;^(&quot;&amp;COM.MICROSOFT.TEXTJOIN(&quot;|&quot;;1;[$Build.$G$2:.$G10])&amp;&quot;)$&quot;)+&#10;SUMIFS([$Systems.$M$2:.$M$200]; [$Systems.$L$2:.$L$200]; [.BG$70]; [$Systems.$A$2:.$A$200]; &quot;^(&quot;&amp;COM.MICROSOFT.TEXTJOIN(&quot;|&quot;;1;[$Build.$AJ10:.$AZ10])&amp;&quot;)$&quot;)" office:value-type="float" office:value="0" calcext:value-type="float">
            <text:p>0</text:p>
          </table:table-cell>
          <table:table-cell table:style-name="ce47" table:formula="of:=SUMIFS([$'Core Bonuses'.$F$2:.$F$200]; [$'Core Bonuses'.$E$2:.$E$200]; [.BH$70]; [$'Core Bonuses'.$A$2:.$A$200]; &quot;^(&quot;&amp;COM.MICROSOFT.TEXTJOIN(&quot;|&quot;;1;[$Build.$G$2:.$G10])&amp;&quot;)$&quot;)+&#10;SUMIFS([$Systems.$M$2:.$M$200]; [$Systems.$L$2:.$L$200]; [.BH$70]; [$Systems.$A$2:.$A$200]; &quot;^(&quot;&amp;COM.MICROSOFT.TEXTJOIN(&quot;|&quot;;1;[$Build.$AJ10:.$AZ10])&amp;&quot;)$&quot;)" office:value-type="float" office:value="0" calcext:value-type="float">
            <text:p>0</text:p>
          </table:table-cell>
          <table:table-cell table:style-name="ce47" table:formula="of:=SUMIFS([$'Core Bonuses'.$F$2:.$F$200]; [$'Core Bonuses'.$E$2:.$E$200]; [.BI$70]; [$'Core Bonuses'.$A$2:.$A$200]; &quot;^(&quot;&amp;COM.MICROSOFT.TEXTJOIN(&quot;|&quot;;1;[$Build.$G$2:.$G10])&amp;&quot;)$&quot;)+&#10;SUMIFS([$Systems.$M$2:.$M$200]; [$Systems.$L$2:.$L$200]; [.BI$70]; [$Systems.$A$2:.$A$200]; &quot;^(&quot;&amp;COM.MICROSOFT.TEXTJOIN(&quot;|&quot;;1;[$Build.$AJ10:.$AZ10])&amp;&quot;)$&quot;)" office:value-type="float" office:value="0" calcext:value-type="float">
            <text:p>0</text:p>
          </table:table-cell>
          <table:table-cell table:style-name="ce47" table:formula="of:=SUMIFS([$'Core Bonuses'.$F$2:.$F$200]; [$'Core Bonuses'.$E$2:.$E$200]; [.BJ$70]; [$'Core Bonuses'.$A$2:.$A$200]; &quot;^(&quot;&amp;COM.MICROSOFT.TEXTJOIN(&quot;|&quot;;1;[$Build.$G$2:.$G10])&amp;&quot;)$&quot;)+&#10;SUMIFS([$Systems.$M$2:.$M$200]; [$Systems.$L$2:.$L$200]; [.BJ$70]; [$Systems.$A$2:.$A$200]; &quot;^(&quot;&amp;COM.MICROSOFT.TEXTJOIN(&quot;|&quot;;1;[$Build.$AJ10:.$AZ10])&amp;&quot;)$&quot;)" office:value-type="float" office:value="0" calcext:value-type="float">
            <text:p>0</text:p>
          </table:table-cell>
          <table:table-cell table:style-name="ce47" table:formula="of:=SUMIFS([$'Core Bonuses'.$F$2:.$F$200]; [$'Core Bonuses'.$E$2:.$E$200]; [.BK$70]; [$'Core Bonuses'.$A$2:.$A$200]; &quot;^(&quot;&amp;COM.MICROSOFT.TEXTJOIN(&quot;|&quot;;1;[$Build.$G$2:.$G10])&amp;&quot;)$&quot;)+&#10;SUMIFS([$Systems.$M$2:.$M$200]; [$Systems.$L$2:.$L$200]; [.BK$70]; [$Systems.$A$2:.$A$200]; &quot;^(&quot;&amp;COM.MICROSOFT.TEXTJOIN(&quot;|&quot;;1;[$Build.$AJ10:.$AZ10])&amp;&quot;)$&quot;)" office:value-type="float" office:value="0" calcext:value-type="float">
            <text:p>0</text:p>
          </table:table-cell>
          <table:table-cell table:style-name="ce47" table:formula="of:=SUMIFS([$'Core Bonuses'.$F$2:.$F$200]; [$'Core Bonuses'.$E$2:.$E$200]; [.BL$70]; [$'Core Bonuses'.$A$2:.$A$200]; &quot;^(&quot;&amp;COM.MICROSOFT.TEXTJOIN(&quot;|&quot;;1;[$Build.$G$2:.$G10])&amp;&quot;)$&quot;)+&#10;SUMIFS([$Systems.$M$2:.$M$200]; [$Systems.$L$2:.$L$200]; [.BL$70]; [$Systems.$A$2:.$A$200]; &quot;^(&quot;&amp;COM.MICROSOFT.TEXTJOIN(&quot;|&quot;;1;[$Build.$AJ10:.$AZ10])&amp;&quot;)$&quot;)" office:value-type="float" office:value="0" calcext:value-type="float">
            <text:p>0</text:p>
          </table:table-cell>
          <table:table-cell table:style-name="ce47" table:formula="of:=SUMIFS([$'Core Bonuses'.$F$2:.$F$200]; [$'Core Bonuses'.$E$2:.$E$200]; [.BM$70]; [$'Core Bonuses'.$A$2:.$A$200]; &quot;^(&quot;&amp;COM.MICROSOFT.TEXTJOIN(&quot;|&quot;;1;[$Build.$G$2:.$G10])&amp;&quot;)$&quot;)+&#10;SUMIFS([$Systems.$M$2:.$M$200]; [$Systems.$L$2:.$L$200]; [.BM$70]; [$Systems.$A$2:.$A$200]; &quot;^(&quot;&amp;COM.MICROSOFT.TEXTJOIN(&quot;|&quot;;1;[$Build.$AJ10:.$AZ10])&amp;&quot;)$&quot;)" office:value-type="float" office:value="0" calcext:value-type="float">
            <text:p>0</text:p>
          </table:table-cell>
          <table:table-cell table:style-name="ce47" table:formula="of:=SUMIFS([$'Core Bonuses'.$F$2:.$F$200]; [$'Core Bonuses'.$E$2:.$E$200]; [.BN$70]; [$'Core Bonuses'.$A$2:.$A$200]; &quot;^(&quot;&amp;COM.MICROSOFT.TEXTJOIN(&quot;|&quot;;1;[$Build.$G$2:.$G10])&amp;&quot;)$&quot;)+&#10;SUMIFS([$Systems.$M$2:.$M$200]; [$Systems.$L$2:.$L$200]; [.BN$70]; [$Systems.$A$2:.$A$200]; &quot;^(&quot;&amp;COM.MICROSOFT.TEXTJOIN(&quot;|&quot;;1;[$Build.$AJ10:.$AZ10])&amp;&quot;)$&quot;)" office:value-type="float" office:value="0" calcext:value-type="float">
            <text:p>0</text:p>
          </table:table-cell>
          <table:table-cell table:style-name="ce47" table:number-columns-repeated="2"/>
          <table:table-cell table:number-columns-repeated="116"/>
        </table:table-row>
        <table:table-row table:style-name="ro2">
          <table:table-cell table:number-columns-repeated="54"/>
          <table:table-cell table:style-name="ce47" table:formula="of:=SUMIFS([$'Core Bonuses'.$F$2:.$F$200]; [$'Core Bonuses'.$E$2:.$E$200]; [.BC$70]; [$'Core Bonuses'.$A$2:.$A$200]; &quot;^(&quot;&amp;COM.MICROSOFT.TEXTJOIN(&quot;|&quot;;1;[$Build.$G$2:.$G11])&amp;&quot;)$&quot;)+&#10;SUMIFS([$Systems.$M$2:.$M$200]; [$Systems.$L$2:.$L$200]; [.BC$70]; [$Systems.$A$2:.$A$200]; &quot;^(&quot;&amp;COM.MICROSOFT.TEXTJOIN(&quot;|&quot;;1;[$Build.$AJ11:.$AZ11])&amp;&quot;)$&quot;)" office:value-type="float" office:value="0" calcext:value-type="float">
            <text:p>0</text:p>
          </table:table-cell>
          <table:table-cell table:style-name="ce47" table:formula="of:=SUMIFS([$'Core Bonuses'.$F$2:.$F$200]; [$'Core Bonuses'.$E$2:.$E$200]; [.BD$70]; [$'Core Bonuses'.$A$2:.$A$200]; &quot;^(&quot;&amp;COM.MICROSOFT.TEXTJOIN(&quot;|&quot;;1;[$Build.$G$2:.$G11])&amp;&quot;)$&quot;)+&#10;SUMIFS([$Systems.$M$2:.$M$200]; [$Systems.$L$2:.$L$200]; [.BD$70]; [$Systems.$A$2:.$A$200]; &quot;^(&quot;&amp;COM.MICROSOFT.TEXTJOIN(&quot;|&quot;;1;[$Build.$AJ11:.$AZ11])&amp;&quot;)$&quot;)" office:value-type="float" office:value="0" calcext:value-type="float">
            <text:p>0</text:p>
          </table:table-cell>
          <table:table-cell table:style-name="ce47" table:formula="of:=SUMIFS([$'Core Bonuses'.$F$2:.$F$200]; [$'Core Bonuses'.$E$2:.$E$200]; [.BE$70]; [$'Core Bonuses'.$A$2:.$A$200]; &quot;^(&quot;&amp;COM.MICROSOFT.TEXTJOIN(&quot;|&quot;;1;[$Build.$G$2:.$G11])&amp;&quot;)$&quot;)+&#10;SUMIFS([$Systems.$M$2:.$M$200]; [$Systems.$L$2:.$L$200]; [.BE$70]; [$Systems.$A$2:.$A$200]; &quot;^(&quot;&amp;COM.MICROSOFT.TEXTJOIN(&quot;|&quot;;1;[$Build.$AJ11:.$AZ11])&amp;&quot;)$&quot;)" office:value-type="float" office:value="0" calcext:value-type="float">
            <text:p>0</text:p>
          </table:table-cell>
          <table:table-cell table:style-name="ce47" table:formula="of:=SUMIFS([$'Core Bonuses'.$F$2:.$F$200]; [$'Core Bonuses'.$E$2:.$E$200]; [.BF$70]; [$'Core Bonuses'.$A$2:.$A$200]; &quot;^(&quot;&amp;COM.MICROSOFT.TEXTJOIN(&quot;|&quot;;1;[$Build.$G$2:.$G11])&amp;&quot;)$&quot;)+&#10;SUMIFS([$Systems.$M$2:.$M$200]; [$Systems.$L$2:.$L$200]; [.BF$70]; [$Systems.$A$2:.$A$200]; &quot;^(&quot;&amp;COM.MICROSOFT.TEXTJOIN(&quot;|&quot;;1;[$Build.$AJ11:.$AZ11])&amp;&quot;)$&quot;)" office:value-type="float" office:value="0" calcext:value-type="float">
            <text:p>0</text:p>
          </table:table-cell>
          <table:table-cell table:style-name="ce47" table:formula="of:=SUMIFS([$'Core Bonuses'.$F$2:.$F$200]; [$'Core Bonuses'.$E$2:.$E$200]; [.BG$70]; [$'Core Bonuses'.$A$2:.$A$200]; &quot;^(&quot;&amp;COM.MICROSOFT.TEXTJOIN(&quot;|&quot;;1;[$Build.$G$2:.$G11])&amp;&quot;)$&quot;)+&#10;SUMIFS([$Systems.$M$2:.$M$200]; [$Systems.$L$2:.$L$200]; [.BG$70]; [$Systems.$A$2:.$A$200]; &quot;^(&quot;&amp;COM.MICROSOFT.TEXTJOIN(&quot;|&quot;;1;[$Build.$AJ11:.$AZ11])&amp;&quot;)$&quot;)" office:value-type="float" office:value="0" calcext:value-type="float">
            <text:p>0</text:p>
          </table:table-cell>
          <table:table-cell table:style-name="ce47" table:formula="of:=SUMIFS([$'Core Bonuses'.$F$2:.$F$200]; [$'Core Bonuses'.$E$2:.$E$200]; [.BH$70]; [$'Core Bonuses'.$A$2:.$A$200]; &quot;^(&quot;&amp;COM.MICROSOFT.TEXTJOIN(&quot;|&quot;;1;[$Build.$G$2:.$G11])&amp;&quot;)$&quot;)+&#10;SUMIFS([$Systems.$M$2:.$M$200]; [$Systems.$L$2:.$L$200]; [.BH$70]; [$Systems.$A$2:.$A$200]; &quot;^(&quot;&amp;COM.MICROSOFT.TEXTJOIN(&quot;|&quot;;1;[$Build.$AJ11:.$AZ11])&amp;&quot;)$&quot;)" office:value-type="float" office:value="0" calcext:value-type="float">
            <text:p>0</text:p>
          </table:table-cell>
          <table:table-cell table:style-name="ce47" table:formula="of:=SUMIFS([$'Core Bonuses'.$F$2:.$F$200]; [$'Core Bonuses'.$E$2:.$E$200]; [.BI$70]; [$'Core Bonuses'.$A$2:.$A$200]; &quot;^(&quot;&amp;COM.MICROSOFT.TEXTJOIN(&quot;|&quot;;1;[$Build.$G$2:.$G11])&amp;&quot;)$&quot;)+&#10;SUMIFS([$Systems.$M$2:.$M$200]; [$Systems.$L$2:.$L$200]; [.BI$70]; [$Systems.$A$2:.$A$200]; &quot;^(&quot;&amp;COM.MICROSOFT.TEXTJOIN(&quot;|&quot;;1;[$Build.$AJ11:.$AZ11])&amp;&quot;)$&quot;)" office:value-type="float" office:value="0" calcext:value-type="float">
            <text:p>0</text:p>
          </table:table-cell>
          <table:table-cell table:style-name="ce47" table:formula="of:=SUMIFS([$'Core Bonuses'.$F$2:.$F$200]; [$'Core Bonuses'.$E$2:.$E$200]; [.BJ$70]; [$'Core Bonuses'.$A$2:.$A$200]; &quot;^(&quot;&amp;COM.MICROSOFT.TEXTJOIN(&quot;|&quot;;1;[$Build.$G$2:.$G11])&amp;&quot;)$&quot;)+&#10;SUMIFS([$Systems.$M$2:.$M$200]; [$Systems.$L$2:.$L$200]; [.BJ$70]; [$Systems.$A$2:.$A$200]; &quot;^(&quot;&amp;COM.MICROSOFT.TEXTJOIN(&quot;|&quot;;1;[$Build.$AJ11:.$AZ11])&amp;&quot;)$&quot;)" office:value-type="float" office:value="0" calcext:value-type="float">
            <text:p>0</text:p>
          </table:table-cell>
          <table:table-cell table:style-name="ce47" table:formula="of:=SUMIFS([$'Core Bonuses'.$F$2:.$F$200]; [$'Core Bonuses'.$E$2:.$E$200]; [.BK$70]; [$'Core Bonuses'.$A$2:.$A$200]; &quot;^(&quot;&amp;COM.MICROSOFT.TEXTJOIN(&quot;|&quot;;1;[$Build.$G$2:.$G11])&amp;&quot;)$&quot;)+&#10;SUMIFS([$Systems.$M$2:.$M$200]; [$Systems.$L$2:.$L$200]; [.BK$70]; [$Systems.$A$2:.$A$200]; &quot;^(&quot;&amp;COM.MICROSOFT.TEXTJOIN(&quot;|&quot;;1;[$Build.$AJ11:.$AZ11])&amp;&quot;)$&quot;)" office:value-type="float" office:value="0" calcext:value-type="float">
            <text:p>0</text:p>
          </table:table-cell>
          <table:table-cell table:style-name="ce47" table:formula="of:=SUMIFS([$'Core Bonuses'.$F$2:.$F$200]; [$'Core Bonuses'.$E$2:.$E$200]; [.BL$70]; [$'Core Bonuses'.$A$2:.$A$200]; &quot;^(&quot;&amp;COM.MICROSOFT.TEXTJOIN(&quot;|&quot;;1;[$Build.$G$2:.$G11])&amp;&quot;)$&quot;)+&#10;SUMIFS([$Systems.$M$2:.$M$200]; [$Systems.$L$2:.$L$200]; [.BL$70]; [$Systems.$A$2:.$A$200]; &quot;^(&quot;&amp;COM.MICROSOFT.TEXTJOIN(&quot;|&quot;;1;[$Build.$AJ11:.$AZ11])&amp;&quot;)$&quot;)" office:value-type="float" office:value="0" calcext:value-type="float">
            <text:p>0</text:p>
          </table:table-cell>
          <table:table-cell table:style-name="ce47" table:formula="of:=SUMIFS([$'Core Bonuses'.$F$2:.$F$200]; [$'Core Bonuses'.$E$2:.$E$200]; [.BM$70]; [$'Core Bonuses'.$A$2:.$A$200]; &quot;^(&quot;&amp;COM.MICROSOFT.TEXTJOIN(&quot;|&quot;;1;[$Build.$G$2:.$G11])&amp;&quot;)$&quot;)+&#10;SUMIFS([$Systems.$M$2:.$M$200]; [$Systems.$L$2:.$L$200]; [.BM$70]; [$Systems.$A$2:.$A$200]; &quot;^(&quot;&amp;COM.MICROSOFT.TEXTJOIN(&quot;|&quot;;1;[$Build.$AJ11:.$AZ11])&amp;&quot;)$&quot;)" office:value-type="float" office:value="0" calcext:value-type="float">
            <text:p>0</text:p>
          </table:table-cell>
          <table:table-cell table:style-name="ce47" table:formula="of:=SUMIFS([$'Core Bonuses'.$F$2:.$F$200]; [$'Core Bonuses'.$E$2:.$E$200]; [.BN$70]; [$'Core Bonuses'.$A$2:.$A$200]; &quot;^(&quot;&amp;COM.MICROSOFT.TEXTJOIN(&quot;|&quot;;1;[$Build.$G$2:.$G11])&amp;&quot;)$&quot;)+&#10;SUMIFS([$Systems.$M$2:.$M$200]; [$Systems.$L$2:.$L$200]; [.BN$70]; [$Systems.$A$2:.$A$200]; &quot;^(&quot;&amp;COM.MICROSOFT.TEXTJOIN(&quot;|&quot;;1;[$Build.$AJ11:.$AZ11])&amp;&quot;)$&quot;)" office:value-type="float" office:value="0" calcext:value-type="float">
            <text:p>0</text:p>
          </table:table-cell>
          <table:table-cell table:style-name="ce47" table:number-columns-repeated="2"/>
          <table:table-cell table:number-columns-repeated="116"/>
        </table:table-row>
        <table:table-row table:style-name="ro2">
          <table:table-cell table:number-columns-repeated="54"/>
          <table:table-cell table:style-name="ce47" table:formula="of:=SUMIFS([$'Core Bonuses'.$F$2:.$F$200]; [$'Core Bonuses'.$E$2:.$E$200]; [.BC$70]; [$'Core Bonuses'.$A$2:.$A$200]; &quot;^(&quot;&amp;COM.MICROSOFT.TEXTJOIN(&quot;|&quot;;1;[$Build.$G$2:.$G12])&amp;&quot;)$&quot;)+&#10;SUMIFS([$Systems.$M$2:.$M$200]; [$Systems.$L$2:.$L$200]; [.BC$70]; [$Systems.$A$2:.$A$200]; &quot;^(&quot;&amp;COM.MICROSOFT.TEXTJOIN(&quot;|&quot;;1;[$Build.$AJ12:.$AZ12])&amp;&quot;)$&quot;)" office:value-type="float" office:value="0" calcext:value-type="float">
            <text:p>0</text:p>
          </table:table-cell>
          <table:table-cell table:style-name="ce47" table:formula="of:=SUMIFS([$'Core Bonuses'.$F$2:.$F$200]; [$'Core Bonuses'.$E$2:.$E$200]; [.BD$70]; [$'Core Bonuses'.$A$2:.$A$200]; &quot;^(&quot;&amp;COM.MICROSOFT.TEXTJOIN(&quot;|&quot;;1;[$Build.$G$2:.$G12])&amp;&quot;)$&quot;)+&#10;SUMIFS([$Systems.$M$2:.$M$200]; [$Systems.$L$2:.$L$200]; [.BD$70]; [$Systems.$A$2:.$A$200]; &quot;^(&quot;&amp;COM.MICROSOFT.TEXTJOIN(&quot;|&quot;;1;[$Build.$AJ12:.$AZ12])&amp;&quot;)$&quot;)" office:value-type="float" office:value="0" calcext:value-type="float">
            <text:p>0</text:p>
          </table:table-cell>
          <table:table-cell table:style-name="ce47" table:formula="of:=SUMIFS([$'Core Bonuses'.$F$2:.$F$200]; [$'Core Bonuses'.$E$2:.$E$200]; [.BE$70]; [$'Core Bonuses'.$A$2:.$A$200]; &quot;^(&quot;&amp;COM.MICROSOFT.TEXTJOIN(&quot;|&quot;;1;[$Build.$G$2:.$G12])&amp;&quot;)$&quot;)+&#10;SUMIFS([$Systems.$M$2:.$M$200]; [$Systems.$L$2:.$L$200]; [.BE$70]; [$Systems.$A$2:.$A$200]; &quot;^(&quot;&amp;COM.MICROSOFT.TEXTJOIN(&quot;|&quot;;1;[$Build.$AJ12:.$AZ12])&amp;&quot;)$&quot;)" office:value-type="float" office:value="0" calcext:value-type="float">
            <text:p>0</text:p>
          </table:table-cell>
          <table:table-cell table:style-name="ce47" table:formula="of:=SUMIFS([$'Core Bonuses'.$F$2:.$F$200]; [$'Core Bonuses'.$E$2:.$E$200]; [.BF$70]; [$'Core Bonuses'.$A$2:.$A$200]; &quot;^(&quot;&amp;COM.MICROSOFT.TEXTJOIN(&quot;|&quot;;1;[$Build.$G$2:.$G12])&amp;&quot;)$&quot;)+&#10;SUMIFS([$Systems.$M$2:.$M$200]; [$Systems.$L$2:.$L$200]; [.BF$70]; [$Systems.$A$2:.$A$200]; &quot;^(&quot;&amp;COM.MICROSOFT.TEXTJOIN(&quot;|&quot;;1;[$Build.$AJ12:.$AZ12])&amp;&quot;)$&quot;)" office:value-type="float" office:value="0" calcext:value-type="float">
            <text:p>0</text:p>
          </table:table-cell>
          <table:table-cell table:style-name="ce47" table:formula="of:=SUMIFS([$'Core Bonuses'.$F$2:.$F$200]; [$'Core Bonuses'.$E$2:.$E$200]; [.BG$70]; [$'Core Bonuses'.$A$2:.$A$200]; &quot;^(&quot;&amp;COM.MICROSOFT.TEXTJOIN(&quot;|&quot;;1;[$Build.$G$2:.$G12])&amp;&quot;)$&quot;)+&#10;SUMIFS([$Systems.$M$2:.$M$200]; [$Systems.$L$2:.$L$200]; [.BG$70]; [$Systems.$A$2:.$A$200]; &quot;^(&quot;&amp;COM.MICROSOFT.TEXTJOIN(&quot;|&quot;;1;[$Build.$AJ12:.$AZ12])&amp;&quot;)$&quot;)" office:value-type="float" office:value="0" calcext:value-type="float">
            <text:p>0</text:p>
          </table:table-cell>
          <table:table-cell table:style-name="ce47" table:formula="of:=SUMIFS([$'Core Bonuses'.$F$2:.$F$200]; [$'Core Bonuses'.$E$2:.$E$200]; [.BH$70]; [$'Core Bonuses'.$A$2:.$A$200]; &quot;^(&quot;&amp;COM.MICROSOFT.TEXTJOIN(&quot;|&quot;;1;[$Build.$G$2:.$G12])&amp;&quot;)$&quot;)+&#10;SUMIFS([$Systems.$M$2:.$M$200]; [$Systems.$L$2:.$L$200]; [.BH$70]; [$Systems.$A$2:.$A$200]; &quot;^(&quot;&amp;COM.MICROSOFT.TEXTJOIN(&quot;|&quot;;1;[$Build.$AJ12:.$AZ12])&amp;&quot;)$&quot;)" office:value-type="float" office:value="0" calcext:value-type="float">
            <text:p>0</text:p>
          </table:table-cell>
          <table:table-cell table:style-name="ce47" table:formula="of:=SUMIFS([$'Core Bonuses'.$F$2:.$F$200]; [$'Core Bonuses'.$E$2:.$E$200]; [.BI$70]; [$'Core Bonuses'.$A$2:.$A$200]; &quot;^(&quot;&amp;COM.MICROSOFT.TEXTJOIN(&quot;|&quot;;1;[$Build.$G$2:.$G12])&amp;&quot;)$&quot;)+&#10;SUMIFS([$Systems.$M$2:.$M$200]; [$Systems.$L$2:.$L$200]; [.BI$70]; [$Systems.$A$2:.$A$200]; &quot;^(&quot;&amp;COM.MICROSOFT.TEXTJOIN(&quot;|&quot;;1;[$Build.$AJ12:.$AZ12])&amp;&quot;)$&quot;)" office:value-type="float" office:value="0" calcext:value-type="float">
            <text:p>0</text:p>
          </table:table-cell>
          <table:table-cell table:style-name="ce47" table:formula="of:=SUMIFS([$'Core Bonuses'.$F$2:.$F$200]; [$'Core Bonuses'.$E$2:.$E$200]; [.BJ$70]; [$'Core Bonuses'.$A$2:.$A$200]; &quot;^(&quot;&amp;COM.MICROSOFT.TEXTJOIN(&quot;|&quot;;1;[$Build.$G$2:.$G12])&amp;&quot;)$&quot;)+&#10;SUMIFS([$Systems.$M$2:.$M$200]; [$Systems.$L$2:.$L$200]; [.BJ$70]; [$Systems.$A$2:.$A$200]; &quot;^(&quot;&amp;COM.MICROSOFT.TEXTJOIN(&quot;|&quot;;1;[$Build.$AJ12:.$AZ12])&amp;&quot;)$&quot;)" office:value-type="float" office:value="0" calcext:value-type="float">
            <text:p>0</text:p>
          </table:table-cell>
          <table:table-cell table:style-name="ce47" table:formula="of:=SUMIFS([$'Core Bonuses'.$F$2:.$F$200]; [$'Core Bonuses'.$E$2:.$E$200]; [.BK$70]; [$'Core Bonuses'.$A$2:.$A$200]; &quot;^(&quot;&amp;COM.MICROSOFT.TEXTJOIN(&quot;|&quot;;1;[$Build.$G$2:.$G12])&amp;&quot;)$&quot;)+&#10;SUMIFS([$Systems.$M$2:.$M$200]; [$Systems.$L$2:.$L$200]; [.BK$70]; [$Systems.$A$2:.$A$200]; &quot;^(&quot;&amp;COM.MICROSOFT.TEXTJOIN(&quot;|&quot;;1;[$Build.$AJ12:.$AZ12])&amp;&quot;)$&quot;)" office:value-type="float" office:value="0" calcext:value-type="float">
            <text:p>0</text:p>
          </table:table-cell>
          <table:table-cell table:style-name="ce47" table:formula="of:=SUMIFS([$'Core Bonuses'.$F$2:.$F$200]; [$'Core Bonuses'.$E$2:.$E$200]; [.BL$70]; [$'Core Bonuses'.$A$2:.$A$200]; &quot;^(&quot;&amp;COM.MICROSOFT.TEXTJOIN(&quot;|&quot;;1;[$Build.$G$2:.$G12])&amp;&quot;)$&quot;)+&#10;SUMIFS([$Systems.$M$2:.$M$200]; [$Systems.$L$2:.$L$200]; [.BL$70]; [$Systems.$A$2:.$A$200]; &quot;^(&quot;&amp;COM.MICROSOFT.TEXTJOIN(&quot;|&quot;;1;[$Build.$AJ12:.$AZ12])&amp;&quot;)$&quot;)" office:value-type="float" office:value="0" calcext:value-type="float">
            <text:p>0</text:p>
          </table:table-cell>
          <table:table-cell table:style-name="ce47" table:formula="of:=SUMIFS([$'Core Bonuses'.$F$2:.$F$200]; [$'Core Bonuses'.$E$2:.$E$200]; [.BM$70]; [$'Core Bonuses'.$A$2:.$A$200]; &quot;^(&quot;&amp;COM.MICROSOFT.TEXTJOIN(&quot;|&quot;;1;[$Build.$G$2:.$G12])&amp;&quot;)$&quot;)+&#10;SUMIFS([$Systems.$M$2:.$M$200]; [$Systems.$L$2:.$L$200]; [.BM$70]; [$Systems.$A$2:.$A$200]; &quot;^(&quot;&amp;COM.MICROSOFT.TEXTJOIN(&quot;|&quot;;1;[$Build.$AJ12:.$AZ12])&amp;&quot;)$&quot;)" office:value-type="float" office:value="0" calcext:value-type="float">
            <text:p>0</text:p>
          </table:table-cell>
          <table:table-cell table:style-name="ce47" table:formula="of:=SUMIFS([$'Core Bonuses'.$F$2:.$F$200]; [$'Core Bonuses'.$E$2:.$E$200]; [.BN$70]; [$'Core Bonuses'.$A$2:.$A$200]; &quot;^(&quot;&amp;COM.MICROSOFT.TEXTJOIN(&quot;|&quot;;1;[$Build.$G$2:.$G12])&amp;&quot;)$&quot;)+&#10;SUMIFS([$Systems.$M$2:.$M$200]; [$Systems.$L$2:.$L$200]; [.BN$70]; [$Systems.$A$2:.$A$200]; &quot;^(&quot;&amp;COM.MICROSOFT.TEXTJOIN(&quot;|&quot;;1;[$Build.$AJ12:.$AZ12])&amp;&quot;)$&quot;)" office:value-type="float" office:value="0" calcext:value-type="float">
            <text:p>0</text:p>
          </table:table-cell>
          <table:table-cell table:style-name="ce47" table:number-columns-repeated="2"/>
          <table:table-cell table:number-columns-repeated="116"/>
        </table:table-row>
        <table:table-row table:style-name="ro2">
          <table:table-cell table:number-columns-repeated="54"/>
          <table:table-cell table:style-name="ce47" table:formula="of:=SUMIFS([$'Core Bonuses'.$F$2:.$F$200]; [$'Core Bonuses'.$E$2:.$E$200]; [.BC$70]; [$'Core Bonuses'.$A$2:.$A$200]; &quot;^(&quot;&amp;COM.MICROSOFT.TEXTJOIN(&quot;|&quot;;1;[$Build.$G$2:.$G13])&amp;&quot;)$&quot;)+&#10;SUMIFS([$Systems.$M$2:.$M$200]; [$Systems.$L$2:.$L$200]; [.BC$70]; [$Systems.$A$2:.$A$200]; &quot;^(&quot;&amp;COM.MICROSOFT.TEXTJOIN(&quot;|&quot;;1;[$Build.$AJ13:.$AZ13])&amp;&quot;)$&quot;)" office:value-type="float" office:value="0" calcext:value-type="float">
            <text:p>0</text:p>
          </table:table-cell>
          <table:table-cell table:style-name="ce47" table:formula="of:=SUMIFS([$'Core Bonuses'.$F$2:.$F$200]; [$'Core Bonuses'.$E$2:.$E$200]; [.BD$70]; [$'Core Bonuses'.$A$2:.$A$200]; &quot;^(&quot;&amp;COM.MICROSOFT.TEXTJOIN(&quot;|&quot;;1;[$Build.$G$2:.$G13])&amp;&quot;)$&quot;)+&#10;SUMIFS([$Systems.$M$2:.$M$200]; [$Systems.$L$2:.$L$200]; [.BD$70]; [$Systems.$A$2:.$A$200]; &quot;^(&quot;&amp;COM.MICROSOFT.TEXTJOIN(&quot;|&quot;;1;[$Build.$AJ13:.$AZ13])&amp;&quot;)$&quot;)" office:value-type="float" office:value="0" calcext:value-type="float">
            <text:p>0</text:p>
          </table:table-cell>
          <table:table-cell table:style-name="ce47" table:formula="of:=SUMIFS([$'Core Bonuses'.$F$2:.$F$200]; [$'Core Bonuses'.$E$2:.$E$200]; [.BE$70]; [$'Core Bonuses'.$A$2:.$A$200]; &quot;^(&quot;&amp;COM.MICROSOFT.TEXTJOIN(&quot;|&quot;;1;[$Build.$G$2:.$G13])&amp;&quot;)$&quot;)+&#10;SUMIFS([$Systems.$M$2:.$M$200]; [$Systems.$L$2:.$L$200]; [.BE$70]; [$Systems.$A$2:.$A$200]; &quot;^(&quot;&amp;COM.MICROSOFT.TEXTJOIN(&quot;|&quot;;1;[$Build.$AJ13:.$AZ13])&amp;&quot;)$&quot;)" office:value-type="float" office:value="0" calcext:value-type="float">
            <text:p>0</text:p>
          </table:table-cell>
          <table:table-cell table:style-name="ce47" table:formula="of:=SUMIFS([$'Core Bonuses'.$F$2:.$F$200]; [$'Core Bonuses'.$E$2:.$E$200]; [.BF$70]; [$'Core Bonuses'.$A$2:.$A$200]; &quot;^(&quot;&amp;COM.MICROSOFT.TEXTJOIN(&quot;|&quot;;1;[$Build.$G$2:.$G13])&amp;&quot;)$&quot;)+&#10;SUMIFS([$Systems.$M$2:.$M$200]; [$Systems.$L$2:.$L$200]; [.BF$70]; [$Systems.$A$2:.$A$200]; &quot;^(&quot;&amp;COM.MICROSOFT.TEXTJOIN(&quot;|&quot;;1;[$Build.$AJ13:.$AZ13])&amp;&quot;)$&quot;)" office:value-type="float" office:value="0" calcext:value-type="float">
            <text:p>0</text:p>
          </table:table-cell>
          <table:table-cell table:style-name="ce47" table:formula="of:=SUMIFS([$'Core Bonuses'.$F$2:.$F$200]; [$'Core Bonuses'.$E$2:.$E$200]; [.BG$70]; [$'Core Bonuses'.$A$2:.$A$200]; &quot;^(&quot;&amp;COM.MICROSOFT.TEXTJOIN(&quot;|&quot;;1;[$Build.$G$2:.$G13])&amp;&quot;)$&quot;)+&#10;SUMIFS([$Systems.$M$2:.$M$200]; [$Systems.$L$2:.$L$200]; [.BG$70]; [$Systems.$A$2:.$A$200]; &quot;^(&quot;&amp;COM.MICROSOFT.TEXTJOIN(&quot;|&quot;;1;[$Build.$AJ13:.$AZ13])&amp;&quot;)$&quot;)" office:value-type="float" office:value="0" calcext:value-type="float">
            <text:p>0</text:p>
          </table:table-cell>
          <table:table-cell table:style-name="ce47" table:formula="of:=SUMIFS([$'Core Bonuses'.$F$2:.$F$200]; [$'Core Bonuses'.$E$2:.$E$200]; [.BH$70]; [$'Core Bonuses'.$A$2:.$A$200]; &quot;^(&quot;&amp;COM.MICROSOFT.TEXTJOIN(&quot;|&quot;;1;[$Build.$G$2:.$G13])&amp;&quot;)$&quot;)+&#10;SUMIFS([$Systems.$M$2:.$M$200]; [$Systems.$L$2:.$L$200]; [.BH$70]; [$Systems.$A$2:.$A$200]; &quot;^(&quot;&amp;COM.MICROSOFT.TEXTJOIN(&quot;|&quot;;1;[$Build.$AJ13:.$AZ13])&amp;&quot;)$&quot;)" office:value-type="float" office:value="0" calcext:value-type="float">
            <text:p>0</text:p>
          </table:table-cell>
          <table:table-cell table:style-name="ce47" table:formula="of:=SUMIFS([$'Core Bonuses'.$F$2:.$F$200]; [$'Core Bonuses'.$E$2:.$E$200]; [.BI$70]; [$'Core Bonuses'.$A$2:.$A$200]; &quot;^(&quot;&amp;COM.MICROSOFT.TEXTJOIN(&quot;|&quot;;1;[$Build.$G$2:.$G13])&amp;&quot;)$&quot;)+&#10;SUMIFS([$Systems.$M$2:.$M$200]; [$Systems.$L$2:.$L$200]; [.BI$70]; [$Systems.$A$2:.$A$200]; &quot;^(&quot;&amp;COM.MICROSOFT.TEXTJOIN(&quot;|&quot;;1;[$Build.$AJ13:.$AZ13])&amp;&quot;)$&quot;)" office:value-type="float" office:value="0" calcext:value-type="float">
            <text:p>0</text:p>
          </table:table-cell>
          <table:table-cell table:style-name="ce47" table:formula="of:=SUMIFS([$'Core Bonuses'.$F$2:.$F$200]; [$'Core Bonuses'.$E$2:.$E$200]; [.BJ$70]; [$'Core Bonuses'.$A$2:.$A$200]; &quot;^(&quot;&amp;COM.MICROSOFT.TEXTJOIN(&quot;|&quot;;1;[$Build.$G$2:.$G13])&amp;&quot;)$&quot;)+&#10;SUMIFS([$Systems.$M$2:.$M$200]; [$Systems.$L$2:.$L$200]; [.BJ$70]; [$Systems.$A$2:.$A$200]; &quot;^(&quot;&amp;COM.MICROSOFT.TEXTJOIN(&quot;|&quot;;1;[$Build.$AJ13:.$AZ13])&amp;&quot;)$&quot;)" office:value-type="float" office:value="0" calcext:value-type="float">
            <text:p>0</text:p>
          </table:table-cell>
          <table:table-cell table:style-name="ce47" table:formula="of:=SUMIFS([$'Core Bonuses'.$F$2:.$F$200]; [$'Core Bonuses'.$E$2:.$E$200]; [.BK$70]; [$'Core Bonuses'.$A$2:.$A$200]; &quot;^(&quot;&amp;COM.MICROSOFT.TEXTJOIN(&quot;|&quot;;1;[$Build.$G$2:.$G13])&amp;&quot;)$&quot;)+&#10;SUMIFS([$Systems.$M$2:.$M$200]; [$Systems.$L$2:.$L$200]; [.BK$70]; [$Systems.$A$2:.$A$200]; &quot;^(&quot;&amp;COM.MICROSOFT.TEXTJOIN(&quot;|&quot;;1;[$Build.$AJ13:.$AZ13])&amp;&quot;)$&quot;)" office:value-type="float" office:value="0" calcext:value-type="float">
            <text:p>0</text:p>
          </table:table-cell>
          <table:table-cell table:style-name="ce47" table:formula="of:=SUMIFS([$'Core Bonuses'.$F$2:.$F$200]; [$'Core Bonuses'.$E$2:.$E$200]; [.BL$70]; [$'Core Bonuses'.$A$2:.$A$200]; &quot;^(&quot;&amp;COM.MICROSOFT.TEXTJOIN(&quot;|&quot;;1;[$Build.$G$2:.$G13])&amp;&quot;)$&quot;)+&#10;SUMIFS([$Systems.$M$2:.$M$200]; [$Systems.$L$2:.$L$200]; [.BL$70]; [$Systems.$A$2:.$A$200]; &quot;^(&quot;&amp;COM.MICROSOFT.TEXTJOIN(&quot;|&quot;;1;[$Build.$AJ13:.$AZ13])&amp;&quot;)$&quot;)" office:value-type="float" office:value="0" calcext:value-type="float">
            <text:p>0</text:p>
          </table:table-cell>
          <table:table-cell table:style-name="ce47" table:formula="of:=SUMIFS([$'Core Bonuses'.$F$2:.$F$200]; [$'Core Bonuses'.$E$2:.$E$200]; [.BM$70]; [$'Core Bonuses'.$A$2:.$A$200]; &quot;^(&quot;&amp;COM.MICROSOFT.TEXTJOIN(&quot;|&quot;;1;[$Build.$G$2:.$G13])&amp;&quot;)$&quot;)+&#10;SUMIFS([$Systems.$M$2:.$M$200]; [$Systems.$L$2:.$L$200]; [.BM$70]; [$Systems.$A$2:.$A$200]; &quot;^(&quot;&amp;COM.MICROSOFT.TEXTJOIN(&quot;|&quot;;1;[$Build.$AJ13:.$AZ13])&amp;&quot;)$&quot;)" office:value-type="float" office:value="0" calcext:value-type="float">
            <text:p>0</text:p>
          </table:table-cell>
          <table:table-cell table:style-name="ce47" table:formula="of:=SUMIFS([$'Core Bonuses'.$F$2:.$F$200]; [$'Core Bonuses'.$E$2:.$E$200]; [.BN$70]; [$'Core Bonuses'.$A$2:.$A$200]; &quot;^(&quot;&amp;COM.MICROSOFT.TEXTJOIN(&quot;|&quot;;1;[$Build.$G$2:.$G13])&amp;&quot;)$&quot;)+&#10;SUMIFS([$Systems.$M$2:.$M$200]; [$Systems.$L$2:.$L$200]; [.BN$70]; [$Systems.$A$2:.$A$200]; &quot;^(&quot;&amp;COM.MICROSOFT.TEXTJOIN(&quot;|&quot;;1;[$Build.$AJ13:.$AZ13])&amp;&quot;)$&quot;)" office:value-type="float" office:value="0" calcext:value-type="float">
            <text:p>0</text:p>
          </table:table-cell>
          <table:table-cell table:style-name="ce47" table:number-columns-repeated="2"/>
          <table:table-cell table:number-columns-repeated="116"/>
        </table:table-row>
        <table:table-row table:style-name="ro2">
          <table:table-cell table:number-columns-repeated="54"/>
          <table:table-cell table:style-name="ce47" table:formula="of:=SUMIFS([$'Core Bonuses'.$F$2:.$F$200]; [$'Core Bonuses'.$E$2:.$E$200]; [.BC$70]; [$'Core Bonuses'.$A$2:.$A$200]; &quot;^(&quot;&amp;COM.MICROSOFT.TEXTJOIN(&quot;|&quot;;1;[$Build.$G$2:.$G14])&amp;&quot;)$&quot;)+&#10;SUMIFS([$Systems.$M$2:.$M$200]; [$Systems.$L$2:.$L$200]; [.BC$70]; [$Systems.$A$2:.$A$200]; &quot;^(&quot;&amp;COM.MICROSOFT.TEXTJOIN(&quot;|&quot;;1;[$Build.$AJ14:.$AZ14])&amp;&quot;)$&quot;)" office:value-type="float" office:value="0" calcext:value-type="float">
            <text:p>0</text:p>
          </table:table-cell>
          <table:table-cell table:style-name="ce47" table:formula="of:=SUMIFS([$'Core Bonuses'.$F$2:.$F$200]; [$'Core Bonuses'.$E$2:.$E$200]; [.BD$70]; [$'Core Bonuses'.$A$2:.$A$200]; &quot;^(&quot;&amp;COM.MICROSOFT.TEXTJOIN(&quot;|&quot;;1;[$Build.$G$2:.$G14])&amp;&quot;)$&quot;)+&#10;SUMIFS([$Systems.$M$2:.$M$200]; [$Systems.$L$2:.$L$200]; [.BD$70]; [$Systems.$A$2:.$A$200]; &quot;^(&quot;&amp;COM.MICROSOFT.TEXTJOIN(&quot;|&quot;;1;[$Build.$AJ14:.$AZ14])&amp;&quot;)$&quot;)" office:value-type="float" office:value="0" calcext:value-type="float">
            <text:p>0</text:p>
          </table:table-cell>
          <table:table-cell table:style-name="ce47" table:formula="of:=SUMIFS([$'Core Bonuses'.$F$2:.$F$200]; [$'Core Bonuses'.$E$2:.$E$200]; [.BE$70]; [$'Core Bonuses'.$A$2:.$A$200]; &quot;^(&quot;&amp;COM.MICROSOFT.TEXTJOIN(&quot;|&quot;;1;[$Build.$G$2:.$G14])&amp;&quot;)$&quot;)+&#10;SUMIFS([$Systems.$M$2:.$M$200]; [$Systems.$L$2:.$L$200]; [.BE$70]; [$Systems.$A$2:.$A$200]; &quot;^(&quot;&amp;COM.MICROSOFT.TEXTJOIN(&quot;|&quot;;1;[$Build.$AJ14:.$AZ14])&amp;&quot;)$&quot;)" office:value-type="float" office:value="0" calcext:value-type="float">
            <text:p>0</text:p>
          </table:table-cell>
          <table:table-cell table:style-name="ce47" table:formula="of:=SUMIFS([$'Core Bonuses'.$F$2:.$F$200]; [$'Core Bonuses'.$E$2:.$E$200]; [.BF$70]; [$'Core Bonuses'.$A$2:.$A$200]; &quot;^(&quot;&amp;COM.MICROSOFT.TEXTJOIN(&quot;|&quot;;1;[$Build.$G$2:.$G14])&amp;&quot;)$&quot;)+&#10;SUMIFS([$Systems.$M$2:.$M$200]; [$Systems.$L$2:.$L$200]; [.BF$70]; [$Systems.$A$2:.$A$200]; &quot;^(&quot;&amp;COM.MICROSOFT.TEXTJOIN(&quot;|&quot;;1;[$Build.$AJ14:.$AZ14])&amp;&quot;)$&quot;)" office:value-type="float" office:value="0" calcext:value-type="float">
            <text:p>0</text:p>
          </table:table-cell>
          <table:table-cell table:style-name="ce47" table:formula="of:=SUMIFS([$'Core Bonuses'.$F$2:.$F$200]; [$'Core Bonuses'.$E$2:.$E$200]; [.BG$70]; [$'Core Bonuses'.$A$2:.$A$200]; &quot;^(&quot;&amp;COM.MICROSOFT.TEXTJOIN(&quot;|&quot;;1;[$Build.$G$2:.$G14])&amp;&quot;)$&quot;)+&#10;SUMIFS([$Systems.$M$2:.$M$200]; [$Systems.$L$2:.$L$200]; [.BG$70]; [$Systems.$A$2:.$A$200]; &quot;^(&quot;&amp;COM.MICROSOFT.TEXTJOIN(&quot;|&quot;;1;[$Build.$AJ14:.$AZ14])&amp;&quot;)$&quot;)" office:value-type="float" office:value="0" calcext:value-type="float">
            <text:p>0</text:p>
          </table:table-cell>
          <table:table-cell table:style-name="ce47" table:formula="of:=SUMIFS([$'Core Bonuses'.$F$2:.$F$200]; [$'Core Bonuses'.$E$2:.$E$200]; [.BH$70]; [$'Core Bonuses'.$A$2:.$A$200]; &quot;^(&quot;&amp;COM.MICROSOFT.TEXTJOIN(&quot;|&quot;;1;[$Build.$G$2:.$G14])&amp;&quot;)$&quot;)+&#10;SUMIFS([$Systems.$M$2:.$M$200]; [$Systems.$L$2:.$L$200]; [.BH$70]; [$Systems.$A$2:.$A$200]; &quot;^(&quot;&amp;COM.MICROSOFT.TEXTJOIN(&quot;|&quot;;1;[$Build.$AJ14:.$AZ14])&amp;&quot;)$&quot;)" office:value-type="float" office:value="0" calcext:value-type="float">
            <text:p>0</text:p>
          </table:table-cell>
          <table:table-cell table:style-name="ce47" table:formula="of:=SUMIFS([$'Core Bonuses'.$F$2:.$F$200]; [$'Core Bonuses'.$E$2:.$E$200]; [.BI$70]; [$'Core Bonuses'.$A$2:.$A$200]; &quot;^(&quot;&amp;COM.MICROSOFT.TEXTJOIN(&quot;|&quot;;1;[$Build.$G$2:.$G14])&amp;&quot;)$&quot;)+&#10;SUMIFS([$Systems.$M$2:.$M$200]; [$Systems.$L$2:.$L$200]; [.BI$70]; [$Systems.$A$2:.$A$200]; &quot;^(&quot;&amp;COM.MICROSOFT.TEXTJOIN(&quot;|&quot;;1;[$Build.$AJ14:.$AZ14])&amp;&quot;)$&quot;)" office:value-type="float" office:value="0" calcext:value-type="float">
            <text:p>0</text:p>
          </table:table-cell>
          <table:table-cell table:style-name="ce47" table:formula="of:=SUMIFS([$'Core Bonuses'.$F$2:.$F$200]; [$'Core Bonuses'.$E$2:.$E$200]; [.BJ$70]; [$'Core Bonuses'.$A$2:.$A$200]; &quot;^(&quot;&amp;COM.MICROSOFT.TEXTJOIN(&quot;|&quot;;1;[$Build.$G$2:.$G14])&amp;&quot;)$&quot;)+&#10;SUMIFS([$Systems.$M$2:.$M$200]; [$Systems.$L$2:.$L$200]; [.BJ$70]; [$Systems.$A$2:.$A$200]; &quot;^(&quot;&amp;COM.MICROSOFT.TEXTJOIN(&quot;|&quot;;1;[$Build.$AJ14:.$AZ14])&amp;&quot;)$&quot;)" office:value-type="float" office:value="0" calcext:value-type="float">
            <text:p>0</text:p>
          </table:table-cell>
          <table:table-cell table:style-name="ce47" table:formula="of:=SUMIFS([$'Core Bonuses'.$F$2:.$F$200]; [$'Core Bonuses'.$E$2:.$E$200]; [.BK$70]; [$'Core Bonuses'.$A$2:.$A$200]; &quot;^(&quot;&amp;COM.MICROSOFT.TEXTJOIN(&quot;|&quot;;1;[$Build.$G$2:.$G14])&amp;&quot;)$&quot;)+&#10;SUMIFS([$Systems.$M$2:.$M$200]; [$Systems.$L$2:.$L$200]; [.BK$70]; [$Systems.$A$2:.$A$200]; &quot;^(&quot;&amp;COM.MICROSOFT.TEXTJOIN(&quot;|&quot;;1;[$Build.$AJ14:.$AZ14])&amp;&quot;)$&quot;)" office:value-type="float" office:value="0" calcext:value-type="float">
            <text:p>0</text:p>
          </table:table-cell>
          <table:table-cell table:style-name="ce47" table:formula="of:=SUMIFS([$'Core Bonuses'.$F$2:.$F$200]; [$'Core Bonuses'.$E$2:.$E$200]; [.BL$70]; [$'Core Bonuses'.$A$2:.$A$200]; &quot;^(&quot;&amp;COM.MICROSOFT.TEXTJOIN(&quot;|&quot;;1;[$Build.$G$2:.$G14])&amp;&quot;)$&quot;)+&#10;SUMIFS([$Systems.$M$2:.$M$200]; [$Systems.$L$2:.$L$200]; [.BL$70]; [$Systems.$A$2:.$A$200]; &quot;^(&quot;&amp;COM.MICROSOFT.TEXTJOIN(&quot;|&quot;;1;[$Build.$AJ14:.$AZ14])&amp;&quot;)$&quot;)" office:value-type="float" office:value="0" calcext:value-type="float">
            <text:p>0</text:p>
          </table:table-cell>
          <table:table-cell table:style-name="ce47" table:formula="of:=SUMIFS([$'Core Bonuses'.$F$2:.$F$200]; [$'Core Bonuses'.$E$2:.$E$200]; [.BM$70]; [$'Core Bonuses'.$A$2:.$A$200]; &quot;^(&quot;&amp;COM.MICROSOFT.TEXTJOIN(&quot;|&quot;;1;[$Build.$G$2:.$G14])&amp;&quot;)$&quot;)+&#10;SUMIFS([$Systems.$M$2:.$M$200]; [$Systems.$L$2:.$L$200]; [.BM$70]; [$Systems.$A$2:.$A$200]; &quot;^(&quot;&amp;COM.MICROSOFT.TEXTJOIN(&quot;|&quot;;1;[$Build.$AJ14:.$AZ14])&amp;&quot;)$&quot;)" office:value-type="float" office:value="0" calcext:value-type="float">
            <text:p>0</text:p>
          </table:table-cell>
          <table:table-cell table:style-name="ce47" table:formula="of:=SUMIFS([$'Core Bonuses'.$F$2:.$F$200]; [$'Core Bonuses'.$E$2:.$E$200]; [.BN$70]; [$'Core Bonuses'.$A$2:.$A$200]; &quot;^(&quot;&amp;COM.MICROSOFT.TEXTJOIN(&quot;|&quot;;1;[$Build.$G$2:.$G14])&amp;&quot;)$&quot;)+&#10;SUMIFS([$Systems.$M$2:.$M$200]; [$Systems.$L$2:.$L$200]; [.BN$70]; [$Systems.$A$2:.$A$200]; &quot;^(&quot;&amp;COM.MICROSOFT.TEXTJOIN(&quot;|&quot;;1;[$Build.$AJ14:.$AZ14])&amp;&quot;)$&quot;)" office:value-type="float" office:value="0" calcext:value-type="float">
            <text:p>0</text:p>
          </table:table-cell>
          <table:table-cell table:style-name="ce47" table:number-columns-repeated="2"/>
          <table:table-cell table:number-columns-repeated="116"/>
        </table:table-row>
        <table:table-row table:style-name="ro2">
          <table:table-cell table:number-columns-repeated="54"/>
          <table:table-cell table:style-name="ce47" table:formula="of:=SUMIFS([$'Core Bonuses'.$F$2:.$F$200]; [$'Core Bonuses'.$E$2:.$E$200]; [.BC$70]; [$'Core Bonuses'.$A$2:.$A$200]; &quot;^(&quot;&amp;COM.MICROSOFT.TEXTJOIN(&quot;|&quot;;1;[$Build.$G$2:.$G15])&amp;&quot;)$&quot;)+&#10;SUMIFS([$Systems.$M$2:.$M$200]; [$Systems.$L$2:.$L$200]; [.BC$70]; [$Systems.$A$2:.$A$200]; &quot;^(&quot;&amp;COM.MICROSOFT.TEXTJOIN(&quot;|&quot;;1;[$Build.$AJ15:.$AZ15])&amp;&quot;)$&quot;)" office:value-type="float" office:value="0" calcext:value-type="float">
            <text:p>0</text:p>
          </table:table-cell>
          <table:table-cell table:style-name="ce47" table:formula="of:=SUMIFS([$'Core Bonuses'.$F$2:.$F$200]; [$'Core Bonuses'.$E$2:.$E$200]; [.BD$70]; [$'Core Bonuses'.$A$2:.$A$200]; &quot;^(&quot;&amp;COM.MICROSOFT.TEXTJOIN(&quot;|&quot;;1;[$Build.$G$2:.$G15])&amp;&quot;)$&quot;)+&#10;SUMIFS([$Systems.$M$2:.$M$200]; [$Systems.$L$2:.$L$200]; [.BD$70]; [$Systems.$A$2:.$A$200]; &quot;^(&quot;&amp;COM.MICROSOFT.TEXTJOIN(&quot;|&quot;;1;[$Build.$AJ15:.$AZ15])&amp;&quot;)$&quot;)" office:value-type="float" office:value="0" calcext:value-type="float">
            <text:p>0</text:p>
          </table:table-cell>
          <table:table-cell table:style-name="ce47" table:formula="of:=SUMIFS([$'Core Bonuses'.$F$2:.$F$200]; [$'Core Bonuses'.$E$2:.$E$200]; [.BE$70]; [$'Core Bonuses'.$A$2:.$A$200]; &quot;^(&quot;&amp;COM.MICROSOFT.TEXTJOIN(&quot;|&quot;;1;[$Build.$G$2:.$G15])&amp;&quot;)$&quot;)+&#10;SUMIFS([$Systems.$M$2:.$M$200]; [$Systems.$L$2:.$L$200]; [.BE$70]; [$Systems.$A$2:.$A$200]; &quot;^(&quot;&amp;COM.MICROSOFT.TEXTJOIN(&quot;|&quot;;1;[$Build.$AJ15:.$AZ15])&amp;&quot;)$&quot;)" office:value-type="float" office:value="0" calcext:value-type="float">
            <text:p>0</text:p>
          </table:table-cell>
          <table:table-cell table:style-name="ce47" table:formula="of:=SUMIFS([$'Core Bonuses'.$F$2:.$F$200]; [$'Core Bonuses'.$E$2:.$E$200]; [.BF$70]; [$'Core Bonuses'.$A$2:.$A$200]; &quot;^(&quot;&amp;COM.MICROSOFT.TEXTJOIN(&quot;|&quot;;1;[$Build.$G$2:.$G15])&amp;&quot;)$&quot;)+&#10;SUMIFS([$Systems.$M$2:.$M$200]; [$Systems.$L$2:.$L$200]; [.BF$70]; [$Systems.$A$2:.$A$200]; &quot;^(&quot;&amp;COM.MICROSOFT.TEXTJOIN(&quot;|&quot;;1;[$Build.$AJ15:.$AZ15])&amp;&quot;)$&quot;)" office:value-type="float" office:value="0" calcext:value-type="float">
            <text:p>0</text:p>
          </table:table-cell>
          <table:table-cell table:style-name="ce47" table:formula="of:=SUMIFS([$'Core Bonuses'.$F$2:.$F$200]; [$'Core Bonuses'.$E$2:.$E$200]; [.BG$70]; [$'Core Bonuses'.$A$2:.$A$200]; &quot;^(&quot;&amp;COM.MICROSOFT.TEXTJOIN(&quot;|&quot;;1;[$Build.$G$2:.$G15])&amp;&quot;)$&quot;)+&#10;SUMIFS([$Systems.$M$2:.$M$200]; [$Systems.$L$2:.$L$200]; [.BG$70]; [$Systems.$A$2:.$A$200]; &quot;^(&quot;&amp;COM.MICROSOFT.TEXTJOIN(&quot;|&quot;;1;[$Build.$AJ15:.$AZ15])&amp;&quot;)$&quot;)" office:value-type="float" office:value="0" calcext:value-type="float">
            <text:p>0</text:p>
          </table:table-cell>
          <table:table-cell table:style-name="ce47" table:formula="of:=SUMIFS([$'Core Bonuses'.$F$2:.$F$200]; [$'Core Bonuses'.$E$2:.$E$200]; [.BH$70]; [$'Core Bonuses'.$A$2:.$A$200]; &quot;^(&quot;&amp;COM.MICROSOFT.TEXTJOIN(&quot;|&quot;;1;[$Build.$G$2:.$G15])&amp;&quot;)$&quot;)+&#10;SUMIFS([$Systems.$M$2:.$M$200]; [$Systems.$L$2:.$L$200]; [.BH$70]; [$Systems.$A$2:.$A$200]; &quot;^(&quot;&amp;COM.MICROSOFT.TEXTJOIN(&quot;|&quot;;1;[$Build.$AJ15:.$AZ15])&amp;&quot;)$&quot;)" office:value-type="float" office:value="0" calcext:value-type="float">
            <text:p>0</text:p>
          </table:table-cell>
          <table:table-cell table:style-name="ce47" table:formula="of:=SUMIFS([$'Core Bonuses'.$F$2:.$F$200]; [$'Core Bonuses'.$E$2:.$E$200]; [.BI$70]; [$'Core Bonuses'.$A$2:.$A$200]; &quot;^(&quot;&amp;COM.MICROSOFT.TEXTJOIN(&quot;|&quot;;1;[$Build.$G$2:.$G15])&amp;&quot;)$&quot;)+&#10;SUMIFS([$Systems.$M$2:.$M$200]; [$Systems.$L$2:.$L$200]; [.BI$70]; [$Systems.$A$2:.$A$200]; &quot;^(&quot;&amp;COM.MICROSOFT.TEXTJOIN(&quot;|&quot;;1;[$Build.$AJ15:.$AZ15])&amp;&quot;)$&quot;)" office:value-type="float" office:value="0" calcext:value-type="float">
            <text:p>0</text:p>
          </table:table-cell>
          <table:table-cell table:style-name="ce47" table:formula="of:=SUMIFS([$'Core Bonuses'.$F$2:.$F$200]; [$'Core Bonuses'.$E$2:.$E$200]; [.BJ$70]; [$'Core Bonuses'.$A$2:.$A$200]; &quot;^(&quot;&amp;COM.MICROSOFT.TEXTJOIN(&quot;|&quot;;1;[$Build.$G$2:.$G15])&amp;&quot;)$&quot;)+&#10;SUMIFS([$Systems.$M$2:.$M$200]; [$Systems.$L$2:.$L$200]; [.BJ$70]; [$Systems.$A$2:.$A$200]; &quot;^(&quot;&amp;COM.MICROSOFT.TEXTJOIN(&quot;|&quot;;1;[$Build.$AJ15:.$AZ15])&amp;&quot;)$&quot;)" office:value-type="float" office:value="0" calcext:value-type="float">
            <text:p>0</text:p>
          </table:table-cell>
          <table:table-cell table:style-name="ce47" table:formula="of:=SUMIFS([$'Core Bonuses'.$F$2:.$F$200]; [$'Core Bonuses'.$E$2:.$E$200]; [.BK$70]; [$'Core Bonuses'.$A$2:.$A$200]; &quot;^(&quot;&amp;COM.MICROSOFT.TEXTJOIN(&quot;|&quot;;1;[$Build.$G$2:.$G15])&amp;&quot;)$&quot;)+&#10;SUMIFS([$Systems.$M$2:.$M$200]; [$Systems.$L$2:.$L$200]; [.BK$70]; [$Systems.$A$2:.$A$200]; &quot;^(&quot;&amp;COM.MICROSOFT.TEXTJOIN(&quot;|&quot;;1;[$Build.$AJ15:.$AZ15])&amp;&quot;)$&quot;)" office:value-type="float" office:value="0" calcext:value-type="float">
            <text:p>0</text:p>
          </table:table-cell>
          <table:table-cell table:style-name="ce47" table:formula="of:=SUMIFS([$'Core Bonuses'.$F$2:.$F$200]; [$'Core Bonuses'.$E$2:.$E$200]; [.BL$70]; [$'Core Bonuses'.$A$2:.$A$200]; &quot;^(&quot;&amp;COM.MICROSOFT.TEXTJOIN(&quot;|&quot;;1;[$Build.$G$2:.$G15])&amp;&quot;)$&quot;)+&#10;SUMIFS([$Systems.$M$2:.$M$200]; [$Systems.$L$2:.$L$200]; [.BL$70]; [$Systems.$A$2:.$A$200]; &quot;^(&quot;&amp;COM.MICROSOFT.TEXTJOIN(&quot;|&quot;;1;[$Build.$AJ15:.$AZ15])&amp;&quot;)$&quot;)" office:value-type="float" office:value="0" calcext:value-type="float">
            <text:p>0</text:p>
          </table:table-cell>
          <table:table-cell table:style-name="ce47" table:formula="of:=SUMIFS([$'Core Bonuses'.$F$2:.$F$200]; [$'Core Bonuses'.$E$2:.$E$200]; [.BM$70]; [$'Core Bonuses'.$A$2:.$A$200]; &quot;^(&quot;&amp;COM.MICROSOFT.TEXTJOIN(&quot;|&quot;;1;[$Build.$G$2:.$G15])&amp;&quot;)$&quot;)+&#10;SUMIFS([$Systems.$M$2:.$M$200]; [$Systems.$L$2:.$L$200]; [.BM$70]; [$Systems.$A$2:.$A$200]; &quot;^(&quot;&amp;COM.MICROSOFT.TEXTJOIN(&quot;|&quot;;1;[$Build.$AJ15:.$AZ15])&amp;&quot;)$&quot;)" office:value-type="float" office:value="0" calcext:value-type="float">
            <text:p>0</text:p>
          </table:table-cell>
          <table:table-cell table:style-name="ce47" table:formula="of:=SUMIFS([$'Core Bonuses'.$F$2:.$F$200]; [$'Core Bonuses'.$E$2:.$E$200]; [.BN$70]; [$'Core Bonuses'.$A$2:.$A$200]; &quot;^(&quot;&amp;COM.MICROSOFT.TEXTJOIN(&quot;|&quot;;1;[$Build.$G$2:.$G15])&amp;&quot;)$&quot;)+&#10;SUMIFS([$Systems.$M$2:.$M$200]; [$Systems.$L$2:.$L$200]; [.BN$70]; [$Systems.$A$2:.$A$200]; &quot;^(&quot;&amp;COM.MICROSOFT.TEXTJOIN(&quot;|&quot;;1;[$Build.$AJ15:.$AZ15])&amp;&quot;)$&quot;)" office:value-type="float" office:value="0" calcext:value-type="float">
            <text:p>0</text:p>
          </table:table-cell>
          <table:table-cell table:style-name="ce47" table:number-columns-repeated="2"/>
          <table:table-cell table:number-columns-repeated="116"/>
        </table:table-row>
        <table:table-row table:style-name="ro2">
          <table:table-cell table:number-columns-repeated="54"/>
          <table:table-cell table:style-name="ce47" table:formula="of:=SUMIFS([$'Core Bonuses'.$F$2:.$F$200]; [$'Core Bonuses'.$E$2:.$E$200]; [.BC$70]; [$'Core Bonuses'.$A$2:.$A$200]; &quot;^(&quot;&amp;COM.MICROSOFT.TEXTJOIN(&quot;|&quot;;1;[$Build.$G$2:.$G16])&amp;&quot;)$&quot;)+&#10;SUMIFS([$Systems.$M$2:.$M$200]; [$Systems.$L$2:.$L$200]; [.BC$70]; [$Systems.$A$2:.$A$200]; &quot;^(&quot;&amp;COM.MICROSOFT.TEXTJOIN(&quot;|&quot;;1;[$Build.$AJ16:.$AZ16])&amp;&quot;)$&quot;)" office:value-type="float" office:value="0" calcext:value-type="float">
            <text:p>0</text:p>
          </table:table-cell>
          <table:table-cell table:style-name="ce47" table:formula="of:=SUMIFS([$'Core Bonuses'.$F$2:.$F$200]; [$'Core Bonuses'.$E$2:.$E$200]; [.BD$70]; [$'Core Bonuses'.$A$2:.$A$200]; &quot;^(&quot;&amp;COM.MICROSOFT.TEXTJOIN(&quot;|&quot;;1;[$Build.$G$2:.$G16])&amp;&quot;)$&quot;)+&#10;SUMIFS([$Systems.$M$2:.$M$200]; [$Systems.$L$2:.$L$200]; [.BD$70]; [$Systems.$A$2:.$A$200]; &quot;^(&quot;&amp;COM.MICROSOFT.TEXTJOIN(&quot;|&quot;;1;[$Build.$AJ16:.$AZ16])&amp;&quot;)$&quot;)" office:value-type="float" office:value="0" calcext:value-type="float">
            <text:p>0</text:p>
          </table:table-cell>
          <table:table-cell table:style-name="ce47" table:formula="of:=SUMIFS([$'Core Bonuses'.$F$2:.$F$200]; [$'Core Bonuses'.$E$2:.$E$200]; [.BE$70]; [$'Core Bonuses'.$A$2:.$A$200]; &quot;^(&quot;&amp;COM.MICROSOFT.TEXTJOIN(&quot;|&quot;;1;[$Build.$G$2:.$G16])&amp;&quot;)$&quot;)+&#10;SUMIFS([$Systems.$M$2:.$M$200]; [$Systems.$L$2:.$L$200]; [.BE$70]; [$Systems.$A$2:.$A$200]; &quot;^(&quot;&amp;COM.MICROSOFT.TEXTJOIN(&quot;|&quot;;1;[$Build.$AJ16:.$AZ16])&amp;&quot;)$&quot;)" office:value-type="float" office:value="0" calcext:value-type="float">
            <text:p>0</text:p>
          </table:table-cell>
          <table:table-cell table:style-name="ce47" table:formula="of:=SUMIFS([$'Core Bonuses'.$F$2:.$F$200]; [$'Core Bonuses'.$E$2:.$E$200]; [.BF$70]; [$'Core Bonuses'.$A$2:.$A$200]; &quot;^(&quot;&amp;COM.MICROSOFT.TEXTJOIN(&quot;|&quot;;1;[$Build.$G$2:.$G16])&amp;&quot;)$&quot;)+&#10;SUMIFS([$Systems.$M$2:.$M$200]; [$Systems.$L$2:.$L$200]; [.BF$70]; [$Systems.$A$2:.$A$200]; &quot;^(&quot;&amp;COM.MICROSOFT.TEXTJOIN(&quot;|&quot;;1;[$Build.$AJ16:.$AZ16])&amp;&quot;)$&quot;)" office:value-type="float" office:value="0" calcext:value-type="float">
            <text:p>0</text:p>
          </table:table-cell>
          <table:table-cell table:style-name="ce47" table:formula="of:=SUMIFS([$'Core Bonuses'.$F$2:.$F$200]; [$'Core Bonuses'.$E$2:.$E$200]; [.BG$70]; [$'Core Bonuses'.$A$2:.$A$200]; &quot;^(&quot;&amp;COM.MICROSOFT.TEXTJOIN(&quot;|&quot;;1;[$Build.$G$2:.$G16])&amp;&quot;)$&quot;)+&#10;SUMIFS([$Systems.$M$2:.$M$200]; [$Systems.$L$2:.$L$200]; [.BG$70]; [$Systems.$A$2:.$A$200]; &quot;^(&quot;&amp;COM.MICROSOFT.TEXTJOIN(&quot;|&quot;;1;[$Build.$AJ16:.$AZ16])&amp;&quot;)$&quot;)" office:value-type="float" office:value="0" calcext:value-type="float">
            <text:p>0</text:p>
          </table:table-cell>
          <table:table-cell table:style-name="ce47" table:formula="of:=SUMIFS([$'Core Bonuses'.$F$2:.$F$200]; [$'Core Bonuses'.$E$2:.$E$200]; [.BH$70]; [$'Core Bonuses'.$A$2:.$A$200]; &quot;^(&quot;&amp;COM.MICROSOFT.TEXTJOIN(&quot;|&quot;;1;[$Build.$G$2:.$G16])&amp;&quot;)$&quot;)+&#10;SUMIFS([$Systems.$M$2:.$M$200]; [$Systems.$L$2:.$L$200]; [.BH$70]; [$Systems.$A$2:.$A$200]; &quot;^(&quot;&amp;COM.MICROSOFT.TEXTJOIN(&quot;|&quot;;1;[$Build.$AJ16:.$AZ16])&amp;&quot;)$&quot;)" office:value-type="float" office:value="0" calcext:value-type="float">
            <text:p>0</text:p>
          </table:table-cell>
          <table:table-cell table:style-name="ce47" table:formula="of:=SUMIFS([$'Core Bonuses'.$F$2:.$F$200]; [$'Core Bonuses'.$E$2:.$E$200]; [.BI$70]; [$'Core Bonuses'.$A$2:.$A$200]; &quot;^(&quot;&amp;COM.MICROSOFT.TEXTJOIN(&quot;|&quot;;1;[$Build.$G$2:.$G16])&amp;&quot;)$&quot;)+&#10;SUMIFS([$Systems.$M$2:.$M$200]; [$Systems.$L$2:.$L$200]; [.BI$70]; [$Systems.$A$2:.$A$200]; &quot;^(&quot;&amp;COM.MICROSOFT.TEXTJOIN(&quot;|&quot;;1;[$Build.$AJ16:.$AZ16])&amp;&quot;)$&quot;)" office:value-type="float" office:value="0" calcext:value-type="float">
            <text:p>0</text:p>
          </table:table-cell>
          <table:table-cell table:style-name="ce47" table:formula="of:=SUMIFS([$'Core Bonuses'.$F$2:.$F$200]; [$'Core Bonuses'.$E$2:.$E$200]; [.BJ$70]; [$'Core Bonuses'.$A$2:.$A$200]; &quot;^(&quot;&amp;COM.MICROSOFT.TEXTJOIN(&quot;|&quot;;1;[$Build.$G$2:.$G16])&amp;&quot;)$&quot;)+&#10;SUMIFS([$Systems.$M$2:.$M$200]; [$Systems.$L$2:.$L$200]; [.BJ$70]; [$Systems.$A$2:.$A$200]; &quot;^(&quot;&amp;COM.MICROSOFT.TEXTJOIN(&quot;|&quot;;1;[$Build.$AJ16:.$AZ16])&amp;&quot;)$&quot;)" office:value-type="float" office:value="0" calcext:value-type="float">
            <text:p>0</text:p>
          </table:table-cell>
          <table:table-cell table:style-name="ce47" table:formula="of:=SUMIFS([$'Core Bonuses'.$F$2:.$F$200]; [$'Core Bonuses'.$E$2:.$E$200]; [.BK$70]; [$'Core Bonuses'.$A$2:.$A$200]; &quot;^(&quot;&amp;COM.MICROSOFT.TEXTJOIN(&quot;|&quot;;1;[$Build.$G$2:.$G16])&amp;&quot;)$&quot;)+&#10;SUMIFS([$Systems.$M$2:.$M$200]; [$Systems.$L$2:.$L$200]; [.BK$70]; [$Systems.$A$2:.$A$200]; &quot;^(&quot;&amp;COM.MICROSOFT.TEXTJOIN(&quot;|&quot;;1;[$Build.$AJ16:.$AZ16])&amp;&quot;)$&quot;)" office:value-type="float" office:value="0" calcext:value-type="float">
            <text:p>0</text:p>
          </table:table-cell>
          <table:table-cell table:style-name="ce47" table:formula="of:=SUMIFS([$'Core Bonuses'.$F$2:.$F$200]; [$'Core Bonuses'.$E$2:.$E$200]; [.BL$70]; [$'Core Bonuses'.$A$2:.$A$200]; &quot;^(&quot;&amp;COM.MICROSOFT.TEXTJOIN(&quot;|&quot;;1;[$Build.$G$2:.$G16])&amp;&quot;)$&quot;)+&#10;SUMIFS([$Systems.$M$2:.$M$200]; [$Systems.$L$2:.$L$200]; [.BL$70]; [$Systems.$A$2:.$A$200]; &quot;^(&quot;&amp;COM.MICROSOFT.TEXTJOIN(&quot;|&quot;;1;[$Build.$AJ16:.$AZ16])&amp;&quot;)$&quot;)" office:value-type="float" office:value="0" calcext:value-type="float">
            <text:p>0</text:p>
          </table:table-cell>
          <table:table-cell table:style-name="ce47" table:formula="of:=SUMIFS([$'Core Bonuses'.$F$2:.$F$200]; [$'Core Bonuses'.$E$2:.$E$200]; [.BM$70]; [$'Core Bonuses'.$A$2:.$A$200]; &quot;^(&quot;&amp;COM.MICROSOFT.TEXTJOIN(&quot;|&quot;;1;[$Build.$G$2:.$G16])&amp;&quot;)$&quot;)+&#10;SUMIFS([$Systems.$M$2:.$M$200]; [$Systems.$L$2:.$L$200]; [.BM$70]; [$Systems.$A$2:.$A$200]; &quot;^(&quot;&amp;COM.MICROSOFT.TEXTJOIN(&quot;|&quot;;1;[$Build.$AJ16:.$AZ16])&amp;&quot;)$&quot;)" office:value-type="float" office:value="0" calcext:value-type="float">
            <text:p>0</text:p>
          </table:table-cell>
          <table:table-cell table:style-name="ce47" table:formula="of:=SUMIFS([$'Core Bonuses'.$F$2:.$F$200]; [$'Core Bonuses'.$E$2:.$E$200]; [.BN$70]; [$'Core Bonuses'.$A$2:.$A$200]; &quot;^(&quot;&amp;COM.MICROSOFT.TEXTJOIN(&quot;|&quot;;1;[$Build.$G$2:.$G16])&amp;&quot;)$&quot;)+&#10;SUMIFS([$Systems.$M$2:.$M$200]; [$Systems.$L$2:.$L$200]; [.BN$70]; [$Systems.$A$2:.$A$200]; &quot;^(&quot;&amp;COM.MICROSOFT.TEXTJOIN(&quot;|&quot;;1;[$Build.$AJ16:.$AZ16])&amp;&quot;)$&quot;)" office:value-type="float" office:value="0" calcext:value-type="float">
            <text:p>0</text:p>
          </table:table-cell>
          <table:table-cell table:style-name="ce47" table:number-columns-repeated="2"/>
          <table:table-cell table:number-columns-repeated="116"/>
        </table:table-row>
        <table:table-row table:style-name="ro2">
          <table:table-cell table:number-columns-repeated="54"/>
          <table:table-cell table:style-name="ce47" table:formula="of:=SUMIFS([$'Core Bonuses'.$F$2:.$F$200]; [$'Core Bonuses'.$E$2:.$E$200]; [.BC$70]; [$'Core Bonuses'.$A$2:.$A$200]; &quot;^(&quot;&amp;COM.MICROSOFT.TEXTJOIN(&quot;|&quot;;1;[$Build.$G$2:.$G17])&amp;&quot;)$&quot;)+&#10;SUMIFS([$Systems.$M$2:.$M$200]; [$Systems.$L$2:.$L$200]; [.BC$70]; [$Systems.$A$2:.$A$200]; &quot;^(&quot;&amp;COM.MICROSOFT.TEXTJOIN(&quot;|&quot;;1;[$Build.$AJ17:.$AZ17])&amp;&quot;)$&quot;)" office:value-type="float" office:value="0" calcext:value-type="float">
            <text:p>0</text:p>
          </table:table-cell>
          <table:table-cell table:style-name="ce47" table:formula="of:=SUMIFS([$'Core Bonuses'.$F$2:.$F$200]; [$'Core Bonuses'.$E$2:.$E$200]; [.BD$70]; [$'Core Bonuses'.$A$2:.$A$200]; &quot;^(&quot;&amp;COM.MICROSOFT.TEXTJOIN(&quot;|&quot;;1;[$Build.$G$2:.$G17])&amp;&quot;)$&quot;)+&#10;SUMIFS([$Systems.$M$2:.$M$200]; [$Systems.$L$2:.$L$200]; [.BD$70]; [$Systems.$A$2:.$A$200]; &quot;^(&quot;&amp;COM.MICROSOFT.TEXTJOIN(&quot;|&quot;;1;[$Build.$AJ17:.$AZ17])&amp;&quot;)$&quot;)" office:value-type="float" office:value="0" calcext:value-type="float">
            <text:p>0</text:p>
          </table:table-cell>
          <table:table-cell table:style-name="ce47" table:formula="of:=SUMIFS([$'Core Bonuses'.$F$2:.$F$200]; [$'Core Bonuses'.$E$2:.$E$200]; [.BE$70]; [$'Core Bonuses'.$A$2:.$A$200]; &quot;^(&quot;&amp;COM.MICROSOFT.TEXTJOIN(&quot;|&quot;;1;[$Build.$G$2:.$G17])&amp;&quot;)$&quot;)+&#10;SUMIFS([$Systems.$M$2:.$M$200]; [$Systems.$L$2:.$L$200]; [.BE$70]; [$Systems.$A$2:.$A$200]; &quot;^(&quot;&amp;COM.MICROSOFT.TEXTJOIN(&quot;|&quot;;1;[$Build.$AJ17:.$AZ17])&amp;&quot;)$&quot;)" office:value-type="float" office:value="0" calcext:value-type="float">
            <text:p>0</text:p>
          </table:table-cell>
          <table:table-cell table:style-name="ce47" table:formula="of:=SUMIFS([$'Core Bonuses'.$F$2:.$F$200]; [$'Core Bonuses'.$E$2:.$E$200]; [.BF$70]; [$'Core Bonuses'.$A$2:.$A$200]; &quot;^(&quot;&amp;COM.MICROSOFT.TEXTJOIN(&quot;|&quot;;1;[$Build.$G$2:.$G17])&amp;&quot;)$&quot;)+&#10;SUMIFS([$Systems.$M$2:.$M$200]; [$Systems.$L$2:.$L$200]; [.BF$70]; [$Systems.$A$2:.$A$200]; &quot;^(&quot;&amp;COM.MICROSOFT.TEXTJOIN(&quot;|&quot;;1;[$Build.$AJ17:.$AZ17])&amp;&quot;)$&quot;)" office:value-type="float" office:value="0" calcext:value-type="float">
            <text:p>0</text:p>
          </table:table-cell>
          <table:table-cell table:style-name="ce47" table:formula="of:=SUMIFS([$'Core Bonuses'.$F$2:.$F$200]; [$'Core Bonuses'.$E$2:.$E$200]; [.BG$70]; [$'Core Bonuses'.$A$2:.$A$200]; &quot;^(&quot;&amp;COM.MICROSOFT.TEXTJOIN(&quot;|&quot;;1;[$Build.$G$2:.$G17])&amp;&quot;)$&quot;)+&#10;SUMIFS([$Systems.$M$2:.$M$200]; [$Systems.$L$2:.$L$200]; [.BG$70]; [$Systems.$A$2:.$A$200]; &quot;^(&quot;&amp;COM.MICROSOFT.TEXTJOIN(&quot;|&quot;;1;[$Build.$AJ17:.$AZ17])&amp;&quot;)$&quot;)" office:value-type="float" office:value="0" calcext:value-type="float">
            <text:p>0</text:p>
          </table:table-cell>
          <table:table-cell table:style-name="ce47" table:formula="of:=SUMIFS([$'Core Bonuses'.$F$2:.$F$200]; [$'Core Bonuses'.$E$2:.$E$200]; [.BH$70]; [$'Core Bonuses'.$A$2:.$A$200]; &quot;^(&quot;&amp;COM.MICROSOFT.TEXTJOIN(&quot;|&quot;;1;[$Build.$G$2:.$G17])&amp;&quot;)$&quot;)+&#10;SUMIFS([$Systems.$M$2:.$M$200]; [$Systems.$L$2:.$L$200]; [.BH$70]; [$Systems.$A$2:.$A$200]; &quot;^(&quot;&amp;COM.MICROSOFT.TEXTJOIN(&quot;|&quot;;1;[$Build.$AJ17:.$AZ17])&amp;&quot;)$&quot;)" office:value-type="float" office:value="0" calcext:value-type="float">
            <text:p>0</text:p>
          </table:table-cell>
          <table:table-cell table:style-name="ce47" table:formula="of:=SUMIFS([$'Core Bonuses'.$F$2:.$F$200]; [$'Core Bonuses'.$E$2:.$E$200]; [.BI$70]; [$'Core Bonuses'.$A$2:.$A$200]; &quot;^(&quot;&amp;COM.MICROSOFT.TEXTJOIN(&quot;|&quot;;1;[$Build.$G$2:.$G17])&amp;&quot;)$&quot;)+&#10;SUMIFS([$Systems.$M$2:.$M$200]; [$Systems.$L$2:.$L$200]; [.BI$70]; [$Systems.$A$2:.$A$200]; &quot;^(&quot;&amp;COM.MICROSOFT.TEXTJOIN(&quot;|&quot;;1;[$Build.$AJ17:.$AZ17])&amp;&quot;)$&quot;)" office:value-type="float" office:value="0" calcext:value-type="float">
            <text:p>0</text:p>
          </table:table-cell>
          <table:table-cell table:style-name="ce47" table:formula="of:=SUMIFS([$'Core Bonuses'.$F$2:.$F$200]; [$'Core Bonuses'.$E$2:.$E$200]; [.BJ$70]; [$'Core Bonuses'.$A$2:.$A$200]; &quot;^(&quot;&amp;COM.MICROSOFT.TEXTJOIN(&quot;|&quot;;1;[$Build.$G$2:.$G17])&amp;&quot;)$&quot;)+&#10;SUMIFS([$Systems.$M$2:.$M$200]; [$Systems.$L$2:.$L$200]; [.BJ$70]; [$Systems.$A$2:.$A$200]; &quot;^(&quot;&amp;COM.MICROSOFT.TEXTJOIN(&quot;|&quot;;1;[$Build.$AJ17:.$AZ17])&amp;&quot;)$&quot;)" office:value-type="float" office:value="0" calcext:value-type="float">
            <text:p>0</text:p>
          </table:table-cell>
          <table:table-cell table:style-name="ce47" table:formula="of:=SUMIFS([$'Core Bonuses'.$F$2:.$F$200]; [$'Core Bonuses'.$E$2:.$E$200]; [.BK$70]; [$'Core Bonuses'.$A$2:.$A$200]; &quot;^(&quot;&amp;COM.MICROSOFT.TEXTJOIN(&quot;|&quot;;1;[$Build.$G$2:.$G17])&amp;&quot;)$&quot;)+&#10;SUMIFS([$Systems.$M$2:.$M$200]; [$Systems.$L$2:.$L$200]; [.BK$70]; [$Systems.$A$2:.$A$200]; &quot;^(&quot;&amp;COM.MICROSOFT.TEXTJOIN(&quot;|&quot;;1;[$Build.$AJ17:.$AZ17])&amp;&quot;)$&quot;)" office:value-type="float" office:value="0" calcext:value-type="float">
            <text:p>0</text:p>
          </table:table-cell>
          <table:table-cell table:style-name="ce47" table:formula="of:=SUMIFS([$'Core Bonuses'.$F$2:.$F$200]; [$'Core Bonuses'.$E$2:.$E$200]; [.BL$70]; [$'Core Bonuses'.$A$2:.$A$200]; &quot;^(&quot;&amp;COM.MICROSOFT.TEXTJOIN(&quot;|&quot;;1;[$Build.$G$2:.$G17])&amp;&quot;)$&quot;)+&#10;SUMIFS([$Systems.$M$2:.$M$200]; [$Systems.$L$2:.$L$200]; [.BL$70]; [$Systems.$A$2:.$A$200]; &quot;^(&quot;&amp;COM.MICROSOFT.TEXTJOIN(&quot;|&quot;;1;[$Build.$AJ17:.$AZ17])&amp;&quot;)$&quot;)" office:value-type="float" office:value="2" calcext:value-type="float">
            <text:p>2</text:p>
          </table:table-cell>
          <table:table-cell table:style-name="ce47" table:formula="of:=SUMIFS([$'Core Bonuses'.$F$2:.$F$200]; [$'Core Bonuses'.$E$2:.$E$200]; [.BM$70]; [$'Core Bonuses'.$A$2:.$A$200]; &quot;^(&quot;&amp;COM.MICROSOFT.TEXTJOIN(&quot;|&quot;;1;[$Build.$G$2:.$G17])&amp;&quot;)$&quot;)+&#10;SUMIFS([$Systems.$M$2:.$M$200]; [$Systems.$L$2:.$L$200]; [.BM$70]; [$Systems.$A$2:.$A$200]; &quot;^(&quot;&amp;COM.MICROSOFT.TEXTJOIN(&quot;|&quot;;1;[$Build.$AJ17:.$AZ17])&amp;&quot;)$&quot;)" office:value-type="float" office:value="0" calcext:value-type="float">
            <text:p>0</text:p>
          </table:table-cell>
          <table:table-cell table:style-name="ce47" table:formula="of:=SUMIFS([$'Core Bonuses'.$F$2:.$F$200]; [$'Core Bonuses'.$E$2:.$E$200]; [.BN$70]; [$'Core Bonuses'.$A$2:.$A$200]; &quot;^(&quot;&amp;COM.MICROSOFT.TEXTJOIN(&quot;|&quot;;1;[$Build.$G$2:.$G17])&amp;&quot;)$&quot;)+&#10;SUMIFS([$Systems.$M$2:.$M$200]; [$Systems.$L$2:.$L$200]; [.BN$70]; [$Systems.$A$2:.$A$200]; &quot;^(&quot;&amp;COM.MICROSOFT.TEXTJOIN(&quot;|&quot;;1;[$Build.$AJ17:.$AZ17])&amp;&quot;)$&quot;)" office:value-type="float" office:value="0" calcext:value-type="float">
            <text:p>0</text:p>
          </table:table-cell>
          <table:table-cell table:style-name="ce47" table:number-columns-repeated="2"/>
          <table:table-cell table:number-columns-repeated="116"/>
        </table:table-row>
        <table:table-row table:style-name="ro2">
          <table:table-cell table:number-columns-repeated="184"/>
        </table:table-row>
        <table:table-row table:style-name="ro2">
          <table:table-cell table:number-columns-repeated="54"/>
          <table:table-cell office:value-type="string" calcext:value-type="string">
            <text:p>CB: MR Tgt</text:p>
          </table:table-cell>
          <table:table-cell office:value-type="string" calcext:value-type="string">
            <text:p>Raw Mount Configuration</text:p>
          </table:table-cell>
          <table:table-cell table:number-columns-repeated="128"/>
        </table:table-row>
        <table:table-row table:style-name="ro2">
          <table:table-cell table:number-columns-repeated="54"/>
          <table:table-cell table:style-name="ce47" table:formula="of:=IF(     COUNTIF([.$G$5:.$G5];&quot;Mount Retrofitting&quot;)=0;     &quot;&quot;;     IF(         COUNTIF([.$BC86:.$BE86];&quot;Aux/Aux&quot;);         &quot;Aux/Aux&quot;;         IF(             COUNTIF([.$BC86:.$BE86];&quot;Flex&quot;);             &quot;Flex&quot;;             IF(                 COUNTIF([.$BC86:.$BE86];&quot;Main&quot;);                 &quot;Main&quot;;                 IF(                     COUNTIF([.$BC86:.$BE86];&quot;Main/Aux&quot;);                     &quot;Main/Aux&quot;;                     IF(                         COUNTIF([.$BC86:.$BE86];&quot;Heavy&quot;);                         &quot;Heavy&quot;;                         &quot;&quot;                     )                 )             )         )     ) )">
            <text:p/>
          </table:table-cell>
          <table:table-cell table:style-name="ce47" table:formula="of:=IFERROR(     COM.MICROSOFT.XLOOKUP(         LOOKUP(2;1/([.$F$2:.$F5]&lt;&gt;&quot;&quot;);[.$F$2:.$F5]);         [$Frames.$A$2:.$A$100];         [$Frames.$Q$2:.$Q$100]     );     &quot;&quot; )" office:value-type="string" office:string-value="Heavy" calcext:value-type="string">
            <text:p>Heavy</text:p>
          </table:table-cell>
          <table:table-cell table:style-name="ce47" table:formula="of:=IFERROR(     COM.MICROSOFT.XLOOKUP(         LOOKUP(2;1/([.$F$2:.$F5]&lt;&gt;&quot;&quot;);[.$F$2:.$F5]);         [$Frames.$A$2:.$A$100];         [$Frames.$R$2:.$R$100]     );     &quot;&quot; )" office:value-type="string" office:string-value="Flex" calcext:value-type="string">
            <text:p>Flex</text:p>
          </table:table-cell>
          <table:table-cell table:style-name="ce47" table:formula="of:=IFERROR(     COM.MICROSOFT.XLOOKUP(         LOOKUP(2;1/([.$F$2:.$F5]&lt;&gt;&quot;&quot;);[.$F$2:.$F5]);         [$Frames.$A$2:.$A$100];         [$Frames.$S$2:.$S$100]     );     &quot;&quot; )" office:value-type="string" office:string-value="Main" calcext:value-type="string">
            <text:p>Main</text:p>
          </table:table-cell>
          <table:table-cell table:style-name="ce47"/>
          <table:table-cell table:style-name="ce47" table:formula="of:=IF(     OR([.BD86]=&quot;&quot;;[.BD86]=0);     &quot;&quot;;     IF(         AND(             [.$BC86]&lt;&gt;&quot;&quot;;             [.BD86]=[.$BC86];             COUNTIF([.$BD86:.BD86];[.$BC86])=1         );         &quot;Main/Aux&quot;;         [.BD86]     ) )" office:value-type="string" office:string-value="Heavy" calcext:value-type="string">
            <text:p>Heavy</text:p>
          </table:table-cell>
          <table:table-cell table:style-name="ce47" table:formula="of:=IF(     OR([.BE86]=&quot;&quot;;[.BE86]=0);     &quot;&quot;;     IF(         AND(             [.$BC86]&lt;&gt;&quot;&quot;;             [.BE86]=[.$BC86];             COUNTIF([.$BD86:.BE86];[.$BC86])=1         );         &quot;Main/Aux&quot;;         [.BE86]     ) )" office:value-type="string" office:string-value="Flex" calcext:value-type="string">
            <text:p>Flex</text:p>
          </table:table-cell>
          <table:table-cell table:style-name="ce47" table:formula="of:=IF(     OR([.BF86]=&quot;&quot;;[.BF86]=0);     &quot;&quot;;     IF(         AND(             [.$BC86]&lt;&gt;&quot;&quot;;             [.BF86]=[.$BC86];             COUNTIF([.$BD86:.BF86];[.$BC86])=1         );         &quot;Main/Aux&quot;;         [.BF86]     ) )" office:value-type="string" office:string-value="Main" calcext:value-type="string">
            <text:p>Main</text:p>
          </table:table-cell>
          <table:table-cell table:style-name="ce47" table:formula="of:=IF(     AND(         COUNTIF([.$G$5:.$G5];&quot;Improved Armament&quot;)&gt;0;         SUMPRODUCT(([.$BH86:.$BJ86]&lt;&gt;&quot;&quot;)*([.$BH86:.$BJ86]&lt;&gt;0))&lt;3     );     &quot;Flex&quot;;     &quot;&quot; )">
            <text:p/>
          </table:table-cell>
          <table:table-cell table:style-name="ce47" table:number-columns-repeated="2"/>
          <table:table-cell table:number-columns-repeated="119"/>
        </table:table-row>
        <table:table-row table:style-name="ro2">
          <table:table-cell table:number-columns-repeated="54"/>
          <table:table-cell table:style-name="ce47" table:formula="of:=IF(     COUNTIF([.$G$5:.$G6];&quot;Mount Retrofitting&quot;)=0;     &quot;&quot;;     IF(         COUNTIF([.$BC87:.$BE87];&quot;Aux/Aux&quot;);         &quot;Aux/Aux&quot;;         IF(             COUNTIF([.$BC87:.$BE87];&quot;Flex&quot;);             &quot;Flex&quot;;             IF(                 COUNTIF([.$BC87:.$BE87];&quot;Main&quot;);                 &quot;Main&quot;;                 IF(                     COUNTIF([.$BC87:.$BE87];&quot;Main/Aux&quot;);                     &quot;Main/Aux&quot;;                     IF(                         COUNTIF([.$BC87:.$BE87];&quot;Heavy&quot;);                         &quot;Heavy&quot;;                         &quot;&quot;                     )                 )             )         )     ) )">
            <text:p/>
          </table:table-cell>
          <table:table-cell table:style-name="ce47" table:formula="of:=IFERROR(     COM.MICROSOFT.XLOOKUP(         LOOKUP(2;1/([.$F$2:.$F6]&lt;&gt;&quot;&quot;);[.$F$2:.$F6]);         [$Frames.$A$2:.$A$100];         [$Frames.$Q$2:.$Q$100]     );     &quot;&quot; )" office:value-type="string" office:string-value="Heavy" calcext:value-type="string">
            <text:p>Heavy</text:p>
          </table:table-cell>
          <table:table-cell table:style-name="ce47" table:formula="of:=IFERROR(     COM.MICROSOFT.XLOOKUP(         LOOKUP(2;1/([.$F$2:.$F6]&lt;&gt;&quot;&quot;);[.$F$2:.$F6]);         [$Frames.$A$2:.$A$100];         [$Frames.$R$2:.$R$100]     );     &quot;&quot; )" office:value-type="string" office:string-value="Flex" calcext:value-type="string">
            <text:p>Flex</text:p>
          </table:table-cell>
          <table:table-cell table:style-name="ce47" table:formula="of:=IFERROR(     COM.MICROSOFT.XLOOKUP(         LOOKUP(2;1/([.$F$2:.$F6]&lt;&gt;&quot;&quot;);[.$F$2:.$F6]);         [$Frames.$A$2:.$A$100];         [$Frames.$S$2:.$S$100]     );     &quot;&quot; )" office:value-type="string" office:string-value="Main" calcext:value-type="string">
            <text:p>Main</text:p>
          </table:table-cell>
          <table:table-cell table:style-name="ce47"/>
          <table:table-cell table:style-name="ce47" table:formula="of:=IF(     OR([.BD87]=&quot;&quot;;[.BD87]=0);     &quot;&quot;;     IF(         AND(             [.$BC87]&lt;&gt;&quot;&quot;;             [.BD87]=[.$BC87];             COUNTIF([.$BD87:.BD87];[.$BC87])=1         );         &quot;Main/Aux&quot;;         [.BD87]     ) )" office:value-type="string" office:string-value="Heavy" calcext:value-type="string">
            <text:p>Heavy</text:p>
          </table:table-cell>
          <table:table-cell table:style-name="ce47" table:formula="of:=IF(     OR([.BE87]=&quot;&quot;;[.BE87]=0);     &quot;&quot;;     IF(         AND(             [.$BC87]&lt;&gt;&quot;&quot;;             [.BE87]=[.$BC87];             COUNTIF([.$BD87:.BE87];[.$BC87])=1         );         &quot;Main/Aux&quot;;         [.BE87]     ) )" office:value-type="string" office:string-value="Flex" calcext:value-type="string">
            <text:p>Flex</text:p>
          </table:table-cell>
          <table:table-cell table:style-name="ce47" table:formula="of:=IF(     OR([.BF87]=&quot;&quot;;[.BF87]=0);     &quot;&quot;;     IF(         AND(             [.$BC87]&lt;&gt;&quot;&quot;;             [.BF87]=[.$BC87];             COUNTIF([.$BD87:.BF87];[.$BC87])=1         );         &quot;Main/Aux&quot;;         [.BF87]     ) )" office:value-type="string" office:string-value="Main" calcext:value-type="string">
            <text:p>Main</text:p>
          </table:table-cell>
          <table:table-cell table:style-name="ce47" table:formula="of:=IF(     AND(         COUNTIF([.$G$5:.$G6];&quot;Improved Armament&quot;)&gt;0;         SUMPRODUCT(([.$BH87:.$BJ87]&lt;&gt;&quot;&quot;)*([.$BH87:.$BJ87]&lt;&gt;0))&lt;3     );     &quot;Flex&quot;;     &quot;&quot; )">
            <text:p/>
          </table:table-cell>
          <table:table-cell table:style-name="ce47" table:number-columns-repeated="2"/>
          <table:table-cell table:number-columns-repeated="119"/>
        </table:table-row>
        <table:table-row table:style-name="ro2">
          <table:table-cell table:number-columns-repeated="54"/>
          <table:table-cell table:style-name="ce47" table:formula="of:=IF(     COUNTIF([.$G$5:.$G7];&quot;Mount Retrofitting&quot;)=0;     &quot;&quot;;     IF(         COUNTIF([.$BC88:.$BE88];&quot;Aux/Aux&quot;);         &quot;Aux/Aux&quot;;         IF(             COUNTIF([.$BC88:.$BE88];&quot;Flex&quot;);             &quot;Flex&quot;;             IF(                 COUNTIF([.$BC88:.$BE88];&quot;Main&quot;);                 &quot;Main&quot;;                 IF(                     COUNTIF([.$BC88:.$BE88];&quot;Main/Aux&quot;);                     &quot;Main/Aux&quot;;                     IF(                         COUNTIF([.$BC88:.$BE88];&quot;Heavy&quot;);                         &quot;Heavy&quot;;                         &quot;&quot;                     )                 )             )         )     ) )">
            <text:p/>
          </table:table-cell>
          <table:table-cell table:style-name="ce47" table:formula="of:=IFERROR(     COM.MICROSOFT.XLOOKUP(         LOOKUP(2;1/([.$F$2:.$F7]&lt;&gt;&quot;&quot;);[.$F$2:.$F7]);         [$Frames.$A$2:.$A$100];         [$Frames.$Q$2:.$Q$100]     );     &quot;&quot; )" office:value-type="string" office:string-value="Heavy" calcext:value-type="string">
            <text:p>Heavy</text:p>
          </table:table-cell>
          <table:table-cell table:style-name="ce47" table:formula="of:=IFERROR(     COM.MICROSOFT.XLOOKUP(         LOOKUP(2;1/([.$F$2:.$F7]&lt;&gt;&quot;&quot;);[.$F$2:.$F7]);         [$Frames.$A$2:.$A$100];         [$Frames.$R$2:.$R$100]     );     &quot;&quot; )" office:value-type="string" office:string-value="Main/Aux" calcext:value-type="string">
            <text:p>Main/Aux</text:p>
          </table:table-cell>
          <table:table-cell table:style-name="ce47" table:formula="of:=IFERROR(     COM.MICROSOFT.XLOOKUP(         LOOKUP(2;1/([.$F$2:.$F7]&lt;&gt;&quot;&quot;);[.$F$2:.$F7]);         [$Frames.$A$2:.$A$100];         [$Frames.$S$2:.$S$100]     );     &quot;&quot; )" office:value-type="float" office:value="0" calcext:value-type="float">
            <text:p>0</text:p>
          </table:table-cell>
          <table:table-cell table:style-name="ce47"/>
          <table:table-cell table:style-name="ce47" table:formula="of:=IF(     OR([.BD88]=&quot;&quot;;[.BD88]=0);     &quot;&quot;;     IF(         AND(             [.$BC88]&lt;&gt;&quot;&quot;;             [.BD88]=[.$BC88];             COUNTIF([.$BD88:.BD88];[.$BC88])=1         );         &quot;Main/Aux&quot;;         [.BD88]     ) )" office:value-type="string" office:string-value="Heavy" calcext:value-type="string">
            <text:p>Heavy</text:p>
          </table:table-cell>
          <table:table-cell table:style-name="ce47" table:formula="of:=IF(     OR([.BE88]=&quot;&quot;;[.BE88]=0);     &quot;&quot;;     IF(         AND(             [.$BC88]&lt;&gt;&quot;&quot;;             [.BE88]=[.$BC88];             COUNTIF([.$BD88:.BE88];[.$BC88])=1         );         &quot;Main/Aux&quot;;         [.BE88]     ) )" office:value-type="string" office:string-value="Main/Aux" calcext:value-type="string">
            <text:p>Main/Aux</text:p>
          </table:table-cell>
          <table:table-cell table:style-name="ce47" table:formula="of:=IF(     OR([.BF88]=&quot;&quot;;[.BF88]=0);     &quot;&quot;;     IF(         AND(             [.$BC88]&lt;&gt;&quot;&quot;;             [.BF88]=[.$BC88];             COUNTIF([.$BD88:.BF88];[.$BC88])=1         );         &quot;Main/Aux&quot;;         [.BF88]     ) )">
            <text:p/>
          </table:table-cell>
          <table:table-cell table:style-name="ce47" table:formula="of:=IF(     AND(         COUNTIF([.$G$5:.$G7];&quot;Improved Armament&quot;)&gt;0;         SUMPRODUCT(([.$BH88:.$BJ88]&lt;&gt;&quot;&quot;)*([.$BH88:.$BJ88]&lt;&gt;0))&lt;3     );     &quot;Flex&quot;;     &quot;&quot; )">
            <text:p/>
          </table:table-cell>
          <table:table-cell table:style-name="ce47" table:number-columns-repeated="2"/>
          <table:table-cell table:number-columns-repeated="119"/>
        </table:table-row>
        <table:table-row table:style-name="ro2">
          <table:table-cell table:number-columns-repeated="54"/>
          <table:table-cell table:style-name="ce47" table:formula="of:=IF(     COUNTIF([.$G$5:.$G8];&quot;Mount Retrofitting&quot;)=0;     &quot;&quot;;     IF(         COUNTIF([.$BC89:.$BE89];&quot;Aux/Aux&quot;);         &quot;Aux/Aux&quot;;         IF(             COUNTIF([.$BC89:.$BE89];&quot;Flex&quot;);             &quot;Flex&quot;;             IF(                 COUNTIF([.$BC89:.$BE89];&quot;Main&quot;);                 &quot;Main&quot;;                 IF(                     COUNTIF([.$BC89:.$BE89];&quot;Main/Aux&quot;);                     &quot;Main/Aux&quot;;                     IF(                         COUNTIF([.$BC89:.$BE89];&quot;Heavy&quot;);                         &quot;Heavy&quot;;                         &quot;&quot;                     )                 )             )         )     ) )">
            <text:p/>
          </table:table-cell>
          <table:table-cell table:style-name="ce47" table:formula="of:=IFERROR(     COM.MICROSOFT.XLOOKUP(         LOOKUP(2;1/([.$F$2:.$F8]&lt;&gt;&quot;&quot;);[.$F$2:.$F8]);         [$Frames.$A$2:.$A$100];         [$Frames.$Q$2:.$Q$100]     );     &quot;&quot; )" office:value-type="string" office:string-value="Heavy" calcext:value-type="string">
            <text:p>Heavy</text:p>
          </table:table-cell>
          <table:table-cell table:style-name="ce47" table:formula="of:=IFERROR(     COM.MICROSOFT.XLOOKUP(         LOOKUP(2;1/([.$F$2:.$F8]&lt;&gt;&quot;&quot;);[.$F$2:.$F8]);         [$Frames.$A$2:.$A$100];         [$Frames.$R$2:.$R$100]     );     &quot;&quot; )" office:value-type="string" office:string-value="Main/Aux" calcext:value-type="string">
            <text:p>Main/Aux</text:p>
          </table:table-cell>
          <table:table-cell table:style-name="ce47" table:formula="of:=IFERROR(     COM.MICROSOFT.XLOOKUP(         LOOKUP(2;1/([.$F$2:.$F8]&lt;&gt;&quot;&quot;);[.$F$2:.$F8]);         [$Frames.$A$2:.$A$100];         [$Frames.$S$2:.$S$100]     );     &quot;&quot; )" office:value-type="float" office:value="0" calcext:value-type="float">
            <text:p>0</text:p>
          </table:table-cell>
          <table:table-cell table:style-name="ce47"/>
          <table:table-cell table:style-name="ce47" table:formula="of:=IF(     OR([.BD89]=&quot;&quot;;[.BD89]=0);     &quot;&quot;;     IF(         AND(             [.$BC89]&lt;&gt;&quot;&quot;;             [.BD89]=[.$BC89];             COUNTIF([.$BD89:.BD89];[.$BC89])=1         );         &quot;Main/Aux&quot;;         [.BD89]     ) )" office:value-type="string" office:string-value="Heavy" calcext:value-type="string">
            <text:p>Heavy</text:p>
          </table:table-cell>
          <table:table-cell table:style-name="ce47" table:formula="of:=IF(     OR([.BE89]=&quot;&quot;;[.BE89]=0);     &quot;&quot;;     IF(         AND(             [.$BC89]&lt;&gt;&quot;&quot;;             [.BE89]=[.$BC89];             COUNTIF([.$BD89:.BE89];[.$BC89])=1         );         &quot;Main/Aux&quot;;         [.BE89]     ) )" office:value-type="string" office:string-value="Main/Aux" calcext:value-type="string">
            <text:p>Main/Aux</text:p>
          </table:table-cell>
          <table:table-cell table:style-name="ce47" table:formula="of:=IF(     OR([.BF89]=&quot;&quot;;[.BF89]=0);     &quot;&quot;;     IF(         AND(             [.$BC89]&lt;&gt;&quot;&quot;;             [.BF89]=[.$BC89];             COUNTIF([.$BD89:.BF89];[.$BC89])=1         );         &quot;Main/Aux&quot;;         [.BF89]     ) )">
            <text:p/>
          </table:table-cell>
          <table:table-cell table:style-name="ce47" table:formula="of:=IF(     AND(         COUNTIF([.$G$5:.$G8];&quot;Improved Armament&quot;)&gt;0;         SUMPRODUCT(([.$BH89:.$BJ89]&lt;&gt;&quot;&quot;)*([.$BH89:.$BJ89]&lt;&gt;0))&lt;3     );     &quot;Flex&quot;;     &quot;&quot; )" office:value-type="string" office:string-value="Flex" calcext:value-type="string">
            <text:p>Flex</text:p>
          </table:table-cell>
          <table:table-cell table:style-name="ce47" table:number-columns-repeated="2"/>
          <table:table-cell table:number-columns-repeated="119"/>
        </table:table-row>
        <table:table-row table:style-name="ro2">
          <table:table-cell table:number-columns-repeated="54"/>
          <table:table-cell table:style-name="ce47" table:formula="of:=IF(     COUNTIF([.$G$5:.$G9];&quot;Mount Retrofitting&quot;)=0;     &quot;&quot;;     IF(         COUNTIF([.$BC90:.$BE90];&quot;Aux/Aux&quot;);         &quot;Aux/Aux&quot;;         IF(             COUNTIF([.$BC90:.$BE90];&quot;Flex&quot;);             &quot;Flex&quot;;             IF(                 COUNTIF([.$BC90:.$BE90];&quot;Main&quot;);                 &quot;Main&quot;;                 IF(                     COUNTIF([.$BC90:.$BE90];&quot;Main/Aux&quot;);                     &quot;Main/Aux&quot;;                     IF(                         COUNTIF([.$BC90:.$BE90];&quot;Heavy&quot;);                         &quot;Heavy&quot;;                         &quot;&quot;                     )                 )             )         )     ) )">
            <text:p/>
          </table:table-cell>
          <table:table-cell table:style-name="ce47" table:formula="of:=IFERROR(     COM.MICROSOFT.XLOOKUP(         LOOKUP(2;1/([.$F$2:.$F9]&lt;&gt;&quot;&quot;);[.$F$2:.$F9]);         [$Frames.$A$2:.$A$100];         [$Frames.$Q$2:.$Q$100]     );     &quot;&quot; )" office:value-type="string" office:string-value="Heavy" calcext:value-type="string">
            <text:p>Heavy</text:p>
          </table:table-cell>
          <table:table-cell table:style-name="ce47" table:formula="of:=IFERROR(     COM.MICROSOFT.XLOOKUP(         LOOKUP(2;1/([.$F$2:.$F9]&lt;&gt;&quot;&quot;);[.$F$2:.$F9]);         [$Frames.$A$2:.$A$100];         [$Frames.$R$2:.$R$100]     );     &quot;&quot; )" office:value-type="string" office:string-value="Main/Aux" calcext:value-type="string">
            <text:p>Main/Aux</text:p>
          </table:table-cell>
          <table:table-cell table:style-name="ce47" table:formula="of:=IFERROR(     COM.MICROSOFT.XLOOKUP(         LOOKUP(2;1/([.$F$2:.$F9]&lt;&gt;&quot;&quot;);[.$F$2:.$F9]);         [$Frames.$A$2:.$A$100];         [$Frames.$S$2:.$S$100]     );     &quot;&quot; )" office:value-type="float" office:value="0" calcext:value-type="float">
            <text:p>0</text:p>
          </table:table-cell>
          <table:table-cell table:style-name="ce47"/>
          <table:table-cell table:style-name="ce47" table:formula="of:=IF(     OR([.BD90]=&quot;&quot;;[.BD90]=0);     &quot;&quot;;     IF(         AND(             [.$BC90]&lt;&gt;&quot;&quot;;             [.BD90]=[.$BC90];             COUNTIF([.$BD90:.BD90];[.$BC90])=1         );         &quot;Main/Aux&quot;;         [.BD90]     ) )" office:value-type="string" office:string-value="Heavy" calcext:value-type="string">
            <text:p>Heavy</text:p>
          </table:table-cell>
          <table:table-cell table:style-name="ce47" table:formula="of:=IF(     OR([.BE90]=&quot;&quot;;[.BE90]=0);     &quot;&quot;;     IF(         AND(             [.$BC90]&lt;&gt;&quot;&quot;;             [.BE90]=[.$BC90];             COUNTIF([.$BD90:.BE90];[.$BC90])=1         );         &quot;Main/Aux&quot;;         [.BE90]     ) )" office:value-type="string" office:string-value="Main/Aux" calcext:value-type="string">
            <text:p>Main/Aux</text:p>
          </table:table-cell>
          <table:table-cell table:style-name="ce47" table:formula="of:=IF(     OR([.BF90]=&quot;&quot;;[.BF90]=0);     &quot;&quot;;     IF(         AND(             [.$BC90]&lt;&gt;&quot;&quot;;             [.BF90]=[.$BC90];             COUNTIF([.$BD90:.BF90];[.$BC90])=1         );         &quot;Main/Aux&quot;;         [.BF90]     ) )">
            <text:p/>
          </table:table-cell>
          <table:table-cell table:style-name="ce47" table:formula="of:=IF(     AND(         COUNTIF([.$G$5:.$G9];&quot;Improved Armament&quot;)&gt;0;         SUMPRODUCT(([.$BH90:.$BJ90]&lt;&gt;&quot;&quot;)*([.$BH90:.$BJ90]&lt;&gt;0))&lt;3     );     &quot;Flex&quot;;     &quot;&quot; )" office:value-type="string" office:string-value="Flex" calcext:value-type="string">
            <text:p>Flex</text:p>
          </table:table-cell>
          <table:table-cell table:style-name="ce47" table:number-columns-repeated="2"/>
          <table:table-cell table:number-columns-repeated="119"/>
        </table:table-row>
        <table:table-row table:style-name="ro2">
          <table:table-cell table:number-columns-repeated="54"/>
          <table:table-cell table:style-name="ce47" table:formula="of:=IF(     COUNTIF([.$G$5:.$G10];&quot;Mount Retrofitting&quot;)=0;     &quot;&quot;;     IF(         COUNTIF([.$BC91:.$BE91];&quot;Aux/Aux&quot;);         &quot;Aux/Aux&quot;;         IF(             COUNTIF([.$BC91:.$BE91];&quot;Flex&quot;);             &quot;Flex&quot;;             IF(                 COUNTIF([.$BC91:.$BE91];&quot;Main&quot;);                 &quot;Main&quot;;                 IF(                     COUNTIF([.$BC91:.$BE91];&quot;Main/Aux&quot;);                     &quot;Main/Aux&quot;;                     IF(                         COUNTIF([.$BC91:.$BE91];&quot;Heavy&quot;);                         &quot;Heavy&quot;;                         &quot;&quot;                     )                 )             )         )     ) )">
            <text:p/>
          </table:table-cell>
          <table:table-cell table:style-name="ce47" table:formula="of:=IFERROR(     COM.MICROSOFT.XLOOKUP(         LOOKUP(2;1/([.$F$2:.$F10]&lt;&gt;&quot;&quot;);[.$F$2:.$F10]);         [$Frames.$A$2:.$A$100];         [$Frames.$Q$2:.$Q$100]     );     &quot;&quot; )" office:value-type="string" office:string-value="Heavy" calcext:value-type="string">
            <text:p>Heavy</text:p>
          </table:table-cell>
          <table:table-cell table:style-name="ce47" table:formula="of:=IFERROR(     COM.MICROSOFT.XLOOKUP(         LOOKUP(2;1/([.$F$2:.$F10]&lt;&gt;&quot;&quot;);[.$F$2:.$F10]);         [$Frames.$A$2:.$A$100];         [$Frames.$R$2:.$R$100]     );     &quot;&quot; )" office:value-type="string" office:string-value="Main/Aux" calcext:value-type="string">
            <text:p>Main/Aux</text:p>
          </table:table-cell>
          <table:table-cell table:style-name="ce47" table:formula="of:=IFERROR(     COM.MICROSOFT.XLOOKUP(         LOOKUP(2;1/([.$F$2:.$F10]&lt;&gt;&quot;&quot;);[.$F$2:.$F10]);         [$Frames.$A$2:.$A$100];         [$Frames.$S$2:.$S$100]     );     &quot;&quot; )" office:value-type="float" office:value="0" calcext:value-type="float">
            <text:p>0</text:p>
          </table:table-cell>
          <table:table-cell table:style-name="ce47"/>
          <table:table-cell table:style-name="ce47" table:formula="of:=IF(     OR([.BD91]=&quot;&quot;;[.BD91]=0);     &quot;&quot;;     IF(         AND(             [.$BC91]&lt;&gt;&quot;&quot;;             [.BD91]=[.$BC91];             COUNTIF([.$BD91:.BD91];[.$BC91])=1         );         &quot;Main/Aux&quot;;         [.BD91]     ) )" office:value-type="string" office:string-value="Heavy" calcext:value-type="string">
            <text:p>Heavy</text:p>
          </table:table-cell>
          <table:table-cell table:style-name="ce47" table:formula="of:=IF(     OR([.BE91]=&quot;&quot;;[.BE91]=0);     &quot;&quot;;     IF(         AND(             [.$BC91]&lt;&gt;&quot;&quot;;             [.BE91]=[.$BC91];             COUNTIF([.$BD91:.BE91];[.$BC91])=1         );         &quot;Main/Aux&quot;;         [.BE91]     ) )" office:value-type="string" office:string-value="Main/Aux" calcext:value-type="string">
            <text:p>Main/Aux</text:p>
          </table:table-cell>
          <table:table-cell table:style-name="ce47" table:formula="of:=IF(     OR([.BF91]=&quot;&quot;;[.BF91]=0);     &quot;&quot;;     IF(         AND(             [.$BC91]&lt;&gt;&quot;&quot;;             [.BF91]=[.$BC91];             COUNTIF([.$BD91:.BF91];[.$BC91])=1         );         &quot;Main/Aux&quot;;         [.BF91]     ) )">
            <text:p/>
          </table:table-cell>
          <table:table-cell table:style-name="ce47" table:formula="of:=IF(     AND(         COUNTIF([.$G$5:.$G10];&quot;Improved Armament&quot;)&gt;0;         SUMPRODUCT(([.$BH91:.$BJ91]&lt;&gt;&quot;&quot;)*([.$BH91:.$BJ91]&lt;&gt;0))&lt;3     );     &quot;Flex&quot;;     &quot;&quot; )" office:value-type="string" office:string-value="Flex" calcext:value-type="string">
            <text:p>Flex</text:p>
          </table:table-cell>
          <table:table-cell table:style-name="ce47" table:number-columns-repeated="2"/>
          <table:table-cell table:number-columns-repeated="119"/>
        </table:table-row>
        <table:table-row table:style-name="ro2">
          <table:table-cell table:number-columns-repeated="54"/>
          <table:table-cell table:style-name="ce47" table:formula="of:=IF(     COUNTIF([.$G$5:.$G11];&quot;Mount Retrofitting&quot;)=0;     &quot;&quot;;     IF(         COUNTIF([.$BC92:.$BE92];&quot;Aux/Aux&quot;);         &quot;Aux/Aux&quot;;         IF(             COUNTIF([.$BC92:.$BE92];&quot;Flex&quot;);             &quot;Flex&quot;;             IF(                 COUNTIF([.$BC92:.$BE92];&quot;Main&quot;);                 &quot;Main&quot;;                 IF(                     COUNTIF([.$BC92:.$BE92];&quot;Main/Aux&quot;);                     &quot;Main/Aux&quot;;                     IF(                         COUNTIF([.$BC92:.$BE92];&quot;Heavy&quot;);                         &quot;Heavy&quot;;                         &quot;&quot;                     )                 )             )         )     ) )">
            <text:p/>
          </table:table-cell>
          <table:table-cell table:style-name="ce47" table:formula="of:=IFERROR(     COM.MICROSOFT.XLOOKUP(         LOOKUP(2;1/([.$F$2:.$F11]&lt;&gt;&quot;&quot;);[.$F$2:.$F11]);         [$Frames.$A$2:.$A$100];         [$Frames.$Q$2:.$Q$100]     );     &quot;&quot; )" office:value-type="string" office:string-value="Heavy" calcext:value-type="string">
            <text:p>Heavy</text:p>
          </table:table-cell>
          <table:table-cell table:style-name="ce47" table:formula="of:=IFERROR(     COM.MICROSOFT.XLOOKUP(         LOOKUP(2;1/([.$F$2:.$F11]&lt;&gt;&quot;&quot;);[.$F$2:.$F11]);         [$Frames.$A$2:.$A$100];         [$Frames.$R$2:.$R$100]     );     &quot;&quot; )" office:value-type="string" office:string-value="Main" calcext:value-type="string">
            <text:p>Main</text:p>
          </table:table-cell>
          <table:table-cell table:style-name="ce47" table:formula="of:=IFERROR(     COM.MICROSOFT.XLOOKUP(         LOOKUP(2;1/([.$F$2:.$F11]&lt;&gt;&quot;&quot;);[.$F$2:.$F11]);         [$Frames.$A$2:.$A$100];         [$Frames.$S$2:.$S$100]     );     &quot;&quot; )" office:value-type="float" office:value="0" calcext:value-type="float">
            <text:p>0</text:p>
          </table:table-cell>
          <table:table-cell table:style-name="ce47"/>
          <table:table-cell table:style-name="ce47" table:formula="of:=IF(     OR([.BD92]=&quot;&quot;;[.BD92]=0);     &quot;&quot;;     IF(         AND(             [.$BC92]&lt;&gt;&quot;&quot;;             [.BD92]=[.$BC92];             COUNTIF([.$BD92:.BD92];[.$BC92])=1         );         &quot;Main/Aux&quot;;         [.BD92]     ) )" office:value-type="string" office:string-value="Heavy" calcext:value-type="string">
            <text:p>Heavy</text:p>
          </table:table-cell>
          <table:table-cell table:style-name="ce47" table:formula="of:=IF(     OR([.BE92]=&quot;&quot;;[.BE92]=0);     &quot;&quot;;     IF(         AND(             [.$BC92]&lt;&gt;&quot;&quot;;             [.BE92]=[.$BC92];             COUNTIF([.$BD92:.BE92];[.$BC92])=1         );         &quot;Main/Aux&quot;;         [.BE92]     ) )" office:value-type="string" office:string-value="Main" calcext:value-type="string">
            <text:p>Main</text:p>
          </table:table-cell>
          <table:table-cell table:style-name="ce47" table:formula="of:=IF(     OR([.BF92]=&quot;&quot;;[.BF92]=0);     &quot;&quot;;     IF(         AND(             [.$BC92]&lt;&gt;&quot;&quot;;             [.BF92]=[.$BC92];             COUNTIF([.$BD92:.BF92];[.$BC92])=1         );         &quot;Main/Aux&quot;;         [.BF92]     ) )">
            <text:p/>
          </table:table-cell>
          <table:table-cell table:style-name="ce47" table:formula="of:=IF(     AND(         COUNTIF([.$G$5:.$G11];&quot;Improved Armament&quot;)&gt;0;         SUMPRODUCT(([.$BH92:.$BJ92]&lt;&gt;&quot;&quot;)*([.$BH92:.$BJ92]&lt;&gt;0))&lt;3     );     &quot;Flex&quot;;     &quot;&quot; )" office:value-type="string" office:string-value="Flex" calcext:value-type="string">
            <text:p>Flex</text:p>
          </table:table-cell>
          <table:table-cell table:style-name="ce47" table:number-columns-repeated="2"/>
          <table:table-cell table:number-columns-repeated="119"/>
        </table:table-row>
        <table:table-row table:style-name="ro2">
          <table:table-cell table:number-columns-repeated="54"/>
          <table:table-cell table:style-name="ce47" table:formula="of:=IF(     COUNTIF([.$G$5:.$G12];&quot;Mount Retrofitting&quot;)=0;     &quot;&quot;;     IF(         COUNTIF([.$BC93:.$BE93];&quot;Aux/Aux&quot;);         &quot;Aux/Aux&quot;;         IF(             COUNTIF([.$BC93:.$BE93];&quot;Flex&quot;);             &quot;Flex&quot;;             IF(                 COUNTIF([.$BC93:.$BE93];&quot;Main&quot;);                 &quot;Main&quot;;                 IF(                     COUNTIF([.$BC93:.$BE93];&quot;Main/Aux&quot;);                     &quot;Main/Aux&quot;;                     IF(                         COUNTIF([.$BC93:.$BE93];&quot;Heavy&quot;);                         &quot;Heavy&quot;;                         &quot;&quot;                     )                 )             )         )     ) )">
            <text:p/>
          </table:table-cell>
          <table:table-cell table:style-name="ce47" table:formula="of:=IFERROR(     COM.MICROSOFT.XLOOKUP(         LOOKUP(2;1/([.$F$2:.$F12]&lt;&gt;&quot;&quot;);[.$F$2:.$F12]);         [$Frames.$A$2:.$A$100];         [$Frames.$Q$2:.$Q$100]     );     &quot;&quot; )" office:value-type="string" office:string-value="Heavy" calcext:value-type="string">
            <text:p>Heavy</text:p>
          </table:table-cell>
          <table:table-cell table:style-name="ce47" table:formula="of:=IFERROR(     COM.MICROSOFT.XLOOKUP(         LOOKUP(2;1/([.$F$2:.$F12]&lt;&gt;&quot;&quot;);[.$F$2:.$F12]);         [$Frames.$A$2:.$A$100];         [$Frames.$R$2:.$R$100]     );     &quot;&quot; )" office:value-type="string" office:string-value="Main" calcext:value-type="string">
            <text:p>Main</text:p>
          </table:table-cell>
          <table:table-cell table:style-name="ce47" table:formula="of:=IFERROR(     COM.MICROSOFT.XLOOKUP(         LOOKUP(2;1/([.$F$2:.$F12]&lt;&gt;&quot;&quot;);[.$F$2:.$F12]);         [$Frames.$A$2:.$A$100];         [$Frames.$S$2:.$S$100]     );     &quot;&quot; )" office:value-type="float" office:value="0" calcext:value-type="float">
            <text:p>0</text:p>
          </table:table-cell>
          <table:table-cell table:style-name="ce47"/>
          <table:table-cell table:style-name="ce47" table:formula="of:=IF(     OR([.BD93]=&quot;&quot;;[.BD93]=0);     &quot;&quot;;     IF(         AND(             [.$BC93]&lt;&gt;&quot;&quot;;             [.BD93]=[.$BC93];             COUNTIF([.$BD93:.BD93];[.$BC93])=1         );         &quot;Main/Aux&quot;;         [.BD93]     ) )" office:value-type="string" office:string-value="Heavy" calcext:value-type="string">
            <text:p>Heavy</text:p>
          </table:table-cell>
          <table:table-cell table:style-name="ce47" table:formula="of:=IF(     OR([.BE93]=&quot;&quot;;[.BE93]=0);     &quot;&quot;;     IF(         AND(             [.$BC93]&lt;&gt;&quot;&quot;;             [.BE93]=[.$BC93];             COUNTIF([.$BD93:.BE93];[.$BC93])=1         );         &quot;Main/Aux&quot;;         [.BE93]     ) )" office:value-type="string" office:string-value="Main" calcext:value-type="string">
            <text:p>Main</text:p>
          </table:table-cell>
          <table:table-cell table:style-name="ce47" table:formula="of:=IF(     OR([.BF93]=&quot;&quot;;[.BF93]=0);     &quot;&quot;;     IF(         AND(             [.$BC93]&lt;&gt;&quot;&quot;;             [.BF93]=[.$BC93];             COUNTIF([.$BD93:.BF93];[.$BC93])=1         );         &quot;Main/Aux&quot;;         [.BF93]     ) )">
            <text:p/>
          </table:table-cell>
          <table:table-cell table:style-name="ce47" table:formula="of:=IF(     AND(         COUNTIF([.$G$5:.$G12];&quot;Improved Armament&quot;)&gt;0;         SUMPRODUCT(([.$BH93:.$BJ93]&lt;&gt;&quot;&quot;)*([.$BH93:.$BJ93]&lt;&gt;0))&lt;3     );     &quot;Flex&quot;;     &quot;&quot; )" office:value-type="string" office:string-value="Flex" calcext:value-type="string">
            <text:p>Flex</text:p>
          </table:table-cell>
          <table:table-cell table:style-name="ce47" table:number-columns-repeated="2"/>
          <table:table-cell table:number-columns-repeated="119"/>
        </table:table-row>
        <table:table-row table:style-name="ro2">
          <table:table-cell table:number-columns-repeated="54"/>
          <table:table-cell table:style-name="ce47" table:formula="of:=IF(     COUNTIF([.$G$5:.$G13];&quot;Mount Retrofitting&quot;)=0;     &quot;&quot;;     IF(         COUNTIF([.$BC94:.$BE94];&quot;Aux/Aux&quot;);         &quot;Aux/Aux&quot;;         IF(             COUNTIF([.$BC94:.$BE94];&quot;Flex&quot;);             &quot;Flex&quot;;             IF(                 COUNTIF([.$BC94:.$BE94];&quot;Main&quot;);                 &quot;Main&quot;;                 IF(                     COUNTIF([.$BC94:.$BE94];&quot;Main/Aux&quot;);                     &quot;Main/Aux&quot;;                     IF(                         COUNTIF([.$BC94:.$BE94];&quot;Heavy&quot;);                         &quot;Heavy&quot;;                         &quot;&quot;                     )                 )             )         )     ) )">
            <text:p/>
          </table:table-cell>
          <table:table-cell table:style-name="ce47" table:formula="of:=IFERROR(     COM.MICROSOFT.XLOOKUP(         LOOKUP(2;1/([.$F$2:.$F13]&lt;&gt;&quot;&quot;);[.$F$2:.$F13]);         [$Frames.$A$2:.$A$100];         [$Frames.$Q$2:.$Q$100]     );     &quot;&quot; )" office:value-type="string" office:string-value="Heavy" calcext:value-type="string">
            <text:p>Heavy</text:p>
          </table:table-cell>
          <table:table-cell table:style-name="ce47" table:formula="of:=IFERROR(     COM.MICROSOFT.XLOOKUP(         LOOKUP(2;1/([.$F$2:.$F13]&lt;&gt;&quot;&quot;);[.$F$2:.$F13]);         [$Frames.$A$2:.$A$100];         [$Frames.$R$2:.$R$100]     );     &quot;&quot; )" office:value-type="string" office:string-value="Main" calcext:value-type="string">
            <text:p>Main</text:p>
          </table:table-cell>
          <table:table-cell table:style-name="ce47" table:formula="of:=IFERROR(     COM.MICROSOFT.XLOOKUP(         LOOKUP(2;1/([.$F$2:.$F13]&lt;&gt;&quot;&quot;);[.$F$2:.$F13]);         [$Frames.$A$2:.$A$100];         [$Frames.$S$2:.$S$100]     );     &quot;&quot; )" office:value-type="float" office:value="0" calcext:value-type="float">
            <text:p>0</text:p>
          </table:table-cell>
          <table:table-cell table:style-name="ce47"/>
          <table:table-cell table:style-name="ce47" table:formula="of:=IF(     OR([.BD94]=&quot;&quot;;[.BD94]=0);     &quot;&quot;;     IF(         AND(             [.$BC94]&lt;&gt;&quot;&quot;;             [.BD94]=[.$BC94];             COUNTIF([.$BD94:.BD94];[.$BC94])=1         );         &quot;Main/Aux&quot;;         [.BD94]     ) )" office:value-type="string" office:string-value="Heavy" calcext:value-type="string">
            <text:p>Heavy</text:p>
          </table:table-cell>
          <table:table-cell table:style-name="ce47" table:formula="of:=IF(     OR([.BE94]=&quot;&quot;;[.BE94]=0);     &quot;&quot;;     IF(         AND(             [.$BC94]&lt;&gt;&quot;&quot;;             [.BE94]=[.$BC94];             COUNTIF([.$BD94:.BE94];[.$BC94])=1         );         &quot;Main/Aux&quot;;         [.BE94]     ) )" office:value-type="string" office:string-value="Main" calcext:value-type="string">
            <text:p>Main</text:p>
          </table:table-cell>
          <table:table-cell table:style-name="ce47" table:formula="of:=IF(     OR([.BF94]=&quot;&quot;;[.BF94]=0);     &quot;&quot;;     IF(         AND(             [.$BC94]&lt;&gt;&quot;&quot;;             [.BF94]=[.$BC94];             COUNTIF([.$BD94:.BF94];[.$BC94])=1         );         &quot;Main/Aux&quot;;         [.BF94]     ) )">
            <text:p/>
          </table:table-cell>
          <table:table-cell table:style-name="ce47" table:formula="of:=IF(     AND(         COUNTIF([.$G$5:.$G13];&quot;Improved Armament&quot;)&gt;0;         SUMPRODUCT(([.$BH94:.$BJ94]&lt;&gt;&quot;&quot;)*([.$BH94:.$BJ94]&lt;&gt;0))&lt;3     );     &quot;Flex&quot;;     &quot;&quot; )" office:value-type="string" office:string-value="Flex" calcext:value-type="string">
            <text:p>Flex</text:p>
          </table:table-cell>
          <table:table-cell table:style-name="ce47" table:number-columns-repeated="2"/>
          <table:table-cell table:number-columns-repeated="119"/>
        </table:table-row>
        <table:table-row table:style-name="ro2">
          <table:table-cell table:number-columns-repeated="54"/>
          <table:table-cell table:style-name="ce47" table:formula="of:=IF(     COUNTIF([.$G$5:.$G14];&quot;Mount Retrofitting&quot;)=0;     &quot;&quot;;     IF(         COUNTIF([.$BC95:.$BE95];&quot;Aux/Aux&quot;);         &quot;Aux/Aux&quot;;         IF(             COUNTIF([.$BC95:.$BE95];&quot;Flex&quot;);             &quot;Flex&quot;;             IF(                 COUNTIF([.$BC95:.$BE95];&quot;Main&quot;);                 &quot;Main&quot;;                 IF(                     COUNTIF([.$BC95:.$BE95];&quot;Main/Aux&quot;);                     &quot;Main/Aux&quot;;                     IF(                         COUNTIF([.$BC95:.$BE95];&quot;Heavy&quot;);                         &quot;Heavy&quot;;                         &quot;&quot;                     )                 )             )         )     ) )" office:value-type="string" office:string-value="Flex" calcext:value-type="string">
            <text:p>Flex</text:p>
          </table:table-cell>
          <table:table-cell table:style-name="ce47" table:formula="of:=IFERROR(     COM.MICROSOFT.XLOOKUP(         LOOKUP(2;1/([.$F$2:.$F14]&lt;&gt;&quot;&quot;);[.$F$2:.$F14]);         [$Frames.$A$2:.$A$100];         [$Frames.$Q$2:.$Q$100]     );     &quot;&quot; )" office:value-type="string" office:string-value="Heavy" calcext:value-type="string">
            <text:p>Heavy</text:p>
          </table:table-cell>
          <table:table-cell table:style-name="ce47" table:formula="of:=IFERROR(     COM.MICROSOFT.XLOOKUP(         LOOKUP(2;1/([.$F$2:.$F14]&lt;&gt;&quot;&quot;);[.$F$2:.$F14]);         [$Frames.$A$2:.$A$100];         [$Frames.$R$2:.$R$100]     );     &quot;&quot; )" office:value-type="string" office:string-value="Flex" calcext:value-type="string">
            <text:p>Flex</text:p>
          </table:table-cell>
          <table:table-cell table:style-name="ce47" table:formula="of:=IFERROR(     COM.MICROSOFT.XLOOKUP(         LOOKUP(2;1/([.$F$2:.$F14]&lt;&gt;&quot;&quot;);[.$F$2:.$F14]);         [$Frames.$A$2:.$A$100];         [$Frames.$S$2:.$S$100]     );     &quot;&quot; )" office:value-type="string" office:string-value="Flex" calcext:value-type="string">
            <text:p>Flex</text:p>
          </table:table-cell>
          <table:table-cell table:style-name="ce47"/>
          <table:table-cell table:style-name="ce47" table:formula="of:=IF(     OR([.BD95]=&quot;&quot;;[.BD95]=0);     &quot;&quot;;     IF(         AND(             [.$BC95]&lt;&gt;&quot;&quot;;             [.BD95]=[.$BC95];             COUNTIF([.$BD95:.BD95];[.$BC95])=1         );         &quot;Main/Aux&quot;;         [.BD95]     ) )" office:value-type="string" office:string-value="Heavy" calcext:value-type="string">
            <text:p>Heavy</text:p>
          </table:table-cell>
          <table:table-cell table:style-name="ce47" table:formula="of:=IF(     OR([.BE95]=&quot;&quot;;[.BE95]=0);     &quot;&quot;;     IF(         AND(             [.$BC95]&lt;&gt;&quot;&quot;;             [.BE95]=[.$BC95];             COUNTIF([.$BD95:.BE95];[.$BC95])=1         );         &quot;Main/Aux&quot;;         [.BE95]     ) )" office:value-type="string" office:string-value="Main/Aux" calcext:value-type="string">
            <text:p>Main/Aux</text:p>
          </table:table-cell>
          <table:table-cell table:style-name="ce47" table:formula="of:=IF(     OR([.BF95]=&quot;&quot;;[.BF95]=0);     &quot;&quot;;     IF(         AND(             [.$BC95]&lt;&gt;&quot;&quot;;             [.BF95]=[.$BC95];             COUNTIF([.$BD95:.BF95];[.$BC95])=1         );         &quot;Main/Aux&quot;;         [.BF95]     ) )" office:value-type="string" office:string-value="Flex" calcext:value-type="string">
            <text:p>Flex</text:p>
          </table:table-cell>
          <table:table-cell table:style-name="ce47" table:formula="of:=IF(     AND(         COUNTIF([.$G$5:.$G14];&quot;Improved Armament&quot;)&gt;0;         SUMPRODUCT(([.$BH95:.$BJ95]&lt;&gt;&quot;&quot;)*([.$BH95:.$BJ95]&lt;&gt;0))&lt;3     );     &quot;Flex&quot;;     &quot;&quot; )">
            <text:p/>
          </table:table-cell>
          <table:table-cell table:style-name="ce47" table:number-columns-repeated="2"/>
          <table:table-cell table:number-columns-repeated="119"/>
        </table:table-row>
        <table:table-row table:style-name="ro2">
          <table:table-cell table:number-columns-repeated="54"/>
          <table:table-cell table:style-name="ce47" table:formula="of:=IF(     COUNTIF([.$G$5:.$G15];&quot;Mount Retrofitting&quot;)=0;     &quot;&quot;;     IF(         COUNTIF([.$BC96:.$BE96];&quot;Aux/Aux&quot;);         &quot;Aux/Aux&quot;;         IF(             COUNTIF([.$BC96:.$BE96];&quot;Flex&quot;);             &quot;Flex&quot;;             IF(                 COUNTIF([.$BC96:.$BE96];&quot;Main&quot;);                 &quot;Main&quot;;                 IF(                     COUNTIF([.$BC96:.$BE96];&quot;Main/Aux&quot;);                     &quot;Main/Aux&quot;;                     IF(                         COUNTIF([.$BC96:.$BE96];&quot;Heavy&quot;);                         &quot;Heavy&quot;;                         &quot;&quot;                     )                 )             )         )     ) )" office:value-type="string" office:string-value="Flex" calcext:value-type="string">
            <text:p>Flex</text:p>
          </table:table-cell>
          <table:table-cell table:style-name="ce47" table:formula="of:=IFERROR(     COM.MICROSOFT.XLOOKUP(         LOOKUP(2;1/([.$F$2:.$F15]&lt;&gt;&quot;&quot;);[.$F$2:.$F15]);         [$Frames.$A$2:.$A$100];         [$Frames.$Q$2:.$Q$100]     );     &quot;&quot; )" office:value-type="string" office:string-value="Heavy" calcext:value-type="string">
            <text:p>Heavy</text:p>
          </table:table-cell>
          <table:table-cell table:style-name="ce47" table:formula="of:=IFERROR(     COM.MICROSOFT.XLOOKUP(         LOOKUP(2;1/([.$F$2:.$F15]&lt;&gt;&quot;&quot;);[.$F$2:.$F15]);         [$Frames.$A$2:.$A$100];         [$Frames.$R$2:.$R$100]     );     &quot;&quot; )" office:value-type="string" office:string-value="Flex" calcext:value-type="string">
            <text:p>Flex</text:p>
          </table:table-cell>
          <table:table-cell table:style-name="ce47" table:formula="of:=IFERROR(     COM.MICROSOFT.XLOOKUP(         LOOKUP(2;1/([.$F$2:.$F15]&lt;&gt;&quot;&quot;);[.$F$2:.$F15]);         [$Frames.$A$2:.$A$100];         [$Frames.$S$2:.$S$100]     );     &quot;&quot; )" office:value-type="string" office:string-value="Flex" calcext:value-type="string">
            <text:p>Flex</text:p>
          </table:table-cell>
          <table:table-cell table:style-name="ce47"/>
          <table:table-cell table:style-name="ce47" table:formula="of:=IF(     OR([.BD96]=&quot;&quot;;[.BD96]=0);     &quot;&quot;;     IF(         AND(             [.$BC96]&lt;&gt;&quot;&quot;;             [.BD96]=[.$BC96];             COUNTIF([.$BD96:.BD96];[.$BC96])=1         );         &quot;Main/Aux&quot;;         [.BD96]     ) )" office:value-type="string" office:string-value="Heavy" calcext:value-type="string">
            <text:p>Heavy</text:p>
          </table:table-cell>
          <table:table-cell table:style-name="ce47" table:formula="of:=IF(     OR([.BE96]=&quot;&quot;;[.BE96]=0);     &quot;&quot;;     IF(         AND(             [.$BC96]&lt;&gt;&quot;&quot;;             [.BE96]=[.$BC96];             COUNTIF([.$BD96:.BE96];[.$BC96])=1         );         &quot;Main/Aux&quot;;         [.BE96]     ) )" office:value-type="string" office:string-value="Main/Aux" calcext:value-type="string">
            <text:p>Main/Aux</text:p>
          </table:table-cell>
          <table:table-cell table:style-name="ce47" table:formula="of:=IF(     OR([.BF96]=&quot;&quot;;[.BF96]=0);     &quot;&quot;;     IF(         AND(             [.$BC96]&lt;&gt;&quot;&quot;;             [.BF96]=[.$BC96];             COUNTIF([.$BD96:.BF96];[.$BC96])=1         );         &quot;Main/Aux&quot;;         [.BF96]     ) )" office:value-type="string" office:string-value="Flex" calcext:value-type="string">
            <text:p>Flex</text:p>
          </table:table-cell>
          <table:table-cell table:style-name="ce47" table:formula="of:=IF(     AND(         COUNTIF([.$G$5:.$G15];&quot;Improved Armament&quot;)&gt;0;         SUMPRODUCT(([.$BH96:.$BJ96]&lt;&gt;&quot;&quot;)*([.$BH96:.$BJ96]&lt;&gt;0))&lt;3     );     &quot;Flex&quot;;     &quot;&quot; )">
            <text:p/>
          </table:table-cell>
          <table:table-cell table:style-name="ce47" table:number-columns-repeated="2"/>
          <table:table-cell table:number-columns-repeated="119"/>
        </table:table-row>
        <table:table-row table:style-name="ro2">
          <table:table-cell table:number-columns-repeated="54"/>
          <table:table-cell table:style-name="ce47" table:formula="of:=IF(     COUNTIF([.$G$5:.$G16];&quot;Mount Retrofitting&quot;)=0;     &quot;&quot;;     IF(         COUNTIF([.$BC97:.$BE97];&quot;Aux/Aux&quot;);         &quot;Aux/Aux&quot;;         IF(             COUNTIF([.$BC97:.$BE97];&quot;Flex&quot;);             &quot;Flex&quot;;             IF(                 COUNTIF([.$BC97:.$BE97];&quot;Main&quot;);                 &quot;Main&quot;;                 IF(                     COUNTIF([.$BC97:.$BE97];&quot;Main/Aux&quot;);                     &quot;Main/Aux&quot;;                     IF(                         COUNTIF([.$BC97:.$BE97];&quot;Heavy&quot;);                         &quot;Heavy&quot;;                         &quot;&quot;                     )                 )             )         )     ) )" office:value-type="string" office:string-value="Flex" calcext:value-type="string">
            <text:p>Flex</text:p>
          </table:table-cell>
          <table:table-cell table:style-name="ce47" table:formula="of:=IFERROR(     COM.MICROSOFT.XLOOKUP(         LOOKUP(2;1/([.$F$2:.$F16]&lt;&gt;&quot;&quot;);[.$F$2:.$F16]);         [$Frames.$A$2:.$A$100];         [$Frames.$Q$2:.$Q$100]     );     &quot;&quot; )" office:value-type="string" office:string-value="Flex" calcext:value-type="string">
            <text:p>Flex</text:p>
          </table:table-cell>
          <table:table-cell table:style-name="ce47" table:formula="of:=IFERROR(     COM.MICROSOFT.XLOOKUP(         LOOKUP(2;1/([.$F$2:.$F16]&lt;&gt;&quot;&quot;);[.$F$2:.$F16]);         [$Frames.$A$2:.$A$100];         [$Frames.$R$2:.$R$100]     );     &quot;&quot; )" office:value-type="float" office:value="0" calcext:value-type="float">
            <text:p>0</text:p>
          </table:table-cell>
          <table:table-cell table:style-name="ce47" table:formula="of:=IFERROR(     COM.MICROSOFT.XLOOKUP(         LOOKUP(2;1/([.$F$2:.$F16]&lt;&gt;&quot;&quot;);[.$F$2:.$F16]);         [$Frames.$A$2:.$A$100];         [$Frames.$S$2:.$S$100]     );     &quot;&quot; )" office:value-type="float" office:value="0" calcext:value-type="float">
            <text:p>0</text:p>
          </table:table-cell>
          <table:table-cell table:style-name="ce47"/>
          <table:table-cell table:style-name="ce47" table:formula="of:=IF(     OR([.BD97]=&quot;&quot;;[.BD97]=0);     &quot;&quot;;     IF(         AND(             [.$BC97]&lt;&gt;&quot;&quot;;             [.BD97]=[.$BC97];             COUNTIF([.$BD97:.BD97];[.$BC97])=1         );         &quot;Main/Aux&quot;;         [.BD97]     ) )" office:value-type="string" office:string-value="Main/Aux" calcext:value-type="string">
            <text:p>Main/Aux</text:p>
          </table:table-cell>
          <table:table-cell table:style-name="ce47" table:formula="of:=IF(     OR([.BE97]=&quot;&quot;;[.BE97]=0);     &quot;&quot;;     IF(         AND(             [.$BC97]&lt;&gt;&quot;&quot;;             [.BE97]=[.$BC97];             COUNTIF([.$BD97:.BE97];[.$BC97])=1         );         &quot;Main/Aux&quot;;         [.BE97]     ) )">
            <text:p/>
          </table:table-cell>
          <table:table-cell table:style-name="ce47" table:formula="of:=IF(     OR([.BF97]=&quot;&quot;;[.BF97]=0);     &quot;&quot;;     IF(         AND(             [.$BC97]&lt;&gt;&quot;&quot;;             [.BF97]=[.$BC97];             COUNTIF([.$BD97:.BF97];[.$BC97])=1         );         &quot;Main/Aux&quot;;         [.BF97]     ) )">
            <text:p/>
          </table:table-cell>
          <table:table-cell table:style-name="ce47" table:formula="of:=IF(     AND(         COUNTIF([.$G$5:.$G16];&quot;Improved Armament&quot;)&gt;0;         SUMPRODUCT(([.$BH97:.$BJ97]&lt;&gt;&quot;&quot;)*([.$BH97:.$BJ97]&lt;&gt;0))&lt;3     );     &quot;Flex&quot;;     &quot;&quot; )" office:value-type="string" office:string-value="Flex" calcext:value-type="string">
            <text:p>Flex</text:p>
          </table:table-cell>
          <table:table-cell table:style-name="ce47" table:number-columns-repeated="2"/>
          <table:table-cell table:number-columns-repeated="119"/>
        </table:table-row>
        <table:table-row table:style-name="ro2">
          <table:table-cell table:number-columns-repeated="54"/>
          <table:table-cell table:style-name="ce47" table:formula="of:=IF(     COUNTIF([.$G$5:.$G17];&quot;Mount Retrofitting&quot;)=0;     &quot;&quot;;     IF(         COUNTIF([.$BC98:.$BE98];&quot;Aux/Aux&quot;);         &quot;Aux/Aux&quot;;         IF(             COUNTIF([.$BC98:.$BE98];&quot;Flex&quot;);             &quot;Flex&quot;;             IF(                 COUNTIF([.$BC98:.$BE98];&quot;Main&quot;);                 &quot;Main&quot;;                 IF(                     COUNTIF([.$BC98:.$BE98];&quot;Main/Aux&quot;);                     &quot;Main/Aux&quot;;                     IF(                         COUNTIF([.$BC98:.$BE98];&quot;Heavy&quot;);                         &quot;Heavy&quot;;                         &quot;&quot;                     )                 )             )         )     ) )" office:value-type="string" office:string-value="Main/Aux" calcext:value-type="string">
            <text:p>Main/Aux</text:p>
          </table:table-cell>
          <table:table-cell table:style-name="ce47" table:formula="of:=IFERROR(     COM.MICROSOFT.XLOOKUP(         LOOKUP(2;1/([.$F$2:.$F17]&lt;&gt;&quot;&quot;);[.$F$2:.$F17]);         [$Frames.$A$2:.$A$100];         [$Frames.$Q$2:.$Q$100]     );     &quot;&quot; )" office:value-type="string" office:string-value="Heavy" calcext:value-type="string">
            <text:p>Heavy</text:p>
          </table:table-cell>
          <table:table-cell table:style-name="ce47" table:formula="of:=IFERROR(     COM.MICROSOFT.XLOOKUP(         LOOKUP(2;1/([.$F$2:.$F17]&lt;&gt;&quot;&quot;);[.$F$2:.$F17]);         [$Frames.$A$2:.$A$100];         [$Frames.$R$2:.$R$100]     );     &quot;&quot; )" office:value-type="string" office:string-value="Main/Aux" calcext:value-type="string">
            <text:p>Main/Aux</text:p>
          </table:table-cell>
          <table:table-cell table:style-name="ce47" table:formula="of:=IFERROR(     COM.MICROSOFT.XLOOKUP(         LOOKUP(2;1/([.$F$2:.$F17]&lt;&gt;&quot;&quot;);[.$F$2:.$F17]);         [$Frames.$A$2:.$A$100];         [$Frames.$S$2:.$S$100]     );     &quot;&quot; )" office:value-type="float" office:value="0" calcext:value-type="float">
            <text:p>0</text:p>
          </table:table-cell>
          <table:table-cell table:style-name="ce47"/>
          <table:table-cell table:style-name="ce47" table:formula="of:=IF(     OR([.BD98]=&quot;&quot;;[.BD98]=0);     &quot;&quot;;     IF(         AND(             [.$BC98]&lt;&gt;&quot;&quot;;             [.BD98]=[.$BC98];             COUNTIF([.$BD98:.BD98];[.$BC98])=1         );         &quot;Main/Aux&quot;;         [.BD98]     ) )" office:value-type="string" office:string-value="Heavy" calcext:value-type="string">
            <text:p>Heavy</text:p>
          </table:table-cell>
          <table:table-cell table:style-name="ce47" table:formula="of:=IF(     OR([.BE98]=&quot;&quot;;[.BE98]=0);     &quot;&quot;;     IF(         AND(             [.$BC98]&lt;&gt;&quot;&quot;;             [.BE98]=[.$BC98];             COUNTIF([.$BD98:.BE98];[.$BC98])=1         );         &quot;Main/Aux&quot;;         [.BE98]     ) )" office:value-type="string" office:string-value="Main/Aux" calcext:value-type="string">
            <text:p>Main/Aux</text:p>
          </table:table-cell>
          <table:table-cell table:style-name="ce47" table:formula="of:=IF(     OR([.BF98]=&quot;&quot;;[.BF98]=0);     &quot;&quot;;     IF(         AND(             [.$BC98]&lt;&gt;&quot;&quot;;             [.BF98]=[.$BC98];             COUNTIF([.$BD98:.BF98];[.$BC98])=1         );         &quot;Main/Aux&quot;;         [.BF98]     ) )">
            <text:p/>
          </table:table-cell>
          <table:table-cell table:style-name="ce47" table:formula="of:=IF(     AND(         COUNTIF([.$G$5:.$G17];&quot;Improved Armament&quot;)&gt;0;         SUMPRODUCT(([.$BH98:.$BJ98]&lt;&gt;&quot;&quot;)*([.$BH98:.$BJ98]&lt;&gt;0))&lt;3     );     &quot;Flex&quot;;     &quot;&quot; )" office:value-type="string" office:string-value="Flex" calcext:value-type="string">
            <text:p>Flex</text:p>
          </table:table-cell>
          <table:table-cell table:style-name="ce47" table:number-columns-repeated="2"/>
          <table:table-cell table:number-columns-repeated="119"/>
        </table:table-row>
        <table:table-row table:style-name="ro2">
          <table:table-cell table:number-columns-repeated="184"/>
        </table:table-row>
        <table:table-row table:style-name="ro2">
          <table:table-cell table:number-columns-repeated="61"/>
          <table:table-cell table:style-name="ce6"/>
          <table:table-cell table:number-columns-repeated="122"/>
        </table:table-row>
        <table:table-row table:style-name="ro2" table:number-rows-repeated="1048475">
          <table:table-cell table:number-columns-repeated="184"/>
        </table:table-row>
        <table:table-row table:style-name="ro2">
          <table:table-cell table:number-columns-repeated="184"/>
        </table:table-row>
        <calcext:conditional-formats>
          <calcext:conditional-format calcext:target-range-address="Build.E6:Build.E17">
            <calcext:condition calcext:apply-style-name="Frame_Less" calcext:value="formula-is(AND([.$E6]&lt;&gt;&quot;&quot;;COUNTIF([Build.$BC17:.$CN17];[.$E6])=0))" calcext:base-cell-address="Build.E6"/>
          </calcext:conditional-format>
          <calcext:conditional-format calcext:target-range-address="Build.I5:Build.L17">
            <calcext:condition calcext:apply-style-name="Frame_Less" calcext:value="&gt;6" calcext:base-cell-address="Build.I5"/>
          </calcext:conditional-format>
          <calcext:conditional-format calcext:target-range-address="Build.G8:Build.G8">
            <calcext:condition calcext:apply-style-name="Frame_Less" calcext:value="formula-is(AND([.$G8]&lt;&gt;&quot;&quot;;COUNTIF([$Build.$BH$49:.$CM$49];[.$G8])=0))" calcext:base-cell-address="Build.G8"/>
          </calcext:conditional-format>
          <calcext:conditional-format calcext:target-range-address="Build.G11:Build.G11">
            <calcext:condition calcext:apply-style-name="Frame_Less" calcext:value="formula-is(AND([.$G11]&lt;&gt;&quot;&quot;;COUNTIF([$Build.$BH$50:.$CM$50];[.$G11])=0))" calcext:base-cell-address="Build.G11"/>
          </calcext:conditional-format>
          <calcext:conditional-format calcext:target-range-address="Build.G14:Build.G14">
            <calcext:condition calcext:apply-style-name="Frame_Less" calcext:value="formula-is(AND([.$G14]&lt;&gt;&quot;&quot;;COUNTIF([$Build.$BH$51:.$CM$51];[.$G14])=0))" calcext:base-cell-address="Build.G14"/>
          </calcext:conditional-format>
          <calcext:conditional-format calcext:target-range-address="Build.G17:Build.G17">
            <calcext:condition calcext:apply-style-name="Frame_Less" calcext:value="formula-is(AND([.$G17]&lt;&gt;&quot;&quot;;COUNTIF([$Build.$BH$52:.$CM$52];[.$G17])=0))" calcext:base-cell-address="Build.G17"/>
          </calcext:conditional-format>
          <calcext:conditional-format calcext:target-range-address="Build.D10:Build.D17">
            <calcext:condition calcext:apply-style-name="Frame_Less" calcext:value="formula-is(COUNTIF([.$D$2:.$D9];[.$D10])&gt;=6)" calcext:base-cell-address="Build.D10"/>
          </calcext:conditional-format>
          <calcext:conditional-format calcext:target-range-address="Build.O5:Build.Y17">
            <calcext:condition calcext:apply-style-name="Bad" calcext:value="&lt;[.O4]" calcext:base-cell-address="Build.O5"/>
          </calcext:conditional-format>
          <calcext:conditional-format calcext:target-range-address="Build.BC34:Build.BC34">
            <calcext:condition calcext:apply-style-name="Frame_Less" calcext:value="formula-is(AND([.$C34]&lt;&gt;&quot;&quot;;COUNTIF([Build.$BC34:.EL$62];[.$C34])=0))" calcext:base-cell-address="Build.BC34"/>
          </calcext:conditional-format>
          <calcext:conditional-format calcext:target-range-address="Build.C6:Build.C17">
            <calcext:condition calcext:apply-style-name="Frame_Less" calcext:value="formula-is(AND([.$C6]&lt;&gt;&quot;&quot;;COUNTIF([Build.$BC34:.$CM34];[.$C6])=0))" calcext:base-cell-address="Build.C6"/>
          </calcext:conditional-format>
          <calcext:conditional-format calcext:target-range-address="Build.C2:Build.C4">
            <calcext:condition calcext:apply-style-name="Frame_Less" calcext:value="formula-is(AND([.$C2]&lt;&gt;&quot;&quot;;COUNTIF([Build.$BC31:.$CM31];[.$C2])=0))" calcext:base-cell-address="Build.C2"/>
          </calcext:conditional-format>
          <calcext:conditional-format calcext:target-range-address="Build.AI5:Build.AI17">
            <calcext:condition calcext:apply-style-name="Frame_Less" calcext:value="&gt;[$Build.$Y5]" calcext:base-cell-address="Build.AI5"/>
          </calcext:conditional-format>
          <calcext:conditional-format calcext:target-range-address="Build.AI5:Build.AI17">
            <calcext:condition calcext:apply-style-name="Frame_Equal" calcext:value="formula-is(IF(ISBLANK([.AI5]);0;[.AI5]&lt;[.Y5]))" calcext:base-cell-address="Build.AI5"/>
          </calcext:conditional-format>
        </calcext:conditional-formats>
      </table:table>
      <table:table table:name="Frames" table:style-name="ta1">
        <office:forms form:automatic-focus="false" form:apply-design-mode="false"/>
        <table:table-column table:style-name="co14" table:default-cell-style-name="Default"/>
        <table:table-column table:style-name="co11" table:default-cell-style-name="Default"/>
        <table:table-column table:style-name="co15" table:default-cell-style-name="Default"/>
        <table:table-column table:style-name="co10" table:default-cell-style-name="ce3"/>
        <table:table-column table:style-name="co8" table:default-cell-style-name="Default"/>
        <table:table-column table:style-name="co8" table:default-cell-style-name="ce3"/>
        <table:table-column table:style-name="co8" table:default-cell-style-name="Default"/>
        <table:table-column table:style-name="co8" table:default-cell-style-name="ce3"/>
        <table:table-column table:style-name="co8" table:default-cell-style-name="Default"/>
        <table:table-column table:style-name="co8" table:default-cell-style-name="ce3"/>
        <table:table-column table:style-name="co8" table:default-cell-style-name="Default"/>
        <table:table-column table:style-name="co8" table:default-cell-style-name="ce3"/>
        <table:table-column table:style-name="co8" table:default-cell-style-name="Default"/>
        <table:table-column table:style-name="co8" table:default-cell-style-name="ce3"/>
        <table:table-column table:style-name="co8" table:default-cell-style-name="Default"/>
        <table:table-column table:style-name="co8" table:default-cell-style-name="ce67"/>
        <table:table-column table:style-name="co11" table:number-columns-repeated="3" table:default-cell-style-name="Default"/>
        <table:table-column table:style-name="co8" table:default-cell-style-name="Default"/>
        <table:table-column table:style-name="co16" table:number-columns-repeated="4" table:default-cell-style-name="Default"/>
        <table:table-column table:style-name="co17" table:default-cell-style-name="Default"/>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6" table:default-cell-style-name="Default"/>
        <table:table-row table:style-name="ro3">
          <table:table-cell office:value-type="string" calcext:value-type="string">
            <text:p>Frame</text:p>
          </table:table-cell>
          <table:table-cell office:value-type="string" calcext:value-type="string">
            <text:p>Manufacturer</text:p>
          </table:table-cell>
          <table:table-cell office:value-type="string" calcext:value-type="string">
            <text:p>License</text:p>
          </table:table-cell>
          <table:table-cell table:style-name="ce78" office:value-type="string" calcext:value-type="string">
            <text:p>Size</text:p>
          </table:table-cell>
          <table:table-cell table:style-name="ce86" office:value-type="string" calcext:value-type="string">
            <text:p>HP</text:p>
          </table:table-cell>
          <table:table-cell table:style-name="ce90" office:value-type="string" calcext:value-type="string">
            <text:p>Armor</text:p>
          </table:table-cell>
          <table:table-cell table:style-name="ce86" office:value-type="string" calcext:value-type="string">
            <text:p>Heat Cap</text:p>
          </table:table-cell>
          <table:table-cell table:style-name="ce90" office:value-type="string" calcext:value-type="string">
            <text:p>Evasion</text:p>
          </table:table-cell>
          <table:table-cell table:style-name="ce86" office:value-type="string" calcext:value-type="string">
            <text:p>Speed</text:p>
          </table:table-cell>
          <table:table-cell table:style-name="ce90" office:value-type="string" calcext:value-type="string">
            <text:p>E-Defense</text:p>
          </table:table-cell>
          <table:table-cell table:style-name="ce86" office:value-type="string" calcext:value-type="string">
            <text:p>Tech Atk</text:p>
          </table:table-cell>
          <table:table-cell table:style-name="ce90" office:value-type="string" calcext:value-type="string">
            <text:p>Sensors</text:p>
          </table:table-cell>
          <table:table-cell table:style-name="ce86" office:value-type="string" calcext:value-type="string">
            <text:p>Repair Cap</text:p>
          </table:table-cell>
          <table:table-cell table:style-name="ce90" office:value-type="string" calcext:value-type="string">
            <text:p>Save Tgt</text:p>
          </table:table-cell>
          <table:table-cell table:style-name="ce86" office:value-type="string" calcext:value-type="string">
            <text:p>SP</text:p>
          </table:table-cell>
          <table:table-cell table:style-name="ce94" office:value-type="string" calcext:value-type="string">
            <text:p>Frame Idx</text:p>
          </table:table-cell>
          <table:table-cell table:style-name="ce98" office:value-type="string" calcext:value-type="string">
            <text:p>Mount 1</text:p>
          </table:table-cell>
          <table:table-cell table:style-name="ce98" office:value-type="string" calcext:value-type="string">
            <text:p>Mount 2</text:p>
          </table:table-cell>
          <table:table-cell table:style-name="ce98" office:value-type="string" calcext:value-type="string">
            <text:p>Mount 3</text:p>
          </table:table-cell>
          <table:table-cell/>
          <table:table-cell office:value-type="string" calcext:value-type="string">
            <text:p>Trait 1</text:p>
          </table:table-cell>
          <table:table-cell office:value-type="string" calcext:value-type="string">
            <text:p>Trait 2</text:p>
          </table:table-cell>
          <table:table-cell office:value-type="string" calcext:value-type="string">
            <text:p>Trait 3</text:p>
          </table:table-cell>
          <table:table-cell office:value-type="string" calcext:value-type="string">
            <text:p>Trait 4</text:p>
          </table:table-cell>
          <table:table-cell office:value-type="string" calcext:value-type="string">
            <text:p>Core Power</text:p>
          </table:table-cell>
          <table:table-cell/>
          <table:table-cell office:value-type="string" calcext:value-type="string">
            <text:p>Source Book</text:p>
          </table:table-cell>
          <table:table-cell/>
          <table:table-cell office:value-type="string" calcext:value-type="string">
            <text:p>%FRAME%</text:p>
          </table:table-cell>
          <table:table-cell office:value-type="string" calcext:value-type="string">
            <text:p>Valid Select Frame</text:p>
          </table:table-cell>
        </table:table-row>
        <table:table-row table:style-name="ro2">
          <table:table-cell table:style-name="ce5" office:value-type="string" calcext:value-type="string">
            <text:p>Everest</text:p>
          </table:table-cell>
          <table:table-cell table:style-name="ce5" office:value-type="string" calcext:value-type="string">
            <text:p>GMS</text:p>
          </table:table-cell>
          <table:table-cell table:style-name="ce5"/>
          <table:table-cell table:style-name="ce5" office:value-type="float" office:value="1" calcext:value-type="float">
            <text:p>1</text:p>
          </table:table-cell>
          <table:table-cell table:style-name="ce5" office:value-type="float" office:value="10" calcext:value-type="float">
            <text:p>10</text:p>
          </table:table-cell>
          <table:table-cell table:style-name="ce5" office:value-type="float" office:value="0" calcext:value-type="float">
            <text:p>0</text:p>
          </table:table-cell>
          <table:table-cell table:style-name="ce5" office:value-type="float" office:value="6" calcext:value-type="float">
            <text:p>6</text:p>
          </table:table-cell>
          <table:table-cell table:style-name="ce5" office:value-type="float" office:value="8" calcext:value-type="float">
            <text:p>8</text:p>
          </table:table-cell>
          <table:table-cell table:style-name="ce5" office:value-type="float" office:value="4" calcext:value-type="float">
            <text:p>4</text:p>
          </table:table-cell>
          <table:table-cell table:style-name="ce5" office:value-type="float" office:value="8" calcext:value-type="float">
            <text:p>8</text:p>
          </table:table-cell>
          <table:table-cell table:style-name="ce5" office:value-type="float" office:value="0" calcext:value-type="float">
            <text:p>0</text:p>
          </table:table-cell>
          <table:table-cell table:style-name="ce5" office:value-type="float" office:value="10" calcext:value-type="float">
            <text:p>10</text:p>
          </table:table-cell>
          <table:table-cell table:style-name="ce5" office:value-type="float" office:value="5" calcext:value-type="float">
            <text:p>5</text:p>
          </table:table-cell>
          <table:table-cell table:style-name="ce5" office:value-type="float" office:value="10" calcext:value-type="float">
            <text:p>10</text:p>
          </table:table-cell>
          <table:table-cell table:style-name="ce5" office:value-type="float" office:value="6" calcext:value-type="float">
            <text:p>6</text:p>
          </table:table-cell>
          <table:table-cell table:style-name="ce87" office:value-type="float" office:value="0" calcext:value-type="float">
            <text:p>0</text:p>
          </table:table-cell>
          <table:table-cell table:style-name="ce69" office:value-type="string" calcext:value-type="string">
            <text:p>Heavy</text:p>
          </table:table-cell>
          <table:table-cell table:style-name="ce69" office:value-type="string" calcext:value-type="string">
            <text:p>Flex</text:p>
          </table:table-cell>
          <table:table-cell table:style-name="ce69" office:value-type="string" calcext:value-type="string">
            <text:p>Main</text:p>
          </table:table-cell>
          <table:table-cell table:style-name="ce5"/>
          <table:table-cell table:style-name="ce5" office:value-type="string" calcext:value-type="string">
            <text:p>Initiative</text:p>
          </table:table-cell>
          <table:table-cell table:style-name="ce5" office:value-type="string" calcext:value-type="string">
            <text:p>Replaceable Parts</text:p>
          </table:table-cell>
          <table:table-cell table:style-name="ce5" table:number-columns-repeated="2"/>
          <table:table-cell table:style-name="ce5" office:value-type="string" calcext:value-type="string">
            <text:p>Hyperspec Fuel Injector</text:p>
          </table:table-cell>
          <table:table-cell table:style-name="ce5" table:number-columns-repeated="3"/>
          <table:table-cell table:style-name="ce5" office:value-type="string" calcext:value-type="string">
            <text:p>Everest</text:p>
          </table:table-cell>
          <table:table-cell table:style-name="ce5" table:formula="of:=IF(     OR(         [.$C2]=&quot;&quot;;         COUNTIF([$Build.$E$2:.$E$20];[$Frames.$C2])&gt;0     );     [$Frames.$A2];     &quot;&quot; )" office:value-type="string" office:string-value="Everest" calcext:value-type="string">
            <text:p>Everest</text:p>
          </table:table-cell>
        </table:table-row>
        <table:table-row table:style-name="ro2">
          <table:table-cell office:value-type="string" calcext:value-type="string">
            <text:p>Sagarmatha</text:p>
          </table:table-cell>
          <table:table-cell office:value-type="string" calcext:value-type="string">
            <text:p>GMS</text:p>
          </table:table-cell>
          <table:table-cell/>
          <table:table-cell table:style-name="ce79" office:value-type="float" office:value="2" calcext:value-type="float">
            <text:p>2</text:p>
          </table:table-cell>
          <table:table-cell table:style-name="ce82" office:value-type="float" office:value="8" calcext:value-type="float">
            <text:p>8</text:p>
          </table:table-cell>
          <table:table-cell table:style-name="ce84" office:value-type="float" office:value="1" calcext:value-type="float">
            <text:p>1</text:p>
          </table:table-cell>
          <table:table-cell table:style-name="ce82" office:value-type="float" office:value="6" calcext:value-type="float">
            <text:p>6</text:p>
          </table:table-cell>
          <table:table-cell table:style-name="ce84" office:value-type="float" office:value="8" calcext:value-type="float">
            <text:p>8</text:p>
          </table:table-cell>
          <table:table-cell table:style-name="ce82" office:value-type="float" office:value="4" calcext:value-type="float">
            <text:p>4</text:p>
          </table:table-cell>
          <table:table-cell table:style-name="ce84" office:value-type="float" office:value="8" calcext:value-type="float">
            <text:p>8</text:p>
          </table:table-cell>
          <table:table-cell table:style-name="ce82" office:value-type="float" office:value="0" calcext:value-type="float">
            <text:p>0</text:p>
          </table:table-cell>
          <table:table-cell table:style-name="ce84" office:value-type="float" office:value="10" calcext:value-type="float">
            <text:p>10</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6" calcext:value-type="float">
            <text:p>6</text:p>
          </table:table-cell>
          <table:table-cell table:style-name="ce87" office:value-type="float" office:value="1" calcext:value-type="float">
            <text:p>1</text:p>
          </table:table-cell>
          <table:table-cell table:style-name="ce101" office:value-type="string" calcext:value-type="string">
            <text:p>Heavy</text:p>
          </table:table-cell>
          <table:table-cell table:style-name="ce101" office:value-type="string" calcext:value-type="string">
            <text:p>Flex</text:p>
          </table:table-cell>
          <table:table-cell table:style-name="ce101" office:value-type="string" calcext:value-type="string">
            <text:p>Main</text:p>
          </table:table-cell>
          <table:table-cell/>
          <table:table-cell office:value-type="string" calcext:value-type="string">
            <text:p>Guardian</text:p>
          </table:table-cell>
          <table:table-cell office:value-type="string" calcext:value-type="string">
            <text:p>Heroism</text:p>
          </table:table-cell>
          <table:table-cell office:value-type="string" calcext:value-type="string">
            <text:p>Replaceable Parts</text:p>
          </table:table-cell>
          <table:table-cell/>
          <table:table-cell office:value-type="string" calcext:value-type="string">
            <text:p>Rallying Cry</text:p>
          </table:table-cell>
          <table:table-cell/>
          <table:table-cell office:value-type="string" calcext:value-type="string">
            <text:p>No Room for a Wallflower: Act 1</text:p>
          </table:table-cell>
          <table:table-cell/>
          <table:table-cell office:value-type="string" calcext:value-type="string">
            <text:p>Sagarmatha</text:p>
          </table:table-cell>
          <table:table-cell table:formula="of:=IF(     OR(         [.$C3]=&quot;&quot;;         COUNTIF([$Build.$E$2:.$E$20];[.$C3])&gt;0     );     [.$A3];     &quot;&quot; )" office:value-type="string" office:string-value="Sagarmatha" calcext:value-type="string">
            <text:p>Sagarmatha</text:p>
          </table:table-cell>
        </table:table-row>
        <table:table-row table:style-name="ro2">
          <table:table-cell office:value-type="string" calcext:value-type="string">
            <text:p>Chomolungma</text:p>
          </table:table-cell>
          <table:table-cell office:value-type="string" calcext:value-type="string">
            <text:p>GMS</text:p>
          </table:table-cell>
          <table:table-cell/>
          <table:table-cell table:style-name="ce80" office:value-type="float" office:value="1" calcext:value-type="float">
            <text:p>1</text:p>
          </table:table-cell>
          <table:table-cell table:style-name="ce82" office:value-type="float" office:value="10" calcext:value-type="float">
            <text:p>10</text:p>
          </table:table-cell>
          <table:table-cell table:style-name="ce84" office:value-type="float" office:value="0" calcext:value-type="float">
            <text:p>0</text:p>
          </table:table-cell>
          <table:table-cell table:style-name="ce85" office:value-type="float" office:value="6" calcext:value-type="float">
            <text:p>6</text:p>
          </table:table-cell>
          <table:table-cell table:style-name="ce84" office:value-type="float" office:value="8" calcext:value-type="float">
            <text:p>8</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1" calcext:value-type="float">
            <text:p>1</text:p>
          </table:table-cell>
          <table:table-cell table:style-name="ce84" office:value-type="float" office:value="15" calcext:value-type="float">
            <text:p>15</text:p>
          </table:table-cell>
          <table:table-cell table:style-name="ce82" office:value-type="float" office:value="4" calcext:value-type="float">
            <text:p>4</text:p>
          </table:table-cell>
          <table:table-cell table:style-name="ce84" office:value-type="float" office:value="11" calcext:value-type="float">
            <text:p>11</text:p>
          </table:table-cell>
          <table:table-cell table:style-name="ce82" office:value-type="float" office:value="7" calcext:value-type="float">
            <text:p>7</text:p>
          </table:table-cell>
          <table:table-cell table:style-name="ce87" office:value-type="float" office:value="2" calcext:value-type="float">
            <text:p>2</text:p>
          </table:table-cell>
          <table:table-cell table:style-name="ce101" office:value-type="string" calcext:value-type="string">
            <text:p>Main/Aux</text:p>
          </table:table-cell>
          <table:table-cell table:style-name="ce101" office:value-type="string" calcext:value-type="string">
            <text:p>Flex</text:p>
          </table:table-cell>
          <table:table-cell table:style-name="ce101"/>
          <table:table-cell/>
          <table:table-cell office:value-type="string" calcext:value-type="string">
            <text:p>Brilliance</text:p>
          </table:table-cell>
          <table:table-cell office:value-type="string" calcext:value-type="string">
            <text:p>Data Siphon</text:p>
          </table:table-cell>
          <table:table-cell office:value-type="string" calcext:value-type="string">
            <text:p>Replaceable Parts</text:p>
          </table:table-cell>
          <table:table-cell/>
          <table:table-cell office:value-type="string" calcext:value-type="string">
            <text:p>Advanced Intrusion Package</text:p>
          </table:table-cell>
          <table:table-cell/>
          <table:table-cell office:value-type="string" calcext:value-type="string">
            <text:p>Operation Solstice Rain</text:p>
          </table:table-cell>
          <table:table-cell/>
          <table:table-cell office:value-type="string" calcext:value-type="string">
            <text:p>Chomolungma</text:p>
          </table:table-cell>
          <table:table-cell table:formula="of:=IF(     OR(         [.$C4]=&quot;&quot;;         COUNTIF([$Build.$E$2:.$E$20];[.$C4])&gt;0     );     [.$A4];     &quot;&quot; )" office:value-type="string" office:string-value="Chomolungma" calcext:value-type="string">
            <text:p>Chomolungma</text:p>
          </table:table-cell>
        </table:table-row>
        <table:table-row table:style-name="ro2">
          <table:table-cell office:value-type="string" calcext:value-type="string">
            <text:p>Blackbeard</text:p>
          </table:table-cell>
          <table:table-cell office:value-type="string" calcext:value-type="string">
            <text:p>IPS-N</text:p>
          </table:table-cell>
          <table:table-cell office:value-type="string" calcext:value-type="string">
            <text:p>Blackbeard II</text:p>
          </table:table-cell>
          <table:table-cell table:style-name="ce79" office:value-type="float" office:value="1" calcext:value-type="float">
            <text:p>1</text:p>
          </table:table-cell>
          <table:table-cell table:style-name="ce82" office:value-type="float" office:value="12" calcext:value-type="float">
            <text:p>12</text:p>
          </table:table-cell>
          <table:table-cell table:style-name="ce84" office:value-type="float" office:value="1" calcext:value-type="float">
            <text:p>1</text:p>
          </table:table-cell>
          <table:table-cell table:style-name="ce82" office:value-type="float" office:value="4" calcext:value-type="float">
            <text:p>4</text:p>
          </table:table-cell>
          <table:table-cell table:style-name="ce84" office:value-type="float" office:value="8" calcext:value-type="float">
            <text:p>8</text:p>
          </table:table-cell>
          <table:table-cell table:style-name="ce82" office:value-type="float" office:value="5" calcext:value-type="float">
            <text:p>5</text:p>
          </table:table-cell>
          <table:table-cell table:style-name="ce84" office:value-type="float" office:value="6" calcext:value-type="float">
            <text:p>6</text:p>
          </table:table-cell>
          <table:table-cell table:style-name="ce82" office:value-type="float" office:value="-2" calcext:value-type="float">
            <text:p>-2</text:p>
          </table:table-cell>
          <table:table-cell table:style-name="ce84" office:value-type="float" office:value="5" calcext:value-type="float">
            <text:p>5</text:p>
          </table:table-cell>
          <table:table-cell table:style-name="ce82" office:value-type="float" office:value="5" calcext:value-type="float">
            <text:p>5</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3" calcext:value-type="float">
            <text:p>3</text:p>
          </table:table-cell>
          <table:table-cell table:style-name="ce101" office:value-type="string" calcext:value-type="string">
            <text:p>Heavy</text:p>
          </table:table-cell>
          <table:table-cell table:style-name="ce101" office:value-type="string" calcext:value-type="string">
            <text:p>Flex</text:p>
          </table:table-cell>
          <table:table-cell table:style-name="ce101" office:value-type="string" calcext:value-type="string">
            <text:p>Main</text:p>
          </table:table-cell>
          <table:table-cell/>
          <table:table-cell office:value-type="string" calcext:value-type="string">
            <text:p>Grapple Cable</text:p>
          </table:table-cell>
          <table:table-cell office:value-type="string" calcext:value-type="string">
            <text:p>Lock/Kill Subsystem</text:p>
          </table:table-cell>
          <table:table-cell office:value-type="string" calcext:value-type="string">
            <text:p>Exposed Reactor</text:p>
          </table:table-cell>
          <table:table-cell/>
          <table:table-cell office:value-type="string" calcext:value-type="string">
            <text:p>Assault Grapples</text:p>
          </table:table-cell>
          <table:table-cell table:number-columns-repeated="3"/>
          <table:table-cell office:value-type="string" calcext:value-type="string">
            <text:p>Blackbeard</text:p>
          </table:table-cell>
          <table:table-cell table:formula="of:=IF(     OR(         [.$C5]=&quot;&quot;;         COUNTIF([$Build.$E$2:.$E$20];[.$C5])&gt;0     );     [.$A5];     &quot;&quot; )">
            <text:p/>
          </table:table-cell>
        </table:table-row>
        <table:table-row table:style-name="ro2">
          <table:table-cell office:value-type="string" calcext:value-type="string">
            <text:p>Empakaai</text:p>
          </table:table-cell>
          <table:table-cell office:value-type="string" calcext:value-type="string">
            <text:p>IPS-N</text:p>
          </table:table-cell>
          <table:table-cell office:value-type="string" calcext:value-type="string">
            <text:p>Blackbeard II</text:p>
          </table:table-cell>
          <table:table-cell table:style-name="ce79" office:value-type="float" office:value="1" calcext:value-type="float">
            <text:p>1</text:p>
          </table:table-cell>
          <table:table-cell table:style-name="ce82" office:value-type="float" office:value="10" calcext:value-type="float">
            <text:p>10</text:p>
          </table:table-cell>
          <table:table-cell table:style-name="ce84" office:value-type="float" office:value="2" calcext:value-type="float">
            <text:p>2</text:p>
          </table:table-cell>
          <table:table-cell table:style-name="ce82" office:value-type="float" office:value="6" calcext:value-type="float">
            <text:p>6</text:p>
          </table:table-cell>
          <table:table-cell table:style-name="ce84" office:value-type="float" office:value="7" calcext:value-type="float">
            <text:p>7</text:p>
          </table:table-cell>
          <table:table-cell table:style-name="ce82" office:value-type="float" office:value="4" calcext:value-type="float">
            <text:p>4</text:p>
          </table:table-cell>
          <table:table-cell table:style-name="ce84" office:value-type="float" office:value="6" calcext:value-type="float">
            <text:p>6</text:p>
          </table:table-cell>
          <table:table-cell table:style-name="ce82" office:value-type="float" office:value="-2" calcext:value-type="float">
            <text:p>-2</text:p>
          </table:table-cell>
          <table:table-cell table:style-name="ce84" office:value-type="float" office:value="5" calcext:value-type="float">
            <text:p>5</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4" calcext:value-type="float">
            <text:p>4</text:p>
          </table:table-cell>
          <table:table-cell table:style-name="ce101" office:value-type="string" calcext:value-type="string">
            <text:p>Heavy</text:p>
          </table:table-cell>
          <table:table-cell table:style-name="ce101" office:value-type="string" calcext:value-type="string">
            <text:p>Flex</text:p>
          </table:table-cell>
          <table:table-cell table:style-name="ce101"/>
          <table:table-cell/>
          <table:table-cell office:value-type="string" calcext:value-type="string">
            <text:p>Untenable Power</text:p>
          </table:table-cell>
          <table:table-cell office:value-type="string" calcext:value-type="string">
            <text:p>Indomitable Force</text:p>
          </table:table-cell>
          <table:table-cell table:number-columns-repeated="2"/>
          <table:table-cell office:value-type="string" calcext:value-type="string">
            <text:p>The Descent to Kalunga</text:p>
          </table:table-cell>
          <table:table-cell/>
          <table:table-cell office:value-type="string" calcext:value-type="string">
            <text:p>Siren's Song: A Mountain's Remorse</text:p>
          </table:table-cell>
          <table:table-cell/>
          <table:table-cell office:value-type="string" calcext:value-type="string">
            <text:p>Empakaai</text:p>
          </table:table-cell>
          <table:table-cell table:formula="of:=IF(     OR(         [.$C6]=&quot;&quot;;         COUNTIF([$Build.$E$2:.$E$20];[.$C6])&gt;0     );     [.$A6];     &quot;&quot; )">
            <text:p/>
          </table:table-cell>
        </table:table-row>
        <table:table-row table:style-name="ro2">
          <table:table-cell office:value-type="string" calcext:value-type="string">
            <text:p>Drake</text:p>
          </table:table-cell>
          <table:table-cell office:value-type="string" calcext:value-type="string">
            <text:p>IPS-N</text:p>
          </table:table-cell>
          <table:table-cell office:value-type="string" calcext:value-type="string">
            <text:p>Drake II</text:p>
          </table:table-cell>
          <table:table-cell table:style-name="ce79" office:value-type="float" office:value="2" calcext:value-type="float">
            <text:p>2</text:p>
          </table:table-cell>
          <table:table-cell table:style-name="ce82" office:value-type="float" office:value="8" calcext:value-type="float">
            <text:p>8</text:p>
          </table:table-cell>
          <table:table-cell table:style-name="ce84" office:value-type="float" office:value="3" calcext:value-type="float">
            <text:p>3</text:p>
          </table:table-cell>
          <table:table-cell table:style-name="ce82" office:value-type="float" office:value="5" calcext:value-type="float">
            <text:p>5</text:p>
          </table:table-cell>
          <table:table-cell table:style-name="ce84" office:value-type="float" office:value="6" calcext:value-type="float">
            <text:p>6</text:p>
          </table:table-cell>
          <table:table-cell table:style-name="ce82" office:value-type="float" office:value="3" calcext:value-type="float">
            <text:p>3</text:p>
          </table:table-cell>
          <table:table-cell table:style-name="ce84" office:value-type="float" office:value="6" calcext:value-type="float">
            <text:p>6</text:p>
          </table:table-cell>
          <table:table-cell table:style-name="ce82" office:value-type="float" office:value="0" calcext:value-type="float">
            <text:p>0</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5" calcext:value-type="float">
            <text:p>5</text:p>
          </table:table-cell>
          <table:table-cell table:style-name="ce101" office:value-type="string" calcext:value-type="string">
            <text:p>Heavy</text:p>
          </table:table-cell>
          <table:table-cell table:number-columns-repeated="2" table:style-name="ce101" office:value-type="string" calcext:value-type="string">
            <text:p>Main</text:p>
          </table:table-cell>
          <table:table-cell/>
          <table:table-cell office:value-type="string" calcext:value-type="string">
            <text:p>Heavy Frame</text:p>
          </table:table-cell>
          <table:table-cell office:value-type="string" calcext:value-type="string">
            <text:p>Blast Plating</text:p>
          </table:table-cell>
          <table:table-cell office:value-type="string" calcext:value-type="string">
            <text:p>Slow</text:p>
          </table:table-cell>
          <table:table-cell office:value-type="string" calcext:value-type="string">
            <text:p>Guardian</text:p>
          </table:table-cell>
          <table:table-cell office:value-type="string" calcext:value-type="string">
            <text:p>Fortress</text:p>
          </table:table-cell>
          <table:table-cell table:number-columns-repeated="3"/>
          <table:table-cell office:value-type="string" calcext:value-type="string">
            <text:p>Drake</text:p>
          </table:table-cell>
          <table:table-cell table:formula="of:=IF(     OR(         [.$C7]=&quot;&quot;;         COUNTIF([$Build.$E$2:.$E$20];[.$C7])&gt;0     );     [.$A7];     &quot;&quot; )">
            <text:p/>
          </table:table-cell>
        </table:table-row>
        <table:table-row table:style-name="ro2">
          <table:table-cell office:value-type="string" calcext:value-type="string">
            <text:p>Lancaster</text:p>
          </table:table-cell>
          <table:table-cell office:value-type="string" calcext:value-type="string">
            <text:p>IPS-N</text:p>
          </table:table-cell>
          <table:table-cell office:value-type="string" calcext:value-type="string">
            <text:p>Lancaster II</text:p>
          </table:table-cell>
          <table:table-cell table:style-name="ce79" office:value-type="float" office:value="2" calcext:value-type="float">
            <text:p>2</text:p>
          </table:table-cell>
          <table:table-cell table:style-name="ce82" office:value-type="float" office:value="6" calcext:value-type="float">
            <text:p>6</text:p>
          </table:table-cell>
          <table:table-cell table:style-name="ce84" office:value-type="float" office:value="1" calcext:value-type="float">
            <text:p>1</text:p>
          </table:table-cell>
          <table:table-cell table:style-name="ce82" office:value-type="float" office:value="6" calcext:value-type="float">
            <text:p>6</text:p>
          </table:table-cell>
          <table:table-cell table:style-name="ce84" office:value-type="float" office:value="8" calcext:value-type="float">
            <text:p>8</text:p>
          </table:table-cell>
          <table:table-cell table:style-name="ce82" office:value-type="float" office:value="6" calcext:value-type="float">
            <text:p>6</text:p>
          </table:table-cell>
          <table:table-cell table:style-name="ce84" office:value-type="float" office:value="8" calcext:value-type="float">
            <text:p>8</text:p>
          </table:table-cell>
          <table:table-cell table:style-name="ce82" office:value-type="float" office:value="1" calcext:value-type="float">
            <text:p>1</text:p>
          </table:table-cell>
          <table:table-cell table:style-name="ce84" office:value-type="float" office:value="8" calcext:value-type="float">
            <text:p>8</text:p>
          </table:table-cell>
          <table:table-cell table:style-name="ce82" office:value-type="float" office:value="10" calcext:value-type="float">
            <text:p>10</text:p>
          </table:table-cell>
          <table:table-cell table:style-name="ce84" office:value-type="float" office:value="10" calcext:value-type="float">
            <text:p>10</text:p>
          </table:table-cell>
          <table:table-cell table:style-name="ce82" office:value-type="float" office:value="8" calcext:value-type="float">
            <text:p>8</text:p>
          </table:table-cell>
          <table:table-cell table:style-name="ce87" office:value-type="float" office:value="6" calcext:value-type="float">
            <text:p>6</text:p>
          </table:table-cell>
          <table:table-cell table:style-name="ce101" office:value-type="string" calcext:value-type="string">
            <text:p>Main/Aux</text:p>
          </table:table-cell>
          <table:table-cell table:style-name="ce101" table:number-columns-repeated="2"/>
          <table:table-cell/>
          <table:table-cell office:value-type="string" calcext:value-type="string">
            <text:p>Insulated</text:p>
          </table:table-cell>
          <table:table-cell table:style-name="ce101" office:value-type="string" calcext:value-type="string">
            <text:p>Combat Repair</text:p>
          </table:table-cell>
          <table:table-cell office:value-type="string" calcext:value-type="string">
            <text:p>Redundant Systems</text:p>
          </table:table-cell>
          <table:table-cell/>
          <table:table-cell office:value-type="string" calcext:value-type="string">
            <text:p>Latch Drone</text:p>
          </table:table-cell>
          <table:table-cell table:number-columns-repeated="3"/>
          <table:table-cell office:value-type="string" calcext:value-type="string">
            <text:p>Lancaster</text:p>
          </table:table-cell>
          <table:table-cell table:formula="of:=IF(     OR(         [.$C8]=&quot;&quot;;         COUNTIF([$Build.$E$2:.$E$20];[.$C8])&gt;0     );     [.$A8];     &quot;&quot; )">
            <text:p/>
          </table:table-cell>
        </table:table-row>
        <table:table-row table:style-name="ro2">
          <table:table-cell office:value-type="string" calcext:value-type="string">
            <text:p>Taraxacum</text:p>
          </table:table-cell>
          <table:table-cell office:value-type="string" calcext:value-type="string">
            <text:p>IPS-N</text:p>
          </table:table-cell>
          <table:table-cell office:value-type="string" calcext:value-type="string">
            <text:p>Lancaster II</text:p>
          </table:table-cell>
          <table:table-cell table:style-name="ce79" office:value-type="float" office:value="2" calcext:value-type="float">
            <text:p>2</text:p>
          </table:table-cell>
          <table:table-cell table:style-name="ce82" office:value-type="float" office:value="6" calcext:value-type="float">
            <text:p>6</text:p>
          </table:table-cell>
          <table:table-cell table:style-name="ce84" office:value-type="float" office:value="1" calcext:value-type="float">
            <text:p>1</text:p>
          </table:table-cell>
          <table:table-cell table:style-name="ce82" office:value-type="float" office:value="8" calcext:value-type="float">
            <text:p>8</text:p>
          </table:table-cell>
          <table:table-cell table:style-name="ce84" office:value-type="float" office:value="10" calcext:value-type="float">
            <text:p>10</text:p>
          </table:table-cell>
          <table:table-cell table:style-name="ce82" office:value-type="float" office:value="6" calcext:value-type="float">
            <text:p>6</text:p>
          </table:table-cell>
          <table:table-cell table:style-name="ce84" office:value-type="float" office:value="8" calcext:value-type="float">
            <text:p>8</text:p>
          </table:table-cell>
          <table:table-cell table:style-name="ce82" office:value-type="float" office:value="1" calcext:value-type="float">
            <text:p>1</text:p>
          </table:table-cell>
          <table:table-cell table:style-name="ce84" office:value-type="float" office:value="15" calcext:value-type="float">
            <text:p>15</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8" calcext:value-type="float">
            <text:p>8</text:p>
          </table:table-cell>
          <table:table-cell table:style-name="ce87" office:value-type="float" office:value="7" calcext:value-type="float">
            <text:p>7</text:p>
          </table:table-cell>
          <table:table-cell table:style-name="ce101" office:value-type="string" calcext:value-type="string">
            <text:p>Main/Aux</text:p>
          </table:table-cell>
          <table:table-cell table:style-name="ce101" table:number-columns-repeated="2"/>
          <table:table-cell/>
          <table:table-cell office:value-type="string" calcext:value-type="string">
            <text:p>Roc Superlifter Flight System</text:p>
          </table:table-cell>
          <table:table-cell office:value-type="string" calcext:value-type="string">
            <text:p>Relay Coupling</text:p>
          </table:table-cell>
          <table:table-cell office:value-type="string" calcext:value-type="string">
            <text:p>Precision Fix</text:p>
          </table:table-cell>
          <table:table-cell/>
          <table:table-cell office:value-type="string" calcext:value-type="string">
            <text:p>Crossland-Pattern Survey Sensors</text:p>
          </table:table-cell>
          <table:table-cell/>
          <table:table-cell office:value-type="string" calcext:value-type="string">
            <text:p>Shadow of the Wolf</text:p>
          </table:table-cell>
          <table:table-cell/>
          <table:table-cell office:value-type="string" calcext:value-type="string">
            <text:p>Taraxacum</text:p>
          </table:table-cell>
          <table:table-cell table:formula="of:=IF(     OR(         [.$C9]=&quot;&quot;;         COUNTIF([$Build.$E$2:.$E$20];[.$C9])&gt;0     );     [.$A9];     &quot;&quot; )">
            <text:p/>
          </table:table-cell>
        </table:table-row>
        <table:table-row table:style-name="ro2">
          <table:table-cell office:value-type="string" calcext:value-type="string">
            <text:p>Nelson</text:p>
          </table:table-cell>
          <table:table-cell office:value-type="string" calcext:value-type="string">
            <text:p>IPS-N</text:p>
          </table:table-cell>
          <table:table-cell office:value-type="string" calcext:value-type="string">
            <text:p>Nelson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0" calcext:value-type="float">
            <text:p>0</text:p>
          </table:table-cell>
          <table:table-cell table:style-name="ce82" office:value-type="float" office:value="6" calcext:value-type="float">
            <text:p>6</text:p>
          </table:table-cell>
          <table:table-cell table:style-name="ce84" office:value-type="float" office:value="11" calcext:value-type="float">
            <text:p>11</text:p>
          </table:table-cell>
          <table:table-cell table:style-name="ce82" office:value-type="float" office:value="5" calcext:value-type="float">
            <text:p>5</text:p>
          </table:table-cell>
          <table:table-cell table:style-name="ce84" office:value-type="float" office:value="7" calcext:value-type="float">
            <text:p>7</text:p>
          </table:table-cell>
          <table:table-cell table:style-name="ce82" office:value-type="float" office:value="0" calcext:value-type="float">
            <text:p>0</text:p>
          </table:table-cell>
          <table:table-cell table:style-name="ce84" office:value-type="float" office:value="5" calcext:value-type="float">
            <text:p>5</text:p>
          </table:table-cell>
          <table:table-cell table:style-name="ce82" office:value-type="float" office:value="5" calcext:value-type="float">
            <text:p>5</text:p>
          </table:table-cell>
          <table:table-cell table:style-name="ce84" office:value-type="float" office:value="10" calcext:value-type="float">
            <text:p>10</text:p>
          </table:table-cell>
          <table:table-cell table:style-name="ce82" office:value-type="float" office:value="6" calcext:value-type="float">
            <text:p>6</text:p>
          </table:table-cell>
          <table:table-cell table:style-name="ce87" office:value-type="float" office:value="8" calcext:value-type="float">
            <text:p>8</text:p>
          </table:table-cell>
          <table:table-cell table:style-name="ce101" office:value-type="string" calcext:value-type="string">
            <text:p>Main/Aux</text:p>
          </table:table-cell>
          <table:table-cell table:style-name="ce101" office:value-type="string" calcext:value-type="string">
            <text:p>Flex</text:p>
          </table:table-cell>
          <table:table-cell table:style-name="ce101"/>
          <table:table-cell/>
          <table:table-cell office:value-type="string" calcext:value-type="string">
            <text:p>Momentum</text:p>
          </table:table-cell>
          <table:table-cell office:value-type="string" calcext:value-type="string">
            <text:p>Skirmisher</text:p>
          </table:table-cell>
          <table:table-cell table:number-columns-repeated="2"/>
          <table:table-cell office:value-type="string" calcext:value-type="string">
            <text:p>Perpetual Momentum Drive</text:p>
          </table:table-cell>
          <table:table-cell table:number-columns-repeated="3"/>
          <table:table-cell office:value-type="string" calcext:value-type="string">
            <text:p>Nelson</text:p>
          </table:table-cell>
          <table:table-cell table:formula="of:=IF(     OR(         [.$C10]=&quot;&quot;;         COUNTIF([$Build.$E$2:.$E$20];[.$C10])&gt;0     );     [.$A10];     &quot;&quot; )">
            <text:p/>
          </table:table-cell>
        </table:table-row>
        <table:table-row table:style-name="ro2">
          <table:table-cell office:value-type="string" calcext:value-type="string">
            <text:p>Raleigh</text:p>
          </table:table-cell>
          <table:table-cell office:value-type="string" calcext:value-type="string">
            <text:p>IPS-N</text:p>
          </table:table-cell>
          <table:table-cell office:value-type="string" calcext:value-type="string">
            <text:p>Raleigh II</text:p>
          </table:table-cell>
          <table:table-cell table:style-name="ce79" office:value-type="float" office:value="1" calcext:value-type="float">
            <text:p>1</text:p>
          </table:table-cell>
          <table:table-cell table:style-name="ce82" office:value-type="float" office:value="10" calcext:value-type="float">
            <text:p>10</text:p>
          </table:table-cell>
          <table:table-cell table:style-name="ce84" office:value-type="float" office:value="1" calcext:value-type="float">
            <text:p>1</text:p>
          </table:table-cell>
          <table:table-cell table:style-name="ce82" office:value-type="float" office:value="5" calcext:value-type="float">
            <text:p>5</text:p>
          </table:table-cell>
          <table:table-cell table:style-name="ce84" office:value-type="float" office:value="8" calcext:value-type="float">
            <text:p>8</text:p>
          </table:table-cell>
          <table:table-cell table:style-name="ce82" office:value-type="float" office:value="4" calcext:value-type="float">
            <text:p>4</text:p>
          </table:table-cell>
          <table:table-cell table:style-name="ce84" office:value-type="float" office:value="7" calcext:value-type="float">
            <text:p>7</text:p>
          </table:table-cell>
          <table:table-cell table:style-name="ce82" office:value-type="float" office:value="-1" calcext:value-type="float">
            <text:p>-1</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9" calcext:value-type="float">
            <text:p>9</text:p>
          </table:table-cell>
          <table:table-cell table:style-name="ce101" office:value-type="string" calcext:value-type="string">
            <text:p>Heavy</text:p>
          </table:table-cell>
          <table:table-cell table:style-name="ce101" office:value-type="string" calcext:value-type="string">
            <text:p>Flex</text:p>
          </table:table-cell>
          <table:table-cell table:style-name="ce101" office:value-type="string" calcext:value-type="string">
            <text:p>Aux/Aux</text:p>
          </table:table-cell>
          <table:table-cell/>
          <table:table-cell office:value-type="string" calcext:value-type="string">
            <text:p>Full Metal Jacket</text:p>
          </table:table-cell>
          <table:table-cell office:value-type="string" calcext:value-type="string">
            <text:p>Shielded Magazines</text:p>
          </table:table-cell>
          <table:table-cell table:number-columns-repeated="2"/>
          <table:table-cell office:value-type="string" calcext:value-type="string">
            <text:p>M35 Mjolnir Cannon</text:p>
          </table:table-cell>
          <table:table-cell table:number-columns-repeated="3"/>
          <table:table-cell office:value-type="string" calcext:value-type="string">
            <text:p>Raleigh</text:p>
          </table:table-cell>
          <table:table-cell table:formula="of:=IF(     OR(         [.$C11]=&quot;&quot;;         COUNTIF([$Build.$E$2:.$E$20];[.$C11])&gt;0     );     [.$A11];     &quot;&quot; )">
            <text:p/>
          </table:table-cell>
        </table:table-row>
        <table:table-row table:style-name="ro2">
          <table:table-cell table:style-name="ce6" office:value-type="string" calcext:value-type="string">
            <text:p>Störtebeker </text:p>
          </table:table-cell>
          <table:table-cell office:value-type="string" calcext:value-type="string">
            <text:p>IPS-N</text:p>
          </table:table-cell>
          <table:table-cell office:value-type="string" calcext:value-type="string">
            <text:p>Raleigh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1" calcext:value-type="float">
            <text:p>1</text:p>
          </table:table-cell>
          <table:table-cell table:style-name="ce82" office:value-type="float" office:value="5" calcext:value-type="float">
            <text:p>5</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4" office:value-type="float" office:value="7" calcext:value-type="float">
            <text:p>7</text:p>
          </table:table-cell>
          <table:table-cell table:style-name="ce82" office:value-type="float" office:value="0" calcext:value-type="float">
            <text:p>0</text:p>
          </table:table-cell>
          <table:table-cell table:style-name="ce84" office:value-type="float" office:value="8" calcext:value-type="float">
            <text:p>8</text:p>
          </table:table-cell>
          <table:table-cell table:style-name="ce82" office:value-type="float" office:value="5" calcext:value-type="float">
            <text:p>5</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10" calcext:value-type="float">
            <text:p>10</text:p>
          </table:table-cell>
          <table:table-cell table:style-name="ce101" office:value-type="string" calcext:value-type="string">
            <text:p>Heavy</text:p>
          </table:table-cell>
          <table:table-cell table:number-columns-repeated="2" table:style-name="ce101" office:value-type="string" calcext:value-type="string">
            <text:p>Flex</text:p>
          </table:table-cell>
          <table:table-cell/>
          <table:table-cell office:value-type="string" calcext:value-type="string">
            <text:p>Dynamic Reload</text:p>
          </table:table-cell>
          <table:table-cell office:value-type="string" calcext:value-type="string">
            <text:p>Truesilver</text:p>
          </table:table-cell>
          <table:table-cell table:number-columns-repeated="2"/>
          <table:table-cell office:value-type="string" calcext:value-type="string">
            <text:p>Truesilver Weaponry</text:p>
          </table:table-cell>
          <table:table-cell/>
          <table:table-cell office:value-type="string" calcext:value-type="string">
            <text:p>Dustgrave</text:p>
          </table:table-cell>
          <table:table-cell/>
          <table:table-cell office:value-type="string" calcext:value-type="string">
            <text:p>Störtebeker </text:p>
          </table:table-cell>
          <table:table-cell table:formula="of:=IF(     OR(         [.$C12]=&quot;&quot;;         COUNTIF([$Build.$E$2:.$E$20];[.$C12])&gt;0     );     [.$A12];     &quot;&quot; )">
            <text:p/>
          </table:table-cell>
        </table:table-row>
        <table:table-row table:style-name="ro2">
          <table:table-cell office:value-type="string" calcext:value-type="string">
            <text:p>Tortuga</text:p>
          </table:table-cell>
          <table:table-cell office:value-type="string" calcext:value-type="string">
            <text:p>IPS-N</text:p>
          </table:table-cell>
          <table:table-cell office:value-type="string" calcext:value-type="string">
            <text:p>Tortuga II</text:p>
          </table:table-cell>
          <table:table-cell table:style-name="ce79" office:value-type="float" office:value="2" calcext:value-type="float">
            <text:p>2</text:p>
          </table:table-cell>
          <table:table-cell table:style-name="ce82" office:value-type="float" office:value="8" calcext:value-type="float">
            <text:p>8</text:p>
          </table:table-cell>
          <table:table-cell table:style-name="ce84" office:value-type="float" office:value="2" calcext:value-type="float">
            <text:p>2</text:p>
          </table:table-cell>
          <table:table-cell table:style-name="ce82" office:value-type="float" office:value="6" calcext:value-type="float">
            <text:p>6</text:p>
          </table:table-cell>
          <table:table-cell table:style-name="ce84" office:value-type="float" office:value="6" calcext:value-type="float">
            <text:p>6</text:p>
          </table:table-cell>
          <table:table-cell table:style-name="ce82" office:value-type="float" office:value="3" calcext:value-type="float">
            <text:p>3</text:p>
          </table:table-cell>
          <table:table-cell table:style-name="ce84" office:value-type="float" office:value="10" calcext:value-type="float">
            <text:p>10</text:p>
          </table:table-cell>
          <table:table-cell table:style-name="ce82" office:value-type="float" office:value="1" calcext:value-type="float">
            <text:p>1</text:p>
          </table:table-cell>
          <table:table-cell table:style-name="ce84" office:value-type="float" office:value="15" calcext:value-type="float">
            <text:p>15</text:p>
          </table:table-cell>
          <table:table-cell table:style-name="ce82" office:value-type="float" office:value="6" calcext:value-type="float">
            <text:p>6</text:p>
          </table:table-cell>
          <table:table-cell table:style-name="ce84" office:value-type="float" office:value="10" calcext:value-type="float">
            <text:p>10</text:p>
          </table:table-cell>
          <table:table-cell table:style-name="ce82" office:value-type="float" office:value="6" calcext:value-type="float">
            <text:p>6</text:p>
          </table:table-cell>
          <table:table-cell table:style-name="ce87" office:value-type="float" office:value="11" calcext:value-type="float">
            <text:p>11</text:p>
          </table:table-cell>
          <table:table-cell table:style-name="ce101" office:value-type="string" calcext:value-type="string">
            <text:p>Heavy</text:p>
          </table:table-cell>
          <table:table-cell table:style-name="ce101" office:value-type="string" calcext:value-type="string">
            <text:p>Main</text:p>
          </table:table-cell>
          <table:table-cell table:style-name="ce101"/>
          <table:table-cell/>
          <table:table-cell office:value-type="string" calcext:value-type="string">
            <text:p>Sentinel</text:p>
          </table:table-cell>
          <table:table-cell office:value-type="string" calcext:value-type="string">
            <text:p>Guardian</text:p>
          </table:table-cell>
          <table:table-cell table:number-columns-repeated="2"/>
          <table:table-cell office:value-type="string" calcext:value-type="string">
            <text:p>Watchdog Co-Pilot</text:p>
          </table:table-cell>
          <table:table-cell table:number-columns-repeated="3"/>
          <table:table-cell office:value-type="string" calcext:value-type="string">
            <text:p>Tortuga</text:p>
          </table:table-cell>
          <table:table-cell table:formula="of:=IF(     OR(         [.$C13]=&quot;&quot;;         COUNTIF([$Build.$E$2:.$E$20];[.$C13])&gt;0     );     [.$A13];     &quot;&quot; )">
            <text:p/>
          </table:table-cell>
        </table:table-row>
        <table:table-row table:style-name="ro2">
          <table:table-cell office:value-type="string" calcext:value-type="string">
            <text:p>Vlad</text:p>
          </table:table-cell>
          <table:table-cell office:value-type="string" calcext:value-type="string">
            <text:p>IPS-N</text:p>
          </table:table-cell>
          <table:table-cell office:value-type="string" calcext:value-type="string">
            <text:p>Vlad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2" calcext:value-type="float">
            <text:p>2</text:p>
          </table:table-cell>
          <table:table-cell table:style-name="ce82" office:value-type="float" office:value="6" calcext:value-type="float">
            <text:p>6</text:p>
          </table:table-cell>
          <table:table-cell table:style-name="ce84" office:value-type="float" office:value="8" calcext:value-type="float">
            <text:p>8</text:p>
          </table:table-cell>
          <table:table-cell table:style-name="ce82" office:value-type="float" office:value="4" calcext:value-type="float">
            <text:p>4</text:p>
          </table:table-cell>
          <table:table-cell table:style-name="ce84" office:value-type="float" office:value="8" calcext:value-type="float">
            <text:p>8</text:p>
          </table:table-cell>
          <table:table-cell table:style-name="ce82" office:value-type="float" office:value="-2" calcext:value-type="float">
            <text:p>-2</text:p>
          </table:table-cell>
          <table:table-cell table:style-name="ce84" office:value-type="float" office:value="5" calcext:value-type="float">
            <text:p>5</text:p>
          </table:table-cell>
          <table:table-cell table:style-name="ce82" office:value-type="float" office:value="4" calcext:value-type="float">
            <text:p>4</text:p>
          </table:table-cell>
          <table:table-cell table:style-name="ce84" office:value-type="float" office:value="11" calcext:value-type="float">
            <text:p>11</text:p>
          </table:table-cell>
          <table:table-cell table:style-name="ce82" office:value-type="float" office:value="5" calcext:value-type="float">
            <text:p>5</text:p>
          </table:table-cell>
          <table:table-cell table:style-name="ce87" office:value-type="float" office:value="12" calcext:value-type="float">
            <text:p>12</text:p>
          </table:table-cell>
          <table:table-cell table:style-name="ce101" office:value-type="string" calcext:value-type="string">
            <text:p>Heavy</text:p>
          </table:table-cell>
          <table:table-cell table:style-name="ce101" office:value-type="string" calcext:value-type="string">
            <text:p>Flex</text:p>
          </table:table-cell>
          <table:table-cell table:style-name="ce101" office:value-type="string" calcext:value-type="string">
            <text:p>Main</text:p>
          </table:table-cell>
          <table:table-cell/>
          <table:table-cell office:value-type="string" calcext:value-type="string">
            <text:p>Dismemberment</text:p>
          </table:table-cell>
          <table:table-cell office:value-type="string" calcext:value-type="string">
            <text:p>Shrike Armor</text:p>
          </table:table-cell>
          <table:table-cell table:number-columns-repeated="2"/>
          <table:table-cell office:value-type="string" calcext:value-type="string">
            <text:p>Shrike Armor</text:p>
          </table:table-cell>
          <table:table-cell table:number-columns-repeated="3"/>
          <table:table-cell office:value-type="string" calcext:value-type="string">
            <text:p>Vlad</text:p>
          </table:table-cell>
          <table:table-cell table:formula="of:=IF(     OR(         [.$C14]=&quot;&quot;;         COUNTIF([$Build.$E$2:.$E$20];[.$C14])&gt;0     );     [.$A14];     &quot;&quot; )">
            <text:p/>
          </table:table-cell>
        </table:table-row>
        <table:table-row table:style-name="ro2">
          <table:table-cell office:value-type="string" calcext:value-type="string">
            <text:p>Kidd</text:p>
          </table:table-cell>
          <table:table-cell office:value-type="string" calcext:value-type="string">
            <text:p>IPS-N</text:p>
          </table:table-cell>
          <table:table-cell office:value-type="string" calcext:value-type="string">
            <text:p>Kidd II</text:p>
          </table:table-cell>
          <table:table-cell table:style-name="ce79" office:value-type="float" office:value="1" calcext:value-type="float">
            <text:p>1</text:p>
          </table:table-cell>
          <table:table-cell table:style-name="ce82" office:value-type="float" office:value="6" calcext:value-type="float">
            <text:p>6</text:p>
          </table:table-cell>
          <table:table-cell table:style-name="ce84" office:value-type="float" office:value="2" calcext:value-type="float">
            <text:p>2</text:p>
          </table:table-cell>
          <table:table-cell table:style-name="ce82" office:value-type="float" office:value="4" calcext:value-type="float">
            <text:p>4</text:p>
          </table:table-cell>
          <table:table-cell table:style-name="ce84" office:value-type="float" office:value="6" calcext:value-type="float">
            <text:p>6</text:p>
          </table:table-cell>
          <table:table-cell table:style-name="ce82" office:value-type="float" office:value="6" calcext:value-type="float">
            <text:p>6</text:p>
          </table:table-cell>
          <table:table-cell table:style-name="ce84" office:value-type="float" office:value="12" calcext:value-type="float">
            <text:p>12</text:p>
          </table:table-cell>
          <table:table-cell table:style-name="ce82" office:value-type="float" office:value="1" calcext:value-type="float">
            <text:p>1</text:p>
          </table:table-cell>
          <table:table-cell table:style-name="ce84" office:value-type="float" office:value="8" calcext:value-type="float">
            <text:p>8</text:p>
          </table:table-cell>
          <table:table-cell table:style-name="ce82" office:value-type="float" office:value="5" calcext:value-type="float">
            <text:p>5</text:p>
          </table:table-cell>
          <table:table-cell table:style-name="ce84" office:value-type="float" office:value="11" calcext:value-type="float">
            <text:p>11</text:p>
          </table:table-cell>
          <table:table-cell table:style-name="ce82" office:value-type="float" office:value="10" calcext:value-type="float">
            <text:p>10</text:p>
          </table:table-cell>
          <table:table-cell table:style-name="ce87" office:value-type="float" office:value="13" calcext:value-type="float">
            <text:p>13</text:p>
          </table:table-cell>
          <table:table-cell table:style-name="ce101" office:value-type="string" calcext:value-type="string">
            <text:p>Main</text:p>
          </table:table-cell>
          <table:table-cell table:style-name="ce101" table:number-columns-repeated="2"/>
          <table:table-cell/>
          <table:table-cell office:value-type="string" calcext:value-type="string">
            <text:p>Rapid Deployment</text:p>
          </table:table-cell>
          <table:table-cell office:value-type="string" calcext:value-type="string">
            <text:p>Reroute Power</text:p>
          </table:table-cell>
          <table:table-cell office:value-type="string" calcext:value-type="string">
            <text:p>Recycle</text:p>
          </table:table-cell>
          <table:table-cell/>
          <table:table-cell office:value-type="string" calcext:value-type="string">
            <text:p>The Jolly Roger</text:p>
          </table:table-cell>
          <table:table-cell/>
          <table:table-cell office:value-type="string" calcext:value-type="string">
            <text:p>No Room for a Wallflower: Act 1</text:p>
          </table:table-cell>
          <table:table-cell/>
          <table:table-cell office:value-type="string" calcext:value-type="string">
            <text:p>Kidd</text:p>
          </table:table-cell>
          <table:table-cell table:formula="of:=IF(     OR(         [.$C15]=&quot;&quot;;         COUNTIF([$Build.$E$2:.$E$20];[.$C15])&gt;0     );     [.$A15];     &quot;&quot; )">
            <text:p/>
          </table:table-cell>
        </table:table-row>
        <table:table-row table:style-name="ro2">
          <table:table-cell office:value-type="string" calcext:value-type="string">
            <text:p>Caliban</text:p>
          </table:table-cell>
          <table:table-cell office:value-type="string" calcext:value-type="string">
            <text:p>IPS-N</text:p>
          </table:table-cell>
          <table:table-cell office:value-type="string" calcext:value-type="string">
            <text:p>Caliban II</text:p>
          </table:table-cell>
          <table:table-cell table:style-name="ce79" office:value-type="float" office:value="0.5" calcext:value-type="float">
            <text:p>0.5</text:p>
          </table:table-cell>
          <table:table-cell table:style-name="ce82" office:value-type="float" office:value="6" calcext:value-type="float">
            <text:p>6</text:p>
          </table:table-cell>
          <table:table-cell table:style-name="ce84" office:value-type="float" office:value="2" calcext:value-type="float">
            <text:p>2</text:p>
          </table:table-cell>
          <table:table-cell table:style-name="ce82" office:value-type="float" office:value="5" calcext:value-type="float">
            <text:p>5</text:p>
          </table:table-cell>
          <table:table-cell table:style-name="ce84" office:value-type="float" office:value="8" calcext:value-type="float">
            <text:p>8</text:p>
          </table:table-cell>
          <table:table-cell table:style-name="ce82" office:value-type="float" office:value="3" calcext:value-type="float">
            <text:p>3</text:p>
          </table:table-cell>
          <table:table-cell table:style-name="ce84" office:value-type="float" office:value="8" calcext:value-type="float">
            <text:p>8</text:p>
          </table:table-cell>
          <table:table-cell table:style-name="ce82" office:value-type="float" office:value="-2" calcext:value-type="float">
            <text:p>-2</text:p>
          </table:table-cell>
          <table:table-cell table:style-name="ce84" office:value-type="float" office:value="3" calcext:value-type="float">
            <text:p>3</text:p>
          </table:table-cell>
          <table:table-cell table:style-name="ce82" office:value-type="float" office:value="5" calcext:value-type="float">
            <text:p>5</text:p>
          </table:table-cell>
          <table:table-cell table:style-name="ce84" office:value-type="float" office:value="11" calcext:value-type="float">
            <text:p>11</text:p>
          </table:table-cell>
          <table:table-cell table:style-name="ce82" office:value-type="float" office:value="5" calcext:value-type="float">
            <text:p>5</text:p>
          </table:table-cell>
          <table:table-cell table:style-name="ce87" office:value-type="float" office:value="14" calcext:value-type="float">
            <text:p>14</text:p>
          </table:table-cell>
          <table:table-cell table:style-name="ce101" office:value-type="string" calcext:value-type="string">
            <text:p>Heavy</text:p>
          </table:table-cell>
          <table:table-cell table:style-name="ce101" table:number-columns-repeated="2"/>
          <table:table-cell/>
          <table:table-cell office:value-type="string" calcext:value-type="string">
            <text:p>Wrecking Ball</text:p>
          </table:table-cell>
          <table:table-cell office:value-type="string" calcext:value-type="string">
            <text:p>Pursue Prey</text:p>
          </table:table-cell>
          <table:table-cell office:value-type="string" calcext:value-type="string">
            <text:p>Slam</text:p>
          </table:table-cell>
          <table:table-cell office:value-type="string" calcext:value-type="string">
            <text:p>Weak Computer</text:p>
          </table:table-cell>
          <table:table-cell office:value-type="string" calcext:value-type="string">
            <text:p>Flayer Shotgun</text:p>
          </table:table-cell>
          <table:table-cell/>
          <table:table-cell office:value-type="string" calcext:value-type="string">
            <text:p>The Long Rim</text:p>
          </table:table-cell>
          <table:table-cell/>
          <table:table-cell office:value-type="string" calcext:value-type="string">
            <text:p>Caliban</text:p>
          </table:table-cell>
          <table:table-cell table:formula="of:=IF(     OR(         [.$C16]=&quot;&quot;;         COUNTIF([$Build.$E$2:.$E$20];[.$C16])&gt;0     );     [.$A16];     &quot;&quot; )">
            <text:p/>
          </table:table-cell>
        </table:table-row>
        <table:table-row table:style-name="ro2">
          <table:table-cell office:value-type="string" calcext:value-type="string">
            <text:p>Zheng</text:p>
          </table:table-cell>
          <table:table-cell office:value-type="string" calcext:value-type="string">
            <text:p>IPS-N</text:p>
          </table:table-cell>
          <table:table-cell office:value-type="string" calcext:value-type="string">
            <text:p>Zheng II</text:p>
          </table:table-cell>
          <table:table-cell table:style-name="ce79" office:value-type="float" office:value="1" calcext:value-type="float">
            <text:p>1</text:p>
          </table:table-cell>
          <table:table-cell table:style-name="ce82" office:value-type="float" office:value="10" calcext:value-type="float">
            <text:p>10</text:p>
          </table:table-cell>
          <table:table-cell table:style-name="ce84" office:value-type="float" office:value="2" calcext:value-type="float">
            <text:p>2</text:p>
          </table:table-cell>
          <table:table-cell table:style-name="ce82" office:value-type="float" office:value="6" calcext:value-type="float">
            <text:p>6</text:p>
          </table:table-cell>
          <table:table-cell table:style-name="ce84" office:value-type="float" office:value="9" calcext:value-type="float">
            <text:p>9</text:p>
          </table:table-cell>
          <table:table-cell table:style-name="ce82" office:value-type="float" office:value="3" calcext:value-type="float">
            <text:p>3</text:p>
          </table:table-cell>
          <table:table-cell table:style-name="ce84" office:value-type="float" office:value="6" calcext:value-type="float">
            <text:p>6</text:p>
          </table:table-cell>
          <table:table-cell table:style-name="ce82" office:value-type="float" office:value="-2" calcext:value-type="float">
            <text:p>-2</text:p>
          </table:table-cell>
          <table:table-cell table:style-name="ce84" office:value-type="float" office:value="3" calcext:value-type="float">
            <text:p>3</text:p>
          </table:table-cell>
          <table:table-cell table:style-name="ce82" office:value-type="float" office:value="6" calcext:value-type="float">
            <text:p>6</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15" calcext:value-type="float">
            <text:p>15</text:p>
          </table:table-cell>
          <table:table-cell table:style-name="ce101" office:value-type="string" calcext:value-type="string">
            <text:p>Heavy</text:p>
          </table:table-cell>
          <table:table-cell table:number-columns-repeated="2" table:style-name="ce101" office:value-type="string" calcext:value-type="string">
            <text:p>Main</text:p>
          </table:table-cell>
          <table:table-cell/>
          <table:table-cell office:value-type="string" calcext:value-type="string">
            <text:p>Destructive Swings</text:p>
          </table:table-cell>
          <table:table-cell office:value-type="string" calcext:value-type="string">
            <text:p>Weak Computer</text:p>
          </table:table-cell>
          <table:table-cell table:number-columns-repeated="2"/>
          <table:table-cell office:value-type="string" calcext:value-type="string">
            <text:p>Xiong-Type CQB Suite</text:p>
          </table:table-cell>
          <table:table-cell/>
          <table:table-cell office:value-type="string" calcext:value-type="string">
            <text:p>The Long Rim</text:p>
          </table:table-cell>
          <table:table-cell/>
          <table:table-cell office:value-type="string" calcext:value-type="string">
            <text:p>Zheng</text:p>
          </table:table-cell>
          <table:table-cell table:formula="of:=IF(     OR(         [.$C17]=&quot;&quot;;         COUNTIF([$Build.$E$2:.$E$20];[.$C17])&gt;0     );     [.$A17];     &quot;&quot; )">
            <text:p/>
          </table:table-cell>
        </table:table-row>
        <table:table-row table:style-name="ro2">
          <table:table-cell office:value-type="string" calcext:value-type="string">
            <text:p>Black Witch</text:p>
          </table:table-cell>
          <table:table-cell office:value-type="string" calcext:value-type="string">
            <text:p>SSC</text:p>
          </table:table-cell>
          <table:table-cell office:value-type="string" calcext:value-type="string">
            <text:p>Black Witch II</text:p>
          </table:table-cell>
          <table:table-cell table:style-name="ce79" office:value-type="float" office:value="1" calcext:value-type="float">
            <text:p>1</text:p>
          </table:table-cell>
          <table:table-cell table:style-name="ce82" office:value-type="float" office:value="6" calcext:value-type="float">
            <text:p>6</text:p>
          </table:table-cell>
          <table:table-cell table:style-name="ce84" office:value-type="float" office:value="1" calcext:value-type="float">
            <text:p>1</text:p>
          </table:table-cell>
          <table:table-cell table:style-name="ce82" office:value-type="float" office:value="6" calcext:value-type="float">
            <text:p>6</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4" office:value-type="float" office:value="12" calcext:value-type="float">
            <text:p>12</text:p>
          </table:table-cell>
          <table:table-cell table:style-name="ce82" office:value-type="float" office:value="0" calcext:value-type="float">
            <text:p>0</text:p>
          </table:table-cell>
          <table:table-cell table:style-name="ce84" office:value-type="float" office:value="15" calcext:value-type="float">
            <text:p>15</text:p>
          </table:table-cell>
          <table:table-cell table:style-name="ce82" office:value-type="float" office:value="3" calcext:value-type="float">
            <text:p>3</text:p>
          </table:table-cell>
          <table:table-cell table:style-name="ce84" office:value-type="float" office:value="11" calcext:value-type="float">
            <text:p>11</text:p>
          </table:table-cell>
          <table:table-cell table:style-name="ce82" office:value-type="float" office:value="8" calcext:value-type="float">
            <text:p>8</text:p>
          </table:table-cell>
          <table:table-cell table:style-name="ce87" office:value-type="float" office:value="16" calcext:value-type="float">
            <text:p>16</text:p>
          </table:table-cell>
          <table:table-cell table:style-name="ce101" office:value-type="string" calcext:value-type="string">
            <text:p>Main/Aux</text:p>
          </table:table-cell>
          <table:table-cell table:style-name="ce101" table:number-columns-repeated="2"/>
          <table:table-cell/>
          <table:table-cell office:value-type="string" calcext:value-type="string">
            <text:p>Repulsor Field</text:p>
          </table:table-cell>
          <table:table-cell office:value-type="string" calcext:value-type="string">
            <text:p>Mag Parry</text:p>
          </table:table-cell>
          <table:table-cell table:number-columns-repeated="2"/>
          <table:table-cell office:value-type="string" calcext:value-type="string">
            <text:p>Magnetic Field Projector</text:p>
          </table:table-cell>
          <table:table-cell table:number-columns-repeated="3"/>
          <table:table-cell office:value-type="string" calcext:value-type="string">
            <text:p>Black Witch</text:p>
          </table:table-cell>
          <table:table-cell table:formula="of:=IF(     OR(         [.$C18]=&quot;&quot;;         COUNTIF([$Build.$E$2:.$E$20];[.$C18])&gt;0     );     [.$A18];     &quot;&quot; )">
            <text:p/>
          </table:table-cell>
        </table:table-row>
        <table:table-row table:style-name="ro2">
          <table:table-cell office:value-type="string" calcext:value-type="string">
            <text:p>Orchis</text:p>
          </table:table-cell>
          <table:table-cell office:value-type="string" calcext:value-type="string">
            <text:p>SSC</text:p>
          </table:table-cell>
          <table:table-cell office:value-type="string" calcext:value-type="string">
            <text:p>Black Witch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1" calcext:value-type="float">
            <text:p>1</text:p>
          </table:table-cell>
          <table:table-cell table:style-name="ce82" office:value-type="float" office:value="6" calcext:value-type="float">
            <text:p>6</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4" office:value-type="float" office:value="10" calcext:value-type="float">
            <text:p>10</text:p>
          </table:table-cell>
          <table:table-cell table:style-name="ce82" office:value-type="float" office:value="-1" calcext:value-type="float">
            <text:p>-1</text:p>
          </table:table-cell>
          <table:table-cell table:style-name="ce84" office:value-type="float" office:value="10" calcext:value-type="float">
            <text:p>10</text:p>
          </table:table-cell>
          <table:table-cell table:style-name="ce82" office:value-type="float" office:value="4" calcext:value-type="float">
            <text:p>4</text:p>
          </table:table-cell>
          <table:table-cell table:style-name="ce84" office:value-type="float" office:value="12" calcext:value-type="float">
            <text:p>12</text:p>
          </table:table-cell>
          <table:table-cell table:style-name="ce82" office:value-type="float" office:value="8" calcext:value-type="float">
            <text:p>8</text:p>
          </table:table-cell>
          <table:table-cell table:style-name="ce87" office:value-type="float" office:value="17" calcext:value-type="float">
            <text:p>17</text:p>
          </table:table-cell>
          <table:table-cell table:style-name="ce101" office:value-type="string" calcext:value-type="string">
            <text:p>Main/Aux</text:p>
          </table:table-cell>
          <table:table-cell table:style-name="ce101" table:number-columns-repeated="2"/>
          <table:table-cell/>
          <table:table-cell office:value-type="string" calcext:value-type="string">
            <text:p>Perfect Parry</text:p>
          </table:table-cell>
          <table:table-cell office:value-type="string" calcext:value-type="string">
            <text:p>Guardian</text:p>
          </table:table-cell>
          <table:table-cell office:value-type="string" calcext:value-type="string">
            <text:p>Royal Guard</text:p>
          </table:table-cell>
          <table:table-cell/>
          <table:table-cell office:value-type="string" calcext:value-type="string">
            <text:p>Helion</text:p>
          </table:table-cell>
          <table:table-cell/>
          <table:table-cell office:value-type="string" calcext:value-type="string">
            <text:p>Field Guide to the Karrakin Trade Baronies</text:p>
          </table:table-cell>
          <table:table-cell/>
          <table:table-cell office:value-type="string" calcext:value-type="string">
            <text:p>Orchis</text:p>
          </table:table-cell>
          <table:table-cell table:formula="of:=IF(     OR(         [.$C19]=&quot;&quot;;         COUNTIF([$Build.$E$2:.$E$20];[.$C19])&gt;0     );     [.$A19];     &quot;&quot; )">
            <text:p/>
          </table:table-cell>
        </table:table-row>
        <table:table-row table:style-name="ro2">
          <table:table-cell office:value-type="string" calcext:value-type="string">
            <text:p>Death’s Head</text:p>
          </table:table-cell>
          <table:table-cell office:value-type="string" calcext:value-type="string">
            <text:p>SSC</text:p>
          </table:table-cell>
          <table:table-cell office:value-type="string" calcext:value-type="string">
            <text:p>Death’s Head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0" calcext:value-type="float">
            <text:p>0</text:p>
          </table:table-cell>
          <table:table-cell table:style-name="ce82" office:value-type="float" office:value="6" calcext:value-type="float">
            <text:p>6</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4" office:value-type="float" office:value="8" calcext:value-type="float">
            <text:p>8</text:p>
          </table:table-cell>
          <table:table-cell table:style-name="ce82" office:value-type="float" office:value="0" calcext:value-type="float">
            <text:p>0</text:p>
          </table:table-cell>
          <table:table-cell table:style-name="ce84" office:value-type="float" office:value="20" calcext:value-type="float">
            <text:p>20</text:p>
          </table:table-cell>
          <table:table-cell table:style-name="ce82" office:value-type="float" office:value="2" calcext:value-type="float">
            <text:p>2</text:p>
          </table:table-cell>
          <table:table-cell table:style-name="ce84" office:value-type="float" office:value="10" calcext:value-type="float">
            <text:p>10</text:p>
          </table:table-cell>
          <table:table-cell table:style-name="ce82" office:value-type="float" office:value="6" calcext:value-type="float">
            <text:p>6</text:p>
          </table:table-cell>
          <table:table-cell table:style-name="ce87" office:value-type="float" office:value="18" calcext:value-type="float">
            <text:p>18</text:p>
          </table:table-cell>
          <table:table-cell table:style-name="ce101" office:value-type="string" calcext:value-type="string">
            <text:p>Heavy</text:p>
          </table:table-cell>
          <table:table-cell table:style-name="ce101" office:value-type="string" calcext:value-type="string">
            <text:p>Main/Aux</text:p>
          </table:table-cell>
          <table:table-cell table:style-name="ce101"/>
          <table:table-cell/>
          <table:table-cell office:value-type="string" calcext:value-type="string">
            <text:p>Neurolink</text:p>
          </table:table-cell>
          <table:table-cell office:value-type="string" calcext:value-type="string">
            <text:p>Perfected Targeting</text:p>
          </table:table-cell>
          <table:table-cell table:number-columns-repeated="2"/>
          <table:table-cell office:value-type="string" calcext:value-type="string">
            <text:p>Precognitive Targeting</text:p>
          </table:table-cell>
          <table:table-cell table:number-columns-repeated="3"/>
          <table:table-cell office:value-type="string" calcext:value-type="string">
            <text:p>Death’s Head</text:p>
          </table:table-cell>
          <table:table-cell table:formula="of:=IF(     OR(         [.$C20]=&quot;&quot;;         COUNTIF([$Build.$E$2:.$E$20];[.$C20])&gt;0     );     [.$A20];     &quot;&quot; )" office:value-type="string" office:string-value="Death’s Head" calcext:value-type="string">
            <text:p>Death’s Head</text:p>
          </table:table-cell>
        </table:table-row>
        <table:table-row table:style-name="ro2">
          <table:table-cell office:value-type="string" calcext:value-type="string">
            <text:p>Dusk Wing</text:p>
          </table:table-cell>
          <table:table-cell office:value-type="string" calcext:value-type="string">
            <text:p>SSC</text:p>
          </table:table-cell>
          <table:table-cell office:value-type="string" calcext:value-type="string">
            <text:p>Dusk Wing II</text:p>
          </table:table-cell>
          <table:table-cell table:style-name="ce79" office:value-type="float" office:value="0.5" calcext:value-type="float">
            <text:p>0.5</text:p>
          </table:table-cell>
          <table:table-cell table:style-name="ce82" office:value-type="float" office:value="6" calcext:value-type="float">
            <text:p>6</text:p>
          </table:table-cell>
          <table:table-cell table:style-name="ce84" office:value-type="float" office:value="0" calcext:value-type="float">
            <text:p>0</text:p>
          </table:table-cell>
          <table:table-cell table:style-name="ce82" office:value-type="float" office:value="4" calcext:value-type="float">
            <text:p>4</text:p>
          </table:table-cell>
          <table:table-cell table:style-name="ce84" office:value-type="float" office:value="12" calcext:value-type="float">
            <text:p>12</text:p>
          </table:table-cell>
          <table:table-cell table:style-name="ce82" office:value-type="float" office:value="6" calcext:value-type="float">
            <text:p>6</text:p>
          </table:table-cell>
          <table:table-cell table:style-name="ce84" office:value-type="float" office:value="8" calcext:value-type="float">
            <text:p>8</text:p>
          </table:table-cell>
          <table:table-cell table:style-name="ce82" office:value-type="float" office:value="1" calcext:value-type="float">
            <text:p>1</text:p>
          </table:table-cell>
          <table:table-cell table:style-name="ce84" office:value-type="float" office:value="10" calcext:value-type="float">
            <text:p>10</text:p>
          </table:table-cell>
          <table:table-cell table:style-name="ce82" office:value-type="float" office:value="3" calcext:value-type="float">
            <text:p>3</text:p>
          </table:table-cell>
          <table:table-cell table:style-name="ce84" office:value-type="float" office:value="11" calcext:value-type="float">
            <text:p>11</text:p>
          </table:table-cell>
          <table:table-cell table:style-name="ce82" office:value-type="float" office:value="6" calcext:value-type="float">
            <text:p>6</text:p>
          </table:table-cell>
          <table:table-cell table:style-name="ce87" office:value-type="float" office:value="19" calcext:value-type="float">
            <text:p>19</text:p>
          </table:table-cell>
          <table:table-cell table:style-name="ce101" office:value-type="string" calcext:value-type="string">
            <text:p>Flex</text:p>
          </table:table-cell>
          <table:table-cell table:style-name="ce101" office:value-type="string" calcext:value-type="string">
            <text:p>Aux/Aux</text:p>
          </table:table-cell>
          <table:table-cell table:style-name="ce101"/>
          <table:table-cell/>
          <table:table-cell office:value-type="string" calcext:value-type="string">
            <text:p>Maneuverability Jets</text:p>
          </table:table-cell>
          <table:table-cell office:value-type="string" calcext:value-type="string">
            <text:p>Harlequin Cloak</text:p>
          </table:table-cell>
          <table:table-cell office:value-type="string" calcext:value-type="string">
            <text:p>Fragile</text:p>
          </table:table-cell>
          <table:table-cell/>
          <table:table-cell office:value-type="string" calcext:value-type="string">
            <text:p>Dhiyed Articulation</text:p>
          </table:table-cell>
          <table:table-cell table:number-columns-repeated="3"/>
          <table:table-cell office:value-type="string" calcext:value-type="string">
            <text:p>Dusk Wing</text:p>
          </table:table-cell>
          <table:table-cell table:formula="of:=IF(     OR(         [.$C21]=&quot;&quot;;         COUNTIF([$Build.$E$2:.$E$20];[.$C21])&gt;0     );     [.$A21];     &quot;&quot; )">
            <text:p/>
          </table:table-cell>
        </table:table-row>
        <table:table-row table:style-name="ro2">
          <table:table-cell office:value-type="string" calcext:value-type="string">
            <text:p>Metalmark</text:p>
          </table:table-cell>
          <table:table-cell office:value-type="string" calcext:value-type="string">
            <text:p>SSC</text:p>
          </table:table-cell>
          <table:table-cell office:value-type="string" calcext:value-type="string">
            <text:p>Metalmark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1" calcext:value-type="float">
            <text:p>1</text:p>
          </table:table-cell>
          <table:table-cell table:style-name="ce82" office:value-type="float" office:value="5" calcext:value-type="float">
            <text:p>5</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4" office:value-type="float" office:value="6" calcext:value-type="float">
            <text:p>6</text:p>
          </table:table-cell>
          <table:table-cell table:style-name="ce82" office:value-type="float" office:value="0" calcext:value-type="float">
            <text:p>0</text:p>
          </table:table-cell>
          <table:table-cell table:style-name="ce84" office:value-type="float" office:value="10" calcext:value-type="float">
            <text:p>10</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20" calcext:value-type="float">
            <text:p>20</text:p>
          </table:table-cell>
          <table:table-cell table:style-name="ce101" office:value-type="string" calcext:value-type="string">
            <text:p>Heavy</text:p>
          </table:table-cell>
          <table:table-cell table:style-name="ce101" office:value-type="string" calcext:value-type="string">
            <text:p>Main</text:p>
          </table:table-cell>
          <table:table-cell table:style-name="ce101" office:value-type="string" calcext:value-type="string">
            <text:p>Aux/Aux</text:p>
          </table:table-cell>
          <table:table-cell/>
          <table:table-cell office:value-type="string" calcext:value-type="string">
            <text:p>Flash Cloak</text:p>
          </table:table-cell>
          <table:table-cell office:value-type="string" calcext:value-type="string">
            <text:p>Carapace Adaptation</text:p>
          </table:table-cell>
          <table:table-cell table:number-columns-repeated="2"/>
          <table:table-cell office:value-type="string" calcext:value-type="string">
            <text:p>Tactical Cloak</text:p>
          </table:table-cell>
          <table:table-cell table:number-columns-repeated="3"/>
          <table:table-cell office:value-type="string" calcext:value-type="string">
            <text:p>Metalmark</text:p>
          </table:table-cell>
          <table:table-cell table:formula="of:=IF(     OR(         [.$C22]=&quot;&quot;;         COUNTIF([$Build.$E$2:.$E$20];[.$C22])&gt;0     );     [.$A22];     &quot;&quot; )">
            <text:p/>
          </table:table-cell>
        </table:table-row>
        <table:table-row table:style-name="ro2">
          <table:table-cell office:value-type="string" calcext:value-type="string">
            <text:p>Amber Phantom</text:p>
          </table:table-cell>
          <table:table-cell office:value-type="string" calcext:value-type="string">
            <text:p>SSC</text:p>
          </table:table-cell>
          <table:table-cell office:value-type="string" calcext:value-type="string">
            <text:p>Metalmark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0" calcext:value-type="float">
            <text:p>0</text:p>
          </table:table-cell>
          <table:table-cell table:style-name="ce82" office:value-type="float" office:value="5" calcext:value-type="float">
            <text:p>5</text:p>
          </table:table-cell>
          <table:table-cell table:style-name="ce84" office:value-type="float" office:value="12" calcext:value-type="float">
            <text:p>12</text:p>
          </table:table-cell>
          <table:table-cell table:style-name="ce82" office:value-type="float" office:value="5" calcext:value-type="float">
            <text:p>5</text:p>
          </table:table-cell>
          <table:table-cell table:style-name="ce84" office:value-type="float" office:value="6" calcext:value-type="float">
            <text:p>6</text:p>
          </table:table-cell>
          <table:table-cell table:style-name="ce82" office:value-type="float" office:value="0" calcext:value-type="float">
            <text:p>0</text:p>
          </table:table-cell>
          <table:table-cell table:style-name="ce84" office:value-type="float" office:value="10" calcext:value-type="float">
            <text:p>10</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21" calcext:value-type="float">
            <text:p>21</text:p>
          </table:table-cell>
          <table:table-cell table:style-name="ce101" office:value-type="string" calcext:value-type="string">
            <text:p>Main/Aux</text:p>
          </table:table-cell>
          <table:table-cell table:style-name="ce101" office:value-type="string" calcext:value-type="string">
            <text:p>Flex</text:p>
          </table:table-cell>
          <table:table-cell table:style-name="ce101" office:value-type="string" calcext:value-type="string">
            <text:p>Main</text:p>
          </table:table-cell>
          <table:table-cell/>
          <table:table-cell office:value-type="string" calcext:value-type="string">
            <text:p>Hyperawareness</text:p>
          </table:table-cell>
          <table:table-cell office:value-type="string" calcext:value-type="string">
            <text:p>Battle Oracle</text:p>
          </table:table-cell>
          <table:table-cell office:value-type="string" calcext:value-type="string">
            <text:p>Possibility Mapping</text:p>
          </table:table-cell>
          <table:table-cell/>
          <table:table-cell office:value-type="string" calcext:value-type="string">
            <text:p>Possibility Mapping</text:p>
          </table:table-cell>
          <table:table-cell/>
          <table:table-cell office:value-type="string" calcext:value-type="string">
            <text:p>Operation Winter Scar</text:p>
          </table:table-cell>
          <table:table-cell/>
          <table:table-cell office:value-type="string" calcext:value-type="string">
            <text:p>Amber Phantom</text:p>
          </table:table-cell>
          <table:table-cell table:formula="of:=IF(     OR(         [.$C23]=&quot;&quot;;         COUNTIF([$Build.$E$2:.$E$20];[.$C23])&gt;0     );     [.$A23];     &quot;&quot; )">
            <text:p/>
          </table:table-cell>
        </table:table-row>
        <table:table-row table:style-name="ro2">
          <table:table-cell office:value-type="string" calcext:value-type="string">
            <text:p>Monarch</text:p>
          </table:table-cell>
          <table:table-cell office:value-type="string" calcext:value-type="string">
            <text:p>SSC</text:p>
          </table:table-cell>
          <table:table-cell office:value-type="string" calcext:value-type="string">
            <text:p>Monarch II</text:p>
          </table:table-cell>
          <table:table-cell table:style-name="ce79" office:value-type="float" office:value="2" calcext:value-type="float">
            <text:p>2</text:p>
          </table:table-cell>
          <table:table-cell table:style-name="ce82" office:value-type="float" office:value="8" calcext:value-type="float">
            <text:p>8</text:p>
          </table:table-cell>
          <table:table-cell table:style-name="ce84" office:value-type="float" office:value="1" calcext:value-type="float">
            <text:p>1</text:p>
          </table:table-cell>
          <table:table-cell table:style-name="ce82" office:value-type="float" office:value="6" calcext:value-type="float">
            <text:p>6</text:p>
          </table:table-cell>
          <table:table-cell table:style-name="ce84" office:value-type="float" office:value="8" calcext:value-type="float">
            <text:p>8</text:p>
          </table:table-cell>
          <table:table-cell table:style-name="ce82" office:value-type="float" office:value="5" calcext:value-type="float">
            <text:p>5</text:p>
          </table:table-cell>
          <table:table-cell table:style-name="ce84" office:value-type="float" office:value="8" calcext:value-type="float">
            <text:p>8</text:p>
          </table:table-cell>
          <table:table-cell table:style-name="ce82" office:value-type="float" office:value="1" calcext:value-type="float">
            <text:p>1</text:p>
          </table:table-cell>
          <table:table-cell table:style-name="ce84" office:value-type="float" office:value="15" calcext:value-type="float">
            <text:p>15</text:p>
          </table:table-cell>
          <table:table-cell table:style-name="ce82" office:value-type="float" office:value="3" calcext:value-type="float">
            <text:p>3</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22" calcext:value-type="float">
            <text:p>22</text:p>
          </table:table-cell>
          <table:table-cell table:style-name="ce101" office:value-type="string" calcext:value-type="string">
            <text:p>Heavy</text:p>
          </table:table-cell>
          <table:table-cell table:style-name="ce101" office:value-type="string" calcext:value-type="string">
            <text:p>Flex</text:p>
          </table:table-cell>
          <table:table-cell table:style-name="ce101" office:value-type="string" calcext:value-type="string">
            <text:p>Main</text:p>
          </table:table-cell>
          <table:table-cell/>
          <table:table-cell office:value-type="string" calcext:value-type="string">
            <text:p>Avenger Silos</text:p>
          </table:table-cell>
          <table:table-cell office:value-type="string" calcext:value-type="string">
            <text:p>Seeking Payload</text:p>
          </table:table-cell>
          <table:table-cell table:number-columns-repeated="2"/>
          <table:table-cell office:value-type="string" calcext:value-type="string">
            <text:p>SSC-30 High-Penetration Missile System</text:p>
          </table:table-cell>
          <table:table-cell table:number-columns-repeated="3"/>
          <table:table-cell office:value-type="string" calcext:value-type="string">
            <text:p>Monarch</text:p>
          </table:table-cell>
          <table:table-cell table:formula="of:=IF(     OR(         [.$C24]=&quot;&quot;;         COUNTIF([$Build.$E$2:.$E$20];[.$C24])&gt;0     );     [.$A24];     &quot;&quot; )">
            <text:p/>
          </table:table-cell>
        </table:table-row>
        <table:table-row table:style-name="ro2">
          <table:table-cell office:value-type="string" calcext:value-type="string">
            <text:p>Viceroy</text:p>
          </table:table-cell>
          <table:table-cell office:value-type="string" calcext:value-type="string">
            <text:p>SSC</text:p>
          </table:table-cell>
          <table:table-cell office:value-type="string" calcext:value-type="string">
            <text:p>Monarch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1" calcext:value-type="float">
            <text:p>1</text:p>
          </table:table-cell>
          <table:table-cell table:style-name="ce82" office:value-type="float" office:value="6" calcext:value-type="float">
            <text:p>6</text:p>
          </table:table-cell>
          <table:table-cell table:style-name="ce84" office:value-type="float" office:value="8" calcext:value-type="float">
            <text:p>8</text:p>
          </table:table-cell>
          <table:table-cell table:style-name="ce82" office:value-type="float" office:value="5" calcext:value-type="float">
            <text:p>5</text:p>
          </table:table-cell>
          <table:table-cell table:style-name="ce84" office:value-type="float" office:value="8" calcext:value-type="float">
            <text:p>8</text:p>
          </table:table-cell>
          <table:table-cell table:style-name="ce82" office:value-type="float" office:value="0" calcext:value-type="float">
            <text:p>0</text:p>
          </table:table-cell>
          <table:table-cell table:style-name="ce84" office:value-type="float" office:value="10" calcext:value-type="float">
            <text:p>10</text:p>
          </table:table-cell>
          <table:table-cell table:style-name="ce82" office:value-type="float" office:value="4" calcext:value-type="float">
            <text:p>4</text:p>
          </table:table-cell>
          <table:table-cell table:style-name="ce84" office:value-type="float" office:value="11" calcext:value-type="float">
            <text:p>11</text:p>
          </table:table-cell>
          <table:table-cell table:style-name="ce82" office:value-type="float" office:value="5" calcext:value-type="float">
            <text:p>5</text:p>
          </table:table-cell>
          <table:table-cell table:style-name="ce87" office:value-type="float" office:value="23" calcext:value-type="float">
            <text:p>23</text:p>
          </table:table-cell>
          <table:table-cell table:style-name="ce101" office:value-type="string" calcext:value-type="string">
            <text:p>Heavy</text:p>
          </table:table-cell>
          <table:table-cell table:style-name="ce101" office:value-type="string" calcext:value-type="string">
            <text:p>Flex</text:p>
          </table:table-cell>
          <table:table-cell table:style-name="ce101" office:value-type="string" calcext:value-type="string">
            <text:p>Aux/Aux</text:p>
          </table:table-cell>
          <table:table-cell/>
          <table:table-cell office:value-type="string" calcext:value-type="string">
            <text:p>Near-Threat Targeting Processor</text:p>
          </table:table-cell>
          <table:table-cell office:value-type="string" calcext:value-type="string">
            <text:p>Vigilante Omnidirectional Launchers</text:p>
          </table:table-cell>
          <table:table-cell office:value-type="string" calcext:value-type="string">
            <text:p>Pressure Plating</text:p>
          </table:table-cell>
          <table:table-cell/>
          <table:table-cell office:value-type="string" calcext:value-type="string">
            <text:p>SSC-41 Tengu-Assisted Missile Tubes</text:p>
          </table:table-cell>
          <table:table-cell/>
          <table:table-cell office:value-type="string" calcext:value-type="string">
            <text:p>Dustgrave</text:p>
          </table:table-cell>
          <table:table-cell/>
          <table:table-cell office:value-type="string" calcext:value-type="string">
            <text:p>Viceroy</text:p>
          </table:table-cell>
          <table:table-cell table:formula="of:=IF(     OR(         [.$C25]=&quot;&quot;;         COUNTIF([$Build.$E$2:.$E$20];[.$C25])&gt;0     );     [.$A25];     &quot;&quot; )">
            <text:p/>
          </table:table-cell>
        </table:table-row>
        <table:table-row table:style-name="ro2">
          <table:table-cell office:value-type="string" calcext:value-type="string">
            <text:p>Mourning Cloak</text:p>
          </table:table-cell>
          <table:table-cell office:value-type="string" calcext:value-type="string">
            <text:p>SSC</text:p>
          </table:table-cell>
          <table:table-cell office:value-type="string" calcext:value-type="string">
            <text:p>Mourning Cloak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0" calcext:value-type="float">
            <text:p>0</text:p>
          </table:table-cell>
          <table:table-cell table:style-name="ce82" office:value-type="float" office:value="4" calcext:value-type="float">
            <text:p>4</text:p>
          </table:table-cell>
          <table:table-cell table:style-name="ce84" office:value-type="float" office:value="12" calcext:value-type="float">
            <text:p>12</text:p>
          </table:table-cell>
          <table:table-cell table:style-name="ce82" office:value-type="float" office:value="5" calcext:value-type="float">
            <text:p>5</text:p>
          </table:table-cell>
          <table:table-cell table:style-name="ce84" office:value-type="float" office:value="6" calcext:value-type="float">
            <text:p>6</text:p>
          </table:table-cell>
          <table:table-cell table:style-name="ce82" office:value-type="float" office:value="0" calcext:value-type="float">
            <text:p>0</text:p>
          </table:table-cell>
          <table:table-cell table:style-name="ce84" office:value-type="float" office:value="15" calcext:value-type="float">
            <text:p>15</text:p>
          </table:table-cell>
          <table:table-cell table:style-name="ce82" office:value-type="float" office:value="3" calcext:value-type="float">
            <text:p>3</text:p>
          </table:table-cell>
          <table:table-cell table:style-name="ce84" office:value-type="float" office:value="10" calcext:value-type="float">
            <text:p>10</text:p>
          </table:table-cell>
          <table:table-cell table:style-name="ce82" office:value-type="float" office:value="6" calcext:value-type="float">
            <text:p>6</text:p>
          </table:table-cell>
          <table:table-cell table:style-name="ce87" office:value-type="float" office:value="24" calcext:value-type="float">
            <text:p>24</text:p>
          </table:table-cell>
          <table:table-cell table:style-name="ce101" office:value-type="string" calcext:value-type="string">
            <text:p>Main/Aux</text:p>
          </table:table-cell>
          <table:table-cell table:style-name="ce101" office:value-type="string" calcext:value-type="string">
            <text:p>Flex</text:p>
          </table:table-cell>
          <table:table-cell table:style-name="ce101"/>
          <table:table-cell/>
          <table:table-cell office:value-type="string" calcext:value-type="string">
            <text:p>Hunter</text:p>
          </table:table-cell>
          <table:table-cell office:value-type="string" calcext:value-type="string">
            <text:p>Biotic Components</text:p>
          </table:table-cell>
          <table:table-cell table:number-columns-repeated="2"/>
          <table:table-cell office:value-type="string" calcext:value-type="string">
            <text:p>EX Slipstream Module</text:p>
          </table:table-cell>
          <table:table-cell table:number-columns-repeated="3"/>
          <table:table-cell office:value-type="string" calcext:value-type="string">
            <text:p>Mourning Cloak</text:p>
          </table:table-cell>
          <table:table-cell table:formula="of:=IF(     OR(         [.$C26]=&quot;&quot;;         COUNTIF([$Build.$E$2:.$E$20];[.$C26])&gt;0     );     [.$A26];     &quot;&quot; )">
            <text:p/>
          </table:table-cell>
        </table:table-row>
        <table:table-row table:style-name="ro2">
          <table:table-cell office:value-type="string" calcext:value-type="string">
            <text:p>Swallowtail</text:p>
          </table:table-cell>
          <table:table-cell office:value-type="string" calcext:value-type="string">
            <text:p>SSC</text:p>
          </table:table-cell>
          <table:table-cell office:value-type="string" calcext:value-type="string">
            <text:p>Swallowtail II</text:p>
          </table:table-cell>
          <table:table-cell table:style-name="ce79" office:value-type="float" office:value="1" calcext:value-type="float">
            <text:p>1</text:p>
          </table:table-cell>
          <table:table-cell table:style-name="ce82" office:value-type="float" office:value="6" calcext:value-type="float">
            <text:p>6</text:p>
          </table:table-cell>
          <table:table-cell table:style-name="ce84" office:value-type="float" office:value="0" calcext:value-type="float">
            <text:p>0</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6" calcext:value-type="float">
            <text:p>6</text:p>
          </table:table-cell>
          <table:table-cell table:style-name="ce84" office:value-type="float" office:value="10" calcext:value-type="float">
            <text:p>10</text:p>
          </table:table-cell>
          <table:table-cell table:style-name="ce82" office:value-type="float" office:value="1" calcext:value-type="float">
            <text:p>1</text:p>
          </table:table-cell>
          <table:table-cell table:style-name="ce84" office:value-type="float" office:value="20" calcext:value-type="float">
            <text:p>20</text:p>
          </table:table-cell>
          <table:table-cell table:style-name="ce82" office:value-type="float" office:value="5" calcext:value-type="float">
            <text:p>5</text:p>
          </table:table-cell>
          <table:table-cell table:style-name="ce84" office:value-type="float" office:value="10" calcext:value-type="float">
            <text:p>10</text:p>
          </table:table-cell>
          <table:table-cell table:style-name="ce82" office:value-type="float" office:value="6" calcext:value-type="float">
            <text:p>6</text:p>
          </table:table-cell>
          <table:table-cell table:style-name="ce87" office:value-type="float" office:value="25" calcext:value-type="float">
            <text:p>25</text:p>
          </table:table-cell>
          <table:table-cell table:style-name="ce101" office:value-type="string" calcext:value-type="string">
            <text:p>Flex</text:p>
          </table:table-cell>
          <table:table-cell table:style-name="ce101" office:value-type="string" calcext:value-type="string">
            <text:p>Aux/Aux</text:p>
          </table:table-cell>
          <table:table-cell table:style-name="ce101"/>
          <table:table-cell/>
          <table:table-cell office:value-type="string" calcext:value-type="string">
            <text:p>Integrated Cloak</text:p>
          </table:table-cell>
          <table:table-cell office:value-type="string" calcext:value-type="string">
            <text:p>Prophetic Scanners</text:p>
          </table:table-cell>
          <table:table-cell table:number-columns-repeated="2"/>
          <table:table-cell office:value-type="string" calcext:value-type="string">
            <text:p>Cloudscout TACSIM Swarms</text:p>
          </table:table-cell>
          <table:table-cell table:number-columns-repeated="3"/>
          <table:table-cell office:value-type="string" calcext:value-type="string">
            <text:p>Swallowtail</text:p>
          </table:table-cell>
          <table:table-cell table:formula="of:=IF(     OR(         [.$C27]=&quot;&quot;;         COUNTIF([$Build.$E$2:.$E$20];[.$C27])&gt;0     );     [.$A27];     &quot;&quot; )" office:value-type="string" office:string-value="Swallowtail" calcext:value-type="string">
            <text:p>Swallowtail</text:p>
          </table:table-cell>
        </table:table-row>
        <table:table-row table:style-name="ro2">
          <table:table-cell office:value-type="string" calcext:value-type="string">
            <text:p>Swallowtail (Ranger Variant)</text:p>
          </table:table-cell>
          <table:table-cell office:value-type="string" calcext:value-type="string">
            <text:p>SSC</text:p>
          </table:table-cell>
          <table:table-cell office:value-type="string" calcext:value-type="string">
            <text:p>Swallowtail II</text:p>
          </table:table-cell>
          <table:table-cell table:style-name="ce79" office:value-type="float" office:value="1" calcext:value-type="float">
            <text:p>1</text:p>
          </table:table-cell>
          <table:table-cell table:style-name="ce82" office:value-type="float" office:value="6" calcext:value-type="float">
            <text:p>6</text:p>
          </table:table-cell>
          <table:table-cell table:style-name="ce84" office:value-type="float" office:value="0" calcext:value-type="float">
            <text:p>0</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6" calcext:value-type="float">
            <text:p>6</text:p>
          </table:table-cell>
          <table:table-cell table:style-name="ce84" office:value-type="float" office:value="8" calcext:value-type="float">
            <text:p>8</text:p>
          </table:table-cell>
          <table:table-cell table:style-name="ce82" office:value-type="float" office:value="1" calcext:value-type="float">
            <text:p>1</text:p>
          </table:table-cell>
          <table:table-cell table:style-name="ce84" office:value-type="float" office:value="20" calcext:value-type="float">
            <text:p>20</text:p>
          </table:table-cell>
          <table:table-cell table:style-name="ce82" office:value-type="float" office:value="5" calcext:value-type="float">
            <text:p>5</text:p>
          </table:table-cell>
          <table:table-cell table:style-name="ce84" office:value-type="float" office:value="10" calcext:value-type="float">
            <text:p>10</text:p>
          </table:table-cell>
          <table:table-cell table:style-name="ce82" office:value-type="float" office:value="6" calcext:value-type="float">
            <text:p>6</text:p>
          </table:table-cell>
          <table:table-cell table:style-name="ce87" office:value-type="float" office:value="26" calcext:value-type="float">
            <text:p>26</text:p>
          </table:table-cell>
          <table:table-cell table:style-name="ce101" office:value-type="string" calcext:value-type="string">
            <text:p>Flex</text:p>
          </table:table-cell>
          <table:table-cell table:style-name="ce101" office:value-type="string" calcext:value-type="string">
            <text:p>Main</text:p>
          </table:table-cell>
          <table:table-cell table:style-name="ce101"/>
          <table:table-cell/>
          <table:table-cell office:value-type="string" calcext:value-type="string">
            <text:p>Scout Battlefield</text:p>
          </table:table-cell>
          <table:table-cell office:value-type="string" calcext:value-type="string">
            <text:p>Invigorating Scanners</text:p>
          </table:table-cell>
          <table:table-cell office:value-type="string" calcext:value-type="string">
            <text:p>Weathering</text:p>
          </table:table-cell>
          <table:table-cell/>
          <table:table-cell office:value-type="string" calcext:value-type="string">
            <text:p>Gaia Inheritance</text:p>
          </table:table-cell>
          <table:table-cell/>
          <table:table-cell office:value-type="string" calcext:value-type="string">
            <text:p>No Room for a Wallflower: Act 1</text:p>
          </table:table-cell>
          <table:table-cell/>
          <table:table-cell office:value-type="string" calcext:value-type="string">
            <text:p>Swallowtail</text:p>
          </table:table-cell>
          <table:table-cell table:formula="of:=IF(     OR(         [.$C28]=&quot;&quot;;         COUNTIF([$Build.$E$2:.$E$20];[.$C28])&gt;0     );     [.$A28];     &quot;&quot; )" office:value-type="string" office:string-value="Swallowtail (Ranger Variant)" calcext:value-type="string">
            <text:p>Swallowtail (Ranger Variant)</text:p>
          </table:table-cell>
        </table:table-row>
        <table:table-row table:style-name="ro2">
          <table:table-cell office:value-type="string" calcext:value-type="string">
            <text:p>Atlas</text:p>
          </table:table-cell>
          <table:table-cell office:value-type="string" calcext:value-type="string">
            <text:p>SSC</text:p>
          </table:table-cell>
          <table:table-cell office:value-type="string" calcext:value-type="string">
            <text:p>Atlas II</text:p>
          </table:table-cell>
          <table:table-cell table:style-name="ce79" office:value-type="float" office:value="0.5" calcext:value-type="float">
            <text:p>0.5</text:p>
          </table:table-cell>
          <table:table-cell table:style-name="ce82" office:value-type="float" office:value="6" calcext:value-type="float">
            <text:p>6</text:p>
          </table:table-cell>
          <table:table-cell table:style-name="ce84" office:value-type="float" office:value="0" calcext:value-type="float">
            <text:p>0</text:p>
          </table:table-cell>
          <table:table-cell table:style-name="ce82" office:value-type="float" office:value="4" calcext:value-type="float">
            <text:p>4</text:p>
          </table:table-cell>
          <table:table-cell table:style-name="ce84" office:value-type="float" office:value="12" calcext:value-type="float">
            <text:p>12</text:p>
          </table:table-cell>
          <table:table-cell table:style-name="ce82" office:value-type="float" office:value="6" calcext:value-type="float">
            <text:p>6</text:p>
          </table:table-cell>
          <table:table-cell table:style-name="ce84" office:value-type="float" office:value="6" calcext:value-type="float">
            <text:p>6</text:p>
          </table:table-cell>
          <table:table-cell table:style-name="ce82" office:value-type="float" office:value="-2" calcext:value-type="float">
            <text:p>-2</text:p>
          </table:table-cell>
          <table:table-cell table:style-name="ce84" office:value-type="float" office:value="3" calcext:value-type="float">
            <text:p>3</text:p>
          </table:table-cell>
          <table:table-cell table:style-name="ce82" office:value-type="float" office:value="2" calcext:value-type="float">
            <text:p>2</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27" calcext:value-type="float">
            <text:p>27</text:p>
          </table:table-cell>
          <table:table-cell table:style-name="ce101" office:value-type="string" calcext:value-type="string">
            <text:p>Flex</text:p>
          </table:table-cell>
          <table:table-cell table:style-name="ce101" office:value-type="string" calcext:value-type="string">
            <text:p>Main</text:p>
          </table:table-cell>
          <table:table-cell table:style-name="ce101"/>
          <table:table-cell/>
          <table:table-cell office:value-type="string" calcext:value-type="string">
            <text:p>Giantkiller</text:p>
          </table:table-cell>
          <table:table-cell office:value-type="string" calcext:value-type="string">
            <text:p>Jäger Dodge</text:p>
          </table:table-cell>
          <table:table-cell office:value-type="string" calcext:value-type="string">
            <text:p>Finishing Blow</text:p>
          </table:table-cell>
          <table:table-cell office:value-type="string" calcext:value-type="string">
            <text:p>Exposed Reactor</text:p>
          </table:table-cell>
          <table:table-cell office:value-type="string" calcext:value-type="string">
            <text:p>Bloodline Active Assist</text:p>
          </table:table-cell>
          <table:table-cell/>
          <table:table-cell office:value-type="string" calcext:value-type="string">
            <text:p>The Long Rim</text:p>
          </table:table-cell>
          <table:table-cell/>
          <table:table-cell office:value-type="string" calcext:value-type="string">
            <text:p>Atlas</text:p>
          </table:table-cell>
          <table:table-cell table:formula="of:=IF(     OR(         [.$C29]=&quot;&quot;;         COUNTIF([$Build.$E$2:.$E$20];[.$C29])&gt;0     );     [.$A29];     &quot;&quot; )">
            <text:p/>
          </table:table-cell>
        </table:table-row>
        <table:table-row table:style-name="ro2">
          <table:table-cell office:value-type="string" calcext:value-type="string">
            <text:p>White Witch</text:p>
          </table:table-cell>
          <table:table-cell office:value-type="string" calcext:value-type="string">
            <text:p>SSC</text:p>
          </table:table-cell>
          <table:table-cell office:value-type="string" calcext:value-type="string">
            <text:p>White Witch II</text:p>
          </table:table-cell>
          <table:table-cell table:style-name="ce79" office:value-type="float" office:value="2" calcext:value-type="float">
            <text:p>2</text:p>
          </table:table-cell>
          <table:table-cell table:style-name="ce82" office:value-type="float" office:value="7" calcext:value-type="float">
            <text:p>7</text:p>
          </table:table-cell>
          <table:table-cell table:style-name="ce84" office:value-type="float" office:value="0" calcext:value-type="float">
            <text:p>0</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6" calcext:value-type="float">
            <text:p>6</text:p>
          </table:table-cell>
          <table:table-cell table:style-name="ce84" office:value-type="float" office:value="6" calcext:value-type="float">
            <text:p>6</text:p>
          </table:table-cell>
          <table:table-cell table:style-name="ce82" office:value-type="float" office:value="0" calcext:value-type="float">
            <text:p>0</text:p>
          </table:table-cell>
          <table:table-cell table:style-name="ce84" office:value-type="float" office:value="5" calcext:value-type="float">
            <text:p>5</text:p>
          </table:table-cell>
          <table:table-cell table:style-name="ce82" office:value-type="float" office:value="5" calcext:value-type="float">
            <text:p>5</text:p>
          </table:table-cell>
          <table:table-cell table:style-name="ce84" office:value-type="float" office:value="11" calcext:value-type="float">
            <text:p>11</text:p>
          </table:table-cell>
          <table:table-cell table:style-name="ce82" office:value-type="float" office:value="6" calcext:value-type="float">
            <text:p>6</text:p>
          </table:table-cell>
          <table:table-cell table:style-name="ce87" office:value-type="float" office:value="28" calcext:value-type="float">
            <text:p>28</text:p>
          </table:table-cell>
          <table:table-cell table:style-name="ce101" office:value-type="string" calcext:value-type="string">
            <text:p>Heavy</text:p>
          </table:table-cell>
          <table:table-cell table:style-name="ce101" office:value-type="string" calcext:value-type="string">
            <text:p>Flex</text:p>
          </table:table-cell>
          <table:table-cell table:style-name="ce101"/>
          <table:table-cell/>
          <table:table-cell office:value-type="string" calcext:value-type="string">
            <text:p>Rooted</text:p>
          </table:table-cell>
          <table:table-cell office:value-type="string" calcext:value-type="string">
            <text:p>Harden</text:p>
          </table:table-cell>
          <table:table-cell office:value-type="string" calcext:value-type="string">
            <text:p>Fluid Burst</text:p>
          </table:table-cell>
          <table:table-cell office:value-type="string" calcext:value-type="string">
            <text:p>Guardian</text:p>
          </table:table-cell>
          <table:table-cell office:value-type="string" calcext:value-type="string">
            <text:p>Ferroreactive Shell</text:p>
          </table:table-cell>
          <table:table-cell/>
          <table:table-cell office:value-type="string" calcext:value-type="string">
            <text:p>Field Guide to the Karrakin Trade Baronies</text:p>
          </table:table-cell>
          <table:table-cell/>
          <table:table-cell office:value-type="string" calcext:value-type="string">
            <text:p>White Witch</text:p>
          </table:table-cell>
          <table:table-cell table:formula="of:=IF(     OR(         [.$C30]=&quot;&quot;;         COUNTIF([$Build.$E$2:.$E$20];[.$C30])&gt;0     );     [.$A30];     &quot;&quot; )">
            <text:p/>
          </table:table-cell>
        </table:table-row>
        <table:table-row table:style-name="ro2">
          <table:table-cell office:value-type="string" calcext:value-type="string">
            <text:p>Emperor</text:p>
          </table:table-cell>
          <table:table-cell office:value-type="string" calcext:value-type="string">
            <text:p>SSC</text:p>
          </table:table-cell>
          <table:table-cell office:value-type="string" calcext:value-type="string">
            <text:p>Emperor II</text:p>
          </table:table-cell>
          <table:table-cell table:style-name="ce79" office:value-type="float" office:value="1" calcext:value-type="float">
            <text:p>1</text:p>
          </table:table-cell>
          <table:table-cell table:style-name="ce82" office:value-type="float" office:value="2" calcext:value-type="float">
            <text:p>2</text:p>
          </table:table-cell>
          <table:table-cell table:style-name="ce84" office:value-type="float" office:value="0" calcext:value-type="float">
            <text:p>0</text:p>
          </table:table-cell>
          <table:table-cell table:style-name="ce82" office:value-type="float" office:value="5" calcext:value-type="float">
            <text:p>5</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4" office:value-type="float" office:value="8" calcext:value-type="float">
            <text:p>8</text:p>
          </table:table-cell>
          <table:table-cell table:style-name="ce82" office:value-type="float" office:value="1" calcext:value-type="float">
            <text:p>1</text:p>
          </table:table-cell>
          <table:table-cell table:style-name="ce84" office:value-type="float" office:value="15" calcext:value-type="float">
            <text:p>15</text:p>
          </table:table-cell>
          <table:table-cell table:style-name="ce82" office:value-type="float" office:value="2" calcext:value-type="float">
            <text:p>2</text:p>
          </table:table-cell>
          <table:table-cell table:style-name="ce84" office:value-type="float" office:value="11" calcext:value-type="float">
            <text:p>11</text:p>
          </table:table-cell>
          <table:table-cell table:style-name="ce82" office:value-type="float" office:value="7" calcext:value-type="float">
            <text:p>7</text:p>
          </table:table-cell>
          <table:table-cell table:style-name="ce87" office:value-type="float" office:value="29" calcext:value-type="float">
            <text:p>29</text:p>
          </table:table-cell>
          <table:table-cell table:style-name="ce101" office:value-type="string" calcext:value-type="string">
            <text:p>Main</text:p>
          </table:table-cell>
          <table:table-cell table:style-name="ce101" table:number-columns-repeated="2"/>
          <table:table-cell/>
          <table:table-cell office:value-type="string" calcext:value-type="string">
            <text:p>Storm Shield</text:p>
          </table:table-cell>
          <table:table-cell office:value-type="string" calcext:value-type="string">
            <text:p>Imperial Vestment</text:p>
          </table:table-cell>
          <table:table-cell office:value-type="string" calcext:value-type="string">
            <text:p>Sovereign Presence</text:p>
          </table:table-cell>
          <table:table-cell/>
          <table:table-cell office:value-type="string" calcext:value-type="string">
            <text:p>Darian Regalia</text:p>
          </table:table-cell>
          <table:table-cell/>
          <table:table-cell office:value-type="string" calcext:value-type="string">
            <text:p>Field Guide to the Karrakin Trade Baronies</text:p>
          </table:table-cell>
          <table:table-cell/>
          <table:table-cell office:value-type="string" calcext:value-type="string">
            <text:p>Emperor</text:p>
          </table:table-cell>
          <table:table-cell table:formula="of:=IF(     OR(         [.$C31]=&quot;&quot;;         COUNTIF([$Build.$E$2:.$E$20];[.$C31])&gt;0     );     [.$A31];     &quot;&quot; )">
            <text:p/>
          </table:table-cell>
        </table:table-row>
        <table:table-row table:style-name="ro2">
          <table:table-cell office:value-type="string" calcext:value-type="string">
            <text:p>Balor</text:p>
          </table:table-cell>
          <table:table-cell office:value-type="string" calcext:value-type="string">
            <text:p>HORUS</text:p>
          </table:table-cell>
          <table:table-cell office:value-type="string" calcext:value-type="string">
            <text:p>Balor II</text:p>
          </table:table-cell>
          <table:table-cell table:style-name="ce79" office:value-type="float" office:value="2" calcext:value-type="float">
            <text:p>2</text:p>
          </table:table-cell>
          <table:table-cell table:style-name="ce82" office:value-type="float" office:value="12" calcext:value-type="float">
            <text:p>12</text:p>
          </table:table-cell>
          <table:table-cell table:style-name="ce84" office:value-type="float" office:value="0" calcext:value-type="float">
            <text:p>0</text:p>
          </table:table-cell>
          <table:table-cell table:style-name="ce82" office:value-type="float" office:value="4" calcext:value-type="float">
            <text:p>4</text:p>
          </table:table-cell>
          <table:table-cell table:style-name="ce84" office:value-type="float" office:value="6" calcext:value-type="float">
            <text:p>6</text:p>
          </table:table-cell>
          <table:table-cell table:style-name="ce82" office:value-type="float" office:value="3" calcext:value-type="float">
            <text:p>3</text:p>
          </table:table-cell>
          <table:table-cell table:style-name="ce84" office:value-type="float" office:value="10" calcext:value-type="float">
            <text:p>10</text:p>
          </table:table-cell>
          <table:table-cell table:style-name="ce82" office:value-type="float" office:value="1" calcext:value-type="float">
            <text:p>1</text:p>
          </table:table-cell>
          <table:table-cell table:style-name="ce84" office:value-type="float" office:value="5" calcext:value-type="float">
            <text:p>5</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6" calcext:value-type="float">
            <text:p>6</text:p>
          </table:table-cell>
          <table:table-cell table:style-name="ce87" office:value-type="float" office:value="30" calcext:value-type="float">
            <text:p>30</text:p>
          </table:table-cell>
          <table:table-cell table:style-name="ce101" office:value-type="string" calcext:value-type="string">
            <text:p>Heavy</text:p>
          </table:table-cell>
          <table:table-cell table:style-name="ce101" office:value-type="string" calcext:value-type="string">
            <text:p>Main</text:p>
          </table:table-cell>
          <table:table-cell table:style-name="ce101"/>
          <table:table-cell/>
          <table:table-cell office:value-type="string" calcext:value-type="string">
            <text:p>Scouring Swarm</text:p>
          </table:table-cell>
          <table:table-cell office:value-type="string" calcext:value-type="string">
            <text:p>Regeneration</text:p>
          </table:table-cell>
          <table:table-cell office:value-type="string" calcext:value-type="string">
            <text:p>Self-Perpetuating</text:p>
          </table:table-cell>
          <table:table-cell/>
          <table:table-cell office:value-type="string" calcext:value-type="string">
            <text:p>Hellswarm</text:p>
          </table:table-cell>
          <table:table-cell table:number-columns-repeated="3"/>
          <table:table-cell office:value-type="string" calcext:value-type="string">
            <text:p>Balor</text:p>
          </table:table-cell>
          <table:table-cell table:formula="of:=IF(     OR(         [.$C32]=&quot;&quot;;         COUNTIF([$Build.$E$2:.$E$20];[.$C32])&gt;0     );     [.$A32];     &quot;&quot; )" office:value-type="string" office:string-value="Balor" calcext:value-type="string">
            <text:p>Balor</text:p>
          </table:table-cell>
        </table:table-row>
        <table:table-row table:style-name="ro2">
          <table:table-cell office:value-type="string" calcext:value-type="string">
            <text:p>Hecatoncheires</text:p>
          </table:table-cell>
          <table:table-cell office:value-type="string" calcext:value-type="string">
            <text:p>HORUS</text:p>
          </table:table-cell>
          <table:table-cell office:value-type="string" calcext:value-type="string">
            <text:p>Balor II</text:p>
          </table:table-cell>
          <table:table-cell table:style-name="ce79" office:value-type="float" office:value="0.5" calcext:value-type="float">
            <text:p>0.5</text:p>
          </table:table-cell>
          <table:table-cell table:style-name="ce82" office:value-type="float" office:value="6" calcext:value-type="float">
            <text:p>6</text:p>
          </table:table-cell>
          <table:table-cell table:style-name="ce84" office:value-type="float" office:value="0" calcext:value-type="float">
            <text:p>0</text:p>
          </table:table-cell>
          <table:table-cell table:style-name="ce82" office:value-type="float" office:value="5" calcext:value-type="float">
            <text:p>5</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4" office:value-type="float" office:value="10" calcext:value-type="float">
            <text:p>10</text:p>
          </table:table-cell>
          <table:table-cell table:style-name="ce82" office:value-type="float" office:value="1" calcext:value-type="float">
            <text:p>1</text:p>
          </table:table-cell>
          <table:table-cell table:style-name="ce84" office:value-type="float" office:value="10" calcext:value-type="float">
            <text:p>10</text:p>
          </table:table-cell>
          <table:table-cell table:style-name="ce82" office:value-type="float" office:value="3" calcext:value-type="float">
            <text:p>3</text:p>
          </table:table-cell>
          <table:table-cell table:style-name="ce84" office:value-type="float" office:value="10" calcext:value-type="float">
            <text:p>10</text:p>
          </table:table-cell>
          <table:table-cell table:style-name="ce82" office:value-type="float" office:value="6" calcext:value-type="float">
            <text:p>6</text:p>
          </table:table-cell>
          <table:table-cell table:style-name="ce87" office:value-type="float" office:value="31" calcext:value-type="float">
            <text:p>31</text:p>
          </table:table-cell>
          <table:table-cell table:style-name="ce101" office:value-type="string" calcext:value-type="string">
            <text:p>Heavy</text:p>
          </table:table-cell>
          <table:table-cell table:style-name="ce101" office:value-type="string" calcext:value-type="string">
            <text:p>Main</text:p>
          </table:table-cell>
          <table:table-cell table:style-name="ce101"/>
          <table:table-cell/>
          <table:table-cell office:value-type="string" calcext:value-type="string">
            <text:p>Carapace Adaptation</text:p>
          </table:table-cell>
          <table:table-cell office:value-type="string" calcext:value-type="string">
            <text:p>Smoke and Mirrors</text:p>
          </table:table-cell>
          <table:table-cell office:value-type="string" calcext:value-type="string">
            <text:p>Panoptes Targeting</text:p>
          </table:table-cell>
          <table:table-cell/>
          <table:table-cell office:value-type="string" calcext:value-type="string">
            <text:p>MYRIOS Long-Leash Directed Greywash</text:p>
          </table:table-cell>
          <table:table-cell/>
          <table:table-cell office:value-type="string" calcext:value-type="string">
            <text:p>Shadow of the Wolf</text:p>
          </table:table-cell>
          <table:table-cell/>
          <table:table-cell office:value-type="string" calcext:value-type="string">
            <text:p>Hecatoncheires</text:p>
          </table:table-cell>
          <table:table-cell table:formula="of:=IF(     OR(         [.$C33]=&quot;&quot;;         COUNTIF([$Build.$E$2:.$E$20];[.$C33])&gt;0     );     [.$A33];     &quot;&quot; )" office:value-type="string" office:string-value="Hecatoncheires" calcext:value-type="string">
            <text:p>Hecatoncheires</text:p>
          </table:table-cell>
        </table:table-row>
        <table:table-row table:style-name="ro2">
          <table:table-cell office:value-type="string" calcext:value-type="string">
            <text:p>Goblin</text:p>
          </table:table-cell>
          <table:table-cell office:value-type="string" calcext:value-type="string">
            <text:p>HORUS</text:p>
          </table:table-cell>
          <table:table-cell office:value-type="string" calcext:value-type="string">
            <text:p>Goblin II</text:p>
          </table:table-cell>
          <table:table-cell table:style-name="ce79" office:value-type="float" office:value="0.5" calcext:value-type="float">
            <text:p>0.5</text:p>
          </table:table-cell>
          <table:table-cell table:style-name="ce82" office:value-type="float" office:value="6" calcext:value-type="float">
            <text:p>6</text:p>
          </table:table-cell>
          <table:table-cell table:style-name="ce84" office:value-type="float" office:value="0" calcext:value-type="float">
            <text:p>0</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4" office:value-type="float" office:value="12" calcext:value-type="float">
            <text:p>12</text:p>
          </table:table-cell>
          <table:table-cell table:style-name="ce82" office:value-type="float" office:value="2" calcext:value-type="float">
            <text:p>2</text:p>
          </table:table-cell>
          <table:table-cell table:style-name="ce84" office:value-type="float" office:value="20" calcext:value-type="float">
            <text:p>20</text:p>
          </table:table-cell>
          <table:table-cell table:style-name="ce82" office:value-type="float" office:value="2" calcext:value-type="float">
            <text:p>2</text:p>
          </table:table-cell>
          <table:table-cell table:style-name="ce84" office:value-type="float" office:value="11" calcext:value-type="float">
            <text:p>11</text:p>
          </table:table-cell>
          <table:table-cell table:style-name="ce82" office:value-type="float" office:value="8" calcext:value-type="float">
            <text:p>8</text:p>
          </table:table-cell>
          <table:table-cell table:style-name="ce87" office:value-type="float" office:value="32" calcext:value-type="float">
            <text:p>32</text:p>
          </table:table-cell>
          <table:table-cell table:style-name="ce101" office:value-type="string" calcext:value-type="string">
            <text:p>Flex</text:p>
          </table:table-cell>
          <table:table-cell table:style-name="ce101" table:number-columns-repeated="2"/>
          <table:table-cell/>
          <table:table-cell office:value-type="string" calcext:value-type="string">
            <text:p>Liturgicode</text:p>
          </table:table-cell>
          <table:table-cell office:value-type="string" calcext:value-type="string">
            <text:p>Reactive Code</text:p>
          </table:table-cell>
          <table:table-cell office:value-type="string" calcext:value-type="string">
            <text:p>Fragile</text:p>
          </table:table-cell>
          <table:table-cell/>
          <table:table-cell office:value-type="string" calcext:value-type="string">
            <text:p>Instinct Rig</text:p>
          </table:table-cell>
          <table:table-cell table:number-columns-repeated="3"/>
          <table:table-cell office:value-type="string" calcext:value-type="string">
            <text:p>Goblin</text:p>
          </table:table-cell>
          <table:table-cell table:formula="of:=IF(     OR(         [.$C34]=&quot;&quot;;         COUNTIF([$Build.$E$2:.$E$20];[.$C34])&gt;0     );     [.$A34];     &quot;&quot; )" office:value-type="string" office:string-value="Goblin" calcext:value-type="string">
            <text:p>Goblin</text:p>
          </table:table-cell>
        </table:table-row>
        <table:table-row table:style-name="ro2">
          <table:table-cell office:value-type="string" calcext:value-type="string">
            <text:p>Gorgon</text:p>
          </table:table-cell>
          <table:table-cell office:value-type="string" calcext:value-type="string">
            <text:p>HORUS</text:p>
          </table:table-cell>
          <table:table-cell office:value-type="string" calcext:value-type="string">
            <text:p>Gorgon II</text:p>
          </table:table-cell>
          <table:table-cell table:style-name="ce79" office:value-type="float" office:value="2" calcext:value-type="float">
            <text:p>2</text:p>
          </table:table-cell>
          <table:table-cell table:style-name="ce82" office:value-type="float" office:value="12" calcext:value-type="float">
            <text:p>12</text:p>
          </table:table-cell>
          <table:table-cell table:style-name="ce84" office:value-type="float" office:value="0" calcext:value-type="float">
            <text:p>0</text:p>
          </table:table-cell>
          <table:table-cell table:style-name="ce82" office:value-type="float" office:value="5" calcext:value-type="float">
            <text:p>5</text:p>
          </table:table-cell>
          <table:table-cell table:style-name="ce84" office:value-type="float" office:value="8" calcext:value-type="float">
            <text:p>8</text:p>
          </table:table-cell>
          <table:table-cell table:style-name="ce82" office:value-type="float" office:value="4" calcext:value-type="float">
            <text:p>4</text:p>
          </table:table-cell>
          <table:table-cell table:style-name="ce84" office:value-type="float" office:value="12" calcext:value-type="float">
            <text:p>12</text:p>
          </table:table-cell>
          <table:table-cell table:style-name="ce82" office:value-type="float" office:value="1" calcext:value-type="float">
            <text:p>1</text:p>
          </table:table-cell>
          <table:table-cell table:style-name="ce84" office:value-type="float" office:value="8" calcext:value-type="float">
            <text:p>8</text:p>
          </table:table-cell>
          <table:table-cell table:style-name="ce82" office:value-type="float" office:value="3" calcext:value-type="float">
            <text:p>3</text:p>
          </table:table-cell>
          <table:table-cell table:style-name="ce84" office:value-type="float" office:value="12" calcext:value-type="float">
            <text:p>12</text:p>
          </table:table-cell>
          <table:table-cell table:style-name="ce82" office:value-type="float" office:value="6" calcext:value-type="float">
            <text:p>6</text:p>
          </table:table-cell>
          <table:table-cell table:style-name="ce87" office:value-type="float" office:value="33" calcext:value-type="float">
            <text:p>33</text:p>
          </table:table-cell>
          <table:table-cell table:style-name="ce101" office:value-type="string" calcext:value-type="string">
            <text:p>Flex</text:p>
          </table:table-cell>
          <table:table-cell table:number-columns-repeated="2" table:style-name="ce101" office:value-type="string" calcext:value-type="string">
            <text:p>Main</text:p>
          </table:table-cell>
          <table:table-cell/>
          <table:table-cell office:value-type="string" calcext:value-type="string">
            <text:p>Metastatic Paralysis</text:p>
          </table:table-cell>
          <table:table-cell office:value-type="string" calcext:value-type="string">
            <text:p>Gaze</text:p>
          </table:table-cell>
          <table:table-cell office:value-type="string" calcext:value-type="string">
            <text:p>Guardian</text:p>
          </table:table-cell>
          <table:table-cell/>
          <table:table-cell office:value-type="string" calcext:value-type="string">
            <text:p>BASILISK Directed Anticognition Hyperfractal</text:p>
          </table:table-cell>
          <table:table-cell table:number-columns-repeated="3"/>
          <table:table-cell office:value-type="string" calcext:value-type="string">
            <text:p>Gorgon</text:p>
          </table:table-cell>
          <table:table-cell table:formula="of:=IF(     OR(         [.$C35]=&quot;&quot;;         COUNTIF([$Build.$E$2:.$E$20];[.$C35])&gt;0     );     [.$A35];     &quot;&quot; )">
            <text:p/>
          </table:table-cell>
        </table:table-row>
        <table:table-row table:style-name="ro2">
          <table:table-cell office:value-type="string" calcext:value-type="string">
            <text:p>Hydra</text:p>
          </table:table-cell>
          <table:table-cell office:value-type="string" calcext:value-type="string">
            <text:p>HORUS</text:p>
          </table:table-cell>
          <table:table-cell office:value-type="string" calcext:value-type="string">
            <text:p>Hydra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1" calcext:value-type="float">
            <text:p>1</text:p>
          </table:table-cell>
          <table:table-cell table:style-name="ce82" office:value-type="float" office:value="5" calcext:value-type="float">
            <text:p>5</text:p>
          </table:table-cell>
          <table:table-cell table:style-name="ce84" office:value-type="float" office:value="7" calcext:value-type="float">
            <text:p>7</text:p>
          </table:table-cell>
          <table:table-cell table:style-name="ce82" office:value-type="float" office:value="5" calcext:value-type="float">
            <text:p>5</text:p>
          </table:table-cell>
          <table:table-cell table:style-name="ce84" office:value-type="float" office:value="10" calcext:value-type="float">
            <text:p>10</text:p>
          </table:table-cell>
          <table:table-cell table:style-name="ce82" office:value-type="float" office:value="1" calcext:value-type="float">
            <text:p>1</text:p>
          </table:table-cell>
          <table:table-cell table:style-name="ce84" office:value-type="float" office:value="10" calcext:value-type="float">
            <text:p>10</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8" calcext:value-type="float">
            <text:p>8</text:p>
          </table:table-cell>
          <table:table-cell table:style-name="ce87" office:value-type="float" office:value="34" calcext:value-type="float">
            <text:p>34</text:p>
          </table:table-cell>
          <table:table-cell table:style-name="ce101" office:value-type="string" calcext:value-type="string">
            <text:p>Heavy</text:p>
          </table:table-cell>
          <table:table-cell table:style-name="ce101" office:value-type="string" calcext:value-type="string">
            <text:p>Main</text:p>
          </table:table-cell>
          <table:table-cell table:style-name="ce101"/>
          <table:table-cell/>
          <table:table-cell office:value-type="string" calcext:value-type="string">
            <text:p>System Link</text:p>
          </table:table-cell>
          <table:table-cell office:value-type="string" calcext:value-type="string">
            <text:p>Shepard Field</text:p>
          </table:table-cell>
          <table:table-cell table:number-columns-repeated="2"/>
          <table:table-cell office:value-type="string" calcext:value-type="string">
            <text:p>OROCHI Disarticulation</text:p>
          </table:table-cell>
          <table:table-cell table:number-columns-repeated="3"/>
          <table:table-cell office:value-type="string" calcext:value-type="string">
            <text:p>Hydra</text:p>
          </table:table-cell>
          <table:table-cell table:formula="of:=IF(     OR(         [.$C36]=&quot;&quot;;         COUNTIF([$Build.$E$2:.$E$20];[.$C36])&gt;0     );     [.$A36];     &quot;&quot; )">
            <text:p/>
          </table:table-cell>
        </table:table-row>
        <table:table-row table:style-name="ro2">
          <table:table-cell office:value-type="string" calcext:value-type="string">
            <text:p>Manticore</text:p>
          </table:table-cell>
          <table:table-cell office:value-type="string" calcext:value-type="string">
            <text:p>HORUS</text:p>
          </table:table-cell>
          <table:table-cell office:value-type="string" calcext:value-type="string">
            <text:p>Manticore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2" calcext:value-type="float">
            <text:p>2</text:p>
          </table:table-cell>
          <table:table-cell table:style-name="ce82" office:value-type="float" office:value="7" calcext:value-type="float">
            <text:p>7</text:p>
          </table:table-cell>
          <table:table-cell table:style-name="ce84" office:value-type="float" office:value="6" calcext:value-type="float">
            <text:p>6</text:p>
          </table:table-cell>
          <table:table-cell table:style-name="ce82" office:value-type="float" office:value="3" calcext:value-type="float">
            <text:p>3</text:p>
          </table:table-cell>
          <table:table-cell table:style-name="ce84" office:value-type="float" office:value="10" calcext:value-type="float">
            <text:p>10</text:p>
          </table:table-cell>
          <table:table-cell table:style-name="ce82" office:value-type="float" office:value="1" calcext:value-type="float">
            <text:p>1</text:p>
          </table:table-cell>
          <table:table-cell table:style-name="ce84" office:value-type="float" office:value="10" calcext:value-type="float">
            <text:p>10</text:p>
          </table:table-cell>
          <table:table-cell table:style-name="ce82" office:value-type="float" office:value="3" calcext:value-type="float">
            <text:p>3</text:p>
          </table:table-cell>
          <table:table-cell table:style-name="ce84" office:value-type="float" office:value="10" calcext:value-type="float">
            <text:p>10</text:p>
          </table:table-cell>
          <table:table-cell table:style-name="ce82" office:value-type="float" office:value="6" calcext:value-type="float">
            <text:p>6</text:p>
          </table:table-cell>
          <table:table-cell table:style-name="ce87" office:value-type="float" office:value="35" calcext:value-type="float">
            <text:p>35</text:p>
          </table:table-cell>
          <table:table-cell table:style-name="ce101" office:value-type="string" calcext:value-type="string">
            <text:p>Heavy</text:p>
          </table:table-cell>
          <table:table-cell table:style-name="ce101" office:value-type="string" calcext:value-type="string">
            <text:p>Flex</text:p>
          </table:table-cell>
          <table:table-cell table:style-name="ce101"/>
          <table:table-cell/>
          <table:table-cell office:value-type="string" calcext:value-type="string">
            <text:p>Slag Carapace</text:p>
          </table:table-cell>
          <table:table-cell office:value-type="string" calcext:value-type="string">
            <text:p>Unstable System</text:p>
          </table:table-cell>
          <table:table-cell office:value-type="string" calcext:value-type="string">
            <text:p>Castigate the Enemies of the Godhead</text:p>
          </table:table-cell>
          <table:table-cell/>
          <table:table-cell office:value-type="string" calcext:value-type="string">
            <text:p>Charged Exoskeleton</text:p>
          </table:table-cell>
          <table:table-cell table:number-columns-repeated="3"/>
          <table:table-cell office:value-type="string" calcext:value-type="string">
            <text:p>Manticore</text:p>
          </table:table-cell>
          <table:table-cell table:formula="of:=IF(     OR(         [.$C37]=&quot;&quot;;         COUNTIF([$Build.$E$2:.$E$20];[.$C37])&gt;0     );     [.$A37];     &quot;&quot; )">
            <text:p/>
          </table:table-cell>
        </table:table-row>
        <table:table-row table:style-name="ro2">
          <table:table-cell office:value-type="string" calcext:value-type="string">
            <text:p>Lycan</text:p>
          </table:table-cell>
          <table:table-cell office:value-type="string" calcext:value-type="string">
            <text:p>HORUS</text:p>
          </table:table-cell>
          <table:table-cell office:value-type="string" calcext:value-type="string">
            <text:p>Manticore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2" calcext:value-type="float">
            <text:p>2</text:p>
          </table:table-cell>
          <table:table-cell table:style-name="ce82" office:value-type="float" office:value="6" calcext:value-type="float">
            <text:p>6</text:p>
          </table:table-cell>
          <table:table-cell table:style-name="ce84" office:value-type="float" office:value="6" calcext:value-type="float">
            <text:p>6</text:p>
          </table:table-cell>
          <table:table-cell table:style-name="ce82" office:value-type="float" office:value="3" calcext:value-type="float">
            <text:p>3</text:p>
          </table:table-cell>
          <table:table-cell table:style-name="ce84" office:value-type="float" office:value="10" calcext:value-type="float">
            <text:p>10</text:p>
          </table:table-cell>
          <table:table-cell table:style-name="ce82" office:value-type="float" office:value="1" calcext:value-type="float">
            <text:p>1</text:p>
          </table:table-cell>
          <table:table-cell table:style-name="ce84" office:value-type="float" office:value="8" calcext:value-type="float">
            <text:p>8</text:p>
          </table:table-cell>
          <table:table-cell table:style-name="ce82" office:value-type="float" office:value="3" calcext:value-type="float">
            <text:p>3</text:p>
          </table:table-cell>
          <table:table-cell table:style-name="ce84" office:value-type="float" office:value="10" calcext:value-type="float">
            <text:p>10</text:p>
          </table:table-cell>
          <table:table-cell table:style-name="ce82" office:value-type="float" office:value="6" calcext:value-type="float">
            <text:p>6</text:p>
          </table:table-cell>
          <table:table-cell table:style-name="ce87" office:value-type="float" office:value="36" calcext:value-type="float">
            <text:p>36</text:p>
          </table:table-cell>
          <table:table-cell table:style-name="ce101" office:value-type="string" calcext:value-type="string">
            <text:p>Heavy</text:p>
          </table:table-cell>
          <table:table-cell table:style-name="ce101" office:value-type="string" calcext:value-type="string">
            <text:p>Flex</text:p>
          </table:table-cell>
          <table:table-cell table:style-name="ce101"/>
          <table:table-cell/>
          <table:table-cell office:value-type="string" calcext:value-type="string">
            <text:p>Interference Field</text:p>
          </table:table-cell>
          <table:table-cell office:value-type="string" calcext:value-type="string">
            <text:p>Power Flux</text:p>
          </table:table-cell>
          <table:table-cell office:value-type="string" calcext:value-type="string">
            <text:p>Slag Carapace</text:p>
          </table:table-cell>
          <table:table-cell/>
          <table:table-cell office:value-type="string" calcext:value-type="string">
            <text:p>Subversive Signature</text:p>
          </table:table-cell>
          <table:table-cell/>
          <table:table-cell office:value-type="string" calcext:value-type="string">
            <text:p>Operation Winter Scar</text:p>
          </table:table-cell>
          <table:table-cell/>
          <table:table-cell office:value-type="string" calcext:value-type="string">
            <text:p>Lycan</text:p>
          </table:table-cell>
          <table:table-cell table:formula="of:=IF(     OR(         [.$C38]=&quot;&quot;;         COUNTIF([$Build.$E$2:.$E$20];[.$C38])&gt;0     );     [.$A38];     &quot;&quot; )">
            <text:p/>
          </table:table-cell>
        </table:table-row>
        <table:table-row table:style-name="ro2">
          <table:table-cell office:value-type="string" calcext:value-type="string">
            <text:p>Minotaur</text:p>
          </table:table-cell>
          <table:table-cell office:value-type="string" calcext:value-type="string">
            <text:p>HORUS</text:p>
          </table:table-cell>
          <table:table-cell office:value-type="string" calcext:value-type="string">
            <text:p>Minotaur II</text:p>
          </table:table-cell>
          <table:table-cell table:style-name="ce79" office:value-type="float" office:value="1" calcext:value-type="float">
            <text:p>1</text:p>
          </table:table-cell>
          <table:table-cell table:style-name="ce82" office:value-type="float" office:value="12" calcext:value-type="float">
            <text:p>12</text:p>
          </table:table-cell>
          <table:table-cell table:style-name="ce84" office:value-type="float" office:value="0" calcext:value-type="float">
            <text:p>0</text:p>
          </table:table-cell>
          <table:table-cell table:style-name="ce82" office:value-type="float" office:value="5" calcext:value-type="float">
            <text:p>5</text:p>
          </table:table-cell>
          <table:table-cell table:style-name="ce84" office:value-type="float" office:value="8" calcext:value-type="float">
            <text:p>8</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1" calcext:value-type="float">
            <text:p>1</text:p>
          </table:table-cell>
          <table:table-cell table:style-name="ce84" office:value-type="float" office:value="8" calcext:value-type="float">
            <text:p>8</text:p>
          </table:table-cell>
          <table:table-cell table:style-name="ce82" office:value-type="float" office:value="4" calcext:value-type="float">
            <text:p>4</text:p>
          </table:table-cell>
          <table:table-cell table:style-name="ce84" office:value-type="float" office:value="11" calcext:value-type="float">
            <text:p>11</text:p>
          </table:table-cell>
          <table:table-cell table:style-name="ce82" office:value-type="float" office:value="8" calcext:value-type="float">
            <text:p>8</text:p>
          </table:table-cell>
          <table:table-cell table:style-name="ce87" office:value-type="float" office:value="37" calcext:value-type="float">
            <text:p>37</text:p>
          </table:table-cell>
          <table:table-cell table:style-name="ce101" office:value-type="string" calcext:value-type="string">
            <text:p>Main/Aux</text:p>
          </table:table-cell>
          <table:table-cell table:style-name="ce101" table:number-columns-repeated="2"/>
          <table:table-cell/>
          <table:table-cell office:value-type="string" calcext:value-type="string">
            <text:p>Invert Cockpit</text:p>
          </table:table-cell>
          <table:table-cell office:value-type="string" calcext:value-type="string">
            <text:p>Internal Metafold</text:p>
          </table:table-cell>
          <table:table-cell office:value-type="string" calcext:value-type="string">
            <text:p>Localized Maze</text:p>
          </table:table-cell>
          <table:table-cell/>
          <table:table-cell office:value-type="string" calcext:value-type="string">
            <text:p>Metafold Maze</text:p>
          </table:table-cell>
          <table:table-cell table:number-columns-repeated="3"/>
          <table:table-cell office:value-type="string" calcext:value-type="string">
            <text:p>Minotaur</text:p>
          </table:table-cell>
          <table:table-cell table:formula="of:=IF(     OR(         [.$C39]=&quot;&quot;;         COUNTIF([$Build.$E$2:.$E$20];[.$C39])&gt;0     );     [.$A39];     &quot;&quot; )">
            <text:p/>
          </table:table-cell>
        </table:table-row>
        <table:table-row table:style-name="ro2">
          <table:table-cell office:value-type="string" calcext:value-type="string">
            <text:p>Calendula</text:p>
          </table:table-cell>
          <table:table-cell office:value-type="string" calcext:value-type="string">
            <text:p>HORUS</text:p>
          </table:table-cell>
          <table:table-cell office:value-type="string" calcext:value-type="string">
            <text:p>Minotaur II</text:p>
          </table:table-cell>
          <table:table-cell table:style-name="ce79" office:value-type="float" office:value="1" calcext:value-type="float">
            <text:p>1</text:p>
          </table:table-cell>
          <table:table-cell table:style-name="ce82" office:value-type="float" office:value="7" calcext:value-type="float">
            <text:p>7</text:p>
          </table:table-cell>
          <table:table-cell table:style-name="ce84" office:value-type="float" office:value="2" calcext:value-type="float">
            <text:p>2</text:p>
          </table:table-cell>
          <table:table-cell table:style-name="ce82" office:value-type="float" office:value="6" calcext:value-type="float">
            <text:p>6</text:p>
          </table:table-cell>
          <table:table-cell table:style-name="ce84" office:value-type="float" office:value="7" calcext:value-type="float">
            <text:p>7</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1" calcext:value-type="float">
            <text:p>1</text:p>
          </table:table-cell>
          <table:table-cell table:style-name="ce84" office:value-type="float" office:value="8" calcext:value-type="float">
            <text:p>8</text:p>
          </table:table-cell>
          <table:table-cell table:style-name="ce82" office:value-type="float" office:value="3" calcext:value-type="float">
            <text:p>3</text:p>
          </table:table-cell>
          <table:table-cell table:style-name="ce84" office:value-type="float" office:value="11" calcext:value-type="float">
            <text:p>11</text:p>
          </table:table-cell>
          <table:table-cell table:style-name="ce82" office:value-type="float" office:value="8" calcext:value-type="float">
            <text:p>8</text:p>
          </table:table-cell>
          <table:table-cell table:style-name="ce87" office:value-type="float" office:value="38" calcext:value-type="float">
            <text:p>38</text:p>
          </table:table-cell>
          <table:table-cell table:style-name="ce101" office:value-type="string" calcext:value-type="string">
            <text:p>Main/Aux</text:p>
          </table:table-cell>
          <table:table-cell table:style-name="ce101" table:number-columns-repeated="2"/>
          <table:table-cell/>
          <table:table-cell office:value-type="string" calcext:value-type="string">
            <text:p>Sculptor of Fate</text:p>
          </table:table-cell>
          <table:table-cell office:value-type="string" calcext:value-type="string">
            <text:p>Grammaton Law</text:p>
          </table:table-cell>
          <table:table-cell office:value-type="string" calcext:value-type="string">
            <text:p>Grammaton Mantle</text:p>
          </table:table-cell>
          <table:table-cell/>
          <table:table-cell office:value-type="string" calcext:value-type="string">
            <text:p>Execration of the Names of the Unworthy Dead</text:p>
          </table:table-cell>
          <table:table-cell/>
          <table:table-cell office:value-type="string" calcext:value-type="string">
            <text:p>Field Guide to the Karrakin Trade Baronies</text:p>
          </table:table-cell>
          <table:table-cell/>
          <table:table-cell office:value-type="string" calcext:value-type="string">
            <text:p>Calendula</text:p>
          </table:table-cell>
          <table:table-cell table:formula="of:=IF(     OR(         [.$C40]=&quot;&quot;;         COUNTIF([$Build.$E$2:.$E$20];[.$C40])&gt;0     );     [.$A40];     &quot;&quot; )">
            <text:p/>
          </table:table-cell>
        </table:table-row>
        <table:table-row table:style-name="ro2">
          <table:table-cell office:value-type="string" calcext:value-type="string">
            <text:p>Pegasus</text:p>
          </table:table-cell>
          <table:table-cell office:value-type="string" calcext:value-type="string">
            <text:p>HORUS</text:p>
          </table:table-cell>
          <table:table-cell office:value-type="string" calcext:value-type="string">
            <text:p>Pegasus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0" calcext:value-type="float">
            <text:p>0</text:p>
          </table:table-cell>
          <table:table-cell table:style-name="ce82" office:value-type="float" office:value="6" calcext:value-type="float">
            <text:p>6</text:p>
          </table:table-cell>
          <table:table-cell table:style-name="ce84" office:value-type="float" office:value="8" calcext:value-type="float">
            <text:p>8</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1" calcext:value-type="float">
            <text:p>1</text:p>
          </table:table-cell>
          <table:table-cell table:style-name="ce84" office:value-type="float" office:value="10" calcext:value-type="float">
            <text:p>10</text:p>
          </table:table-cell>
          <table:table-cell table:style-name="ce82" office:value-type="float" office:value="3" calcext:value-type="float">
            <text:p>3</text:p>
          </table:table-cell>
          <table:table-cell table:style-name="ce84" office:value-type="float" office:value="10" calcext:value-type="float">
            <text:p>10</text:p>
          </table:table-cell>
          <table:table-cell table:style-name="ce82" office:value-type="float" office:value="7" calcext:value-type="float">
            <text:p>7</text:p>
          </table:table-cell>
          <table:table-cell table:style-name="ce87" office:value-type="float" office:value="39" calcext:value-type="float">
            <text:p>39</text:p>
          </table:table-cell>
          <table:table-cell table:style-name="ce101" office:value-type="string" calcext:value-type="string">
            <text:p>Heavy</text:p>
          </table:table-cell>
          <table:table-cell table:number-columns-repeated="2" table:style-name="ce101" office:value-type="string" calcext:value-type="string">
            <text:p>Flex</text:p>
          </table:table-cell>
          <table:table-cell/>
          <table:table-cell office:value-type="string" calcext:value-type="string">
            <text:p>¿%:?EXTR!UDE GUN</text:p>
          </table:table-cell>
          <table:table-cell office:value-type="string" calcext:value-type="string">
            <text:p>By the Way, I Know Everything</text:p>
          </table:table-cell>
          <table:table-cell table:number-columns-repeated="2"/>
          <table:table-cell office:value-type="string" calcext:value-type="string">
            <text:p>Ushabti Omnigun</text:p>
          </table:table-cell>
          <table:table-cell table:number-columns-repeated="3"/>
          <table:table-cell office:value-type="string" calcext:value-type="string">
            <text:p>Pegasus</text:p>
          </table:table-cell>
          <table:table-cell table:formula="of:=IF(     OR(         [.$C41]=&quot;&quot;;         COUNTIF([$Build.$E$2:.$E$20];[.$C41])&gt;0     );     [.$A41];     &quot;&quot; )" office:value-type="string" office:string-value="Pegasus" calcext:value-type="string">
            <text:p>Pegasus</text:p>
          </table:table-cell>
        </table:table-row>
        <table:table-row table:style-name="ro2">
          <table:table-cell office:value-type="string" calcext:value-type="string">
            <text:p>Kobold</text:p>
          </table:table-cell>
          <table:table-cell office:value-type="string" calcext:value-type="string">
            <text:p>HORUS</text:p>
          </table:table-cell>
          <table:table-cell office:value-type="string" calcext:value-type="string">
            <text:p>Kobold II</text:p>
          </table:table-cell>
          <table:table-cell table:style-name="ce79" office:value-type="float" office:value="0.5" calcext:value-type="float">
            <text:p>0.5</text:p>
          </table:table-cell>
          <table:table-cell table:style-name="ce82" office:value-type="float" office:value="6" calcext:value-type="float">
            <text:p>6</text:p>
          </table:table-cell>
          <table:table-cell table:style-name="ce84" office:value-type="float" office:value="1" calcext:value-type="float">
            <text:p>1</text:p>
          </table:table-cell>
          <table:table-cell table:style-name="ce82" office:value-type="float" office:value="6" calcext:value-type="float">
            <text:p>6</text:p>
          </table:table-cell>
          <table:table-cell table:style-name="ce84" office:value-type="float" office:value="10" calcext:value-type="float">
            <text:p>10</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1" calcext:value-type="float">
            <text:p>1</text:p>
          </table:table-cell>
          <table:table-cell table:style-name="ce84" office:value-type="float" office:value="8" calcext:value-type="float">
            <text:p>8</text:p>
          </table:table-cell>
          <table:table-cell table:style-name="ce82" office:value-type="float" office:value="2" calcext:value-type="float">
            <text:p>2</text:p>
          </table:table-cell>
          <table:table-cell table:style-name="ce84" office:value-type="float" office:value="11" calcext:value-type="float">
            <text:p>11</text:p>
          </table:table-cell>
          <table:table-cell table:style-name="ce82" office:value-type="float" office:value="8" calcext:value-type="float">
            <text:p>8</text:p>
          </table:table-cell>
          <table:table-cell table:style-name="ce87" office:value-type="float" office:value="40" calcext:value-type="float">
            <text:p>40</text:p>
          </table:table-cell>
          <table:table-cell table:style-name="ce101" office:value-type="string" calcext:value-type="string">
            <text:p>Main/Aux</text:p>
          </table:table-cell>
          <table:table-cell table:style-name="ce101" table:number-columns-repeated="2"/>
          <table:table-cell/>
          <table:table-cell office:value-type="string" calcext:value-type="string">
            <text:p>Mimic Carapace</text:p>
          </table:table-cell>
          <table:table-cell office:value-type="string" calcext:value-type="string">
            <text:p>Slag Spray</text:p>
          </table:table-cell>
          <table:table-cell office:value-type="string" calcext:value-type="string">
            <text:p>Exposed Reactor</text:p>
          </table:table-cell>
          <table:table-cell/>
          <table:table-cell office:value-type="string" calcext:value-type="string">
            <text:p>Terraform</text:p>
          </table:table-cell>
          <table:table-cell/>
          <table:table-cell office:value-type="string" calcext:value-type="string">
            <text:p>The Long Rim</text:p>
          </table:table-cell>
          <table:table-cell/>
          <table:table-cell office:value-type="string" calcext:value-type="string">
            <text:p>Kobold</text:p>
          </table:table-cell>
          <table:table-cell table:formula="of:=IF(     OR(         [.$C42]=&quot;&quot;;         COUNTIF([$Build.$E$2:.$E$20];[.$C42])&gt;0     );     [.$A42];     &quot;&quot; )">
            <text:p/>
          </table:table-cell>
        </table:table-row>
        <table:table-row table:style-name="ro2">
          <table:table-cell office:value-type="string" calcext:value-type="string">
            <text:p>Lich</text:p>
          </table:table-cell>
          <table:table-cell office:value-type="string" calcext:value-type="string">
            <text:p>HORUS</text:p>
          </table:table-cell>
          <table:table-cell office:value-type="string" calcext:value-type="string">
            <text:p>Lich II</text:p>
          </table:table-cell>
          <table:table-cell table:style-name="ce79" office:value-type="float" office:value="1" calcext:value-type="float">
            <text:p>1</text:p>
          </table:table-cell>
          <table:table-cell table:style-name="ce82" office:value-type="float" office:value="4" calcext:value-type="float">
            <text:p>4</text:p>
          </table:table-cell>
          <table:table-cell table:style-name="ce84" office:value-type="float" office:value="0" calcext:value-type="float">
            <text:p>0</text:p>
          </table:table-cell>
          <table:table-cell table:style-name="ce82" office:value-type="float" office:value="3" calcext:value-type="float">
            <text:p>3</text:p>
          </table:table-cell>
          <table:table-cell table:style-name="ce84" office:value-type="float" office:value="8" calcext:value-type="float">
            <text:p>8</text:p>
          </table:table-cell>
          <table:table-cell table:style-name="ce82" office:value-type="float" office:value="5" calcext:value-type="float">
            <text:p>5</text:p>
          </table:table-cell>
          <table:table-cell table:style-name="ce84" office:value-type="float" office:value="12" calcext:value-type="float">
            <text:p>12</text:p>
          </table:table-cell>
          <table:table-cell table:style-name="ce82" office:value-type="float" office:value="1" calcext:value-type="float">
            <text:p>1</text:p>
          </table:table-cell>
          <table:table-cell table:style-name="ce84" office:value-type="float" office:value="15" calcext:value-type="float">
            <text:p>15</text:p>
          </table:table-cell>
          <table:table-cell table:style-name="ce82" office:value-type="float" office:value="5" calcext:value-type="float">
            <text:p>5</text:p>
          </table:table-cell>
          <table:table-cell table:style-name="ce84" office:value-type="float" office:value="11" calcext:value-type="float">
            <text:p>11</text:p>
          </table:table-cell>
          <table:table-cell table:style-name="ce82" office:value-type="float" office:value="8" calcext:value-type="float">
            <text:p>8</text:p>
          </table:table-cell>
          <table:table-cell table:style-name="ce87" office:value-type="float" office:value="41" calcext:value-type="float">
            <text:p>41</text:p>
          </table:table-cell>
          <table:table-cell table:style-name="ce101" office:value-type="string" calcext:value-type="string">
            <text:p>Main/Aux</text:p>
          </table:table-cell>
          <table:table-cell table:style-name="ce101" table:number-columns-repeated="2"/>
          <table:table-cell/>
          <table:table-cell office:value-type="string" calcext:value-type="string">
            <text:p>Soul Vessel</text:p>
          </table:table-cell>
          <table:table-cell office:value-type="string" calcext:value-type="string">
            <text:p>Immortal</text:p>
          </table:table-cell>
          <table:table-cell table:number-columns-repeated="2"/>
          <table:table-cell office:value-type="string" calcext:value-type="string">
            <text:p>Chronostutter</text:p>
          </table:table-cell>
          <table:table-cell/>
          <table:table-cell office:value-type="string" calcext:value-type="string">
            <text:p>The Long Rim</text:p>
          </table:table-cell>
          <table:table-cell/>
          <table:table-cell office:value-type="string" calcext:value-type="string">
            <text:p>Lich</text:p>
          </table:table-cell>
          <table:table-cell table:formula="of:=IF(     OR(         [.$C43]=&quot;&quot;;         COUNTIF([$Build.$E$2:.$E$20];[.$C43])&gt;0     );     [.$A43];     &quot;&quot; )">
            <text:p/>
          </table:table-cell>
        </table:table-row>
        <table:table-row table:style-name="ro2">
          <table:table-cell office:value-type="string" calcext:value-type="string">
            <text:p>Barbarossa</text:p>
          </table:table-cell>
          <table:table-cell office:value-type="string" calcext:value-type="string">
            <text:p>HA</text:p>
          </table:table-cell>
          <table:table-cell office:value-type="string" calcext:value-type="string">
            <text:p>Barbarossa II</text:p>
          </table:table-cell>
          <table:table-cell table:style-name="ce79" office:value-type="float" office:value="3" calcext:value-type="float">
            <text:p>3</text:p>
          </table:table-cell>
          <table:table-cell table:style-name="ce82" office:value-type="float" office:value="10" calcext:value-type="float">
            <text:p>10</text:p>
          </table:table-cell>
          <table:table-cell table:style-name="ce84" office:value-type="float" office:value="2" calcext:value-type="float">
            <text:p>2</text:p>
          </table:table-cell>
          <table:table-cell table:style-name="ce82" office:value-type="float" office:value="8" calcext:value-type="float">
            <text:p>8</text:p>
          </table:table-cell>
          <table:table-cell table:style-name="ce84" office:value-type="float" office:value="6" calcext:value-type="float">
            <text:p>6</text:p>
          </table:table-cell>
          <table:table-cell table:style-name="ce82" office:value-type="float" office:value="2" calcext:value-type="float">
            <text:p>2</text:p>
          </table:table-cell>
          <table:table-cell table:style-name="ce84" office:value-type="float" office:value="6" calcext:value-type="float">
            <text:p>6</text:p>
          </table:table-cell>
          <table:table-cell table:style-name="ce82" office:value-type="float" office:value="-2" calcext:value-type="float">
            <text:p>-2</text:p>
          </table:table-cell>
          <table:table-cell table:style-name="ce84" office:value-type="float" office:value="10" calcext:value-type="float">
            <text:p>10</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42" calcext:value-type="float">
            <text:p>42</text:p>
          </table:table-cell>
          <table:table-cell table:style-name="ce101" office:value-type="string" calcext:value-type="string">
            <text:p>Heavy</text:p>
          </table:table-cell>
          <table:table-cell table:number-columns-repeated="2" table:style-name="ce101" office:value-type="string" calcext:value-type="string">
            <text:p>Main</text:p>
          </table:table-cell>
          <table:table-cell/>
          <table:table-cell office:value-type="string" calcext:value-type="string">
            <text:p>Heavy Frame</text:p>
          </table:table-cell>
          <table:table-cell office:value-type="string" calcext:value-type="string">
            <text:p>Pressure Plating</text:p>
          </table:table-cell>
          <table:table-cell office:value-type="string" calcext:value-type="string">
            <text:p>Colossus</text:p>
          </table:table-cell>
          <table:table-cell office:value-type="string" calcext:value-type="string">
            <text:p>Slow</text:p>
          </table:table-cell>
          <table:table-cell office:value-type="string" calcext:value-type="string">
            <text:p>Apocalypse Rail</text:p>
          </table:table-cell>
          <table:table-cell table:number-columns-repeated="3"/>
          <table:table-cell office:value-type="string" calcext:value-type="string">
            <text:p>Barbarossa</text:p>
          </table:table-cell>
          <table:table-cell table:formula="of:=IF(     OR(         [.$C44]=&quot;&quot;;         COUNTIF([$Build.$E$2:.$E$20];[.$C44])&gt;0     );     [.$A44];     &quot;&quot; )">
            <text:p/>
          </table:table-cell>
        </table:table-row>
        <table:table-row table:style-name="ro2">
          <table:table-cell office:value-type="string" calcext:value-type="string">
            <text:p>Genghis</text:p>
          </table:table-cell>
          <table:table-cell office:value-type="string" calcext:value-type="string">
            <text:p>HA</text:p>
          </table:table-cell>
          <table:table-cell office:value-type="string" calcext:value-type="string">
            <text:p>Genghis II</text:p>
          </table:table-cell>
          <table:table-cell table:style-name="ce79" office:value-type="float" office:value="1" calcext:value-type="float">
            <text:p>1</text:p>
          </table:table-cell>
          <table:table-cell table:style-name="ce82" office:value-type="float" office:value="6" calcext:value-type="float">
            <text:p>6</text:p>
          </table:table-cell>
          <table:table-cell table:style-name="ce84" office:value-type="float" office:value="3" calcext:value-type="float">
            <text:p>3</text:p>
          </table:table-cell>
          <table:table-cell table:style-name="ce82" office:value-type="float" office:value="10" calcext:value-type="float">
            <text:p>10</text:p>
          </table:table-cell>
          <table:table-cell table:style-name="ce84" office:value-type="float" office:value="6" calcext:value-type="float">
            <text:p>6</text:p>
          </table:table-cell>
          <table:table-cell table:style-name="ce82" office:value-type="float" office:value="3" calcext:value-type="float">
            <text:p>3</text:p>
          </table:table-cell>
          <table:table-cell table:style-name="ce84" office:value-type="float" office:value="8" calcext:value-type="float">
            <text:p>8</text:p>
          </table:table-cell>
          <table:table-cell table:style-name="ce82" office:value-type="float" office:value="-2" calcext:value-type="float">
            <text:p>-2</text:p>
          </table:table-cell>
          <table:table-cell table:style-name="ce84" office:value-type="float" office:value="5" calcext:value-type="float">
            <text:p>5</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43" calcext:value-type="float">
            <text:p>43</text:p>
          </table:table-cell>
          <table:table-cell table:style-name="ce101" office:value-type="string" calcext:value-type="string">
            <text:p>Heavy</text:p>
          </table:table-cell>
          <table:table-cell table:style-name="ce101" office:value-type="string" calcext:value-type="string">
            <text:p>Flex</text:p>
          </table:table-cell>
          <table:table-cell table:style-name="ce101" office:value-type="string" calcext:value-type="string">
            <text:p>Main</text:p>
          </table:table-cell>
          <table:table-cell/>
          <table:table-cell office:value-type="string" calcext:value-type="string">
            <text:p>Insulated</text:p>
          </table:table-cell>
          <table:table-cell office:value-type="string" calcext:value-type="string">
            <text:p>Emergency Vent</text:p>
          </table:table-cell>
          <table:table-cell table:number-columns-repeated="2"/>
          <table:table-cell office:value-type="string" calcext:value-type="string">
            <text:p>TBK Sustain Suite</text:p>
          </table:table-cell>
          <table:table-cell table:number-columns-repeated="3"/>
          <table:table-cell office:value-type="string" calcext:value-type="string">
            <text:p>Genghis</text:p>
          </table:table-cell>
          <table:table-cell table:formula="of:=IF(     OR(         [.$C45]=&quot;&quot;;         COUNTIF([$Build.$E$2:.$E$20];[.$C45])&gt;0     );     [.$A45];     &quot;&quot; )">
            <text:p/>
          </table:table-cell>
        </table:table-row>
        <table:table-row table:style-name="ro2">
          <table:table-cell office:value-type="string" calcext:value-type="string">
            <text:p>“Worldkiller” Genghis Mk I</text:p>
          </table:table-cell>
          <table:table-cell office:value-type="string" calcext:value-type="string">
            <text:p>HA</text:p>
          </table:table-cell>
          <table:table-cell office:value-type="string" calcext:value-type="string">
            <text:p>Genghis II</text:p>
          </table:table-cell>
          <table:table-cell table:style-name="ce79" office:value-type="float" office:value="2" calcext:value-type="float">
            <text:p>2</text:p>
          </table:table-cell>
          <table:table-cell table:style-name="ce82" office:value-type="float" office:value="6" calcext:value-type="float">
            <text:p>6</text:p>
          </table:table-cell>
          <table:table-cell table:style-name="ce84" office:value-type="float" office:value="3" calcext:value-type="float">
            <text:p>3</text:p>
          </table:table-cell>
          <table:table-cell table:style-name="ce82" office:value-type="float" office:value="8" calcext:value-type="float">
            <text:p>8</text:p>
          </table:table-cell>
          <table:table-cell table:style-name="ce84" office:value-type="float" office:value="6" calcext:value-type="float">
            <text:p>6</text:p>
          </table:table-cell>
          <table:table-cell table:style-name="ce82" office:value-type="float" office:value="3" calcext:value-type="float">
            <text:p>3</text:p>
          </table:table-cell>
          <table:table-cell table:style-name="ce84" office:value-type="float" office:value="8" calcext:value-type="float">
            <text:p>8</text:p>
          </table:table-cell>
          <table:table-cell table:style-name="ce82" office:value-type="float" office:value="-2" calcext:value-type="float">
            <text:p>-2</text:p>
          </table:table-cell>
          <table:table-cell table:style-name="ce84" office:value-type="float" office:value="5" calcext:value-type="float">
            <text:p>5</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44" calcext:value-type="float">
            <text:p>44</text:p>
          </table:table-cell>
          <table:table-cell table:style-name="ce101" office:value-type="string" calcext:value-type="string">
            <text:p>Heavy</text:p>
          </table:table-cell>
          <table:table-cell table:number-columns-repeated="2" table:style-name="ce101" office:value-type="string" calcext:value-type="string">
            <text:p>Main</text:p>
          </table:table-cell>
          <table:table-cell/>
          <table:table-cell office:value-type="string" calcext:value-type="string">
            <text:p>Insulated</text:p>
          </table:table-cell>
          <table:table-cell office:value-type="string" calcext:value-type="string">
            <text:p>TBK Munitions</text:p>
          </table:table-cell>
          <table:table-cell office:value-type="string" calcext:value-type="string">
            <text:p>Weak Computer</text:p>
          </table:table-cell>
          <table:table-cell/>
          <table:table-cell office:value-type="string" calcext:value-type="string">
            <text:p>Juggernaut Reactor</text:p>
          </table:table-cell>
          <table:table-cell/>
          <table:table-cell office:value-type="string" calcext:value-type="string">
            <text:p>No Room for a Wallflower: Act 1</text:p>
          </table:table-cell>
          <table:table-cell/>
          <table:table-cell office:value-type="string" calcext:value-type="string">
            <text:p>Genghis</text:p>
          </table:table-cell>
          <table:table-cell table:formula="of:=IF(     OR(         [.$C46]=&quot;&quot;;         COUNTIF([$Build.$E$2:.$E$20];[.$C46])&gt;0     );     [.$A46];     &quot;&quot; )">
            <text:p/>
          </table:table-cell>
        </table:table-row>
        <table:table-row table:style-name="ro2">
          <table:table-cell office:value-type="string" calcext:value-type="string">
            <text:p>Gilgamesh</text:p>
          </table:table-cell>
          <table:table-cell office:value-type="string" calcext:value-type="string">
            <text:p>HA</text:p>
          </table:table-cell>
          <table:table-cell office:value-type="string" calcext:value-type="string">
            <text:p>Gilgamesh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1" calcext:value-type="float">
            <text:p>1</text:p>
          </table:table-cell>
          <table:table-cell table:style-name="ce82" office:value-type="float" office:value="7" calcext:value-type="float">
            <text:p>7</text:p>
          </table:table-cell>
          <table:table-cell table:style-name="ce84" office:value-type="float" office:value="8" calcext:value-type="float">
            <text:p>8</text:p>
          </table:table-cell>
          <table:table-cell table:style-name="ce82" office:value-type="float" office:value="4" calcext:value-type="float">
            <text:p>4</text:p>
          </table:table-cell>
          <table:table-cell table:style-name="ce84" office:value-type="float" office:value="8" calcext:value-type="float">
            <text:p>8</text:p>
          </table:table-cell>
          <table:table-cell table:style-name="ce82" office:value-type="float" office:value="0" calcext:value-type="float">
            <text:p>0</text:p>
          </table:table-cell>
          <table:table-cell table:style-name="ce84" office:value-type="float" office:value="10" calcext:value-type="float">
            <text:p>10</text:p>
          </table:table-cell>
          <table:table-cell table:style-name="ce82" office:value-type="float" office:value="4" calcext:value-type="float">
            <text:p>4</text:p>
          </table:table-cell>
          <table:table-cell table:style-name="ce84" office:value-type="float" office:value="11" calcext:value-type="float">
            <text:p>11</text:p>
          </table:table-cell>
          <table:table-cell table:style-name="ce82" office:value-type="float" office:value="6" calcext:value-type="float">
            <text:p>6</text:p>
          </table:table-cell>
          <table:table-cell table:style-name="ce87" office:value-type="float" office:value="45" calcext:value-type="float">
            <text:p>45</text:p>
          </table:table-cell>
          <table:table-cell table:style-name="ce101" office:value-type="string" calcext:value-type="string">
            <text:p>Heavy</text:p>
          </table:table-cell>
          <table:table-cell table:style-name="ce101" office:value-type="string" calcext:value-type="string">
            <text:p>Flex</text:p>
          </table:table-cell>
          <table:table-cell table:style-name="ce101" office:value-type="string" calcext:value-type="string">
            <text:p>Main</text:p>
          </table:table-cell>
          <table:table-cell/>
          <table:table-cell office:value-type="string" calcext:value-type="string">
            <text:p>Load-Bearing Hardpoints</text:p>
          </table:table-cell>
          <table:table-cell office:value-type="string" calcext:value-type="string">
            <text:p>Locked and Loaded</text:p>
          </table:table-cell>
          <table:table-cell office:value-type="string" calcext:value-type="string">
            <text:p>Exoframe Engineering</text:p>
          </table:table-cell>
          <table:table-cell/>
          <table:table-cell office:value-type="string" calcext:value-type="string">
            <text:p>Exoframe Engineering</text:p>
          </table:table-cell>
          <table:table-cell/>
          <table:table-cell office:value-type="string" calcext:value-type="string">
            <text:p>Operation Winter Scar</text:p>
          </table:table-cell>
          <table:table-cell/>
          <table:table-cell office:value-type="string" calcext:value-type="string">
            <text:p>Gilgamesh</text:p>
          </table:table-cell>
          <table:table-cell table:formula="of:=IF(     OR(         [.$C47]=&quot;&quot;;         COUNTIF([$Build.$E$2:.$E$20];[.$C47])&gt;0     );     [.$A47];     &quot;&quot; )">
            <text:p/>
          </table:table-cell>
        </table:table-row>
        <table:table-row table:style-name="ro2">
          <table:table-cell office:value-type="string" calcext:value-type="string">
            <text:p>Iskander</text:p>
          </table:table-cell>
          <table:table-cell office:value-type="string" calcext:value-type="string">
            <text:p>HA</text:p>
          </table:table-cell>
          <table:table-cell office:value-type="string" calcext:value-type="string">
            <text:p>Iskander II</text:p>
          </table:table-cell>
          <table:table-cell table:style-name="ce79" office:value-type="float" office:value="2" calcext:value-type="float">
            <text:p>2</text:p>
          </table:table-cell>
          <table:table-cell table:style-name="ce82" office:value-type="float" office:value="8" calcext:value-type="float">
            <text:p>8</text:p>
          </table:table-cell>
          <table:table-cell table:style-name="ce84" office:value-type="float" office:value="1" calcext:value-type="float">
            <text:p>1</text:p>
          </table:table-cell>
          <table:table-cell table:style-name="ce82" office:value-type="float" office:value="7" calcext:value-type="float">
            <text:p>7</text:p>
          </table:table-cell>
          <table:table-cell table:style-name="ce84" office:value-type="float" office:value="8" calcext:value-type="float">
            <text:p>8</text:p>
          </table:table-cell>
          <table:table-cell table:style-name="ce82" office:value-type="float" office:value="3" calcext:value-type="float">
            <text:p>3</text:p>
          </table:table-cell>
          <table:table-cell table:style-name="ce84" office:value-type="float" office:value="10" calcext:value-type="float">
            <text:p>10</text:p>
          </table:table-cell>
          <table:table-cell table:style-name="ce82" office:value-type="float" office:value="1" calcext:value-type="float">
            <text:p>1</text:p>
          </table:table-cell>
          <table:table-cell table:style-name="ce84" office:value-type="float" office:value="15" calcext:value-type="float">
            <text:p>15</text:p>
          </table:table-cell>
          <table:table-cell table:style-name="ce82" office:value-type="float" office:value="3" calcext:value-type="float">
            <text:p>3</text:p>
          </table:table-cell>
          <table:table-cell table:style-name="ce84" office:value-type="float" office:value="12" calcext:value-type="float">
            <text:p>12</text:p>
          </table:table-cell>
          <table:table-cell table:style-name="ce82" office:value-type="float" office:value="6" calcext:value-type="float">
            <text:p>6</text:p>
          </table:table-cell>
          <table:table-cell table:style-name="ce87" office:value-type="float" office:value="46" calcext:value-type="float">
            <text:p>46</text:p>
          </table:table-cell>
          <table:table-cell table:style-name="ce101" office:value-type="string" calcext:value-type="string">
            <text:p>Heavy</text:p>
          </table:table-cell>
          <table:table-cell table:style-name="ce101" office:value-type="string" calcext:value-type="string">
            <text:p>Flex</text:p>
          </table:table-cell>
          <table:table-cell table:style-name="ce101"/>
          <table:table-cell/>
          <table:table-cell office:value-type="string" calcext:value-type="string">
            <text:p>Assault Launcher</text:p>
          </table:table-cell>
          <table:table-cell office:value-type="string" calcext:value-type="string">
            <text:p>Mine Deployers</text:p>
          </table:table-cell>
          <table:table-cell office:value-type="string" calcext:value-type="string">
            <text:p>Skeleton Key</text:p>
          </table:table-cell>
          <table:table-cell/>
          <table:table-cell office:value-type="string" calcext:value-type="string">
            <text:p>Broad-Sweep Seeder</text:p>
          </table:table-cell>
          <table:table-cell table:number-columns-repeated="3"/>
          <table:table-cell office:value-type="string" calcext:value-type="string">
            <text:p>Iskander</text:p>
          </table:table-cell>
          <table:table-cell table:formula="of:=IF(     OR(         [.$C48]=&quot;&quot;;         COUNTIF([$Build.$E$2:.$E$20];[.$C48])&gt;0     );     [.$A48];     &quot;&quot; )">
            <text:p/>
          </table:table-cell>
        </table:table-row>
        <table:table-row table:style-name="ro2">
          <table:table-cell office:value-type="string" calcext:value-type="string">
            <text:p>Napoleon</text:p>
          </table:table-cell>
          <table:table-cell office:value-type="string" calcext:value-type="string">
            <text:p>HA</text:p>
          </table:table-cell>
          <table:table-cell office:value-type="string" calcext:value-type="string">
            <text:p>Napoleon II</text:p>
          </table:table-cell>
          <table:table-cell table:style-name="ce79" office:value-type="float" office:value="0.5" calcext:value-type="float">
            <text:p>0.5</text:p>
          </table:table-cell>
          <table:table-cell table:style-name="ce82" office:value-type="float" office:value="6" calcext:value-type="float">
            <text:p>6</text:p>
          </table:table-cell>
          <table:table-cell table:style-name="ce84" office:value-type="float" office:value="2" calcext:value-type="float">
            <text:p>2</text:p>
          </table:table-cell>
          <table:table-cell table:style-name="ce82" office:value-type="float" office:value="8" calcext:value-type="float">
            <text:p>8</text:p>
          </table:table-cell>
          <table:table-cell table:style-name="ce84" office:value-type="float" office:value="8" calcext:value-type="float">
            <text:p>8</text:p>
          </table:table-cell>
          <table:table-cell table:style-name="ce82" office:value-type="float" office:value="4" calcext:value-type="float">
            <text:p>4</text:p>
          </table:table-cell>
          <table:table-cell table:style-name="ce84" office:value-type="float" office:value="8" calcext:value-type="float">
            <text:p>8</text:p>
          </table:table-cell>
          <table:table-cell table:style-name="ce82" office:value-type="float" office:value="0" calcext:value-type="float">
            <text:p>0</text:p>
          </table:table-cell>
          <table:table-cell table:style-name="ce84" office:value-type="float" office:value="5" calcext:value-type="float">
            <text:p>5</text:p>
          </table:table-cell>
          <table:table-cell table:style-name="ce82" office:value-type="float" office:value="3" calcext:value-type="float">
            <text:p>3</text:p>
          </table:table-cell>
          <table:table-cell table:style-name="ce84" office:value-type="float" office:value="11" calcext:value-type="float">
            <text:p>11</text:p>
          </table:table-cell>
          <table:table-cell table:style-name="ce82" office:value-type="float" office:value="7" calcext:value-type="float">
            <text:p>7</text:p>
          </table:table-cell>
          <table:table-cell table:style-name="ce87" office:value-type="float" office:value="47" calcext:value-type="float">
            <text:p>47</text:p>
          </table:table-cell>
          <table:table-cell table:style-name="ce101" office:value-type="string" calcext:value-type="string">
            <text:p>Main/Aux</text:p>
          </table:table-cell>
          <table:table-cell table:style-name="ce101" table:number-columns-repeated="2"/>
          <table:table-cell/>
          <table:table-cell office:value-type="string" calcext:value-type="string">
            <text:p>Heavy Shielding</text:p>
          </table:table-cell>
          <table:table-cell office:value-type="string" calcext:value-type="string">
            <text:p>Flash Aegis</text:p>
          </table:table-cell>
          <table:table-cell table:number-columns-repeated="2"/>
          <table:table-cell office:value-type="string" calcext:value-type="string">
            <text:p>Trueblack Aegis</text:p>
          </table:table-cell>
          <table:table-cell table:number-columns-repeated="3"/>
          <table:table-cell office:value-type="string" calcext:value-type="string">
            <text:p>Napoleon</text:p>
          </table:table-cell>
          <table:table-cell table:formula="of:=IF(     OR(         [.$C49]=&quot;&quot;;         COUNTIF([$Build.$E$2:.$E$20];[.$C49])&gt;0     );     [.$A49];     &quot;&quot; )">
            <text:p/>
          </table:table-cell>
        </table:table-row>
        <table:table-row table:style-name="ro2">
          <table:table-cell office:value-type="string" calcext:value-type="string">
            <text:p>Kutuzov</text:p>
          </table:table-cell>
          <table:table-cell office:value-type="string" calcext:value-type="string">
            <text:p>HA</text:p>
          </table:table-cell>
          <table:table-cell office:value-type="string" calcext:value-type="string">
            <text:p>Napoleon II</text:p>
          </table:table-cell>
          <table:table-cell table:style-name="ce79" office:value-type="float" office:value="0.5" calcext:value-type="float">
            <text:p>0.5</text:p>
          </table:table-cell>
          <table:table-cell table:style-name="ce82" office:value-type="float" office:value="6" calcext:value-type="float">
            <text:p>6</text:p>
          </table:table-cell>
          <table:table-cell table:style-name="ce84" office:value-type="float" office:value="2" calcext:value-type="float">
            <text:p>2</text:p>
          </table:table-cell>
          <table:table-cell table:style-name="ce82" office:value-type="float" office:value="8" calcext:value-type="float">
            <text:p>8</text:p>
          </table:table-cell>
          <table:table-cell table:style-name="ce84" office:value-type="float" office:value="8" calcext:value-type="float">
            <text:p>8</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0" calcext:value-type="float">
            <text:p>0</text:p>
          </table:table-cell>
          <table:table-cell table:style-name="ce84" office:value-type="float" office:value="5" calcext:value-type="float">
            <text:p>5</text:p>
          </table:table-cell>
          <table:table-cell table:style-name="ce82" office:value-type="float" office:value="3" calcext:value-type="float">
            <text:p>3</text:p>
          </table:table-cell>
          <table:table-cell table:style-name="ce84" office:value-type="float" office:value="11" calcext:value-type="float">
            <text:p>11</text:p>
          </table:table-cell>
          <table:table-cell table:style-name="ce82" office:value-type="float" office:value="7" calcext:value-type="float">
            <text:p>7</text:p>
          </table:table-cell>
          <table:table-cell table:style-name="ce87" office:value-type="float" office:value="48" calcext:value-type="float">
            <text:p>48</text:p>
          </table:table-cell>
          <table:table-cell table:style-name="ce101" office:value-type="string" calcext:value-type="string">
            <text:p>Main/Aux</text:p>
          </table:table-cell>
          <table:table-cell table:style-name="ce101" table:number-columns-repeated="2"/>
          <table:table-cell/>
          <table:table-cell office:value-type="string" calcext:value-type="string">
            <text:p>Expulsion Zone</text:p>
          </table:table-cell>
          <table:table-cell office:value-type="string" calcext:value-type="string">
            <text:p>Emergency Blinkfields</text:p>
          </table:table-cell>
          <table:table-cell office:value-type="string" calcext:value-type="string">
            <text:p>Parallel Projectors</text:p>
          </table:table-cell>
          <table:table-cell/>
          <table:table-cell office:value-type="string" calcext:value-type="string">
            <text:p>Parallel Projectors</text:p>
          </table:table-cell>
          <table:table-cell/>
          <table:table-cell office:value-type="string" calcext:value-type="string">
            <text:p>Operation Winter Scar</text:p>
          </table:table-cell>
          <table:table-cell/>
          <table:table-cell office:value-type="string" calcext:value-type="string">
            <text:p>Kutuzov</text:p>
          </table:table-cell>
          <table:table-cell table:formula="of:=IF(     OR(         [.$C50]=&quot;&quot;;         COUNTIF([$Build.$E$2:.$E$20];[.$C50])&gt;0     );     [.$A50];     &quot;&quot; )">
            <text:p/>
          </table:table-cell>
        </table:table-row>
        <table:table-row table:style-name="ro2">
          <table:table-cell office:value-type="string" calcext:value-type="string">
            <text:p>Saladin</text:p>
          </table:table-cell>
          <table:table-cell office:value-type="string" calcext:value-type="string">
            <text:p>HA</text:p>
          </table:table-cell>
          <table:table-cell office:value-type="string" calcext:value-type="string">
            <text:p>Saladin II</text:p>
          </table:table-cell>
          <table:table-cell table:style-name="ce79" office:value-type="float" office:value="2" calcext:value-type="float">
            <text:p>2</text:p>
          </table:table-cell>
          <table:table-cell table:style-name="ce82" office:value-type="float" office:value="12" calcext:value-type="float">
            <text:p>12</text:p>
          </table:table-cell>
          <table:table-cell table:style-name="ce84" office:value-type="float" office:value="1" calcext:value-type="float">
            <text:p>1</text:p>
          </table:table-cell>
          <table:table-cell table:style-name="ce82" office:value-type="float" office:value="8" calcext:value-type="float">
            <text:p>8</text:p>
          </table:table-cell>
          <table:table-cell table:style-name="ce84" office:value-type="float" office:value="6" calcext:value-type="float">
            <text:p>6</text:p>
          </table:table-cell>
          <table:table-cell table:style-name="ce82" office:value-type="float" office:value="3" calcext:value-type="float">
            <text:p>3</text:p>
          </table:table-cell>
          <table:table-cell table:style-name="ce84" office:value-type="float" office:value="8" calcext:value-type="float">
            <text:p>8</text:p>
          </table:table-cell>
          <table:table-cell table:style-name="ce82" office:value-type="float" office:value="0" calcext:value-type="float">
            <text:p>0</text:p>
          </table:table-cell>
          <table:table-cell table:style-name="ce84" office:value-type="float" office:value="10" calcext:value-type="float">
            <text:p>10</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8" calcext:value-type="float">
            <text:p>8</text:p>
          </table:table-cell>
          <table:table-cell table:style-name="ce87" office:value-type="float" office:value="49" calcext:value-type="float">
            <text:p>49</text:p>
          </table:table-cell>
          <table:table-cell table:style-name="ce101" office:value-type="string" calcext:value-type="string">
            <text:p>Flex</text:p>
          </table:table-cell>
          <table:table-cell table:style-name="ce101" table:number-columns-repeated="2"/>
          <table:table-cell/>
          <table:table-cell office:value-type="string" calcext:value-type="string">
            <text:p>Reinforced Frame</text:p>
          </table:table-cell>
          <table:table-cell office:value-type="string" calcext:value-type="string">
            <text:p>Guardian</text:p>
          </table:table-cell>
          <table:table-cell office:value-type="string" calcext:value-type="string">
            <text:p>Warp Shield</text:p>
          </table:table-cell>
          <table:table-cell/>
          <table:table-cell office:value-type="string" calcext:value-type="string">
            <text:p>Tachyon Loop</text:p>
          </table:table-cell>
          <table:table-cell table:number-columns-repeated="3"/>
          <table:table-cell office:value-type="string" calcext:value-type="string">
            <text:p>Saladin</text:p>
          </table:table-cell>
          <table:table-cell table:formula="of:=IF(     OR(         [.$C51]=&quot;&quot;;         COUNTIF([$Build.$E$2:.$E$20];[.$C51])&gt;0     );     [.$A51];     &quot;&quot; )">
            <text:p/>
          </table:table-cell>
        </table:table-row>
        <table:table-row table:style-name="ro2">
          <table:table-cell office:value-type="string" calcext:value-type="string">
            <text:p>Sherman</text:p>
          </table:table-cell>
          <table:table-cell office:value-type="string" calcext:value-type="string">
            <text:p>HA</text:p>
          </table:table-cell>
          <table:table-cell office:value-type="string" calcext:value-type="string">
            <text:p>Sherman II</text:p>
          </table:table-cell>
          <table:table-cell table:style-name="ce79" office:value-type="float" office:value="1" calcext:value-type="float">
            <text:p>1</text:p>
          </table:table-cell>
          <table:table-cell table:style-name="ce82" office:value-type="float" office:value="10" calcext:value-type="float">
            <text:p>10</text:p>
          </table:table-cell>
          <table:table-cell table:style-name="ce84" office:value-type="float" office:value="1" calcext:value-type="float">
            <text:p>1</text:p>
          </table:table-cell>
          <table:table-cell table:style-name="ce82" office:value-type="float" office:value="8" calcext:value-type="float">
            <text:p>8</text:p>
          </table:table-cell>
          <table:table-cell table:style-name="ce84" office:value-type="float" office:value="7" calcext:value-type="float">
            <text:p>7</text:p>
          </table:table-cell>
          <table:table-cell table:style-name="ce82" office:value-type="float" office:value="3" calcext:value-type="float">
            <text:p>3</text:p>
          </table:table-cell>
          <table:table-cell table:style-name="ce84" office:value-type="float" office:value="8" calcext:value-type="float">
            <text:p>8</text:p>
          </table:table-cell>
          <table:table-cell table:style-name="ce82" office:value-type="float" office:value="-1" calcext:value-type="float">
            <text:p>-1</text:p>
          </table:table-cell>
          <table:table-cell table:style-name="ce84" office:value-type="float" office:value="10" calcext:value-type="float">
            <text:p>10</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50" calcext:value-type="float">
            <text:p>50</text:p>
          </table:table-cell>
          <table:table-cell table:style-name="ce101" office:value-type="string" calcext:value-type="string">
            <text:p>Heavy</text:p>
          </table:table-cell>
          <table:table-cell table:style-name="ce101" office:value-type="string" calcext:value-type="string">
            <text:p>Flex</text:p>
          </table:table-cell>
          <table:table-cell table:style-name="ce101" office:value-type="string" calcext:value-type="string">
            <text:p>Main</text:p>
          </table:table-cell>
          <table:table-cell/>
          <table:table-cell office:value-type="string" calcext:value-type="string">
            <text:p>Superior Reactor</text:p>
          </table:table-cell>
          <table:table-cell office:value-type="string" calcext:value-type="string">
            <text:p>Mathur Stop</text:p>
          </table:table-cell>
          <table:table-cell office:value-type="string" calcext:value-type="string">
            <text:p>Vent Heat</text:p>
          </table:table-cell>
          <table:table-cell/>
          <table:table-cell office:value-type="string" calcext:value-type="string">
            <text:p>Zone-Focus Mk IV SOLIDCORE</text:p>
          </table:table-cell>
          <table:table-cell table:number-columns-repeated="3"/>
          <table:table-cell office:value-type="string" calcext:value-type="string">
            <text:p>Sherman</text:p>
          </table:table-cell>
          <table:table-cell table:formula="of:=IF(     OR(         [.$C52]=&quot;&quot;;         COUNTIF([$Build.$E$2:.$E$20];[.$C52])&gt;0     );     [.$A52];     &quot;&quot; )">
            <text:p/>
          </table:table-cell>
        </table:table-row>
        <table:table-row table:style-name="ro2">
          <table:table-cell office:value-type="string" calcext:value-type="string">
            <text:p>Tagetes</text:p>
          </table:table-cell>
          <table:table-cell office:value-type="string" calcext:value-type="string">
            <text:p>HA</text:p>
          </table:table-cell>
          <table:table-cell office:value-type="string" calcext:value-type="string">
            <text:p>Sherman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1" calcext:value-type="float">
            <text:p>1</text:p>
          </table:table-cell>
          <table:table-cell table:style-name="ce82" office:value-type="float" office:value="8" calcext:value-type="float">
            <text:p>8</text:p>
          </table:table-cell>
          <table:table-cell table:style-name="ce84" office:value-type="float" office:value="7" calcext:value-type="float">
            <text:p>7</text:p>
          </table:table-cell>
          <table:table-cell table:style-name="ce82" office:value-type="float" office:value="3" calcext:value-type="float">
            <text:p>3</text:p>
          </table:table-cell>
          <table:table-cell table:style-name="ce84" office:value-type="float" office:value="8" calcext:value-type="float">
            <text:p>8</text:p>
          </table:table-cell>
          <table:table-cell table:style-name="ce82" office:value-type="float" office:value="-1" calcext:value-type="float">
            <text:p>-1</text:p>
          </table:table-cell>
          <table:table-cell table:style-name="ce84" office:value-type="float" office:value="8" calcext:value-type="float">
            <text:p>8</text:p>
          </table:table-cell>
          <table:table-cell table:style-name="ce82" office:value-type="float" office:value="4" calcext:value-type="float">
            <text:p>4</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51" calcext:value-type="float">
            <text:p>51</text:p>
          </table:table-cell>
          <table:table-cell table:style-name="ce101" office:value-type="string" calcext:value-type="string">
            <text:p>Heavy</text:p>
          </table:table-cell>
          <table:table-cell table:style-name="ce101" office:value-type="string" calcext:value-type="string">
            <text:p>Flex</text:p>
          </table:table-cell>
          <table:table-cell table:style-name="ce101" office:value-type="string" calcext:value-type="string">
            <text:p>Main</text:p>
          </table:table-cell>
          <table:table-cell/>
          <table:table-cell office:value-type="string" calcext:value-type="string">
            <text:p>Eterane Construction</text:p>
          </table:table-cell>
          <table:table-cell office:value-type="string" calcext:value-type="string">
            <text:p>Fusilier</text:p>
          </table:table-cell>
          <table:table-cell office:value-type="string" calcext:value-type="string">
            <text:p>Rank Discipline</text:p>
          </table:table-cell>
          <table:table-cell office:value-type="string" calcext:value-type="string">
            <text:p>Tempeste Synchronized Long Scope</text:p>
          </table:table-cell>
          <table:table-cell office:value-type="string" calcext:value-type="string">
            <text:p>Chorak Skirmish Gear</text:p>
          </table:table-cell>
          <table:table-cell/>
          <table:table-cell office:value-type="string" calcext:value-type="string">
            <text:p>Shadow of the Wolf</text:p>
          </table:table-cell>
          <table:table-cell/>
          <table:table-cell office:value-type="string" calcext:value-type="string">
            <text:p>Tagetes</text:p>
          </table:table-cell>
          <table:table-cell table:formula="of:=IF(     OR(         [.$C53]=&quot;&quot;;         COUNTIF([$Build.$E$2:.$E$20];[.$C53])&gt;0     );     [.$A53];     &quot;&quot; )">
            <text:p/>
          </table:table-cell>
        </table:table-row>
        <table:table-row table:style-name="ro2">
          <table:table-cell office:value-type="string" calcext:value-type="string">
            <text:p>Tokugawa</text:p>
          </table:table-cell>
          <table:table-cell office:value-type="string" calcext:value-type="string">
            <text:p>HA</text:p>
          </table:table-cell>
          <table:table-cell office:value-type="string" calcext:value-type="string">
            <text:p>Tokugawa II</text:p>
          </table:table-cell>
          <table:table-cell table:style-name="ce79" office:value-type="float" office:value="1" calcext:value-type="float">
            <text:p>1</text:p>
          </table:table-cell>
          <table:table-cell table:style-name="ce82" office:value-type="float" office:value="8" calcext:value-type="float">
            <text:p>8</text:p>
          </table:table-cell>
          <table:table-cell table:style-name="ce84" office:value-type="float" office:value="1" calcext:value-type="float">
            <text:p>1</text:p>
          </table:table-cell>
          <table:table-cell table:style-name="ce82" office:value-type="float" office:value="8" calcext:value-type="float">
            <text:p>8</text:p>
          </table:table-cell>
          <table:table-cell table:style-name="ce84" office:value-type="float" office:value="8" calcext:value-type="float">
            <text:p>8</text:p>
          </table:table-cell>
          <table:table-cell table:style-name="ce82" office:value-type="float" office:value="4" calcext:value-type="float">
            <text:p>4</text:p>
          </table:table-cell>
          <table:table-cell table:style-name="ce84" office:value-type="float" office:value="6" calcext:value-type="float">
            <text:p>6</text:p>
          </table:table-cell>
          <table:table-cell table:style-name="ce82" office:value-type="float" office:value="-1" calcext:value-type="float">
            <text:p>-1</text:p>
          </table:table-cell>
          <table:table-cell table:style-name="ce84" office:value-type="float" office:value="10" calcext:value-type="float">
            <text:p>10</text:p>
          </table:table-cell>
          <table:table-cell table:style-name="ce82" office:value-type="float" office:value="4" calcext:value-type="float">
            <text:p>4</text:p>
          </table:table-cell>
          <table:table-cell table:style-name="ce84" office:value-type="float" office:value="11" calcext:value-type="float">
            <text:p>11</text:p>
          </table:table-cell>
          <table:table-cell table:style-name="ce82" office:value-type="float" office:value="6" calcext:value-type="float">
            <text:p>6</text:p>
          </table:table-cell>
          <table:table-cell table:style-name="ce87" office:value-type="float" office:value="52" calcext:value-type="float">
            <text:p>52</text:p>
          </table:table-cell>
          <table:table-cell table:style-name="ce101" office:value-type="string" calcext:value-type="string">
            <text:p>Flex</text:p>
          </table:table-cell>
          <table:table-cell table:number-columns-repeated="2" table:style-name="ce101" office:value-type="string" calcext:value-type="string">
            <text:p>Main</text:p>
          </table:table-cell>
          <table:table-cell/>
          <table:table-cell office:value-type="string" calcext:value-type="string">
            <text:p>Limit Break</text:p>
          </table:table-cell>
          <table:table-cell office:value-type="string" calcext:value-type="string">
            <text:p>Plasma Sheath</text:p>
          </table:table-cell>
          <table:table-cell table:number-columns-repeated="2"/>
          <table:table-cell office:value-type="string" calcext:value-type="string">
            <text:p>Superheated Reactor Feed</text:p>
          </table:table-cell>
          <table:table-cell table:number-columns-repeated="3"/>
          <table:table-cell office:value-type="string" calcext:value-type="string">
            <text:p>Tokugawa</text:p>
          </table:table-cell>
          <table:table-cell table:formula="of:=IF(     OR(         [.$C54]=&quot;&quot;;         COUNTIF([$Build.$E$2:.$E$20];[.$C54])&gt;0     );     [.$A54];     &quot;&quot; )">
            <text:p/>
          </table:table-cell>
        </table:table-row>
        <table:table-row table:style-name="ro2">
          <table:table-cell office:value-type="string" calcext:value-type="string">
            <text:p>Enkidu</text:p>
          </table:table-cell>
          <table:table-cell office:value-type="string" calcext:value-type="string">
            <text:p>HA</text:p>
          </table:table-cell>
          <table:table-cell office:value-type="string" calcext:value-type="string">
            <text:p>Tokugawa II</text:p>
          </table:table-cell>
          <table:table-cell table:style-name="ce79" office:value-type="float" office:value="2" calcext:value-type="float">
            <text:p>2</text:p>
          </table:table-cell>
          <table:table-cell table:style-name="ce82" office:value-type="float" office:value="10" calcext:value-type="float">
            <text:p>10</text:p>
          </table:table-cell>
          <table:table-cell table:style-name="ce84" office:value-type="float" office:value="1" calcext:value-type="float">
            <text:p>1</text:p>
          </table:table-cell>
          <table:table-cell table:style-name="ce82" office:value-type="float" office:value="8" calcext:value-type="float">
            <text:p>8</text:p>
          </table:table-cell>
          <table:table-cell table:style-name="ce84" office:value-type="float" office:value="8" calcext:value-type="float">
            <text:p>8</text:p>
          </table:table-cell>
          <table:table-cell table:style-name="ce82" office:value-type="float" office:value="3" calcext:value-type="float">
            <text:p>3</text:p>
          </table:table-cell>
          <table:table-cell table:style-name="ce84" office:value-type="float" office:value="8" calcext:value-type="float">
            <text:p>8</text:p>
          </table:table-cell>
          <table:table-cell table:style-name="ce82" office:value-type="float" office:value="-2" calcext:value-type="float">
            <text:p>-2</text:p>
          </table:table-cell>
          <table:table-cell table:style-name="ce84" office:value-type="float" office:value="5" calcext:value-type="float">
            <text:p>5</text:p>
          </table:table-cell>
          <table:table-cell table:style-name="ce82" office:value-type="float" office:value="5" calcext:value-type="float">
            <text:p>5</text:p>
          </table:table-cell>
          <table:table-cell table:style-name="ce84" office:value-type="float" office:value="10" calcext:value-type="float">
            <text:p>10</text:p>
          </table:table-cell>
          <table:table-cell table:style-name="ce82" office:value-type="float" office:value="5" calcext:value-type="float">
            <text:p>5</text:p>
          </table:table-cell>
          <table:table-cell table:style-name="ce87" office:value-type="float" office:value="53" calcext:value-type="float">
            <text:p>53</text:p>
          </table:table-cell>
          <table:table-cell table:number-columns-repeated="2" table:style-name="ce101" office:value-type="string" calcext:value-type="string">
            <text:p>Flex</text:p>
          </table:table-cell>
          <table:table-cell table:style-name="ce101"/>
          <table:table-cell/>
          <table:table-cell office:value-type="string" calcext:value-type="string">
            <text:p>Primal Fury</text:p>
          </table:table-cell>
          <table:table-cell office:value-type="string" calcext:value-type="string">
            <text:p>All Fours</text:p>
          </table:table-cell>
          <table:table-cell office:value-type="string" calcext:value-type="string">
            <text:p>Brute Strength</text:p>
          </table:table-cell>
          <table:table-cell office:value-type="string" calcext:value-type="string">
            <text:p>Bloodsense</text:p>
          </table:table-cell>
          <table:table-cell office:value-type="string" calcext:value-type="string">
            <text:p>Limit Restriction Zero</text:p>
          </table:table-cell>
          <table:table-cell/>
          <table:table-cell office:value-type="string" calcext:value-type="string">
            <text:p>No Room for a Wallflower: Act 1</text:p>
          </table:table-cell>
          <table:table-cell/>
          <table:table-cell office:value-type="string" calcext:value-type="string">
            <text:p>Enkidu</text:p>
          </table:table-cell>
          <table:table-cell table:formula="of:=IF(     OR(         [.$C55]=&quot;&quot;;         COUNTIF([$Build.$E$2:.$E$20];[.$C55])&gt;0     );     [.$A55];     &quot;&quot; )">
            <text:p/>
          </table:table-cell>
        </table:table-row>
        <table:table-row table:style-name="ro2">
          <table:table-cell office:value-type="string" calcext:value-type="string">
            <text:p>Sunzi</text:p>
          </table:table-cell>
          <table:table-cell office:value-type="string" calcext:value-type="string">
            <text:p>HA</text:p>
          </table:table-cell>
          <table:table-cell office:value-type="string" calcext:value-type="string">
            <text:p>Sunzi II</text:p>
          </table:table-cell>
          <table:table-cell table:style-name="ce79" office:value-type="float" office:value="1" calcext:value-type="float">
            <text:p>1</text:p>
          </table:table-cell>
          <table:table-cell table:style-name="ce82" office:value-type="float" office:value="7" calcext:value-type="float">
            <text:p>7</text:p>
          </table:table-cell>
          <table:table-cell table:style-name="ce84" office:value-type="float" office:value="1" calcext:value-type="float">
            <text:p>1</text:p>
          </table:table-cell>
          <table:table-cell table:style-name="ce82" office:value-type="float" office:value="7" calcext:value-type="float">
            <text:p>7</text:p>
          </table:table-cell>
          <table:table-cell table:style-name="ce84" office:value-type="float" office:value="7" calcext:value-type="float">
            <text:p>7</text:p>
          </table:table-cell>
          <table:table-cell table:style-name="ce82" office:value-type="float" office:value="4" calcext:value-type="float">
            <text:p>4</text:p>
          </table:table-cell>
          <table:table-cell table:style-name="ce84" office:value-type="float" office:value="8" calcext:value-type="float">
            <text:p>8</text:p>
          </table:table-cell>
          <table:table-cell table:style-name="ce82" office:value-type="float" office:value="1" calcext:value-type="float">
            <text:p>1</text:p>
          </table:table-cell>
          <table:table-cell table:style-name="ce84" office:value-type="float" office:value="15" calcext:value-type="float">
            <text:p>15</text:p>
          </table:table-cell>
          <table:table-cell table:style-name="ce82" office:value-type="float" office:value="3" calcext:value-type="float">
            <text:p>3</text:p>
          </table:table-cell>
          <table:table-cell table:style-name="ce84" office:value-type="float" office:value="11" calcext:value-type="float">
            <text:p>11</text:p>
          </table:table-cell>
          <table:table-cell table:style-name="ce82" office:value-type="float" office:value="7" calcext:value-type="float">
            <text:p>7</text:p>
          </table:table-cell>
          <table:table-cell table:style-name="ce87" office:value-type="float" office:value="54" calcext:value-type="float">
            <text:p>54</text:p>
          </table:table-cell>
          <table:table-cell table:style-name="ce101" office:value-type="string" calcext:value-type="string">
            <text:p>Main/Aux</text:p>
          </table:table-cell>
          <table:table-cell table:style-name="ce101" table:number-columns-repeated="2"/>
          <table:table-cell/>
          <table:table-cell office:value-type="string" calcext:value-type="string">
            <text:p>Safe Harbor</text:p>
          </table:table-cell>
          <table:table-cell office:value-type="string" calcext:value-type="string">
            <text:p>Anchor</text:p>
          </table:table-cell>
          <table:table-cell office:value-type="string" calcext:value-type="string">
            <text:p>Slip</text:p>
          </table:table-cell>
          <table:table-cell/>
          <table:table-cell office:value-type="string" calcext:value-type="string">
            <text:p>Reality Carver</text:p>
          </table:table-cell>
          <table:table-cell/>
          <table:table-cell office:value-type="string" calcext:value-type="string">
            <text:p>The Long Rim</text:p>
          </table:table-cell>
          <table:table-cell/>
          <table:table-cell office:value-type="string" calcext:value-type="string">
            <text:p>Sunzi</text:p>
          </table:table-cell>
          <table:table-cell table:formula="of:=IF(     OR(         [.$C56]=&quot;&quot;;         COUNTIF([$Build.$E$2:.$E$20];[.$C56])&gt;0     );     [.$A56];     &quot;&quot; )">
            <text:p/>
          </table:table-cell>
        </table:table-row>
        <table:table-row table:style-name="ro2" table:number-rows-repeated="44">
          <table:table-cell table:number-columns-repeated="3"/>
          <table:table-cell table:style-name="ce79"/>
          <table:table-cell table:style-name="ce82"/>
          <table:table-cell table:style-name="ce84"/>
          <table:table-cell table:style-name="ce82"/>
          <table:table-cell table:style-name="ce84"/>
          <table:table-cell table:style-name="ce82"/>
          <table:table-cell table:style-name="ce84"/>
          <table:table-cell table:style-name="ce82"/>
          <table:table-cell table:style-name="ce84"/>
          <table:table-cell table:style-name="ce82"/>
          <table:table-cell table:style-name="ce84"/>
          <table:table-cell table:style-name="ce82"/>
          <table:table-cell table:number-columns-repeated="15"/>
        </table:table-row>
        <table:table-row table:style-name="ro2" table:number-rows-repeated="1048475">
          <table:table-cell table:number-columns-repeated="30"/>
        </table:table-row>
        <table:table-row table:style-name="ro2">
          <table:table-cell table:number-columns-repeated="30"/>
        </table:table-row>
        <calcext:conditional-formats>
          <calcext:conditional-format calcext:target-range-address="Frames.E3:Frames.O100">
            <calcext:condition calcext:apply-style-name="Frame_Equal" calcext:value="formula-is(AND([.E3]=COM.MICROSOFT.XLOOKUP(0; [.$P$2:.$P$56]; [.E$2:.E$56]); NOT(ISBLANK([.E3]))))" calcext:base-cell-address="Frames.E3"/>
          </calcext:conditional-format>
          <calcext:conditional-format calcext:target-range-address="Frames.E3:Frames.O100">
            <calcext:condition calcext:apply-style-name="Frame_Less" calcext:value="formula-is(AND([.E3]&lt;COM.MICROSOFT.XLOOKUP(0; [.$P$2:.$P$56]; [.E$2:.E$56]); NOT(ISBLANK([.E3]))))" calcext:base-cell-address="Frames.E3"/>
          </calcext:conditional-format>
          <calcext:conditional-format calcext:target-range-address="Frames.E3:Frames.O100">
            <calcext:condition calcext:apply-style-name="Frame_Greater" calcext:value="formula-is(AND([.E3]&gt;COM.MICROSOFT.XLOOKUP(0; [.$P$2:.$P$56]; [.E$2:.E$56]); NOT(ISBLANK([.E3]))))" calcext:base-cell-address="Frames.E3"/>
          </calcext:conditional-format>
          <calcext:conditional-format calcext:target-range-address="Frames.D3:Frames.D100">
            <calcext:condition calcext:apply-style-name="Frame_Equal" calcext:value="formula-is(AND([.D3]=COM.MICROSOFT.XLOOKUP(0; [.$P$2:.$P$56]; [.D$2:.D$56]); NOT(ISBLANK([.D3]))))" calcext:base-cell-address="Frames.D3"/>
          </calcext:conditional-format>
          <calcext:conditional-format calcext:target-range-address="Frames.D3:Frames.D100">
            <calcext:condition calcext:apply-style-name="Frame_Less" calcext:value="formula-is(AND([.D3]&gt;COM.MICROSOFT.XLOOKUP(0; [.$P$2:.$P$56]; [.D$2:.D$56]); NOT(ISBLANK([.D3]))))" calcext:base-cell-address="Frames.D3"/>
          </calcext:conditional-format>
          <calcext:conditional-format calcext:target-range-address="Frames.D3:Frames.D100">
            <calcext:condition calcext:apply-style-name="Frame_Greater" calcext:value="formula-is(AND([.D3]&lt;COM.MICROSOFT.XLOOKUP(0; [.$P$2:.$P$56]; [.D$2:.D$56]); NOT(ISBLANK([.D3]))))" calcext:base-cell-address="Frames.D3"/>
          </calcext:conditional-format>
        </calcext:conditional-formats>
      </table:table>
      <table:table table:name="Traits" table:style-name="ta1">
        <office:forms form:automatic-focus="false" form:apply-design-mode="false"/>
        <table:table-column table:style-name="co20" table:default-cell-style-name="Default"/>
        <table:table-column table:style-name="co11" table:default-cell-style-name="Default"/>
        <table:table-row table:style-name="ro2">
          <table:table-cell office:value-type="string" calcext:value-type="string">
            <text:p>Trait</text:p>
          </table:table-cell>
          <table:table-cell office:value-type="string" calcext:value-type="string">
            <text:p>Mechanic</text:p>
          </table:table-cell>
        </table:table-row>
        <table:table-row table:style-name="ro2">
          <table:table-cell office:value-type="string" calcext:value-type="string">
            <text:p>Initiative</text:p>
          </table:table-cell>
          <table:table-cell office:value-type="string" calcext:value-type="string">
            <text:p>1/scene the %FRAME% may take any quick action as a free action.</text:p>
          </table:table-cell>
        </table:table-row>
        <table:table-row table:style-name="ro2">
          <table:table-cell office:value-type="string" calcext:value-type="string">
            <text:p>Replaceable Parts</text:p>
          </table:table-cell>
          <table:table-cell office:value-type="string" calcext:value-type="string">
            <text:p>While resting, the %FRAME% can be repaired at a rate of 1 Repair per 1 structure damage, instead of 2 Repairs.</text:p>
          </table:table-cell>
        </table:table-row>
        <table:table-row table:style-name="ro2">
          <table:table-cell office:value-type="string" calcext:value-type="string">
            <text:p>Guardian</text:p>
          </table:table-cell>
          <table:table-cell office:value-type="string" calcext:value-type="string">
            <text:p>Adjacent allied characters can use the %FRAME% as hard cover.</text:p>
          </table:table-cell>
        </table:table-row>
        <table:table-row table:style-name="ro2">
          <table:table-cell office:value-type="string" calcext:value-type="string">
            <text:p>Heroism</text:p>
          </table:table-cell>
          <table:table-cell office:value-type="string" calcext:value-type="string">
            <text:p>1/scene the %FRAME% can brace without sacrificing any actions or movement on its following turn.</text:p>
          </table:table-cell>
        </table:table-row>
        <table:table-row table:style-name="ro2">
          <table:table-cell office:value-type="string" calcext:value-type="string">
            <text:p>Brilliance</text:p>
          </table:table-cell>
          <table:table-cell office:value-type="string" calcext:value-type="string">
            <text:p>1/scene, the %FRAME% may take any Quick Tech action as a free action, and then may either Bolster or Lock On as a free action.</text:p>
          </table:table-cell>
        </table:table-row>
        <table:table-row table:style-name="ro2">
          <table:table-cell office:value-type="string" calcext:value-type="string">
            <text:p>Data Siphon</text:p>
          </table:table-cell>
          <table:table-cell office:value-type="string" calcext:value-type="string">
            <text:p>Whenever the %FRAME% makes a tech attack against a hostile character, it may also automatically Scan them.</text:p>
          </table:table-cell>
        </table:table-row>
        <table:table-row table:style-name="ro2">
          <table:table-cell office:value-type="string" calcext:value-type="string">
            <text:p>Grapple Cable</text:p>
          </table:table-cell>
          <table:table-cell office:value-type="string" calcext:value-type="string">
            <text:p>The %FRAME% can Grapple targets within Range 5. If the Grapple is successful, the %FRAME% is immediately pulled adjacent to the target by the most direct path. If there are no suitable spaces, the grapple breaks and the %FRAME% does not move.</text:p>
          </table:table-cell>
        </table:table-row>
        <table:table-row table:style-name="ro2">
          <table:table-cell office:value-type="string" calcext:value-type="string">
            <text:p>Lock/Kill Subsystem</text:p>
          </table:table-cell>
          <table:table-cell office:value-type="string" calcext:value-type="string">
            <text:p>While grappling, the %FRAME% can Boost and take reactions.</text:p>
          </table:table-cell>
        </table:table-row>
        <table:table-row table:style-name="ro2">
          <table:table-cell office:value-type="string" calcext:value-type="string">
            <text:p>Exposed Reactor</text:p>
          </table:table-cell>
          <table:table-cell office:value-type="string" calcext:value-type="string">
            <text:p>The %FRAME% receives +1 Difficulty on ENGINEERING checks and saves.</text:p>
          </table:table-cell>
        </table:table-row>
        <table:table-row table:style-name="ro2">
          <table:table-cell office:value-type="string" calcext:value-type="string">
            <text:p>Heavy Frame</text:p>
          </table:table-cell>
          <table:table-cell office:value-type="string" calcext:value-type="string">
            <text:p>The %FRAME% can’t be pushed, pulled, knocked Prone, or knocked back by smaller characters.</text:p>
          </table:table-cell>
        </table:table-row>
        <table:table-row table:style-name="ro2">
          <table:table-cell office:value-type="string" calcext:value-type="string">
            <text:p>Blast Plating</text:p>
          </table:table-cell>
          <table:table-cell office:value-type="string" calcext:value-type="string">
            <text:p>The %FRAME% has Resistance to damage, burn and heat from blast, burst, line, and cone attacks.</text:p>
          </table:table-cell>
        </table:table-row>
        <table:table-row table:style-name="ro2">
          <table:table-cell office:value-type="string" calcext:value-type="string">
            <text:p>Slow</text:p>
          </table:table-cell>
          <table:table-cell office:value-type="string" calcext:value-type="string">
            <text:p>The %FRAME% receives +1 difficulty on Agility checks and saves. </text:p>
          </table:table-cell>
        </table:table-row>
        <table:table-row table:style-name="ro2">
          <table:table-cell office:value-type="string" calcext:value-type="string">
            <text:p>Insulated</text:p>
          </table:table-cell>
          <table:table-cell office:value-type="string" calcext:value-type="string">
            <text:p>The %FRAME% has Immunity to burn.</text:p>
          </table:table-cell>
        </table:table-row>
        <table:table-row table:style-name="ro2">
          <table:table-cell office:value-type="string" calcext:value-type="string">
            <text:p>Combat Repair</text:p>
          </table:table-cell>
          <table:table-cell office:value-type="string" calcext:value-type="string">
            <text:p>In combat, the %FRAME% can use 4 Repairs to repair a destroyed mech as a full action, returning it to 1 Structure, 1 Stress, and 1 HP.</text:p>
          </table:table-cell>
        </table:table-row>
        <table:table-row table:style-name="ro2">
          <table:table-cell office:value-type="string" calcext:value-type="string">
            <text:p>Redundant Systems</text:p>
          </table:table-cell>
          <table:table-cell office:value-type="string" calcext:value-type="string">
            <text:p>At your discretion, other characters adjacent to the %FRAME% can spend its Repairs as their own.</text:p>
          </table:table-cell>
        </table:table-row>
        <table:table-row table:style-name="ro2">
          <table:table-cell office:value-type="string" calcext:value-type="string">
            <text:p>Momentum</text:p>
          </table:table-cell>
          <table:table-cell office:value-type="string" calcext:value-type="string">
            <text:p><text:span text:style-name="T1">1/round, after you Boost, the %FRAME%’s</text:span> next melee attack deals +1d6 bonus damage on hit.</text:p>
          </table:table-cell>
        </table:table-row>
        <table:table-row table:style-name="ro2">
          <table:table-cell office:value-type="string" calcext:value-type="string">
            <text:p>Skirmisher</text:p>
          </table:table-cell>
          <table:table-cell office:value-type="string" calcext:value-type="string">
            <text:p><text:span text:style-name="T1">After attacking, the %FRAME%</text:span> can immediately move 1 space in any direction as long as it isn’t Immobilized or Slowed. This movement ignores engagement and doesn’t provoke reactions.</text:p>
          </table:table-cell>
        </table:table-row>
        <table:table-row table:style-name="ro2">
          <table:table-cell office:value-type="string" calcext:value-type="string">
            <text:p>Full Metal Jacket</text:p>
          </table:table-cell>
          <table:table-cell office:value-type="string" calcext:value-type="string">
            <text:p><text:span text:style-name="T1">At the end of its turn, if the %FRAME%</text:span> hasn’t made any attacks or forced any saves, it can reload all Loading weapons as a free action.</text:p>
          </table:table-cell>
        </table:table-row>
        <table:table-row table:style-name="ro2">
          <table:table-cell office:value-type="string" calcext:value-type="string">
            <text:p>Shielded Magazines</text:p>
          </table:table-cell>
          <table:table-cell office:value-type="string" calcext:value-type="string">
            <text:p><text:span text:style-name="T1">The %FRAME%</text:span> can make ranged attacks when Jammed.</text:p>
          </table:table-cell>
        </table:table-row>
        <table:table-row table:style-name="ro2">
          <table:table-cell office:value-type="string" calcext:value-type="string">
            <text:p>Sentinel</text:p>
          </table:table-cell>
          <table:table-cell office:value-type="string" calcext:value-type="string">
            <text:p>The %FRAME% gains +1 accuracy on all attacks made as reactions (e.g. Overwatch).</text:p>
          </table:table-cell>
        </table:table-row>
        <table:table-row table:style-name="ro2">
          <table:table-cell office:value-type="string" calcext:value-type="string">
            <text:p>Dismemberment</text:p>
          </table:table-cell>
          <table:table-cell office:value-type="string" calcext:value-type="string">
            <text:p><text:span text:style-name="T1">When the %FRAME%</text:span> inflicts Immobilize on another character, the target also becomes Shredded for the same duration.</text:p>
          </table:table-cell>
        </table:table-row>
        <table:table-row table:style-name="ro2">
          <table:table-cell office:value-type="string" calcext:value-type="string">
            <text:p>Shrike Armor</text:p>
          </table:table-cell>
          <table:table-cell office:value-type="string" calcext:value-type="string">
            <text:p><text:span text:style-name="T1">When a character within range 3 attacks the %FRAME%</text:span>, the attacker first takes 1 AP kinetic damage.</text:p>
          </table:table-cell>
        </table:table-row>
        <table:table-row table:style-name="ro2">
          <table:table-cell office:value-type="string" calcext:value-type="string">
            <text:p>Wrecking Ball</text:p>
          </table:table-cell>
          <table:table-cell office:value-type="string" calcext:value-type="string">
            <text:p><text:span text:style-name="T1">The %FRAME%</text:span> counts as Size 3 when inflicting knockback with any Ram, Ranged, or Melee Attack.</text:p>
          </table:table-cell>
        </table:table-row>
        <table:table-row table:style-name="ro2">
          <table:table-cell office:value-type="string" calcext:value-type="string">
            <text:p>Pursue Prey</text:p>
          </table:table-cell>
          <table:table-cell office:value-type="string" calcext:value-type="string">
            <text:p><text:span text:style-name="T1">When the %FRAME%</text:span> inflicts KNOCKBACK as part of any action, it can move an equal number of spaces towards the same target by the most direct route possible. This movement is part of the same action, ignores engagement and doesn’t provoke reactions.</text:p>
          </table:table-cell>
        </table:table-row>
        <table:table-row table:style-name="ro2">
          <table:table-cell office:value-type="string" calcext:value-type="string">
            <text:p>Slam</text:p>
          </table:table-cell>
          <table:table-cell office:value-type="string" calcext:value-type="string">
            <text:p><text:span text:style-name="T1">1/round, when the %FRAME%</text:span> knocks a character into a wall, mech, or other obstruction that would cause it to stop moving, it may force its target to pass a HULL save or take 1d6 Kinetic Damage and become IMPAIRED until the end of its next turn.</text:p>
          </table:table-cell>
        </table:table-row>
        <table:table-row table:style-name="ro2">
          <table:table-cell office:value-type="string" calcext:value-type="string">
            <text:p>Weak Computer</text:p>
          </table:table-cell>
          <table:table-cell office:value-type="string" calcext:value-type="string">
            <text:p><text:span text:style-name="T1">The %FRAME%</text:span> takes +1 Difficulty on all SYSTEMS saves and checks.</text:p>
          </table:table-cell>
        </table:table-row>
        <table:table-row table:style-name="ro2">
          <table:table-cell office:value-type="string" calcext:value-type="string">
            <text:p>Destructive Swings</text:p>
          </table:table-cell>
          <table:table-cell office:value-type="string" calcext:value-type="string">
            <text:p><text:span text:style-name="T1">At the end of the %FRAME%’s</text:span> turn, if it made at least one melee attack against a hostile character, the force of its swings creates a SIZE 1 piece of terrain that grants hard cover in a free, adjacent space. It has 10 HP and EVASION 5.</text:p>
          </table:table-cell>
        </table:table-row>
        <table:table-row table:style-name="ro2">
          <table:table-cell office:value-type="string" calcext:value-type="string">
            <text:p>Rapid Deployment</text:p>
          </table:table-cell>
          <table:table-cell office:value-type="string" calcext:value-type="string">
            <text:p><text:span text:style-name="T1">On its first turn in any combat scene, the %FRAME%</text:span> can deploy or activate any one system with the drone or deployable tag as a free action.</text:p>
          </table:table-cell>
        </table:table-row>
        <table:table-row table:style-name="ro2">
          <table:table-cell office:value-type="string" calcext:value-type="string">
            <text:p>Reroute Power</text:p>
          </table:table-cell>
          <table:table-cell office:value-type="string" calcext:value-type="string">
            <text:p><text:span text:style-name="T1">As a quick action 1/round, the %FRAME%</text:span> can destroy one of its DEPLOYABLES or DRONES that was not deployed or created in the same round to either grant 1d6+1 OVERSHIELD to an allied character or deal 1d6+1 AP Energy Damage to a hostile character. The target, allied or hostile, must be adjacent to whatever is destroyed. Systems without LIMITED that are destroyed this way must be repaired before they can be used again.</text:p>
          </table:table-cell>
        </table:table-row>
        <table:table-row table:style-name="ro2">
          <table:table-cell office:value-type="string" calcext:value-type="string">
            <text:p>Recycle</text:p>
          </table:table-cell>
          <table:table-cell office:value-type="string" calcext:value-type="string">
            <text:p><text:span text:style-name="T1">At the end of any scene in which the %FRAME%</text:span> used REROUTE POWER, it restores 1 charge to a LIMITED system of its choice with the DRONE or DEPLOYABLE tag.</text:p>
          </table:table-cell>
        </table:table-row>
        <table:table-row table:style-name="ro4">
          <table:table-cell office:value-type="string" calcext:value-type="string">
            <text:p>Dynamic Reload</text:p>
          </table:table-cell>
          <table:table-cell office:value-type="string" calcext:value-type="string">
            <text:p><text:span text:style-name="T1">The %FRAME%’s</text:span> non-Auxiliary weapons gain the following effects:</text:p>
            <text:p>    Melee weapons gain: “On critical hit: Reload all ranged weapons not used to attack this turn.”</text:p>
            <text:p>    Ranged weapons gain: “On critical hit: Reload all melee weapons not used to attack this turn.”</text:p>
          </table:table-cell>
        </table:table-row>
        <table:table-row table:style-name="ro4">
          <table:table-cell office:value-type="string" calcext:value-type="string">
            <text:p>Truesilver</text:p>
          </table:table-cell>
          <table:table-cell office:value-type="string" calcext:value-type="string">
            <text:p><text:span text:style-name="T1">1/Scene, after hitting with a weapon, the %FRAME%</text:span> may apply one of the following effects depending on the weapon’s type.</text:p>
            <text:p>    Non-Loading weapon: The hit is treated as a Critical Hit. Resulting damage is not rolled twice.</text:p>
            <text:p>    Loading weapon: Resulting damage can’t be reduced.</text:p>
          </table:table-cell>
        </table:table-row>
        <table:table-row table:style-name="ro2">
          <table:table-cell office:value-type="string" calcext:value-type="string">
            <text:p>Untenable Power</text:p>
          </table:table-cell>
          <table:table-cell office:value-type="string" calcext:value-type="string">
            <text:p><text:span text:style-name="T1">1/round, the %FRAME%</text:span> may give a HULL check or save it forced +1 Difficulty.</text:p>
          </table:table-cell>
        </table:table-row>
        <table:table-row table:style-name="ro2">
          <table:table-cell office:value-type="string" calcext:value-type="string">
            <text:p>Indomitable Force</text:p>
          </table:table-cell>
          <table:table-cell office:value-type="string" calcext:value-type="string">
            <text:p><text:span text:style-name="T1">The %FRAME%</text:span> has Resistance to damage and heat dealt by characters it is Grappling.</text:p>
          </table:table-cell>
        </table:table-row>
        <table:table-row table:style-name="ro2">
          <table:table-cell office:value-type="string" calcext:value-type="string">
            <text:p>Roc Superlifter Flight System</text:p>
          </table:table-cell>
          <table:table-cell office:value-type="string" calcext:value-type="string">
            <text:p><text:span text:style-name="T1">The %FRAME% may hover when it moves. As long as it is only carrying objects or allied characters, it may ignore restrictions on carrying caused by flight. At the end of any of the %FRAME%’s</text:span> turns in which it uses this trait, it takes heat equal to 1 + the total size of objects and characters it is carrying.</text:p>
          </table:table-cell>
        </table:table-row>
        <table:table-row table:style-name="ro2">
          <table:table-cell office:value-type="string" calcext:value-type="string">
            <text:p>Relay Coupling</text:p>
          </table:table-cell>
          <table:table-cell office:value-type="string" calcext:value-type="string">
            <text:p><text:span text:style-name="T1">When the %FRAME% targets an allied character within sensors with a system or tech action, they may use the %FRAME%’s</text:span> Sensors and line of sight for tech actions until the start of its next turn.</text:p>
          </table:table-cell>
        </table:table-row>
        <table:table-row table:style-name="ro2">
          <table:table-cell office:value-type="string" calcext:value-type="string">
            <text:p>Precision Fix</text:p>
          </table:table-cell>
          <table:table-cell office:value-type="string" calcext:value-type="string">
            <text:p>When you scan a character, it cannot benefit from cover or being invisible until the end of your next turn.</text:p>
          </table:table-cell>
        </table:table-row>
        <table:table-row table:style-name="ro2">
          <table:table-cell office:value-type="string" calcext:value-type="string">
            <text:p>Repulsor Field</text:p>
          </table:table-cell>
          <table:table-cell office:value-type="string" calcext:value-type="string">
            <text:p><text:span text:style-name="T1">The %FRAME%</text:span> has Resistance to Kinetic Damage.</text:p>
          </table:table-cell>
        </table:table-row>
        <table:table-row table:style-name="ro2">
          <table:table-cell office:value-type="string" calcext:value-type="string">
            <text:p>Mag Parry</text:p>
          </table:table-cell>
          <table:table-cell office:value-type="string" calcext:value-type="string">
            <text:p>1/round, as a reaction, you may attempt to parry an attack that would deal Kinetic Damage to you or an adjacent allied character. Roll 1d6: on 5+, the attack misses. This effect does not stack with Invisible.</text:p>
          </table:table-cell>
        </table:table-row>
        <table:table-row table:style-name="ro2">
          <table:table-cell office:value-type="string" calcext:value-type="string">
            <text:p>Perfect Parry</text:p>
          </table:table-cell>
          <table:table-cell office:value-type="string" calcext:value-type="string">
            <text:p><text:span text:style-name="T1">The %FRAME%</text:span> and all adjacent allied characters have IMMUNITY to all damage and effects from missed attacks.</text:p>
          </table:table-cell>
        </table:table-row>
        <table:table-row table:style-name="ro2">
          <table:table-cell office:value-type="string" calcext:value-type="string">
            <text:p>Royal Guard</text:p>
          </table:table-cell>
          <table:table-cell office:value-type="string" calcext:value-type="string">
            <text:p><text:span text:style-name="T1">When an allied mech adjacent to the %FRAME% moves, the %FRAME% can also move with that character as long as it doesn’t break adjacency, mirroring that character’s movement. The %FRAME%</text:span> is still affected by obstructions and, between its turns, can only move a total number of spaces with this ability equal to its SPEED + 1. This effect doesn’t take a reaction, and doesn’t provoke reactions or obey engagement.</text:p>
          </table:table-cell>
        </table:table-row>
        <table:table-row table:style-name="ro2">
          <table:table-cell office:value-type="string" calcext:value-type="string">
            <text:p>Neurolink</text:p>
          </table:table-cell>
          <table:table-cell office:value-type="string" calcext:value-type="string">
            <text:p>The %FRAME% may reroll its first ranged attack each round, but must keep the second result.</text:p>
          </table:table-cell>
        </table:table-row>
        <table:table-row table:style-name="ro2">
          <table:table-cell office:value-type="string" calcext:value-type="string">
            <text:p>Perfected Targeting</text:p>
          </table:table-cell>
          <table:table-cell office:value-type="string" calcext:value-type="string">
            <text:p><text:span text:style-name="T1">The %FRAME%</text:span> gains an additional +1 to all ranged attack rolls.</text:p>
          </table:table-cell>
        </table:table-row>
        <table:table-row table:style-name="ro2">
          <table:table-cell office:value-type="string" calcext:value-type="string">
            <text:p>Maneuverability Jets</text:p>
          </table:table-cell>
          <table:table-cell office:value-type="string" calcext:value-type="string">
            <text:p>The %FRAME% can hover when it moves.</text:p>
          </table:table-cell>
        </table:table-row>
        <table:table-row table:style-name="ro2">
          <table:table-cell office:value-type="string" calcext:value-type="string">
            <text:p>Harlequin Cloak</text:p>
          </table:table-cell>
          <table:table-cell office:value-type="string" calcext:value-type="string">
            <text:p>During its turn, the %FRAME% is Invisible; it reappears at the end of the turn.</text:p>
          </table:table-cell>
        </table:table-row>
        <table:table-row table:style-name="ro2">
          <table:table-cell office:value-type="string" calcext:value-type="string">
            <text:p>Fragile</text:p>
          </table:table-cell>
          <table:table-cell office:value-type="string" calcext:value-type="string">
            <text:p>The %FRAME% receives +1 difficulty on Hull checks and saves.</text:p>
          </table:table-cell>
        </table:table-row>
        <table:table-row table:style-name="ro2">
          <table:table-cell office:value-type="string" calcext:value-type="string">
            <text:p>Flash Cloak</text:p>
          </table:table-cell>
          <table:table-cell office:value-type="string" calcext:value-type="string">
            <text:p>The %FRAME% is Invisible while moving, but reappears when stationary.</text:p>
          </table:table-cell>
        </table:table-row>
        <table:table-row table:style-name="ro2">
          <table:table-cell office:value-type="string" calcext:value-type="string">
            <text:p>Carapace Adaptation</text:p>
          </table:table-cell>
          <table:table-cell office:value-type="string" calcext:value-type="string">
            <text:p>When the %FRAME% is in soft cover, ranged attackers receive +2 difficulty instead of +1 difficulty.</text:p>
          </table:table-cell>
        </table:table-row>
        <table:table-row table:style-name="ro2">
          <table:table-cell office:value-type="string" calcext:value-type="string">
            <text:p>Hyperawareness</text:p>
          </table:table-cell>
          <table:table-cell office:value-type="string" calcext:value-type="string">
            <text:p>At the start of each round, until the %FRAME% takes its turn, all attacks against it receive +1 Difficulty and it gains +1 Accuracy on all saves.</text:p>
          </table:table-cell>
        </table:table-row>
        <table:table-row table:style-name="ro2">
          <table:table-cell office:value-type="string" calcext:value-type="string">
            <text:p>Battle Oracle</text:p>
          </table:table-cell>
          <table:table-cell office:value-type="string" calcext:value-type="string">
            <text:p>1/round, when a hostile attack misses the %FRAME%, it may pull a character within Sensors up to 2 spaces in any direction.</text:p>
          </table:table-cell>
        </table:table-row>
        <table:table-row table:style-name="ro2">
          <table:table-cell office:value-type="string" calcext:value-type="string">
            <text:p>Possibility Mapping</text:p>
          </table:table-cell>
          <table:table-cell office:value-type="string" calcext:value-type="string">
            <text:p>At the start of each round, choose the point in the PC turn order during which you intend to act (e.g., if there are three PCs, you can choose to act first, second, or third among them). 1/round, if you take your turn at the chosen point, you may deal +1d6 bonus damage on hit with a ranged or melee attack against a target within Sensors. If you take your turn at another point in the round instead, you may still deal this bonus damage, but you take 1d6 Heat when doing so.</text:p>
          </table:table-cell>
        </table:table-row>
        <table:table-row table:style-name="ro2">
          <table:table-cell office:value-type="string" calcext:value-type="string">
            <text:p>Avenger Silos</text:p>
          </table:table-cell>
          <table:table-cell office:value-type="string" calcext:value-type="string">
            <text:p>1/round, on a critical hit with any ranged weapon, the %FRAME% may deal 3 explosive to a different character of your choice within range 15 and line of sight.</text:p>
          </table:table-cell>
        </table:table-row>
        <table:table-row table:style-name="ro2">
          <table:table-cell office:value-type="string" calcext:value-type="string">
            <text:p>Seeking Payload</text:p>
          </table:table-cell>
          <table:table-cell office:value-type="string" calcext:value-type="string">
            <text:p>The %FRAME% can use a Launcher weapon to attack a character with the Lock On condition as if its weapon had Seeking, but must consume the Lock On during the attack. When it does so, the attack’s damage cannot be reduced in any way.</text:p>
          </table:table-cell>
        </table:table-row>
        <table:table-row table:style-name="ro2">
          <table:table-cell office:value-type="string" calcext:value-type="string">
            <text:p>Near-Threat Targeting Processor</text:p>
          </table:table-cell>
          <table:table-cell office:value-type="string" calcext:value-type="string">
            <text:p>The %FRAME% treats its LAUNCHER weapons as though they are also CQB weapons with THREAT 3.</text:p>
          </table:table-cell>
        </table:table-row>
        <table:table-row table:style-name="ro2">
          <table:table-cell office:value-type="string" calcext:value-type="string">
            <text:p>Vigilante Omnidirectional Launchers</text:p>
          </table:table-cell>
          <table:table-cell office:value-type="string" calcext:value-type="string">
            <text:p>1/Round, on a critical hit against a character, the %FRAME% may immediately deal 2 Explosive damage to all characters of its choice within Range 3 of itself and knock them back 1 space.</text:p>
          </table:table-cell>
        </table:table-row>
        <table:table-row table:style-name="ro2">
          <table:table-cell office:value-type="string" calcext:value-type="string">
            <text:p>Pressure Plating</text:p>
          </table:table-cell>
          <table:table-cell office:value-type="string" calcext:value-type="string">
            <text:p>The %FRAME% has Resistance to Explosive Damage.</text:p>
          </table:table-cell>
        </table:table-row>
        <table:table-row table:style-name="ro2">
          <table:table-cell office:value-type="string" calcext:value-type="string">
            <text:p>Hunter</text:p>
          </table:table-cell>
          <table:table-cell office:value-type="string" calcext:value-type="string">
            <text:p>1/round, the %FRAME% may deal +1d6 bonus damage on hit with a melee attack if its target has no adjacent characters, or if the %FRAME% is the only character adjacent to the target.</text:p>
          </table:table-cell>
        </table:table-row>
        <table:table-row table:style-name="ro2">
          <table:table-cell office:value-type="string" calcext:value-type="string">
            <text:p>Biotic Components</text:p>
          </table:table-cell>
          <table:table-cell office:value-type="string" calcext:value-type="string">
            <text:p>The %FRAME% gains +1 accuracy on Agility checks and saves.</text:p>
          </table:table-cell>
        </table:table-row>
        <table:table-row table:style-name="ro2">
          <table:table-cell office:value-type="string" calcext:value-type="string">
            <text:p>Integrated Cloak</text:p>
          </table:table-cell>
          <table:table-cell office:value-type="string" calcext:value-type="string">
            <text:p><text:span text:style-name="T1">At the end of its turn, the %FRAME%</text:span> becomes Invisible if it hasn’t moved that turn. This lasts until it moves or takes a reaction, or until the start of its next turn.</text:p>
          </table:table-cell>
        </table:table-row>
        <table:table-row table:style-name="ro2">
          <table:table-cell office:value-type="string" calcext:value-type="string">
            <text:p>Prophetic Scanners</text:p>
          </table:table-cell>
          <table:table-cell office:value-type="string" calcext:value-type="string">
            <text:p><text:span text:style-name="T1">1/round, when the %FRAME%</text:span> inflicts Lock On, its target also becomes Shredded until the end of its next turn.</text:p>
          </table:table-cell>
        </table:table-row>
        <table:table-row table:style-name="ro5">
          <table:table-cell office:value-type="string" calcext:value-type="string">
            <text:p>Scout Battlefield</text:p>
          </table:table-cell>
          <table:table-cell office:value-type="string" calcext:value-type="string">
            <text:p>Before the first round of any combat and before any deployment takes place, place up to two of the following in free spaces anywhere on the battlefield:</text:p>
            <text:p>    A 2 x 2 zone that does not impede movement and grants soft cover to characters at least partly within it.</text:p>
            <text:p>    A 2 x 2 zone that is difficult terrain.</text:p>
            <text:p>    A SIZE 1 piece of hard cover.</text:p>
            <text:p>They can't be placed within 4 spaces of each other. The same option can be chosen more than once. These objects and zones represent naturally occurring terrain on the battlefield, and you can work with the GM to decide what they are.</text:p>
          </table:table-cell>
        </table:table-row>
        <table:table-row table:style-name="ro2">
          <table:table-cell office:value-type="string" calcext:value-type="string">
            <text:p>Invigorating Scanners</text:p>
          </table:table-cell>
          <table:table-cell office:value-type="string" calcext:value-type="string">
            <text:p>1/round when the %FRAME% inflicts Lock On, an allied character in its sensor range and line of sight can move up to its speed as a reaction.</text:p>
          </table:table-cell>
        </table:table-row>
        <table:table-row table:style-name="ro2">
          <table:table-cell office:value-type="string" calcext:value-type="string">
            <text:p>Weathering</text:p>
          </table:table-cell>
          <table:table-cell office:value-type="string" calcext:value-type="string">
            <text:p>The %FRAME% ignores difficult terrain.</text:p>
          </table:table-cell>
        </table:table-row>
        <table:table-row table:style-name="ro2">
          <table:table-cell office:value-type="string" calcext:value-type="string">
            <text:p>Giantkiller</text:p>
          </table:table-cell>
          <table:table-cell office:value-type="string" calcext:value-type="string">
            <text:p><text:span text:style-name="T1">The %FRAME%</text:span> counts as SIZE 1 for RAM and GRAPPLE. It ignores engagement from larger characters and can freely move through and share the spaces they occupy (even if they’re hostile). While occupying the same spaces as any character, it gains soft cover, even from that character.</text:p>
          </table:table-cell>
        </table:table-row>
        <table:table-row table:style-name="ro2">
          <table:table-cell office:value-type="string" calcext:value-type="string">
            <text:p>Jäger Dodge</text:p>
          </table:table-cell>
          <table:table-cell office:value-type="string" calcext:value-type="string">
            <text:p>1/round, when you take damage from a larger character, gain RESISTANCE to that damage and move 3 spaces in any direction as a reaction. This ignores engagement and doesn’t provoke reactions.</text:p>
          </table:table-cell>
        </table:table-row>
        <table:table-row table:style-name="ro2">
          <table:table-cell office:value-type="string" calcext:value-type="string">
            <text:p>Finishing Blow</text:p>
          </table:table-cell>
          <table:table-cell office:value-type="string" calcext:value-type="string">
            <text:p>1/round, deal +1d6 bonus damage on a successful melee attack against a PRONE target.</text:p>
          </table:table-cell>
        </table:table-row>
        <table:table-row table:style-name="ro2">
          <table:table-cell office:value-type="string" calcext:value-type="string">
            <text:p>Rooted</text:p>
          </table:table-cell>
          <table:table-cell office:value-type="string" calcext:value-type="string">
            <text:p>While this mech is Immobilized, it has resistance to Kinetic damage and cannot be knocked back or knocked prone. It can choose to become immobilized until the end of its next turn as a protocol.</text:p>
          </table:table-cell>
        </table:table-row>
        <table:table-row table:style-name="ro2">
          <table:table-cell office:value-type="string" calcext:value-type="string">
            <text:p>Harden</text:p>
          </table:table-cell>
          <table:table-cell office:value-type="string" calcext:value-type="string">
            <text:p><text:span text:style-name="T1">When the %FRAME%</text:span> braces, it gains overshield equal to 4 + GRIT before it takes damage.</text:p>
          </table:table-cell>
        </table:table-row>
        <table:table-row table:style-name="ro2">
          <table:table-cell office:value-type="string" calcext:value-type="string">
            <text:p>Fluid Burst</text:p>
          </table:table-cell>
          <table:table-cell office:value-type="string" calcext:value-type="string">
            <text:p><text:span text:style-name="T1">When an allied character in Range 2 of the %FRAME% takes damage from a hostile source, the %FRAME%</text:span> can reduce the damage by 1 and deal 1 AP kinetic damage to itself.</text:p>
          </table:table-cell>
        </table:table-row>
        <table:table-row table:style-name="ro2">
          <table:table-cell office:value-type="string" calcext:value-type="string">
            <text:p>Storm Shield</text:p>
          </table:table-cell>
          <table:table-cell office:value-type="string" calcext:value-type="string">
            <text:p><text:span text:style-name="T1">The %FRAME%’s HP is not increased by its pilot's GRIT. Instead, at the start of any scene, the %FRAME% gains OVERSHIELD equal to 6+GRIT. This OVERSHIELD refreshes any time the %FRAME%</text:span> takes structure damage.</text:p>
          </table:table-cell>
        </table:table-row>
        <table:table-row table:style-name="ro2">
          <table:table-cell office:value-type="string" calcext:value-type="string">
            <text:p>Imperial Vestment</text:p>
          </table:table-cell>
          <table:table-cell office:value-type="string" calcext:value-type="string">
            <text:p><text:span text:style-name="T1">Whenever the %FRAME% grants OVERSHIELD to another character, it gains the same amount of OVERSHIELD. If the %FRAME%</text:span> gains OVERSHIELD from any source, including this trait, it increases its current OVERSHIELD by that amount instead of replacing it. Its OVERSHIELD cannot exceed the amount granted by Storm Shield.</text:p>
          </table:table-cell>
        </table:table-row>
        <table:table-row table:style-name="ro2">
          <table:table-cell office:value-type="string" calcext:value-type="string">
            <text:p>Sovereign Presence</text:p>
          </table:table-cell>
          <table:table-cell office:value-type="string" calcext:value-type="string">
            <text:p><text:span text:style-name="T1">1/round, when the %FRAME% targets a character with an attack, it can condemn that character, forcing them to make an ENGINEERING save. On a failure, the target takes +1 damage any time they take damage until the start of the %FRAME%’s</text:span> next turn.</text:p>
          </table:table-cell>
        </table:table-row>
        <table:table-row table:style-name="ro2">
          <table:table-cell office:value-type="string" calcext:value-type="string">
            <text:p>Scouring Swarm</text:p>
          </table:table-cell>
          <table:table-cell office:value-type="string" calcext:value-type="string">
            <text:p><text:span text:style-name="T1">The %FRAME%</text:span> deals 2 kinetic to characters of its choice that start their turn grappled by or adjacent to it.</text:p>
          </table:table-cell>
        </table:table-row>
        <table:table-row table:style-name="ro2">
          <table:table-cell office:value-type="string" calcext:value-type="string">
            <text:p>Regeneration</text:p>
          </table:table-cell>
          <table:table-cell office:value-type="string" calcext:value-type="string">
            <text:p><text:span text:style-name="T1">At the end of its turn, the %FRAME%</text:span> regains 1/4 of its total HP. When it takes stress or structure damage, this effect ceases until the end of its next turn.</text:p>
          </table:table-cell>
        </table:table-row>
        <table:table-row table:style-name="ro2">
          <table:table-cell office:value-type="string" calcext:value-type="string">
            <text:p>Self-Perpetuating</text:p>
          </table:table-cell>
          <table:table-cell office:value-type="string" calcext:value-type="string">
            <text:p>When you rest, the %FRAME% regains full HP automatically and without repairs.</text:p>
          </table:table-cell>
        </table:table-row>
        <table:table-row table:style-name="ro2">
          <table:table-cell office:value-type="string" calcext:value-type="string">
            <text:p>Smoke and Mirrors</text:p>
          </table:table-cell>
          <table:table-cell office:value-type="string" calcext:value-type="string">
            <text:p><text:span text:style-name="T1">The %FRAME%</text:span> can always hide in areas of soft cover, regardless of engagement or enemy traits and systems.</text:p>
          </table:table-cell>
        </table:table-row>
        <table:table-row table:style-name="ro2">
          <table:table-cell office:value-type="string" calcext:value-type="string">
            <text:p>Panoptes Targeting</text:p>
          </table:table-cell>
          <table:table-cell office:value-type="string" calcext:value-type="string">
            <text:p>The %FRAME%’s Smart weapons ignore the invisible status of characters within Sensors.</text:p>
          </table:table-cell>
        </table:table-row>
        <table:table-row table:style-name="ro2">
          <table:table-cell office:value-type="string" calcext:value-type="string">
            <text:p>Liturgicode</text:p>
          </table:table-cell>
          <table:table-cell office:value-type="string" calcext:value-type="string">
            <text:p>The %FRAME% gains +1 accuracy on tech attacks.</text:p>
          </table:table-cell>
        </table:table-row>
        <table:table-row table:style-name="ro2">
          <table:table-cell office:value-type="string" calcext:value-type="string">
            <text:p>Reactive Code</text:p>
          </table:table-cell>
          <table:table-cell office:value-type="string" calcext:value-type="string">
            <text:p>1/round, when the %FRAME% is hit by a tech attack, the %FRAME% may take any quick tech option against the attacker as a reaction.</text:p>
          </table:table-cell>
        </table:table-row>
        <table:table-row table:style-name="ro2">
          <table:table-cell office:value-type="string" calcext:value-type="string">
            <text:p>Metastatic Paralysis</text:p>
          </table:table-cell>
          <table:table-cell office:value-type="string" calcext:value-type="string">
            <text:p>When an attack roll against the %FRAME% lands on 1–2, it automatically misses and the attacker becomes Stunned until the end of their next turn.</text:p>
          </table:table-cell>
        </table:table-row>
        <table:table-row table:style-name="ro2">
          <table:table-cell office:value-type="string" calcext:value-type="string">
            <text:p>Gaze</text:p>
          </table:table-cell>
          <table:table-cell office:value-type="string" calcext:value-type="string">
            <text:p>The %FRAME% can take two reactions per turn, instead of one.</text:p>
          </table:table-cell>
        </table:table-row>
        <table:table-row table:style-name="ro2">
          <table:table-cell office:value-type="string" calcext:value-type="string">
            <text:p>System Link</text:p>
          </table:table-cell>
          <table:table-cell office:value-type="string" calcext:value-type="string">
            <text:p>The %FRAME%’s Deployables and Drones gain +5 HP.</text:p>
          </table:table-cell>
        </table:table-row>
        <table:table-row table:style-name="ro2">
          <table:table-cell office:value-type="string" calcext:value-type="string">
            <text:p>Shepard Field</text:p>
          </table:table-cell>
          <table:table-cell office:value-type="string" calcext:value-type="string">
            <text:p><text:span text:style-name="T1">Drones, Deployables, and objects adjacent to the %FRAME%</text:span> gain Resistance to all damage.</text:p>
          </table:table-cell>
        </table:table-row>
        <table:table-row table:style-name="ro2">
          <table:table-cell office:value-type="string" calcext:value-type="string">
            <text:p>Slag Carapace</text:p>
          </table:table-cell>
          <table:table-cell office:value-type="string" calcext:value-type="string">
            <text:p>The %FRAME% has Resistance to Energy Damage and Burn.</text:p>
          </table:table-cell>
        </table:table-row>
        <table:table-row table:style-name="ro2">
          <table:table-cell office:value-type="string" calcext:value-type="string">
            <text:p>Unstable System</text:p>
          </table:table-cell>
          <table:table-cell office:value-type="string" calcext:value-type="string">
            <text:p><text:span text:style-name="T1">When destroyed, the %FRAME%</text:span> explodes as per a reactor meltdown at the end of its next turn.</text:p>
          </table:table-cell>
        </table:table-row>
        <table:table-row table:style-name="ro2">
          <table:table-cell office:value-type="string" calcext:value-type="string">
            <text:p>Castigate the Enemies of the Godhead</text:p>
          </table:table-cell>
          <table:table-cell office:value-type="string" calcext:value-type="string">
            <text:p><text:span text:style-name="T1">When you rest or perform a Full Repair, you can push the %FRAME% into an unstable Castigation State (or bring it out of one). In this state, the %FRAME% explodes immediately when destroyed due to damage or reactor meltdown, vaporizing it and instantly killing you and any other passengers. Characters within burst 2 must succeed on an Agility save or take 8d6 explosive. On a success, they take half damage. This only takes place if you are physically present in the %FRAME%</text:span>.</text:p>
          </table:table-cell>
        </table:table-row>
        <table:table-row table:style-name="ro2">
          <table:table-cell office:value-type="string" calcext:value-type="string">
            <text:p>Interference Field</text:p>
          </table:table-cell>
          <table:table-cell office:value-type="string" calcext:value-type="string">
            <text:p><text:span text:style-name="T1">All hostile characters within Range 3 of the %FRAME% receive +1 Difficulty on all attacks that do not target the %FRAME%</text:span>.</text:p>
          </table:table-cell>
        </table:table-row>
        <table:table-row table:style-name="ro2">
          <table:table-cell office:value-type="string" calcext:value-type="string">
            <text:p>Power Flux</text:p>
          </table:table-cell>
          <table:table-cell office:value-type="string" calcext:value-type="string">
            <text:p>1/round, when the %FRAME% takes heat, a hostile character within Range 3 must pass a SYSTEMS save or become Impaired and Slowed until the end of their next turn.</text:p>
          </table:table-cell>
        </table:table-row>
        <table:table-row table:style-name="ro2">
          <table:table-cell office:value-type="string" calcext:value-type="string">
            <text:p>Invert Cockpit</text:p>
          </table:table-cell>
          <table:table-cell office:value-type="string" calcext:value-type="string">
            <text:p><text:span text:style-name="T1">You may Mount or Dismount the %FRAME% for the first time each round as a free action. Additionally, the %FRAME%</text:span> doesn’t become Impaired when you Eject.</text:p>
          </table:table-cell>
        </table:table-row>
        <table:table-row table:style-name="ro2">
          <table:table-cell office:value-type="string" calcext:value-type="string">
            <text:p>Internal Metafold</text:p>
          </table:table-cell>
          <table:table-cell office:value-type="string" calcext:value-type="string">
            <text:p><text:span text:style-name="T1">While inside the %FRAME%, you can’t be harmed in any way, even if the %FRAME%</text:span> explodes or is destroyed.</text:p>
          </table:table-cell>
        </table:table-row>
        <table:table-row table:style-name="ro2">
          <table:table-cell office:value-type="string" calcext:value-type="string">
            <text:p>Localized Maze</text:p>
          </table:table-cell>
          <table:table-cell office:value-type="string" calcext:value-type="string">
            <text:p><text:span text:style-name="T1">Hostile characters cannot pass through a space occupied by the %FRAME%</text:span> for any reason, and must always stop moving when Engaged with it, regardless of Size.</text:p>
          </table:table-cell>
        </table:table-row>
        <table:table-row table:style-name="ro2">
          <table:table-cell office:value-type="string" calcext:value-type="string">
            <text:p>Sculptor of Fate</text:p>
          </table:table-cell>
          <table:table-cell office:value-type="string" calcext:value-type="string">
            <text:p><text:span text:style-name="T1">1/round, when the %FRAME% hits a character with a tech attack, it can create a void husk in a free space within Range 3 of its target. Void husks are intangible objects that don’t cause obstruction. The husk is the same size as its target, has immunity to all damage and effects, and emits a Burst 2 aura while active that affects both intangible and tangible characters. Hostiles are slowed while they are at least partly in the area. The %FRAME%</text:span> can create any number of husks, all of which disintegrate at the end of the scene.</text:p>
          </table:table-cell>
        </table:table-row>
        <table:table-row table:style-name="ro2">
          <table:table-cell office:value-type="string" calcext:value-type="string">
            <text:p>Grammaton Law</text:p>
          </table:table-cell>
          <table:table-cell office:value-type="string" calcext:value-type="string">
            <text:p><text:span text:style-name="T1">Slowed hostiles are also shredded while within Range 3 of the %FRAME%</text:span>.</text:p>
          </table:table-cell>
        </table:table-row>
        <table:table-row table:style-name="ro2">
          <table:table-cell office:value-type="string" calcext:value-type="string">
            <text:p>Grammaton Mantle</text:p>
          </table:table-cell>
          <table:table-cell office:value-type="string" calcext:value-type="string">
            <text:p><text:span text:style-name="T1">As a protocol, the %FRAME%</text:span> can become intangible until the start of its next turn.</text:p>
          </table:table-cell>
        </table:table-row>
        <table:table-row table:style-name="ro2">
          <table:table-cell office:value-type="string" calcext:value-type="string">
            <text:p>¿%:?EXTR!UDE GUN</text:p>
          </table:table-cell>
          <table:table-cell office:value-type="string" calcext:value-type="string">
            <text:p>GUN: GUN</text:p>
          </table:table-cell>
        </table:table-row>
        <table:table-row table:style-name="ro2">
          <table:table-cell office:value-type="string" calcext:value-type="string">
            <text:p>By the Way, I Know Everything</text:p>
          </table:table-cell>
          <table:table-cell office:value-type="string" calcext:value-type="string">
            <text:p>When it would roll damage, the %FRAME% can instead deal the average damage based on the number of dice rolled, as follows: 1d3 (2), 1d6 (4), 2d6 (7), 3d6 (11), 4d6 (14). This must be decided before rolling damage.</text:p>
          </table:table-cell>
        </table:table-row>
        <table:table-row table:style-name="ro2">
          <table:table-cell office:value-type="string" calcext:value-type="string">
            <text:p>Mimic Carapace</text:p>
          </table:table-cell>
          <table:table-cell office:value-type="string" calcext:value-type="string">
            <text:p>When the %FRAME% starts its turn adjacent to a piece of terrain or hard cover of SIZE 1 or larger it becomes INVISIBLE as long as it remains adjacent. It ceases to be INVISIBLE if it attacks or takes damage.</text:p>
          </table:table-cell>
        </table:table-row>
        <table:table-row table:style-name="ro2">
          <table:table-cell office:value-type="string" calcext:value-type="string">
            <text:p>Slag Spray</text:p>
          </table:table-cell>
          <table:table-cell office:value-type="string" calcext:value-type="string">
            <text:p>1/round, as a quick action, the %FRAME% may create a SIZE 1 mound of semi-molten polymer in a free space within Range 3 and line of sight. This terrain has 10 HP, EVASION 5, and grants hard cover.</text:p>
          </table:table-cell>
        </table:table-row>
        <table:table-row table:style-name="ro2">
          <table:table-cell office:value-type="string" calcext:value-type="string">
            <text:p>Soul Vessel</text:p>
          </table:table-cell>
          <table:table-cell office:value-type="string" calcext:value-type="string">
            <text:p><text:span text:style-name="T1">At the start of the %FRAME%’s turn, set down a SOUL VESSEL at its current location (replacing any previous markers). 1/round, as a reaction when the %FRAME% is hit by an attack, fails a save or check, or takes damage or Heat from any source (even itself), it may immediately gain IMMUNITY to all damage, heat, or conditions from that effect. It then teleports to the marker or as close as possible. The %FRAME%</text:span> can also take this reaction at the end of any turn, including its own, but if it does so it only teleports and does not gain IMMUNITY. It can't take this reaction if it is JAMMED, STUNNED, GRAPPLED, or unable to take reactions for any reason.</text:p>
          </table:table-cell>
        </table:table-row>
        <table:table-row table:style-name="ro2">
          <table:table-cell office:value-type="string" calcext:value-type="string">
            <text:p>Immortal</text:p>
          </table:table-cell>
          <table:table-cell office:value-type="string" calcext:value-type="string">
            <text:p><text:span text:style-name="T1">1/scene, in the round after the %FRAME% has been destroyed, it may return to the location of its SOUL VESSEL as a reaction at the end of any turn. This counts as teleporting; additionally, the %FRAME% appears with full HP, no Heat, 1 STRUCTURE and 1 STRESS (even if it had more when it was destroyed). If its pilot died in the same scene, they also return to life. If the %FRAME%</text:span> does not take this reaction in that round, it remains destroyed and the pilot remains dead.</text:p>
          </table:table-cell>
        </table:table-row>
        <table:table-row table:style-name="ro2">
          <table:table-cell office:value-type="string" calcext:value-type="string">
            <text:p>Colossus</text:p>
          </table:table-cell>
          <table:table-cell office:value-type="string" calcext:value-type="string">
            <text:p>Adjacent allied characters can use the %FRAME% for hard cover.</text:p>
          </table:table-cell>
        </table:table-row>
        <table:table-row table:style-name="ro2">
          <table:table-cell office:value-type="string" calcext:value-type="string">
            <text:p>Emergency Vent</text:p>
          </table:table-cell>
          <table:table-cell office:value-type="string" calcext:value-type="string">
            <text:p>When the %FRAME% takes structure damage, it clears all heat.</text:p>
          </table:table-cell>
        </table:table-row>
        <table:table-row table:style-name="ro2">
          <table:table-cell office:value-type="string" calcext:value-type="string">
            <text:p>TBK Munitions</text:p>
          </table:table-cell>
          <table:table-cell office:value-type="string" calcext:value-type="string">
            <text:p>The %FRAME%’s attacks ignore resistance to Burn and Heat.</text:p>
          </table:table-cell>
        </table:table-row>
        <table:table-row table:style-name="ro2">
          <table:table-cell office:value-type="string" calcext:value-type="string">
            <text:p>Load-Bearing Hardpoints</text:p>
          </table:table-cell>
          <table:table-cell office:value-type="string" calcext:value-type="string">
            <text:p><text:span text:style-name="T1">All limited systems and weapons equipped to the %FRAME%</text:span> gain +1 charge.</text:p>
          </table:table-cell>
        </table:table-row>
        <table:table-row table:style-name="ro2">
          <table:table-cell office:value-type="string" calcext:value-type="string">
            <text:p>Locked and Loaded</text:p>
          </table:table-cell>
          <table:table-cell office:value-type="string" calcext:value-type="string">
            <text:p>The %FRAME% has a Loadout Die, 1d6 starting at 6. Each time it expends a Limited charge, reduce the value of the Loadout Die by 1. When the Loadout Die reaches 1, you may reset it to 6 to re-roll one attack, check, or save, although the second result must be kept. The value of the Loadout Die persists between scenes but resets to 6 when you perform a full repair.</text:p>
          </table:table-cell>
        </table:table-row>
        <table:table-row table:style-name="ro6">
          <table:table-cell office:value-type="string" calcext:value-type="string">
            <text:p>Exoframe Engineering</text:p>
          </table:table-cell>
          <table:table-cell office:value-type="string" calcext:value-type="string">
            <text:p> 1/scene, you may choose one of the following as a free action:</text:p>
            <text:p>    Regain half of your total HP.</text:p>
            <text:p>    Repair a destroyed weapon or system.</text:p>
            <text:p>If you don’t use this ability during a combat, then when you next rest you may either regain all HP or automatically repair a destroyed weapon or system. Using this ability during combat counts as expending a Limited charge.</text:p>
          </table:table-cell>
        </table:table-row>
        <table:table-row table:style-name="ro2">
          <table:table-cell office:value-type="string" calcext:value-type="string">
            <text:p>Assault Launcher</text:p>
          </table:table-cell>
          <table:table-cell office:value-type="string" calcext:value-type="string">
            <text:p><text:span text:style-name="T1">1/round, the %FRAME%</text:span> may throw one Grenade or plant one Mine as though it has range 15.</text:p>
          </table:table-cell>
        </table:table-row>
        <table:table-row table:style-name="ro2">
          <table:table-cell office:value-type="string" calcext:value-type="string">
            <text:p>Mine Deployers</text:p>
          </table:table-cell>
          <table:table-cell office:value-type="string" calcext:value-type="string">
            <text:p><text:span text:style-name="T1">1/round, when the %FRAME%</text:span> plants a Mine (even using its Assault Launcher trait), it may plant up to two other Mines in free spaces adjacent to itself as a free action.</text:p>
          </table:table-cell>
        </table:table-row>
        <table:table-row table:style-name="ro2">
          <table:table-cell office:value-type="string" calcext:value-type="string">
            <text:p>Skeleton Key</text:p>
          </table:table-cell>
          <table:table-cell office:value-type="string" calcext:value-type="string">
            <text:p>The %FRAME% never triggers or sets off Mines or other proximity-based systems unless it chooses to do so.</text:p>
          </table:table-cell>
        </table:table-row>
        <table:table-row table:style-name="ro2">
          <table:table-cell office:value-type="string" calcext:value-type="string">
            <text:p>Heavy Shielding</text:p>
          </table:table-cell>
          <table:table-cell office:value-type="string" calcext:value-type="string">
            <text:p>When the %FRAME% would take half damage on a successful check or save, it instead reduces the damage to 1.</text:p>
          </table:table-cell>
        </table:table-row>
        <table:table-row table:style-name="ro2">
          <table:table-cell office:value-type="string" calcext:value-type="string">
            <text:p>Flash Aegis</text:p>
          </table:table-cell>
          <table:table-cell office:value-type="string" calcext:value-type="string">
            <text:p>When the %FRAME% Braces, it reduces incoming damage to 1 instead of gaining Resistance.</text:p>
          </table:table-cell>
        </table:table-row>
        <table:table-row table:style-name="ro2">
          <table:table-cell office:value-type="string" calcext:value-type="string">
            <text:p>Expulsion Zone</text:p>
          </table:table-cell>
          <table:table-cell office:value-type="string" calcext:value-type="string">
            <text:p><text:span text:style-name="T1">1/round, when the %FRAME%</text:span> activates or otherwise uses a Shield system during its turn, it may knock all hostile characters of its choice within Sensors back 3 spaces.</text:p>
          </table:table-cell>
        </table:table-row>
        <table:table-row table:style-name="ro2">
          <table:table-cell office:value-type="string" calcext:value-type="string">
            <text:p>Emergency Blinkfields</text:p>
          </table:table-cell>
          <table:table-cell office:value-type="string" calcext:value-type="string">
            <text:p>Whenever the %FRAME% or any allied character within Sensors uses the Brace reaction, that character clears Shredded (or ignores its effects if it can’t be cleared normally) from hostile sources, and attacks they brace against can’t inflict Shredded.</text:p>
          </table:table-cell>
        </table:table-row>
        <table:table-row table:style-name="ro7">
          <table:table-cell office:value-type="string" calcext:value-type="string">
            <text:p>Parallel Projectors</text:p>
          </table:table-cell>
          <table:table-cell office:value-type="string" calcext:value-type="string">
            <text:p> 1/round, when you take the Stabilize action, Bolster quick tech action, or activate or otherwise use a Shield system during your turn, you may grant an allied character within Sensors a benefit based on the overall cost of that action:</text:p>
            <text:p>Free Action</text:p>
            <text:p>    They gain soft cover until the end of their next turn.</text:p>
            <text:p>Quick Action</text:p>
            <text:p>    They ignore engagement, their movement doesn’t provoke reactions, and they may pass through (but not stop in) spaces occupied by obstructions and other characters until the end of their next turn.</text:p>
            <text:p>Full Action</text:p>
            <text:p>    They may clear a condition that wasn’t caused by one of their own systems, talents, etc.</text:p>
            <text:p>You can choose a benefit from a lower action cost if you like, instead (e.g., if you performed a full action, you could choose the quick action or free action options instead).</text:p>
          </table:table-cell>
        </table:table-row>
        <table:table-row table:style-name="ro2">
          <table:table-cell office:value-type="string" calcext:value-type="string">
            <text:p>Reinforced Frame</text:p>
          </table:table-cell>
          <table:table-cell office:value-type="string" calcext:value-type="string">
            <text:p>The %FRAME% has Immunity to Shredded.</text:p>
          </table:table-cell>
        </table:table-row>
        <table:table-row table:style-name="ro2">
          <table:table-cell office:value-type="string" calcext:value-type="string">
            <text:p>Warp Shield</text:p>
          </table:table-cell>
          <table:table-cell office:value-type="string" calcext:value-type="string">
            <text:p>1/round, the %FRAME% can give +1 difficulty to any attack against it or an allied character within Sensors as a reaction before the roll is made.</text:p>
          </table:table-cell>
        </table:table-row>
        <table:table-row table:style-name="ro2">
          <table:table-cell office:value-type="string" calcext:value-type="string">
            <text:p>Superior Reactor</text:p>
          </table:table-cell>
          <table:table-cell office:value-type="string" calcext:value-type="string">
            <text:p>The %FRAME% gains +1 accuracy on Engineering checks and saves.</text:p>
          </table:table-cell>
        </table:table-row>
        <table:table-row table:style-name="ro2">
          <table:table-cell office:value-type="string" calcext:value-type="string">
            <text:p>Mathur Stop</text:p>
          </table:table-cell>
          <table:table-cell office:value-type="string" calcext:value-type="string">
            <text:p>When the %FRAME% clears all heat, you may choose to receive heat equal to half its Heat Cap, putting it in the Danger Zone.</text:p>
          </table:table-cell>
        </table:table-row>
        <table:table-row table:style-name="ro2">
          <table:table-cell office:value-type="string" calcext:value-type="string">
            <text:p>Vent Heat</text:p>
          </table:table-cell>
          <table:table-cell office:value-type="string" calcext:value-type="string">
            <text:p>When you Stabilize the %FRAME% or it exceeds its Heat Cap, it benefits from soft cover until the start of your next turn.</text:p>
          </table:table-cell>
        </table:table-row>
        <table:table-row table:style-name="ro5">
          <table:table-cell office:value-type="string" calcext:value-type="string">
            <text:p>Eterane Construction</text:p>
          </table:table-cell>
          <table:table-cell office:value-type="string" calcext:value-type="string">
            <text:p> When you stabilize, you may choose one of the following in addition to other options:</text:p>
            <text:p>    Reload all loading weapons.</text:p>
            <text:p>    Clear any burn currently affecting your mech.</text:p>
            <text:p>    Clear a condition that wasn’t caused by one of your own systems, talents, etc.</text:p>
            <text:p>    Clear an adjacent allied character’s condition that wasn’t caused by one of their own systems, talents, etc.</text:p>
          </table:table-cell>
        </table:table-row>
        <table:table-row table:style-name="ro2">
          <table:table-cell office:value-type="string" calcext:value-type="string">
            <text:p>Fusilier</text:p>
          </table:table-cell>
          <table:table-cell office:value-type="string" calcext:value-type="string">
            <text:p><text:span text:style-name="T1">When you install a ranged weapon on the %FRAME%</text:span> (or during a full repair), you may change its weapon type to Rifle. Weapons with their type changed in this way gain Overkill.</text:p>
          </table:table-cell>
        </table:table-row>
        <table:table-row table:style-name="ro2">
          <table:table-cell office:value-type="string" calcext:value-type="string">
            <text:p>Rank Discipline</text:p>
          </table:table-cell>
          <table:table-cell office:value-type="string" calcext:value-type="string">
            <text:p>While adjacent to an allied mech, the %FRAME% gains +1 Accuracy on all skill checks and saves.</text:p>
          </table:table-cell>
        </table:table-row>
        <table:table-row table:style-name="ro2">
          <table:table-cell office:value-type="string" calcext:value-type="string">
            <text:p>Tempeste Synchronized Long Scope</text:p>
          </table:table-cell>
          <table:table-cell office:value-type="string" calcext:value-type="string">
            <text:p>You can attack with rifles as though they had Range +5, as long as Lock On is consumed during the attack.</text:p>
          </table:table-cell>
        </table:table-row>
        <table:table-row table:style-name="ro2">
          <table:table-cell office:value-type="string" calcext:value-type="string">
            <text:p>Limit Break</text:p>
          </table:table-cell>
          <table:table-cell office:value-type="string" calcext:value-type="string">
            <text:p>When the %FRAME% is Exposed, its ranged and melee attacks deal +3 energy bonus damage on hit, all of its weapons that would deal kinetic or explosive damage instead deal energy, ranged weapons gain +5 range and melee weapons gain +1 threat.</text:p>
          </table:table-cell>
        </table:table-row>
        <table:table-row table:style-name="ro2">
          <table:table-cell office:value-type="string" calcext:value-type="string">
            <text:p>Plasma Sheath</text:p>
          </table:table-cell>
          <table:table-cell office:value-type="string" calcext:value-type="string">
            <text:p><text:span text:style-name="T1">When the %FRAME%</text:span> is in the Danger Zone and attacks with a weapon that deals any amount of energy, all bonus damage becomes burn.</text:p>
          </table:table-cell>
        </table:table-row>
        <table:table-row table:style-name="ro6">
          <table:table-cell office:value-type="string" calcext:value-type="string">
            <text:p>Primal Fury</text:p>
          </table:table-cell>
          <table:table-cell office:value-type="string" calcext:value-type="string">
            <text:p><text:span text:style-name="T1">When the %FRAME%</text:span> ends its turn in the DANGER ZONE, it rears up, extends its PLASMA TALONS (see below), and enters a state of primal fury with the following effects:</text:p>
            <text:p><text:span text:style-name="T1">    On hit, characters struck by the %FRAME%’s</text:span> PLASMA TALONS immediately become IMMOBILIZED until the end of their next turn.</text:p>
            <text:p><text:span text:style-name="T1">    As a special reaction, the %FRAME% must use its PLASMA TALONS to attack any character (hostile or allied) that enters, exits or moves more than 1 space within its THREAT. This special reaction can be used once a turn, any number of times a round, and doesn’t count against the maximum number of reactions a turn, so the %FRAME%</text:span> can take other reactions normally.</text:p>
            <text:p><text:span text:style-name="T1">This state ends at the start of the %FRAME%’s turn, or if the %FRAME%</text:span> exits the DANGER ZONE.</text:p>
          </table:table-cell>
        </table:table-row>
        <table:table-row table:style-name="ro2">
          <table:table-cell office:value-type="string" calcext:value-type="string">
            <text:p>All Fours</text:p>
          </table:table-cell>
          <table:table-cell office:value-type="string" calcext:value-type="string">
            <text:p><text:span text:style-name="T1">While it’s in the DANGER ZONE, the %FRAME%</text:span> can’t make ranged or tech attacks but has 6 base SPEED.</text:p>
          </table:table-cell>
        </table:table-row>
        <table:table-row table:style-name="ro2">
          <table:table-cell office:value-type="string" calcext:value-type="string">
            <text:p>Brute Strength</text:p>
          </table:table-cell>
          <table:table-cell office:value-type="string" calcext:value-type="string">
            <text:p><text:span text:style-name="T1">The %FRAME%</text:span> gets +1 accuracy on hull checks and saves.</text:p>
          </table:table-cell>
        </table:table-row>
        <table:table-row table:style-name="ro2">
          <table:table-cell office:value-type="string" calcext:value-type="string">
            <text:p>Bloodsense</text:p>
          </table:table-cell>
          <table:table-cell office:value-type="string" calcext:value-type="string">
            <text:p>The %FRAME% always knows if characters are at or under half of their maximum HP, but not the exact number.</text:p>
          </table:table-cell>
        </table:table-row>
        <table:table-row table:style-name="ro2">
          <table:table-cell office:value-type="string" calcext:value-type="string">
            <text:p>Safe Harbor</text:p>
          </table:table-cell>
          <table:table-cell office:value-type="string" calcext:value-type="string">
            <text:p><text:span text:style-name="T1">When allied characters within Range 50 of the %FRAME% teleport or are teleported, free spaces adjacent to the %FRAME%</text:span> are always valid end destinations.</text:p>
          </table:table-cell>
        </table:table-row>
        <table:table-row table:style-name="ro8">
          <table:table-cell office:value-type="string" calcext:value-type="string">
            <text:p>Anchor</text:p>
          </table:table-cell>
          <table:table-cell office:value-type="string" calcext:value-type="string">
            <text:p><text:span text:style-name="T1">The %FRAME%</text:span> has Immunity to involuntary movement caused by other characters.</text:p>
          </table:table-cell>
        </table:table-row>
        <table:table-row table:style-name="ro2">
          <table:table-cell office:value-type="string" calcext:value-type="string">
            <text:p>Slip</text:p>
          </table:table-cell>
          <table:table-cell office:value-type="string" calcext:value-type="string">
            <text:p>1/round, the %FRAME% can teleport 2 spaces as a free action.</text:p>
          </table:table-cell>
        </table:table-row>
      </table:table>
      <table:table table:name="Core Bonuses" table:style-name="ta1">
        <office:forms form:automatic-focus="false" form:apply-design-mode="false"/>
        <table:table-column table:style-name="co21" table:default-cell-style-name="Default"/>
        <table:table-column table:style-name="co22" table:default-cell-style-name="Default"/>
        <table:table-column table:style-name="co23" table:default-cell-style-name="Default"/>
        <table:table-column table:style-name="co8" table:default-cell-style-name="Default"/>
        <table:table-column table:style-name="co24" table:default-cell-style-name="Default"/>
        <table:table-column table:style-name="co25" table:default-cell-style-name="Default"/>
        <table:table-column table:style-name="co26" table:default-cell-style-name="Default"/>
        <table:table-row table:style-name="ro2">
          <table:table-cell office:value-type="string" calcext:value-type="string">
            <text:p>Core Bonus</text:p>
          </table:table-cell>
          <table:table-cell office:value-type="string" calcext:value-type="string">
            <text:p>Manufacturer</text:p>
          </table:table-cell>
          <table:table-cell office:value-type="string" calcext:value-type="string">
            <text:p>Mechanic</text:p>
          </table:table-cell>
          <table:table-cell/>
          <table:table-cell office:value-type="string" calcext:value-type="string">
            <text:p>Effect</text:p>
          </table:table-cell>
          <table:table-cell office:value-type="string" calcext:value-type="string">
            <text:p>Value</text:p>
          </table:table-cell>
          <table:table-cell office:value-type="string" calcext:value-type="string">
            <text:p>Limit</text:p>
          </table:table-cell>
        </table:table-row>
        <table:table-row table:style-name="ro2">
          <table:table-cell office:value-type="string" calcext:value-type="string">
            <text:p>Auto-Stabilizing Hardpoints</text:p>
          </table:table-cell>
          <table:table-cell office:value-type="string" calcext:value-type="string">
            <text:p>GMS</text:p>
          </table:table-cell>
          <table:table-cell office:value-type="string" calcext:value-type="string">
            <text:p>Choose one mount. Weapons attached to this mount gain +1 Accuracy.</text:p>
          </table:table-cell>
          <table:table-cell table:number-columns-repeated="4"/>
        </table:table-row>
        <table:table-row table:style-name="ro2">
          <table:table-cell office:value-type="string" calcext:value-type="string">
            <text:p>Overpower Caliber</text:p>
          </table:table-cell>
          <table:table-cell office:value-type="string" calcext:value-type="string">
            <text:p>GMS</text:p>
          </table:table-cell>
          <table:table-cell office:value-type="string" calcext:value-type="string">
            <text:p>Choose one weapon. 1/round, when you hit with an attack, you can cause it to deal +1d6 bonus damage.</text:p>
          </table:table-cell>
          <table:table-cell table:number-columns-repeated="4"/>
        </table:table-row>
        <table:table-row table:style-name="ro2">
          <table:table-cell office:value-type="string" calcext:value-type="string">
            <text:p>Improved Armament</text:p>
          </table:table-cell>
          <table:table-cell office:value-type="string" calcext:value-type="string">
            <text:p>GMS</text:p>
          </table:table-cell>
          <table:table-cell office:value-type="string" calcext:value-type="string">
            <text:p>If your mech has fewer than three mounts (excluding integrated mounts), it gains an additional Flex mount.</text:p>
          </table:table-cell>
          <table:table-cell/>
          <table:table-cell office:value-type="string" calcext:value-type="string">
            <text:p>Mount-Add</text:p>
          </table:table-cell>
          <table:table-cell office:value-type="string" calcext:value-type="string">
            <text:p>Flex</text:p>
          </table:table-cell>
          <table:table-cell office:value-type="float" office:value="3" calcext:value-type="float">
            <text:p>3</text:p>
          </table:table-cell>
        </table:table-row>
        <table:table-row table:style-name="ro2">
          <table:table-cell office:value-type="string" calcext:value-type="string">
            <text:p>Integrated Weapon</text:p>
          </table:table-cell>
          <table:table-cell office:value-type="string" calcext:value-type="string">
            <text:p>GMS</text:p>
          </table:table-cell>
          <table:table-cell office:value-type="string" calcext:value-type="string">
            <text:p>Your mech gains a new integrated mount with capacity for one Auxiliary weapon. This weapon can be fired 1/round as a free action when you fire any other weapon on your mech. It can’t be modified.</text:p>
          </table:table-cell>
          <table:table-cell/>
          <table:table-cell office:value-type="string" calcext:value-type="string">
            <text:p>Mount-Add</text:p>
          </table:table-cell>
          <table:table-cell office:value-type="string" calcext:value-type="string">
            <text:p>Integrated</text:p>
          </table:table-cell>
          <table:table-cell/>
        </table:table-row>
        <table:table-row table:style-name="ro2">
          <table:table-cell office:value-type="string" calcext:value-type="string">
            <text:p>Mount Retrofitting</text:p>
          </table:table-cell>
          <table:table-cell office:value-type="string" calcext:value-type="string">
            <text:p>GMS</text:p>
          </table:table-cell>
          <table:table-cell office:value-type="string" calcext:value-type="string">
            <text:p>Replace one mount with a Main/Aux mount.</text:p>
          </table:table-cell>
          <table:table-cell/>
          <table:table-cell office:value-type="string" calcext:value-type="string">
            <text:p>Mount-Replace</text:p>
          </table:table-cell>
          <table:table-cell office:value-type="string" calcext:value-type="string">
            <text:p>Main/Aux</text:p>
          </table:table-cell>
          <table:table-cell/>
        </table:table-row>
        <table:table-row table:style-name="ro2">
          <table:table-cell office:value-type="string" calcext:value-type="string">
            <text:p>Universal Compatibility</text:p>
          </table:table-cell>
          <table:table-cell office:value-type="string" calcext:value-type="string">
            <text:p>GMS</text:p>
          </table:table-cell>
          <table:table-cell office:value-type="string" calcext:value-type="string">
            <text:p>Any time you spend CP to activate a Core System, you may also take a free action to restore all HP, cool all Heat, and roll 1d20: on 20, regain 1 CP.</text:p>
          </table:table-cell>
          <table:table-cell table:number-columns-repeated="4"/>
        </table:table-row>
        <table:table-row table:style-name="ro2">
          <table:table-cell office:value-type="string" calcext:value-type="string">
            <text:p>Superheavy Mounting</text:p>
          </table:table-cell>
          <table:table-cell office:value-type="string" calcext:value-type="string">
            <text:p>GMS</text:p>
          </table:table-cell>
          <table:table-cell office:value-type="string" calcext:value-type="string">
            <text:p>If your mech has fewer than 3 mounts (excluding integrated mounts) it gains an additional superheavy mount. It can only take SUPERHEAVY WEAPONS. They still require an additional mount to be installed. If your mech also has a heavy mount the SUPERHEAVY WEAPON must use that mount as the additional mount.</text:p>
          </table:table-cell>
          <table:table-cell/>
          <table:table-cell office:value-type="string" calcext:value-type="string">
            <text:p>Mount-Add</text:p>
          </table:table-cell>
          <table:table-cell office:value-type="string" calcext:value-type="string">
            <text:p>Superheavy</text:p>
          </table:table-cell>
          <table:table-cell office:value-type="float" office:value="3" calcext:value-type="float">
            <text:p>3</text:p>
          </table:table-cell>
        </table:table-row>
        <table:table-row table:style-name="ro2">
          <table:table-cell office:value-type="string" calcext:value-type="string">
            <text:p>Briareos Frame</text:p>
          </table:table-cell>
          <table:table-cell office:value-type="string" calcext:value-type="string">
            <text:p>IPS-N</text:p>
          </table:table-cell>
          <table:table-cell office:value-type="string" calcext:value-type="string">
            <text:p>As long as your mech has no more than 1 Structure, you gain Resistance to all damage. When it’s reduced to 0 HP and 0 Structure, it is not destroyed: instead, you must make a structure damage check each time it takes damage. While in this state, your mech cannot regain HP until you rest or perform a Full Repair, at which point your mech can be repaired normally.</text:p>
          </table:table-cell>
          <table:table-cell table:number-columns-repeated="4"/>
        </table:table-row>
        <table:table-row table:style-name="ro2">
          <table:table-cell office:value-type="string" calcext:value-type="string">
            <text:p>Fomorian Frame</text:p>
          </table:table-cell>
          <table:table-cell office:value-type="string" calcext:value-type="string">
            <text:p>IPS-N</text:p>
          </table:table-cell>
          <table:table-cell office:value-type="string" calcext:value-type="string">
            <text:p>Increase your mech’s Size by one increment (e.g., from 1/2 to 1, 1 to 2, or 2 to 3) up to a maximum of 3 Size. You can’t be knocked Prone, pulled, or knocked back by smaller characters, regardless of what system or weapon causes the effect.</text:p>
          </table:table-cell>
          <table:table-cell/>
          <table:table-cell office:value-type="string" calcext:value-type="string">
            <text:p>Size-Bonus</text:p>
          </table:table-cell>
          <table:table-cell office:value-type="float" office:value="1" calcext:value-type="float">
            <text:p>1</text:p>
          </table:table-cell>
          <table:table-cell/>
        </table:table-row>
        <table:table-row table:style-name="ro2">
          <table:table-cell office:value-type="string" calcext:value-type="string">
            <text:p>Gyges Frame</text:p>
          </table:table-cell>
          <table:table-cell office:value-type="string" calcext:value-type="string">
            <text:p>IPS-N</text:p>
          </table:table-cell>
          <table:table-cell office:value-type="string" calcext:value-type="string">
            <text:p>You gain +1 Accuracy on all Hull checks and saves and +1 Threat with all melee weapons.</text:p>
          </table:table-cell>
          <table:table-cell table:number-columns-repeated="4"/>
        </table:table-row>
        <table:table-row table:style-name="ro2">
          <table:table-cell office:value-type="string" calcext:value-type="string">
            <text:p>Reinforced Frame</text:p>
          </table:table-cell>
          <table:table-cell office:value-type="string" calcext:value-type="string">
            <text:p>IPS-N</text:p>
          </table:table-cell>
          <table:table-cell office:value-type="string" calcext:value-type="string">
            <text:p>You gain +5 HP.</text:p>
          </table:table-cell>
          <table:table-cell/>
          <table:table-cell office:value-type="string" calcext:value-type="string">
            <text:p>HP-Bonus</text:p>
          </table:table-cell>
          <table:table-cell office:value-type="float" office:value="5" calcext:value-type="float">
            <text:p>5</text:p>
          </table:table-cell>
          <table:table-cell/>
        </table:table-row>
        <table:table-row table:style-name="ro2">
          <table:table-cell office:value-type="string" calcext:value-type="string">
            <text:p>Sloped Plating</text:p>
          </table:table-cell>
          <table:table-cell office:value-type="string" calcext:value-type="string">
            <text:p>IPS-N</text:p>
          </table:table-cell>
          <table:table-cell office:value-type="string" calcext:value-type="string">
            <text:p>You gain +1 Armor, up to the maximum (+4).</text:p>
          </table:table-cell>
          <table:table-cell/>
          <table:table-cell office:value-type="string" calcext:value-type="string">
            <text:p>Armor-Bonus</text:p>
          </table:table-cell>
          <table:table-cell office:value-type="float" office:value="1" calcext:value-type="float">
            <text:p>1</text:p>
          </table:table-cell>
          <table:table-cell office:value-type="float" office:value="4" calcext:value-type="float">
            <text:p>4</text:p>
          </table:table-cell>
        </table:table-row>
        <table:table-row table:style-name="ro2">
          <table:table-cell office:value-type="string" calcext:value-type="string">
            <text:p>Titanomachy Mesh</text:p>
          </table:table-cell>
          <table:table-cell office:value-type="string" calcext:value-type="string">
            <text:p>IPS-N</text:p>
          </table:table-cell>
          <table:table-cell office:value-type="string" calcext:value-type="string">
            <text:p>1/round, when you successfully Ram or Grapple a mech, you can Ram or Grapple again as a free action. Additionally, when you knock targets back with melee attacks, you knock them back 1 additional space.</text:p>
          </table:table-cell>
          <table:table-cell table:number-columns-repeated="4"/>
        </table:table-row>
        <table:table-row table:style-name="ro2">
          <table:table-cell office:value-type="string" calcext:value-type="string">
            <text:p>All-Theater Movement Suite</text:p>
          </table:table-cell>
          <table:table-cell office:value-type="string" calcext:value-type="string">
            <text:p>SSC</text:p>
          </table:table-cell>
          <table:table-cell office:value-type="string" calcext:value-type="string">
            <text:p>You may choose to count any and all of your movement as flying; however, you take 1 Heat at the end of each of your turns in which you fly this way.</text:p>
          </table:table-cell>
          <table:table-cell table:number-columns-repeated="4"/>
        </table:table-row>
        <table:table-row table:style-name="ro2">
          <table:table-cell office:value-type="string" calcext:value-type="string">
            <text:p>Full Subjectivity Sync</text:p>
          </table:table-cell>
          <table:table-cell office:value-type="string" calcext:value-type="string">
            <text:p>SSC</text:p>
          </table:table-cell>
          <table:table-cell office:value-type="string" calcext:value-type="string">
            <text:p>You gain +2 Evasion.</text:p>
          </table:table-cell>
          <table:table-cell/>
          <table:table-cell office:value-type="string" calcext:value-type="string">
            <text:p>Evasion-Bonus</text:p>
          </table:table-cell>
          <table:table-cell office:value-type="float" office:value="2" calcext:value-type="float">
            <text:p>2</text:p>
          </table:table-cell>
          <table:table-cell/>
        </table:table-row>
        <table:table-row table:style-name="ro2">
          <table:table-cell office:value-type="string" calcext:value-type="string">
            <text:p>Ghostweave</text:p>
          </table:table-cell>
          <table:table-cell office:value-type="string" calcext:value-type="string">
            <text:p>SSC</text:p>
          </table:table-cell>
          <table:table-cell office:value-type="string" calcext:value-type="string">
            <text:p>During your turn, you are Invisible. If you take no actions on your turn other than your standard move, Hide, and Boost, you remain Invisible until the start of your next turn. You immediately cease to be Invisible when you take a reaction.</text:p>
          </table:table-cell>
          <table:table-cell table:number-columns-repeated="4"/>
        </table:table-row>
        <table:table-row table:style-name="ro2">
          <table:table-cell office:value-type="string" calcext:value-type="string">
            <text:p>Integrated Nerveweave</text:p>
          </table:table-cell>
          <table:table-cell office:value-type="string" calcext:value-type="string">
            <text:p>SSC</text:p>
          </table:table-cell>
          <table:table-cell office:value-type="string" calcext:value-type="string">
            <text:p>You may move an additional 2 spaces when you Boost.</text:p>
          </table:table-cell>
          <table:table-cell table:number-columns-repeated="4"/>
        </table:table-row>
        <table:table-row table:style-name="ro2">
          <table:table-cell office:value-type="string" calcext:value-type="string">
            <text:p>Kai Bioplating</text:p>
          </table:table-cell>
          <table:table-cell office:value-type="string" calcext:value-type="string">
            <text:p>SSC</text:p>
          </table:table-cell>
          <table:table-cell office:value-type="string" calcext:value-type="string">
            <text:p>You gain +1 Accuracy on all Agility checks and saves; additionally, you climb and swim at normal speed, ignore difficult terrain, and when making a standard move, can jump horizontally up to your full Speed and upwards up to half your Speed (in any combination).</text:p>
          </table:table-cell>
          <table:table-cell table:number-columns-repeated="4"/>
        </table:table-row>
        <table:table-row table:style-name="ro2">
          <table:table-cell office:value-type="string" calcext:value-type="string">
            <text:p>Neurolink Targeting</text:p>
          </table:table-cell>
          <table:table-cell office:value-type="string" calcext:value-type="string">
            <text:p>SSC</text:p>
          </table:table-cell>
          <table:table-cell office:value-type="string" calcext:value-type="string">
            <text:p>Your ranged weapons gain +3 Range.</text:p>
          </table:table-cell>
          <table:table-cell table:number-columns-repeated="4"/>
        </table:table-row>
        <table:table-row table:style-name="ro2">
          <table:table-cell office:value-type="string" calcext:value-type="string">
            <text:p>The Lesson of Disbelief</text:p>
          </table:table-cell>
          <table:table-cell office:value-type="string" calcext:value-type="string">
            <text:p>HORUS</text:p>
          </table:table-cell>
          <table:table-cell office:value-type="string" calcext:value-type="string">
            <text:p>You gain +1 accuracy on Systems checks and saves, and +2 E-Defense.</text:p>
          </table:table-cell>
          <table:table-cell/>
          <table:table-cell office:value-type="string" calcext:value-type="string">
            <text:p>E-Def-Bonus</text:p>
          </table:table-cell>
          <table:table-cell office:value-type="float" office:value="2" calcext:value-type="float">
            <text:p>2</text:p>
          </table:table-cell>
          <table:table-cell/>
        </table:table-row>
        <table:table-row table:style-name="ro2">
          <table:table-cell office:value-type="string" calcext:value-type="string">
            <text:p>The Lesson of the Open Door</text:p>
          </table:table-cell>
          <table:table-cell office:value-type="string" calcext:value-type="string">
            <text:p>HORUS</text:p>
          </table:table-cell>
          <table:table-cell office:value-type="string" calcext:value-type="string">
            <text:p>Your Save Target increases by +2; additionally, 1/round, when a character fails a save against you, they take 2 heat.</text:p>
          </table:table-cell>
          <table:table-cell/>
          <table:table-cell office:value-type="string" calcext:value-type="string">
            <text:p>Save-Tgt-Bonus</text:p>
          </table:table-cell>
          <table:table-cell office:value-type="float" office:value="2" calcext:value-type="float">
            <text:p>2</text:p>
          </table:table-cell>
          <table:table-cell/>
        </table:table-row>
        <table:table-row table:style-name="ro2">
          <table:table-cell office:value-type="string" calcext:value-type="string">
            <text:p>The Lesson of the Held Image</text:p>
          </table:table-cell>
          <table:table-cell office:value-type="string" calcext:value-type="string">
            <text:p>HORUS</text:p>
          </table:table-cell>
          <table:table-cell office:value-type="string" calcext:value-type="string">
            <text:p>1/round, as a reaction at the start of any allied character’s turn, you may make a Lock On tech action against any character within line of sight and Sensors.</text:p>
          </table:table-cell>
          <table:table-cell table:number-columns-repeated="4"/>
        </table:table-row>
        <table:table-row table:style-name="ro2">
          <table:table-cell office:value-type="string" calcext:value-type="string">
            <text:p>The Lesson of Thinking-Tomorrow’s-Thought</text:p>
          </table:table-cell>
          <table:table-cell office:value-type="string" calcext:value-type="string">
            <text:p>HORUS</text:p>
          </table:table-cell>
          <table:table-cell office:value-type="string" calcext:value-type="string">
            <text:p>When you hit with a tech attack, your next melee attack against the same target gains +1 accuracy, and its damage can’t be reduced in any way.</text:p>
          </table:table-cell>
          <table:table-cell table:number-columns-repeated="4"/>
        </table:table-row>
        <table:table-row table:style-name="ro2">
          <table:table-cell office:value-type="string" calcext:value-type="string">
            <text:p>The Lesson of Transubstantiation</text:p>
          </table:table-cell>
          <table:table-cell office:value-type="string" calcext:value-type="string">
            <text:p>HORUS</text:p>
          </table:table-cell>
          <table:table-cell office:value-type="string" calcext:value-type="string">
            <text:p>Any time you take structure damage, you disappear into a non-space and cease to be a valid target. You reappear in the same space at the start of your next turn. If that space is occupied, you reappear in the nearest available free space (chosen by you).</text:p>
          </table:table-cell>
          <table:table-cell table:number-columns-repeated="4"/>
        </table:table-row>
        <table:table-row table:style-name="ro2">
          <table:table-cell office:value-type="string" calcext:value-type="string">
            <text:p>The Lesson of Shaping</text:p>
          </table:table-cell>
          <table:table-cell office:value-type="string" calcext:value-type="string">
            <text:p>HORUS</text:p>
          </table:table-cell>
          <table:table-cell office:value-type="string" calcext:value-type="string">
            <text:p>You may install an additional AI in your mech. If one enters cascade (or becomes unshackled narratively), the other prevents it from taking control of your mech. You only lose control of your mech if both AI-tagged systems or equipment enter cascade.</text:p>
          </table:table-cell>
          <table:table-cell/>
          <table:table-cell office:value-type="string" calcext:value-type="string">
            <text:p>AI-Cap-Bonus</text:p>
          </table:table-cell>
          <table:table-cell office:value-type="float" office:value="1" calcext:value-type="float">
            <text:p>1</text:p>
          </table:table-cell>
          <table:table-cell/>
        </table:table-row>
        <table:table-row table:style-name="ro2">
          <table:table-cell office:value-type="string" calcext:value-type="string">
            <text:p>Adaptive Reactor</text:p>
          </table:table-cell>
          <table:table-cell office:value-type="string" calcext:value-type="string">
            <text:p>HA</text:p>
          </table:table-cell>
          <table:table-cell office:value-type="string" calcext:value-type="string">
            <text:p>When you Stabilize and choose to cool your mech, you may spend 2 Repairs to clear 1 stress damage.</text:p>
          </table:table-cell>
          <table:table-cell table:number-columns-repeated="4"/>
        </table:table-row>
        <table:table-row table:style-name="ro2">
          <table:table-cell office:value-type="string" calcext:value-type="string">
            <text:p>Armory-Sculpted Chassis</text:p>
          </table:table-cell>
          <table:table-cell office:value-type="string" calcext:value-type="string">
            <text:p>HA</text:p>
          </table:table-cell>
          <table:table-cell office:value-type="string" calcext:value-type="string">
            <text:p>You gain +1 accuracy on all Engineering checks and saves. When you Overcharge, you gain soft cover until the start of your next turn.</text:p>
          </table:table-cell>
          <table:table-cell table:number-columns-repeated="4"/>
        </table:table-row>
        <table:table-row table:style-name="ro2">
          <table:table-cell office:value-type="string" calcext:value-type="string">
            <text:p>Heatfall Coolant System</text:p>
          </table:table-cell>
          <table:table-cell office:value-type="string" calcext:value-type="string">
            <text:p>HA</text:p>
          </table:table-cell>
          <table:table-cell office:value-type="string" calcext:value-type="string">
            <text:p>Your cost for Overcharge never goes past 1d6 heat.</text:p>
          </table:table-cell>
          <table:table-cell table:number-columns-repeated="4"/>
        </table:table-row>
        <table:table-row table:style-name="ro2">
          <table:table-cell office:value-type="string" calcext:value-type="string">
            <text:p>Integrated Ammo Feeds</text:p>
          </table:table-cell>
          <table:table-cell office:value-type="string" calcext:value-type="string">
            <text:p>HA</text:p>
          </table:table-cell>
          <table:table-cell office:value-type="string" calcext:value-type="string">
            <text:p>All Limited systems and weapons gain an additional two charges.</text:p>
          </table:table-cell>
          <table:table-cell/>
          <table:table-cell office:value-type="string" calcext:value-type="string">
            <text:p>Limited-Bonus</text:p>
          </table:table-cell>
          <table:table-cell office:value-type="float" office:value="2" calcext:value-type="float">
            <text:p>2</text:p>
          </table:table-cell>
          <table:table-cell/>
        </table:table-row>
        <table:table-row table:style-name="ro2">
          <table:table-cell office:value-type="string" calcext:value-type="string">
            <text:p>Stasis Shielding</text:p>
          </table:table-cell>
          <table:table-cell office:value-type="string" calcext:value-type="string">
            <text:p>HA</text:p>
          </table:table-cell>
          <table:table-cell office:value-type="string" calcext:value-type="string">
            <text:p>Whenever you take stress damage, you gain Resistance to all damage until the start of your next turn.</text:p>
          </table:table-cell>
          <table:table-cell table:number-columns-repeated="4"/>
        </table:table-row>
        <table:table-row table:style-name="ro2">
          <table:table-cell office:value-type="string" calcext:value-type="string">
            <text:p>Superior By Design</text:p>
          </table:table-cell>
          <table:table-cell office:value-type="string" calcext:value-type="string">
            <text:p>HA</text:p>
          </table:table-cell>
          <table:table-cell office:value-type="string" calcext:value-type="string">
            <text:p>You gain Immunity to Impaired and gain +2 Heat Cap.</text:p>
          </table:table-cell>
          <table:table-cell/>
          <table:table-cell office:value-type="string" calcext:value-type="string">
            <text:p>Heat-Cap-Bonus</text:p>
          </table:table-cell>
          <table:table-cell office:value-type="float" office:value="2" calcext:value-type="float">
            <text:p>2</text:p>
          </table:table-cell>
          <table:table-cell/>
        </table:table-row>
      </table:table>
      <table:table table:name="Weapons" table:style-name="ta1">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ce98"/>
        <table:table-column table:style-name="co8" table:default-cell-style-name="Default"/>
        <table:table-row table:style-name="ro2">
          <table:table-cell office:value-type="string" calcext:value-type="string">
            <text:p>Weapon</text:p>
          </table:table-cell>
          <table:table-cell office:value-type="string" calcext:value-type="string">
            <text:p>License</text:p>
          </table:table-cell>
          <table:table-cell office:value-type="string" calcext:value-type="string">
            <text:p>Frame</text:p>
          </table:table-cell>
          <table:table-cell office:value-type="string" calcext:value-type="string">
            <text:p>Talent</text:p>
          </table:table-cell>
          <table:table-cell office:value-type="string" calcext:value-type="string">
            <text:p>Mount</text:p>
          </table:table-cell>
          <table:table-cell office:value-type="string" calcext:value-type="string">
            <text:p>Type</text:p>
          </table:table-cell>
          <table:table-cell table:style-name="ce48" office:value-type="string" calcext:value-type="string">
            <text:p>Limited</text:p>
          </table:table-cell>
          <table:table-cell office:value-type="string" calcext:value-type="string">
            <text:p>SP</text:p>
          </table:table-cell>
        </table:table-row>
        <table:table-row table:style-name="ro2">
          <table:table-cell office:value-type="string" calcext:value-type="string">
            <text:p>Fuel Rod Gun</text:p>
          </table:table-cell>
          <table:table-cell table:number-columns-repeated="2"/>
          <table:table-cell office:value-type="string" calcext:value-type="string">
            <text:p>Nuclear Cavalier III</text:p>
          </table:table-cell>
          <table:table-cell office:value-type="string" calcext:value-type="string">
            <text:p>Integrated</text:p>
          </table:table-cell>
          <table:table-cell office:value-type="string" calcext:value-type="string">
            <text:p>CQB</text:p>
          </table:table-cell>
          <table:table-cell office:value-type="float" office:value="3" calcext:value-type="float">
            <text:p>3</text:p>
          </table:table-cell>
          <table:table-cell/>
        </table:table-row>
        <table:table-row table:style-name="ro2">
          <table:table-cell office:value-type="string" calcext:value-type="string">
            <text:p>Prototype Weapon I</text:p>
          </table:table-cell>
          <table:table-cell table:number-columns-repeated="2"/>
          <table:table-cell office:value-type="string" calcext:value-type="string">
            <text:p>Engineer I</text:p>
          </table:table-cell>
          <table:table-cell office:value-type="string" calcext:value-type="string">
            <text:p>Integrated</text:p>
          </table:table-cell>
          <table:table-cell office:value-type="string" calcext:value-type="string">
            <text:p>Special</text:p>
          </table:table-cell>
          <table:table-cell office:value-type="string" calcext:value-type="string">
            <text:p>1d6+2</text:p>
          </table:table-cell>
          <table:table-cell/>
        </table:table-row>
        <table:table-row table:style-name="ro2">
          <table:table-cell office:value-type="string" calcext:value-type="string">
            <text:p>Prototype Weapon II</text:p>
          </table:table-cell>
          <table:table-cell table:number-columns-repeated="2"/>
          <table:table-cell office:value-type="string" calcext:value-type="string">
            <text:p>Engineer II</text:p>
          </table:table-cell>
          <table:table-cell office:value-type="string" calcext:value-type="string">
            <text:p>Integrated</text:p>
          </table:table-cell>
          <table:table-cell office:value-type="string" calcext:value-type="string">
            <text:p>Special</text:p>
          </table:table-cell>
          <table:table-cell office:value-type="string" calcext:value-type="string">
            <text:p>1d6+2</text:p>
          </table:table-cell>
          <table:table-cell/>
        </table:table-row>
        <table:table-row table:style-name="ro2">
          <table:table-cell office:value-type="string" calcext:value-type="string">
            <text:p>Prototype Weapon III</text:p>
          </table:table-cell>
          <table:table-cell table:number-columns-repeated="2"/>
          <table:table-cell office:value-type="string" calcext:value-type="string">
            <text:p>Engineer III</text:p>
          </table:table-cell>
          <table:table-cell office:value-type="string" calcext:value-type="string">
            <text:p>Integrated</text:p>
          </table:table-cell>
          <table:table-cell office:value-type="string" calcext:value-type="string">
            <text:p>Special</text:p>
          </table:table-cell>
          <table:table-cell office:value-type="string" calcext:value-type="string">
            <text:p>2d6</text:p>
          </table:table-cell>
          <table:table-cell/>
        </table:table-row>
        <table:table-row table:style-name="ro2">
          <table:table-cell office:value-type="string" calcext:value-type="string">
            <text:p>Apocalypse Rail</text:p>
          </table:table-cell>
          <table:table-cell/>
          <table:table-cell office:value-type="string" calcext:value-type="string">
            <text:p>Barbarossa</text:p>
          </table:table-cell>
          <table:table-cell/>
          <table:table-cell office:value-type="string" calcext:value-type="string">
            <text:p>Integrated</text:p>
          </table:table-cell>
          <table:table-cell table:number-columns-repeated="3"/>
        </table:table-row>
        <table:table-row table:style-name="ro2">
          <table:table-cell office:value-type="string" calcext:value-type="string">
            <text:p>HHS-075 “Flayer” Shotgun</text:p>
          </table:table-cell>
          <table:table-cell/>
          <table:table-cell office:value-type="string" calcext:value-type="string">
            <text:p>Caliban</text:p>
          </table:table-cell>
          <table:table-cell/>
          <table:table-cell office:value-type="string" calcext:value-type="string">
            <text:p>Integrated</text:p>
          </table:table-cell>
          <table:table-cell office:value-type="string" calcext:value-type="string">
            <text:p>CQB</text:p>
          </table:table-cell>
          <table:table-cell table:number-columns-repeated="2"/>
        </table:table-row>
        <table:table-row table:style-name="ro2">
          <table:table-cell office:value-type="string" calcext:value-type="string">
            <text:p>Latch Drone</text:p>
          </table:table-cell>
          <table:table-cell/>
          <table:table-cell office:value-type="string" calcext:value-type="string">
            <text:p>Lancaster</text:p>
          </table:table-cell>
          <table:table-cell/>
          <table:table-cell office:value-type="string" calcext:value-type="string">
            <text:p>Integrated</text:p>
          </table:table-cell>
          <table:table-cell office:value-type="string" calcext:value-type="string">
            <text:p>Launcher</text:p>
          </table:table-cell>
          <table:table-cell table:number-columns-repeated="2"/>
        </table:table-row>
        <table:table-row table:style-name="ro2">
          <table:table-cell office:value-type="string" calcext:value-type="string">
            <text:p>M35 Mjolnir</text:p>
          </table:table-cell>
          <table:table-cell/>
          <table:table-cell office:value-type="string" calcext:value-type="string">
            <text:p>Raleigh</text:p>
          </table:table-cell>
          <table:table-cell/>
          <table:table-cell office:value-type="string" calcext:value-type="string">
            <text:p>Integrated</text:p>
          </table:table-cell>
          <table:table-cell office:value-type="string" calcext:value-type="string">
            <text:p>CQB</text:p>
          </table:table-cell>
          <table:table-cell table:number-columns-repeated="2"/>
        </table:table-row>
        <table:table-row table:style-name="ro2">
          <table:table-cell office:value-type="string" calcext:value-type="string">
            <text:p>Marathon Arc Bow</text:p>
          </table:table-cell>
          <table:table-cell/>
          <table:table-cell office:value-type="string" calcext:value-type="string">
            <text:p>Emperor</text:p>
          </table:table-cell>
          <table:table-cell/>
          <table:table-cell office:value-type="string" calcext:value-type="string">
            <text:p>Integrated</text:p>
          </table:table-cell>
          <table:table-cell office:value-type="string" calcext:value-type="string">
            <text:p>Launcher</text:p>
          </table:table-cell>
          <table:table-cell table:number-columns-repeated="2"/>
        </table:table-row>
        <table:table-row table:style-name="ro2">
          <table:table-cell office:value-type="string" calcext:value-type="string">
            <text:p>Plasma Talons</text:p>
          </table:table-cell>
          <table:table-cell/>
          <table:table-cell office:value-type="string" calcext:value-type="string">
            <text:p>Enkidu</text:p>
          </table:table-cell>
          <table:table-cell/>
          <table:table-cell office:value-type="string" calcext:value-type="string">
            <text:p>Integrated</text:p>
          </table:table-cell>
          <table:table-cell office:value-type="string" calcext:value-type="string">
            <text:p>Melee</text:p>
          </table:table-cell>
          <table:table-cell table:number-columns-repeated="2"/>
        </table:table-row>
        <table:table-row table:style-name="ro2">
          <table:table-cell office:value-type="string" calcext:value-type="string">
            <text:p>ZF4 SOLIDCORE</text:p>
          </table:table-cell>
          <table:table-cell/>
          <table:table-cell office:value-type="string" calcext:value-type="string">
            <text:p>Sherman</text:p>
          </table:table-cell>
          <table:table-cell/>
          <table:table-cell office:value-type="string" calcext:value-type="string">
            <text:p>Integrated</text:p>
          </table:table-cell>
          <table:table-cell office:value-type="string" calcext:value-type="string">
            <text:p>Cannon</text:p>
          </table:table-cell>
          <table:table-cell table:number-columns-repeated="2"/>
        </table:table-row>
        <table:table-row table:style-name="ro2">
          <table:table-cell office:value-type="string" calcext:value-type="string">
            <text:p>Anti-Materiel Rifle</text:p>
          </table:table-cell>
          <table:table-cell table:number-columns-repeated="3"/>
          <table:table-cell office:value-type="string" calcext:value-type="string">
            <text:p>Heavy</text:p>
          </table:table-cell>
          <table:table-cell office:value-type="string" calcext:value-type="string">
            <text:p>Rifle</text:p>
          </table:table-cell>
          <table:table-cell table:number-columns-repeated="2"/>
        </table:table-row>
        <table:table-row table:style-name="ro2">
          <table:table-cell office:value-type="string" calcext:value-type="string">
            <text:p>Assault Rifle</text:p>
          </table:table-cell>
          <table:table-cell table:number-columns-repeated="3"/>
          <table:table-cell office:value-type="string" calcext:value-type="string">
            <text:p>Main</text:p>
          </table:table-cell>
          <table:table-cell office:value-type="string" calcext:value-type="string">
            <text:p>Rifle</text:p>
          </table:table-cell>
          <table:table-cell table:number-columns-repeated="2"/>
        </table:table-row>
        <table:table-row table:style-name="ro2">
          <table:table-cell office:value-type="string" calcext:value-type="string">
            <text:p>Charged Blade</text:p>
          </table:table-cell>
          <table:table-cell table:number-columns-repeated="3"/>
          <table:table-cell office:value-type="string" calcext:value-type="string">
            <text:p>Main</text:p>
          </table:table-cell>
          <table:table-cell office:value-type="string" calcext:value-type="string">
            <text:p>Melee</text:p>
          </table:table-cell>
          <table:table-cell table:number-columns-repeated="2"/>
        </table:table-row>
        <table:table-row table:style-name="ro2">
          <table:table-cell office:value-type="string" calcext:value-type="string">
            <text:p>Cyclone Pulse Rifle</text:p>
          </table:table-cell>
          <table:table-cell table:number-columns-repeated="3"/>
          <table:table-cell office:value-type="string" calcext:value-type="string">
            <text:p>Superheavy</text:p>
          </table:table-cell>
          <table:table-cell office:value-type="string" calcext:value-type="string">
            <text:p>Rifle</text:p>
          </table:table-cell>
          <table:table-cell table:number-columns-repeated="2"/>
        </table:table-row>
        <table:table-row table:style-name="ro2">
          <table:table-cell office:value-type="string" calcext:value-type="string">
            <text:p>Heavy Charged Blade</text:p>
          </table:table-cell>
          <table:table-cell table:number-columns-repeated="3"/>
          <table:table-cell office:value-type="string" calcext:value-type="string">
            <text:p>Heavy</text:p>
          </table:table-cell>
          <table:table-cell office:value-type="string" calcext:value-type="string">
            <text:p>Melee</text:p>
          </table:table-cell>
          <table:table-cell table:number-columns-repeated="2"/>
        </table:table-row>
        <table:table-row table:style-name="ro2">
          <table:table-cell office:value-type="string" calcext:value-type="string">
            <text:p>Heavy Machine Gun</text:p>
          </table:table-cell>
          <table:table-cell table:number-columns-repeated="3"/>
          <table:table-cell office:value-type="string" calcext:value-type="string">
            <text:p>Heavy</text:p>
          </table:table-cell>
          <table:table-cell office:value-type="string" calcext:value-type="string">
            <text:p>Cannon</text:p>
          </table:table-cell>
          <table:table-cell table:number-columns-repeated="2"/>
        </table:table-row>
        <table:table-row table:style-name="ro2">
          <table:table-cell office:value-type="string" calcext:value-type="string">
            <text:p>Heavy Melee Weapon</text:p>
          </table:table-cell>
          <table:table-cell table:number-columns-repeated="3"/>
          <table:table-cell office:value-type="string" calcext:value-type="string">
            <text:p>Heavy</text:p>
          </table:table-cell>
          <table:table-cell office:value-type="string" calcext:value-type="string">
            <text:p>Melee</text:p>
          </table:table-cell>
          <table:table-cell table:number-columns-repeated="2"/>
        </table:table-row>
        <table:table-row table:style-name="ro2">
          <table:table-cell office:value-type="string" calcext:value-type="string">
            <text:p>Howitzer</text:p>
          </table:table-cell>
          <table:table-cell table:number-columns-repeated="3"/>
          <table:table-cell office:value-type="string" calcext:value-type="string">
            <text:p>Heavy</text:p>
          </table:table-cell>
          <table:table-cell office:value-type="string" calcext:value-type="string">
            <text:p>Cannon</text:p>
          </table:table-cell>
          <table:table-cell table:number-columns-repeated="2"/>
        </table:table-row>
        <table:table-row table:style-name="ro2">
          <table:table-cell office:value-type="string" calcext:value-type="string">
            <text:p>Hurricane Cluster Projector</text:p>
          </table:table-cell>
          <table:table-cell table:number-columns-repeated="3"/>
          <table:table-cell office:value-type="string" calcext:value-type="string">
            <text:p>Superheavy</text:p>
          </table:table-cell>
          <table:table-cell office:value-type="string" calcext:value-type="string">
            <text:p>Cannon</text:p>
          </table:table-cell>
          <table:table-cell table:number-columns-repeated="2"/>
        </table:table-row>
        <table:table-row table:style-name="ro2">
          <table:table-cell office:value-type="string" calcext:value-type="string">
            <text:p>Missile Rack</text:p>
          </table:table-cell>
          <table:table-cell table:number-columns-repeated="3"/>
          <table:table-cell office:value-type="string" calcext:value-type="string">
            <text:p>Auxiliary</text:p>
          </table:table-cell>
          <table:table-cell office:value-type="string" calcext:value-type="string">
            <text:p>Launcher</text:p>
          </table:table-cell>
          <table:table-cell table:number-columns-repeated="2"/>
        </table:table-row>
        <table:table-row table:style-name="ro2">
          <table:table-cell office:value-type="string" calcext:value-type="string">
            <text:p>Mortar</text:p>
          </table:table-cell>
          <table:table-cell table:number-columns-repeated="3"/>
          <table:table-cell office:value-type="string" calcext:value-type="string">
            <text:p>Main</text:p>
          </table:table-cell>
          <table:table-cell office:value-type="string" calcext:value-type="string">
            <text:p>Cannon</text:p>
          </table:table-cell>
          <table:table-cell table:number-columns-repeated="2"/>
        </table:table-row>
        <table:table-row table:style-name="ro2">
          <table:table-cell office:value-type="string" calcext:value-type="string">
            <text:p>Nexus (Hunter-Killer)</text:p>
          </table:table-cell>
          <table:table-cell table:number-columns-repeated="3"/>
          <table:table-cell office:value-type="string" calcext:value-type="string">
            <text:p>Main</text:p>
          </table:table-cell>
          <table:table-cell office:value-type="string" calcext:value-type="string">
            <text:p>Nexus</text:p>
          </table:table-cell>
          <table:table-cell table:number-columns-repeated="2"/>
        </table:table-row>
        <table:table-row table:style-name="ro2">
          <table:table-cell office:value-type="string" calcext:value-type="string">
            <text:p>Nexus (Light)</text:p>
          </table:table-cell>
          <table:table-cell table:number-columns-repeated="3"/>
          <table:table-cell office:value-type="string" calcext:value-type="string">
            <text:p>Auxiliary</text:p>
          </table:table-cell>
          <table:table-cell office:value-type="string" calcext:value-type="string">
            <text:p>Nexus</text:p>
          </table:table-cell>
          <table:table-cell table:number-columns-repeated="2"/>
        </table:table-row>
        <table:table-row table:style-name="ro2">
          <table:table-cell office:value-type="string" calcext:value-type="string">
            <text:p>Pistol</text:p>
          </table:table-cell>
          <table:table-cell table:number-columns-repeated="3"/>
          <table:table-cell office:value-type="string" calcext:value-type="string">
            <text:p>Auxiliary</text:p>
          </table:table-cell>
          <table:table-cell office:value-type="string" calcext:value-type="string">
            <text:p>CQB</text:p>
          </table:table-cell>
          <table:table-cell table:number-columns-repeated="2"/>
        </table:table-row>
        <table:table-row table:style-name="ro2">
          <table:table-cell office:value-type="string" calcext:value-type="string">
            <text:p>Rocket-Propelled Grenade</text:p>
          </table:table-cell>
          <table:table-cell table:number-columns-repeated="3"/>
          <table:table-cell office:value-type="string" calcext:value-type="string">
            <text:p>Main</text:p>
          </table:table-cell>
          <table:table-cell office:value-type="string" calcext:value-type="string">
            <text:p>Launcher</text:p>
          </table:table-cell>
          <table:table-cell table:number-columns-repeated="2"/>
        </table:table-row>
        <table:table-row table:style-name="ro2">
          <table:table-cell office:value-type="string" calcext:value-type="string">
            <text:p>Segment Knife</text:p>
          </table:table-cell>
          <table:table-cell table:number-columns-repeated="3"/>
          <table:table-cell office:value-type="string" calcext:value-type="string">
            <text:p>Auxiliary</text:p>
          </table:table-cell>
          <table:table-cell office:value-type="string" calcext:value-type="string">
            <text:p>Melee</text:p>
          </table:table-cell>
          <table:table-cell table:number-columns-repeated="2"/>
        </table:table-row>
        <table:table-row table:style-name="ro2">
          <table:table-cell office:value-type="string" calcext:value-type="string">
            <text:p>Shotgun</text:p>
          </table:table-cell>
          <table:table-cell table:number-columns-repeated="3"/>
          <table:table-cell office:value-type="string" calcext:value-type="string">
            <text:p>Main</text:p>
          </table:table-cell>
          <table:table-cell office:value-type="string" calcext:value-type="string">
            <text:p>CQB</text:p>
          </table:table-cell>
          <table:table-cell table:number-columns-repeated="2"/>
        </table:table-row>
        <table:table-row table:style-name="ro2">
          <table:table-cell office:value-type="string" calcext:value-type="string">
            <text:p>Tactical Knife</text:p>
          </table:table-cell>
          <table:table-cell table:number-columns-repeated="3"/>
          <table:table-cell office:value-type="string" calcext:value-type="string">
            <text:p>Auxiliary</text:p>
          </table:table-cell>
          <table:table-cell office:value-type="string" calcext:value-type="string">
            <text:p>Melee</text:p>
          </table:table-cell>
          <table:table-cell table:number-columns-repeated="2"/>
        </table:table-row>
        <table:table-row table:style-name="ro2">
          <table:table-cell office:value-type="string" calcext:value-type="string">
            <text:p>Tactical Melee Weapon</text:p>
          </table:table-cell>
          <table:table-cell table:number-columns-repeated="3"/>
          <table:table-cell office:value-type="string" calcext:value-type="string">
            <text:p>Main</text:p>
          </table:table-cell>
          <table:table-cell office:value-type="string" calcext:value-type="string">
            <text:p>Melee</text:p>
          </table:table-cell>
          <table:table-cell table:number-columns-repeated="2"/>
        </table:table-row>
        <table:table-row table:style-name="ro2">
          <table:table-cell office:value-type="string" calcext:value-type="string">
            <text:p>Tempest Charged Blade</text:p>
          </table:table-cell>
          <table:table-cell table:number-columns-repeated="3"/>
          <table:table-cell office:value-type="string" calcext:value-type="string">
            <text:p>Superheavy</text:p>
          </table:table-cell>
          <table:table-cell office:value-type="string" calcext:value-type="string">
            <text:p>Melee</text:p>
          </table:table-cell>
          <table:table-cell table:number-columns-repeated="2"/>
        </table:table-row>
        <table:table-row table:style-name="ro2">
          <table:table-cell office:value-type="string" calcext:value-type="string">
            <text:p>Thermal Lance</text:p>
          </table:table-cell>
          <table:table-cell table:number-columns-repeated="3"/>
          <table:table-cell office:value-type="string" calcext:value-type="string">
            <text:p>Heavy</text:p>
          </table:table-cell>
          <table:table-cell office:value-type="string" calcext:value-type="string">
            <text:p>Cannon</text:p>
          </table:table-cell>
          <table:table-cell table:number-columns-repeated="2"/>
        </table:table-row>
        <table:table-row table:style-name="ro2">
          <table:table-cell office:value-type="string" calcext:value-type="string">
            <text:p>Thermal Pistol</text:p>
          </table:table-cell>
          <table:table-cell table:number-columns-repeated="3"/>
          <table:table-cell office:value-type="string" calcext:value-type="string">
            <text:p>Auxiliary</text:p>
          </table:table-cell>
          <table:table-cell office:value-type="string" calcext:value-type="string">
            <text:p>CQB</text:p>
          </table:table-cell>
          <table:table-cell table:number-columns-repeated="2"/>
        </table:table-row>
        <table:table-row table:style-name="ro2">
          <table:table-cell office:value-type="string" calcext:value-type="string">
            <text:p>Thermal Rifle</text:p>
          </table:table-cell>
          <table:table-cell table:number-columns-repeated="3"/>
          <table:table-cell office:value-type="string" calcext:value-type="string">
            <text:p>Main</text:p>
          </table:table-cell>
          <table:table-cell office:value-type="string" calcext:value-type="string">
            <text:p>Rifle</text:p>
          </table:table-cell>
          <table:table-cell table:number-columns-repeated="2"/>
        </table:table-row>
        <table:table-row table:style-name="ro2">
          <table:table-cell office:value-type="string" calcext:value-type="string">
            <text:p>Kraul Rifle</text:p>
          </table:table-cell>
          <table:table-cell office:value-type="string" calcext:value-type="string">
            <text:p>Atlas I</text:p>
          </table:table-cell>
          <table:table-cell table:number-columns-repeated="2"/>
          <table:table-cell office:value-type="string" calcext:value-type="string">
            <text:p>Main</text:p>
          </table:table-cell>
          <table:table-cell office:value-type="string" calcext:value-type="string">
            <text:p>CQB</text:p>
          </table:table-cell>
          <table:table-cell table:number-columns-repeated="2"/>
        </table:table-row>
        <table:table-row table:style-name="ro2">
          <table:table-cell office:value-type="string" calcext:value-type="string">
            <text:p>Terashima Blade</text:p>
          </table:table-cell>
          <table:table-cell office:value-type="string" calcext:value-type="string">
            <text:p>Atlas III</text:p>
          </table:table-cell>
          <table:table-cell table:number-columns-repeated="2"/>
          <table:table-cell office:value-type="string" calcext:value-type="string">
            <text:p>Main</text:p>
          </table:table-cell>
          <table:table-cell office:value-type="string" calcext:value-type="string">
            <text:p>Melee</text:p>
          </table:table-cell>
          <table:table-cell/>
          <table:table-cell office:value-type="float" office:value="2" calcext:value-type="float">
            <text:p>2</text:p>
          </table:table-cell>
        </table:table-row>
        <table:table-row table:style-name="ro2">
          <table:table-cell office:value-type="string" calcext:value-type="string">
            <text:p>Nanobot Whip</text:p>
          </table:table-cell>
          <table:table-cell office:value-type="string" calcext:value-type="string">
            <text:p>Balor III</text:p>
          </table:table-cell>
          <table:table-cell table:number-columns-repeated="2"/>
          <table:table-cell office:value-type="string" calcext:value-type="string">
            <text:p>Heavy</text:p>
          </table:table-cell>
          <table:table-cell office:value-type="string" calcext:value-type="string">
            <text:p>Melee</text:p>
          </table:table-cell>
          <table:table-cell/>
          <table:table-cell office:value-type="float" office:value="2" calcext:value-type="float">
            <text:p>2</text:p>
          </table:table-cell>
        </table:table-row>
        <table:table-row table:style-name="ro2">
          <table:table-cell office:value-type="string" calcext:value-type="string">
            <text:p>Swarm/Hive Nanites</text:p>
          </table:table-cell>
          <table:table-cell office:value-type="string" calcext:value-type="string">
            <text:p>Balor III</text:p>
          </table:table-cell>
          <table:table-cell table:number-columns-repeated="2"/>
          <table:table-cell office:value-type="string" calcext:value-type="string">
            <text:p>Main</text:p>
          </table:table-cell>
          <table:table-cell office:value-type="string" calcext:value-type="string">
            <text:p>Nexus</text:p>
          </table:table-cell>
          <table:table-cell table:number-columns-repeated="2"/>
        </table:table-row>
        <table:table-row table:style-name="ro2">
          <table:table-cell office:value-type="string" calcext:value-type="string">
            <text:p>Siege Cannon</text:p>
          </table:table-cell>
          <table:table-cell office:value-type="string" calcext:value-type="string">
            <text:p>Barbarossa III</text:p>
          </table:table-cell>
          <table:table-cell table:number-columns-repeated="2"/>
          <table:table-cell office:value-type="string" calcext:value-type="string">
            <text:p>Superheavy</text:p>
          </table:table-cell>
          <table:table-cell office:value-type="string" calcext:value-type="string">
            <text:p>Cannon</text:p>
          </table:table-cell>
          <table:table-cell table:number-columns-repeated="2"/>
        </table:table-row>
        <table:table-row table:style-name="ro2">
          <table:table-cell office:value-type="string" calcext:value-type="string">
            <text:p>Magnetic Cannon</text:p>
          </table:table-cell>
          <table:table-cell office:value-type="string" calcext:value-type="string">
            <text:p>Black Witch I</text:p>
          </table:table-cell>
          <table:table-cell table:number-columns-repeated="2"/>
          <table:table-cell office:value-type="string" calcext:value-type="string">
            <text:p>Main</text:p>
          </table:table-cell>
          <table:table-cell office:value-type="string" calcext:value-type="string">
            <text:p>Cannon</text:p>
          </table:table-cell>
          <table:table-cell table:number-columns-repeated="2"/>
        </table:table-row>
        <table:table-row table:style-name="ro2">
          <table:table-cell office:value-type="string" calcext:value-type="string">
            <text:p>Bristlecrown Flechette Launcher</text:p>
          </table:table-cell>
          <table:table-cell office:value-type="string" calcext:value-type="string">
            <text:p>Blackbeard II</text:p>
          </table:table-cell>
          <table:table-cell table:number-columns-repeated="2"/>
          <table:table-cell office:value-type="string" calcext:value-type="string">
            <text:p>Auxiliary</text:p>
          </table:table-cell>
          <table:table-cell office:value-type="string" calcext:value-type="string">
            <text:p>CQB</text:p>
          </table:table-cell>
          <table:table-cell table:number-columns-repeated="2"/>
        </table:table-row>
        <table:table-row table:style-name="ro2">
          <table:table-cell office:value-type="string" calcext:value-type="string">
            <text:p>Chain Axe</text:p>
          </table:table-cell>
          <table:table-cell office:value-type="string" calcext:value-type="string">
            <text:p>Blackbeard I</text:p>
          </table:table-cell>
          <table:table-cell table:number-columns-repeated="2"/>
          <table:table-cell office:value-type="string" calcext:value-type="string">
            <text:p>Main</text:p>
          </table:table-cell>
          <table:table-cell office:value-type="string" calcext:value-type="string">
            <text:p>Melee</text:p>
          </table:table-cell>
          <table:table-cell table:number-columns-repeated="2"/>
        </table:table-row>
        <table:table-row table:style-name="ro2">
          <table:table-cell office:value-type="string" calcext:value-type="string">
            <text:p>Nanocarbon Sword</text:p>
          </table:table-cell>
          <table:table-cell office:value-type="string" calcext:value-type="string">
            <text:p>Blackbeard III</text:p>
          </table:table-cell>
          <table:table-cell table:number-columns-repeated="2"/>
          <table:table-cell office:value-type="string" calcext:value-type="string">
            <text:p>Heavy</text:p>
          </table:table-cell>
          <table:table-cell office:value-type="string" calcext:value-type="string">
            <text:p>Melee</text:p>
          </table:table-cell>
          <table:table-cell table:number-columns-repeated="2"/>
        </table:table-row>
        <table:table-row table:style-name="ro2">
          <table:table-cell office:value-type="string" calcext:value-type="string">
            <text:p>HHS-155 Cannibal</text:p>
          </table:table-cell>
          <table:table-cell office:value-type="string" calcext:value-type="string">
            <text:p>Caliban III</text:p>
          </table:table-cell>
          <table:table-cell table:number-columns-repeated="2"/>
          <table:table-cell office:value-type="string" calcext:value-type="string">
            <text:p>Heavy</text:p>
          </table:table-cell>
          <table:table-cell office:value-type="string" calcext:value-type="string">
            <text:p>CQB</text:p>
          </table:table-cell>
          <table:table-cell table:number-columns-repeated="2"/>
        </table:table-row>
        <table:table-row table:style-name="ro2">
          <table:table-cell office:value-type="string" calcext:value-type="string">
            <text:p>Hammer U-RPL</text:p>
          </table:table-cell>
          <table:table-cell office:value-type="string" calcext:value-type="string">
            <text:p>Caliban I</text:p>
          </table:table-cell>
          <table:table-cell table:number-columns-repeated="2"/>
          <table:table-cell office:value-type="string" calcext:value-type="string">
            <text:p>Heavy</text:p>
          </table:table-cell>
          <table:table-cell office:value-type="string" calcext:value-type="string">
            <text:p>Launcher</text:p>
          </table:table-cell>
          <table:table-cell table:number-columns-repeated="2"/>
        </table:table-row>
        <table:table-row table:style-name="ro2">
          <table:table-cell office:value-type="string" calcext:value-type="string">
            <text:p>Railgun</text:p>
          </table:table-cell>
          <table:table-cell office:value-type="string" calcext:value-type="string">
            <text:p>Death’s Head III</text:p>
          </table:table-cell>
          <table:table-cell table:number-columns-repeated="2"/>
          <table:table-cell office:value-type="string" calcext:value-type="string">
            <text:p>Heavy</text:p>
          </table:table-cell>
          <table:table-cell office:value-type="string" calcext:value-type="string">
            <text:p>Rifle</text:p>
          </table:table-cell>
          <table:table-cell table:number-columns-repeated="2"/>
        </table:table-row>
        <table:table-row table:style-name="ro2">
          <table:table-cell office:value-type="string" calcext:value-type="string">
            <text:p>Vulture DMR</text:p>
          </table:table-cell>
          <table:table-cell office:value-type="string" calcext:value-type="string">
            <text:p>Death’s Head II</text:p>
          </table:table-cell>
          <table:table-cell table:number-columns-repeated="2"/>
          <table:table-cell office:value-type="string" calcext:value-type="string">
            <text:p>Main</text:p>
          </table:table-cell>
          <table:table-cell office:value-type="string" calcext:value-type="string">
            <text:p>Rifle</text:p>
          </table:table-cell>
          <table:table-cell table:number-columns-repeated="2"/>
        </table:table-row>
        <table:table-row table:style-name="ro2">
          <table:table-cell office:value-type="string" calcext:value-type="string">
            <text:p>Assault Cannon</text:p>
          </table:table-cell>
          <table:table-cell office:value-type="string" calcext:value-type="string">
            <text:p>Drake I</text:p>
          </table:table-cell>
          <table:table-cell table:number-columns-repeated="2"/>
          <table:table-cell office:value-type="string" calcext:value-type="string">
            <text:p>Main</text:p>
          </table:table-cell>
          <table:table-cell office:value-type="string" calcext:value-type="string">
            <text:p>Cannon</text:p>
          </table:table-cell>
          <table:table-cell table:number-columns-repeated="2"/>
        </table:table-row>
        <table:table-row table:style-name="ro2">
          <table:table-cell office:value-type="string" calcext:value-type="string">
            <text:p>Concussion Missiles</text:p>
          </table:table-cell>
          <table:table-cell office:value-type="string" calcext:value-type="string">
            <text:p>Drake II</text:p>
          </table:table-cell>
          <table:table-cell table:number-columns-repeated="2"/>
          <table:table-cell office:value-type="string" calcext:value-type="string">
            <text:p>Main</text:p>
          </table:table-cell>
          <table:table-cell office:value-type="string" calcext:value-type="string">
            <text:p>Launcher</text:p>
          </table:table-cell>
          <table:table-cell table:number-columns-repeated="2"/>
        </table:table-row>
        <table:table-row table:style-name="ro2">
          <table:table-cell office:value-type="string" calcext:value-type="string">
            <text:p>Leviathan Heavy Assault Cannon</text:p>
          </table:table-cell>
          <table:table-cell office:value-type="string" calcext:value-type="string">
            <text:p>Drake III</text:p>
          </table:table-cell>
          <table:table-cell table:number-columns-repeated="2"/>
          <table:table-cell office:value-type="string" calcext:value-type="string">
            <text:p>Superheavy</text:p>
          </table:table-cell>
          <table:table-cell office:value-type="string" calcext:value-type="string">
            <text:p>Cannon</text:p>
          </table:table-cell>
          <table:table-cell table:number-columns-repeated="2"/>
        </table:table-row>
        <table:table-row table:style-name="ro2">
          <table:table-cell office:value-type="string" calcext:value-type="string">
            <text:p>Burst Launcher</text:p>
          </table:table-cell>
          <table:table-cell office:value-type="string" calcext:value-type="string">
            <text:p>Dusk Wing II</text:p>
          </table:table-cell>
          <table:table-cell table:number-columns-repeated="2"/>
          <table:table-cell office:value-type="string" calcext:value-type="string">
            <text:p>Main</text:p>
          </table:table-cell>
          <table:table-cell office:value-type="string" calcext:value-type="string">
            <text:p>Launcher</text:p>
          </table:table-cell>
          <table:table-cell table:number-columns-repeated="2"/>
        </table:table-row>
        <table:table-row table:style-name="ro2">
          <table:table-cell office:value-type="string" calcext:value-type="string">
            <text:p>Veil Rifle</text:p>
          </table:table-cell>
          <table:table-cell office:value-type="string" calcext:value-type="string">
            <text:p>Dusk Wing I</text:p>
          </table:table-cell>
          <table:table-cell table:number-columns-repeated="2"/>
          <table:table-cell office:value-type="string" calcext:value-type="string">
            <text:p>Main</text:p>
          </table:table-cell>
          <table:table-cell office:value-type="string" calcext:value-type="string">
            <text:p>Rifle</text:p>
          </table:table-cell>
          <table:table-cell table:number-columns-repeated="2"/>
        </table:table-row>
        <table:table-row table:style-name="ro2">
          <table:table-cell office:value-type="string" calcext:value-type="string">
            <text:p>Bolt Nexus</text:p>
          </table:table-cell>
          <table:table-cell office:value-type="string" calcext:value-type="string">
            <text:p>Emperor I</text:p>
          </table:table-cell>
          <table:table-cell table:number-columns-repeated="2"/>
          <table:table-cell office:value-type="string" calcext:value-type="string">
            <text:p>Main</text:p>
          </table:table-cell>
          <table:table-cell office:value-type="string" calcext:value-type="string">
            <text:p>Nexus</text:p>
          </table:table-cell>
          <table:table-cell table:number-columns-repeated="2"/>
        </table:table-row>
        <table:table-row table:style-name="ro2">
          <table:table-cell office:value-type="string" calcext:value-type="string">
            <text:p>Krakatoa Thermobaric Flamethrower</text:p>
          </table:table-cell>
          <table:table-cell office:value-type="string" calcext:value-type="string">
            <text:p>Genghis I</text:p>
          </table:table-cell>
          <table:table-cell table:number-columns-repeated="2"/>
          <table:table-cell office:value-type="string" calcext:value-type="string">
            <text:p>Heavy</text:p>
          </table:table-cell>
          <table:table-cell office:value-type="string" calcext:value-type="string">
            <text:p>CQB</text:p>
          </table:table-cell>
          <table:table-cell table:number-columns-repeated="2"/>
        </table:table-row>
        <table:table-row table:style-name="ro2">
          <table:table-cell office:value-type="string" calcext:value-type="string">
            <text:p>Plasma Thrower</text:p>
          </table:table-cell>
          <table:table-cell office:value-type="string" calcext:value-type="string">
            <text:p>Genghis III</text:p>
          </table:table-cell>
          <table:table-cell table:number-columns-repeated="2"/>
          <table:table-cell office:value-type="string" calcext:value-type="string">
            <text:p>Superheavy</text:p>
          </table:table-cell>
          <table:table-cell office:value-type="string" calcext:value-type="string">
            <text:p>CQB</text:p>
          </table:table-cell>
          <table:table-cell table:number-columns-repeated="2"/>
        </table:table-row>
        <table:table-row table:style-name="ro2">
          <table:table-cell office:value-type="string" calcext:value-type="string">
            <text:p>Autopod</text:p>
          </table:table-cell>
          <table:table-cell office:value-type="string" calcext:value-type="string">
            <text:p>Goblin I</text:p>
          </table:table-cell>
          <table:table-cell table:number-columns-repeated="2"/>
          <table:table-cell office:value-type="string" calcext:value-type="string">
            <text:p>Main</text:p>
          </table:table-cell>
          <table:table-cell office:value-type="string" calcext:value-type="string">
            <text:p>Launcher</text:p>
          </table:table-cell>
          <table:table-cell/>
          <table:table-cell office:value-type="float" office:value="1" calcext:value-type="float">
            <text:p>1</text:p>
          </table:table-cell>
        </table:table-row>
        <table:table-row table:style-name="ro2">
          <table:table-cell office:value-type="string" calcext:value-type="string">
            <text:p>Vorpal Gun</text:p>
          </table:table-cell>
          <table:table-cell office:value-type="string" calcext:value-type="string">
            <text:p>Gorgon III</text:p>
          </table:table-cell>
          <table:table-cell table:number-columns-repeated="2"/>
          <table:table-cell office:value-type="string" calcext:value-type="string">
            <text:p>Main</text:p>
          </table:table-cell>
          <table:table-cell office:value-type="string" calcext:value-type="string">
            <text:p>Cannon</text:p>
          </table:table-cell>
          <table:table-cell table:number-columns-repeated="2"/>
        </table:table-row>
        <table:table-row table:style-name="ro2">
          <table:table-cell office:value-type="string" calcext:value-type="string">
            <text:p>Annihilation Nexus</text:p>
          </table:table-cell>
          <table:table-cell office:value-type="string" calcext:value-type="string">
            <text:p>Hydra III</text:p>
          </table:table-cell>
          <table:table-cell table:number-columns-repeated="2"/>
          <table:table-cell office:value-type="string" calcext:value-type="string">
            <text:p>Superheavy</text:p>
          </table:table-cell>
          <table:table-cell office:value-type="string" calcext:value-type="string">
            <text:p>Nexus</text:p>
          </table:table-cell>
          <table:table-cell table:number-columns-repeated="2"/>
        </table:table-row>
        <table:table-row table:style-name="ro2">
          <table:table-cell office:value-type="string" calcext:value-type="string">
            <text:p>Ghast Nexus</text:p>
          </table:table-cell>
          <table:table-cell office:value-type="string" calcext:value-type="string">
            <text:p>Hydra II</text:p>
          </table:table-cell>
          <table:table-cell table:number-columns-repeated="2"/>
          <table:table-cell office:value-type="string" calcext:value-type="string">
            <text:p>Heavy</text:p>
          </table:table-cell>
          <table:table-cell office:value-type="string" calcext:value-type="string">
            <text:p>Nexus</text:p>
          </table:table-cell>
          <table:table-cell table:number-columns-repeated="2"/>
        </table:table-row>
        <table:table-row table:style-name="ro2">
          <table:table-cell office:value-type="string" calcext:value-type="string">
            <text:p>Ghoul Nexus</text:p>
          </table:table-cell>
          <table:table-cell office:value-type="string" calcext:value-type="string">
            <text:p>Hydra I</text:p>
          </table:table-cell>
          <table:table-cell table:number-columns-repeated="2"/>
          <table:table-cell office:value-type="string" calcext:value-type="string">
            <text:p>Main</text:p>
          </table:table-cell>
          <table:table-cell office:value-type="string" calcext:value-type="string">
            <text:p>Nexus</text:p>
          </table:table-cell>
          <table:table-cell table:number-columns-repeated="2"/>
        </table:table-row>
        <table:table-row table:style-name="ro2">
          <table:table-cell office:value-type="string" calcext:value-type="string">
            <text:p>Gravity Gun</text:p>
          </table:table-cell>
          <table:table-cell office:value-type="string" calcext:value-type="string">
            <text:p>Iskander II</text:p>
          </table:table-cell>
          <table:table-cell table:number-columns-repeated="2"/>
          <table:table-cell office:value-type="string" calcext:value-type="string">
            <text:p>Heavy</text:p>
          </table:table-cell>
          <table:table-cell office:value-type="string" calcext:value-type="string">
            <text:p>Rifle</text:p>
          </table:table-cell>
          <table:table-cell table:number-columns-repeated="2"/>
        </table:table-row>
        <table:table-row table:style-name="ro2">
          <table:table-cell office:value-type="string" calcext:value-type="string">
            <text:p>Stub Cannon</text:p>
          </table:table-cell>
          <table:table-cell office:value-type="string" calcext:value-type="string">
            <text:p>Iskander I</text:p>
          </table:table-cell>
          <table:table-cell table:number-columns-repeated="2"/>
          <table:table-cell office:value-type="string" calcext:value-type="string">
            <text:p>Auxiliary</text:p>
          </table:table-cell>
          <table:table-cell office:value-type="string" calcext:value-type="string">
            <text:p>Cannon</text:p>
          </table:table-cell>
          <table:table-cell office:value-type="float" office:value="6" calcext:value-type="float">
            <text:p>6</text:p>
          </table:table-cell>
          <table:table-cell/>
        </table:table-row>
        <table:table-row table:style-name="ro2">
          <table:table-cell office:value-type="string" calcext:value-type="string">
            <text:p>Blackspot Targeting Laser</text:p>
          </table:table-cell>
          <table:table-cell office:value-type="string" calcext:value-type="string">
            <text:p>Kidd I</text:p>
          </table:table-cell>
          <table:table-cell table:number-columns-repeated="2"/>
          <table:table-cell office:value-type="string" calcext:value-type="string">
            <text:p>Main</text:p>
          </table:table-cell>
          <table:table-cell office:value-type="string" calcext:value-type="string">
            <text:p>Rifle</text:p>
          </table:table-cell>
          <table:table-cell/>
          <table:table-cell office:value-type="float" office:value="1" calcext:value-type="float">
            <text:p>1</text:p>
          </table:table-cell>
        </table:table-row>
        <table:table-row table:style-name="ro2">
          <table:table-cell office:value-type="string" calcext:value-type="string">
            <text:p>Fusion Rifle</text:p>
          </table:table-cell>
          <table:table-cell office:value-type="string" calcext:value-type="string">
            <text:p>Kobold I</text:p>
          </table:table-cell>
          <table:table-cell table:number-columns-repeated="2"/>
          <table:table-cell office:value-type="string" calcext:value-type="string">
            <text:p>Main</text:p>
          </table:table-cell>
          <table:table-cell office:value-type="string" calcext:value-type="string">
            <text:p>Rifle</text:p>
          </table:table-cell>
          <table:table-cell table:number-columns-repeated="2"/>
        </table:table-row>
        <table:table-row table:style-name="ro2">
          <table:table-cell office:value-type="string" calcext:value-type="string">
            <text:p>Slag Cannon</text:p>
          </table:table-cell>
          <table:table-cell office:value-type="string" calcext:value-type="string">
            <text:p>Kobold II</text:p>
          </table:table-cell>
          <table:table-cell table:number-columns-repeated="2"/>
          <table:table-cell office:value-type="string" calcext:value-type="string">
            <text:p>Main</text:p>
          </table:table-cell>
          <table:table-cell office:value-type="string" calcext:value-type="string">
            <text:p>Cannon</text:p>
          </table:table-cell>
          <table:table-cell table:number-columns-repeated="2"/>
        </table:table-row>
        <table:table-row table:style-name="ro2">
          <table:table-cell office:value-type="string" calcext:value-type="string">
            <text:p>Cutter MkII Plasma Torch</text:p>
          </table:table-cell>
          <table:table-cell office:value-type="string" calcext:value-type="string">
            <text:p>Lancaster III</text:p>
          </table:table-cell>
          <table:table-cell table:number-columns-repeated="2"/>
          <table:table-cell office:value-type="string" calcext:value-type="string">
            <text:p>Auxiliary</text:p>
          </table:table-cell>
          <table:table-cell office:value-type="string" calcext:value-type="string">
            <text:p>Melee</text:p>
          </table:table-cell>
          <table:table-cell table:number-columns-repeated="2"/>
        </table:table-row>
        <table:table-row table:style-name="ro2">
          <table:table-cell office:value-type="string" calcext:value-type="string">
            <text:p>Unraveler</text:p>
          </table:table-cell>
          <table:table-cell office:value-type="string" calcext:value-type="string">
            <text:p>Lich I</text:p>
          </table:table-cell>
          <table:table-cell table:number-columns-repeated="2"/>
          <table:table-cell office:value-type="string" calcext:value-type="string">
            <text:p>Main</text:p>
          </table:table-cell>
          <table:table-cell office:value-type="string" calcext:value-type="string">
            <text:p>Launcher</text:p>
          </table:table-cell>
          <table:table-cell table:number-columns-repeated="2"/>
        </table:table-row>
        <table:table-row table:style-name="ro2">
          <table:table-cell office:value-type="string" calcext:value-type="string">
            <text:p>Arc Projector</text:p>
          </table:table-cell>
          <table:table-cell office:value-type="string" calcext:value-type="string">
            <text:p>Manticore II</text:p>
          </table:table-cell>
          <table:table-cell table:number-columns-repeated="2"/>
          <table:table-cell office:value-type="string" calcext:value-type="string">
            <text:p>Heavy</text:p>
          </table:table-cell>
          <table:table-cell office:value-type="string" calcext:value-type="string">
            <text:p>CQB</text:p>
          </table:table-cell>
          <table:table-cell table:number-columns-repeated="2"/>
        </table:table-row>
        <table:table-row table:style-name="ro2">
          <table:table-cell office:value-type="string" calcext:value-type="string">
            <text:p>Catalyst Pistol</text:p>
          </table:table-cell>
          <table:table-cell office:value-type="string" calcext:value-type="string">
            <text:p>Manticore I</text:p>
          </table:table-cell>
          <table:table-cell table:number-columns-repeated="2"/>
          <table:table-cell office:value-type="string" calcext:value-type="string">
            <text:p>Auxiliary</text:p>
          </table:table-cell>
          <table:table-cell office:value-type="string" calcext:value-type="string">
            <text:p>CQB</text:p>
          </table:table-cell>
          <table:table-cell table:number-columns-repeated="2"/>
        </table:table-row>
        <table:table-row table:style-name="ro2">
          <table:table-cell office:value-type="string" calcext:value-type="string">
            <text:p>Rail Rifle</text:p>
          </table:table-cell>
          <table:table-cell office:value-type="string" calcext:value-type="string">
            <text:p>Metalmark II</text:p>
          </table:table-cell>
          <table:table-cell table:number-columns-repeated="2"/>
          <table:table-cell office:value-type="string" calcext:value-type="string">
            <text:p>Main</text:p>
          </table:table-cell>
          <table:table-cell office:value-type="string" calcext:value-type="string">
            <text:p>Rifle</text:p>
          </table:table-cell>
          <table:table-cell table:number-columns-repeated="2"/>
        </table:table-row>
        <table:table-row table:style-name="ro2">
          <table:table-cell office:value-type="string" calcext:value-type="string">
            <text:p>Shock Knife</text:p>
          </table:table-cell>
          <table:table-cell office:value-type="string" calcext:value-type="string">
            <text:p>Metalmark I</text:p>
          </table:table-cell>
          <table:table-cell table:number-columns-repeated="2"/>
          <table:table-cell office:value-type="string" calcext:value-type="string">
            <text:p>Auxiliary</text:p>
          </table:table-cell>
          <table:table-cell office:value-type="string" calcext:value-type="string">
            <text:p>Melee</text:p>
          </table:table-cell>
          <table:table-cell table:number-columns-repeated="2"/>
        </table:table-row>
        <table:table-row table:style-name="ro2">
          <table:table-cell office:value-type="string" calcext:value-type="string">
            <text:p>Gandiva Missiles</text:p>
          </table:table-cell>
          <table:table-cell office:value-type="string" calcext:value-type="string">
            <text:p>Monarch II</text:p>
          </table:table-cell>
          <table:table-cell table:number-columns-repeated="2"/>
          <table:table-cell office:value-type="string" calcext:value-type="string">
            <text:p>Heavy</text:p>
          </table:table-cell>
          <table:table-cell office:value-type="string" calcext:value-type="string">
            <text:p>Launcher</text:p>
          </table:table-cell>
          <table:table-cell/>
          <table:table-cell office:value-type="float" office:value="1" calcext:value-type="float">
            <text:p>1</text:p>
          </table:table-cell>
        </table:table-row>
        <table:table-row table:style-name="ro2">
          <table:table-cell office:value-type="string" calcext:value-type="string">
            <text:p>Pinaka Missiles</text:p>
          </table:table-cell>
          <table:table-cell office:value-type="string" calcext:value-type="string">
            <text:p>Monarch III</text:p>
          </table:table-cell>
          <table:table-cell table:number-columns-repeated="2"/>
          <table:table-cell office:value-type="string" calcext:value-type="string">
            <text:p>Superheavy</text:p>
          </table:table-cell>
          <table:table-cell office:value-type="string" calcext:value-type="string">
            <text:p>Launcher</text:p>
          </table:table-cell>
          <table:table-cell table:number-columns-repeated="2"/>
        </table:table-row>
        <table:table-row table:style-name="ro2">
          <table:table-cell office:value-type="string" calcext:value-type="string">
            <text:p>Sharanga Missiles</text:p>
          </table:table-cell>
          <table:table-cell office:value-type="string" calcext:value-type="string">
            <text:p>Monarch I</text:p>
          </table:table-cell>
          <table:table-cell table:number-columns-repeated="2"/>
          <table:table-cell office:value-type="string" calcext:value-type="string">
            <text:p>Main</text:p>
          </table:table-cell>
          <table:table-cell office:value-type="string" calcext:value-type="string">
            <text:p>Launcher</text:p>
          </table:table-cell>
          <table:table-cell table:number-columns-repeated="2"/>
        </table:table-row>
        <table:table-row table:style-name="ro2">
          <table:table-cell office:value-type="string" calcext:value-type="string">
            <text:p>Fold Knife</text:p>
          </table:table-cell>
          <table:table-cell office:value-type="string" calcext:value-type="string">
            <text:p>Mourning Cloak I</text:p>
          </table:table-cell>
          <table:table-cell table:number-columns-repeated="2"/>
          <table:table-cell office:value-type="string" calcext:value-type="string">
            <text:p>Auxiliary</text:p>
          </table:table-cell>
          <table:table-cell office:value-type="string" calcext:value-type="string">
            <text:p>Melee</text:p>
          </table:table-cell>
          <table:table-cell table:number-columns-repeated="2"/>
        </table:table-row>
        <table:table-row table:style-name="ro2">
          <table:table-cell office:value-type="string" calcext:value-type="string">
            <text:p>Variable Sword</text:p>
          </table:table-cell>
          <table:table-cell office:value-type="string" calcext:value-type="string">
            <text:p>Mourning Cloak III</text:p>
          </table:table-cell>
          <table:table-cell table:number-columns-repeated="2"/>
          <table:table-cell office:value-type="string" calcext:value-type="string">
            <text:p>Main</text:p>
          </table:table-cell>
          <table:table-cell office:value-type="string" calcext:value-type="string">
            <text:p>Melee</text:p>
          </table:table-cell>
          <table:table-cell table:number-columns-repeated="2"/>
        </table:table-row>
        <table:table-row table:style-name="ro2">
          <table:table-cell office:value-type="string" calcext:value-type="string">
            <text:p>Vijaya Rockets</text:p>
          </table:table-cell>
          <table:table-cell office:value-type="string" calcext:value-type="string">
            <text:p>Mourning Cloak I</text:p>
          </table:table-cell>
          <table:table-cell table:number-columns-repeated="2"/>
          <table:table-cell office:value-type="string" calcext:value-type="string">
            <text:p>Auxiliary</text:p>
          </table:table-cell>
          <table:table-cell office:value-type="string" calcext:value-type="string">
            <text:p>Launcher</text:p>
          </table:table-cell>
          <table:table-cell table:number-columns-repeated="2"/>
        </table:table-row>
        <table:table-row table:style-name="ro2">
          <table:table-cell office:value-type="string" calcext:value-type="string">
            <text:p>Displacer</text:p>
          </table:table-cell>
          <table:table-cell office:value-type="string" calcext:value-type="string">
            <text:p>Napoleon III</text:p>
          </table:table-cell>
          <table:table-cell table:number-columns-repeated="2"/>
          <table:table-cell office:value-type="string" calcext:value-type="string">
            <text:p>Main</text:p>
          </table:table-cell>
          <table:table-cell office:value-type="string" calcext:value-type="string">
            <text:p>Rifle</text:p>
          </table:table-cell>
          <table:table-cell table:number-columns-repeated="2"/>
        </table:table-row>
        <table:table-row table:style-name="ro2">
          <table:table-cell office:value-type="string" calcext:value-type="string">
            <text:p>Power Knuckles</text:p>
          </table:table-cell>
          <table:table-cell office:value-type="string" calcext:value-type="string">
            <text:p>Nelson III</text:p>
          </table:table-cell>
          <table:table-cell table:number-columns-repeated="2"/>
          <table:table-cell office:value-type="string" calcext:value-type="string">
            <text:p>Auxiliary</text:p>
          </table:table-cell>
          <table:table-cell office:value-type="string" calcext:value-type="string">
            <text:p>Melee</text:p>
          </table:table-cell>
          <table:table-cell table:number-columns-repeated="2"/>
        </table:table-row>
        <table:table-row table:style-name="ro2">
          <table:table-cell office:value-type="string" calcext:value-type="string">
            <text:p>War Pike</text:p>
          </table:table-cell>
          <table:table-cell office:value-type="string" calcext:value-type="string">
            <text:p>Nelson I</text:p>
          </table:table-cell>
          <table:table-cell table:number-columns-repeated="2"/>
          <table:table-cell office:value-type="string" calcext:value-type="string">
            <text:p>Main</text:p>
          </table:table-cell>
          <table:table-cell office:value-type="string" calcext:value-type="string">
            <text:p>Melee</text:p>
          </table:table-cell>
          <table:table-cell table:number-columns-repeated="2"/>
        </table:table-row>
        <table:table-row table:style-name="ro2">
          <table:table-cell office:value-type="string" calcext:value-type="string">
            <text:p>Autogun</text:p>
          </table:table-cell>
          <table:table-cell office:value-type="string" calcext:value-type="string">
            <text:p>Pegasus III</text:p>
          </table:table-cell>
          <table:table-cell table:number-columns-repeated="2"/>
          <table:table-cell office:value-type="string" calcext:value-type="string">
            <text:p>Main</text:p>
          </table:table-cell>
          <table:table-cell office:value-type="string" calcext:value-type="string">
            <text:p>Cannon</text:p>
          </table:table-cell>
          <table:table-cell/>
          <table:table-cell office:value-type="float" office:value="1" calcext:value-type="float">
            <text:p>1</text:p>
          </table:table-cell>
        </table:table-row>
        <table:table-row table:style-name="ro2">
          <table:table-cell office:value-type="string" calcext:value-type="string">
            <text:p>Mimic Gun</text:p>
          </table:table-cell>
          <table:table-cell office:value-type="string" calcext:value-type="string">
            <text:p>Pegasus II</text:p>
          </table:table-cell>
          <table:table-cell table:number-columns-repeated="2"/>
          <table:table-cell office:value-type="string" calcext:value-type="string">
            <text:p>Heavy</text:p>
          </table:table-cell>
          <table:table-cell office:value-type="string" calcext:value-type="string">
            <text:p>???</text:p>
          </table:table-cell>
          <table:table-cell table:number-columns-repeated="2"/>
        </table:table-row>
        <table:table-row table:style-name="ro2">
          <table:table-cell office:value-type="string" calcext:value-type="string">
            <text:p>Smartgun</text:p>
          </table:table-cell>
          <table:table-cell office:value-type="string" calcext:value-type="string">
            <text:p>Pegasus I</text:p>
          </table:table-cell>
          <table:table-cell table:number-columns-repeated="2"/>
          <table:table-cell office:value-type="string" calcext:value-type="string">
            <text:p>Main</text:p>
          </table:table-cell>
          <table:table-cell office:value-type="string" calcext:value-type="string">
            <text:p>Rifle</text:p>
          </table:table-cell>
          <table:table-cell/>
          <table:table-cell office:value-type="float" office:value="2" calcext:value-type="float">
            <text:p>2</text:p>
          </table:table-cell>
        </table:table-row>
        <table:table-row table:style-name="ro2">
          <table:table-cell office:value-type="string" calcext:value-type="string">
            <text:p>Bolt Thrower</text:p>
          </table:table-cell>
          <table:table-cell office:value-type="string" calcext:value-type="string">
            <text:p>Raleigh II</text:p>
          </table:table-cell>
          <table:table-cell table:number-columns-repeated="2"/>
          <table:table-cell office:value-type="string" calcext:value-type="string">
            <text:p>Heavy</text:p>
          </table:table-cell>
          <table:table-cell office:value-type="string" calcext:value-type="string">
            <text:p>Cannon</text:p>
          </table:table-cell>
          <table:table-cell table:number-columns-repeated="2"/>
        </table:table-row>
        <table:table-row table:style-name="ro2">
          <table:table-cell office:value-type="string" calcext:value-type="string">
            <text:p>Hand Cannon</text:p>
          </table:table-cell>
          <table:table-cell office:value-type="string" calcext:value-type="string">
            <text:p>Raleigh I</text:p>
          </table:table-cell>
          <table:table-cell table:number-columns-repeated="2"/>
          <table:table-cell office:value-type="string" calcext:value-type="string">
            <text:p>Auxiliary</text:p>
          </table:table-cell>
          <table:table-cell office:value-type="string" calcext:value-type="string">
            <text:p>CQB</text:p>
          </table:table-cell>
          <table:table-cell table:number-columns-repeated="2"/>
        </table:table-row>
        <table:table-row table:style-name="ro2">
          <table:table-cell office:value-type="string" calcext:value-type="string">
            <text:p>Kinetic Hammer</text:p>
          </table:table-cell>
          <table:table-cell office:value-type="string" calcext:value-type="string">
            <text:p>Raleigh III</text:p>
          </table:table-cell>
          <table:table-cell table:number-columns-repeated="2"/>
          <table:table-cell office:value-type="string" calcext:value-type="string">
            <text:p>Heavy</text:p>
          </table:table-cell>
          <table:table-cell office:value-type="string" calcext:value-type="string">
            <text:p>Melee</text:p>
          </table:table-cell>
          <table:table-cell table:number-columns-repeated="2"/>
        </table:table-row>
        <table:table-row table:style-name="ro2">
          <table:table-cell office:value-type="string" calcext:value-type="string">
            <text:p>Shatterhead Colony Missiles</text:p>
          </table:table-cell>
          <table:table-cell office:value-type="string" calcext:value-type="string">
            <text:p>Saladin I</text:p>
          </table:table-cell>
          <table:table-cell table:number-columns-repeated="2"/>
          <table:table-cell office:value-type="string" calcext:value-type="string">
            <text:p>Main</text:p>
          </table:table-cell>
          <table:table-cell office:value-type="string" calcext:value-type="string">
            <text:p>Launcher</text:p>
          </table:table-cell>
          <table:table-cell/>
          <table:table-cell office:value-type="float" office:value="1" calcext:value-type="float">
            <text:p>1</text:p>
          </table:table-cell>
        </table:table-row>
        <table:table-row table:style-name="ro2">
          <table:table-cell office:value-type="string" calcext:value-type="string">
            <text:p>Andromeda-Pattern Heavy Laser Rifle</text:p>
          </table:table-cell>
          <table:table-cell office:value-type="string" calcext:value-type="string">
            <text:p>Sherman II</text:p>
          </table:table-cell>
          <table:table-cell table:number-columns-repeated="2"/>
          <table:table-cell office:value-type="string" calcext:value-type="string">
            <text:p>Heavy</text:p>
          </table:table-cell>
          <table:table-cell office:value-type="string" calcext:value-type="string">
            <text:p>Cannon</text:p>
          </table:table-cell>
          <table:table-cell table:number-columns-repeated="2"/>
        </table:table-row>
        <table:table-row table:style-name="ro2">
          <table:table-cell office:value-type="string" calcext:value-type="string">
            <text:p>Sol-Pattern Laser Rifle</text:p>
          </table:table-cell>
          <table:table-cell office:value-type="string" calcext:value-type="string">
            <text:p>Sherman I</text:p>
          </table:table-cell>
          <table:table-cell table:number-columns-repeated="2"/>
          <table:table-cell office:value-type="string" calcext:value-type="string">
            <text:p>Main</text:p>
          </table:table-cell>
          <table:table-cell office:value-type="string" calcext:value-type="string">
            <text:p>Rifle</text:p>
          </table:table-cell>
          <table:table-cell table:number-columns-repeated="2"/>
        </table:table-row>
        <table:table-row table:style-name="ro2">
          <table:table-cell office:value-type="string" calcext:value-type="string">
            <text:p>Tachyon Lance</text:p>
          </table:table-cell>
          <table:table-cell office:value-type="string" calcext:value-type="string">
            <text:p>Sherman III</text:p>
          </table:table-cell>
          <table:table-cell table:number-columns-repeated="2"/>
          <table:table-cell office:value-type="string" calcext:value-type="string">
            <text:p>Superheavy</text:p>
          </table:table-cell>
          <table:table-cell office:value-type="string" calcext:value-type="string">
            <text:p>Cannon</text:p>
          </table:table-cell>
          <table:table-cell table:number-columns-repeated="2"/>
        </table:table-row>
        <table:table-row table:style-name="ro2">
          <table:table-cell office:value-type="string" calcext:value-type="string">
            <text:p>Warp Rifle</text:p>
          </table:table-cell>
          <table:table-cell office:value-type="string" calcext:value-type="string">
            <text:p>Sunzi II</text:p>
          </table:table-cell>
          <table:table-cell table:number-columns-repeated="2"/>
          <table:table-cell office:value-type="string" calcext:value-type="string">
            <text:p>Main</text:p>
          </table:table-cell>
          <table:table-cell office:value-type="string" calcext:value-type="string">
            <text:p>Rifle</text:p>
          </table:table-cell>
          <table:table-cell/>
          <table:table-cell office:value-type="float" office:value="1" calcext:value-type="float">
            <text:p>1</text:p>
          </table:table-cell>
        </table:table-row>
        <table:table-row table:style-name="ro2">
          <table:table-cell office:value-type="string" calcext:value-type="string">
            <text:p>Oracle LMG-I</text:p>
          </table:table-cell>
          <table:table-cell office:value-type="string" calcext:value-type="string">
            <text:p>Swallowtail II</text:p>
          </table:table-cell>
          <table:table-cell table:number-columns-repeated="2"/>
          <table:table-cell office:value-type="string" calcext:value-type="string">
            <text:p>Auxiliary</text:p>
          </table:table-cell>
          <table:table-cell office:value-type="string" calcext:value-type="string">
            <text:p>Rifle</text:p>
          </table:table-cell>
          <table:table-cell/>
          <table:table-cell office:value-type="float" office:value="1" calcext:value-type="float">
            <text:p>1</text:p>
          </table:table-cell>
        </table:table-row>
        <table:table-row table:style-name="ro2">
          <table:table-cell office:value-type="string" calcext:value-type="string">
            <text:p>Annihilator</text:p>
          </table:table-cell>
          <table:table-cell office:value-type="string" calcext:value-type="string">
            <text:p>Tokugawa I</text:p>
          </table:table-cell>
          <table:table-cell table:number-columns-repeated="2"/>
          <table:table-cell office:value-type="string" calcext:value-type="string">
            <text:p>Main</text:p>
          </table:table-cell>
          <table:table-cell office:value-type="string" calcext:value-type="string">
            <text:p>CQB</text:p>
          </table:table-cell>
          <table:table-cell table:number-columns-repeated="2"/>
        </table:table-row>
        <table:table-row table:style-name="ro2">
          <table:table-cell office:value-type="string" calcext:value-type="string">
            <text:p>Torch</text:p>
          </table:table-cell>
          <table:table-cell office:value-type="string" calcext:value-type="string">
            <text:p>Tokugawa II</text:p>
          </table:table-cell>
          <table:table-cell table:number-columns-repeated="2"/>
          <table:table-cell office:value-type="string" calcext:value-type="string">
            <text:p>Main</text:p>
          </table:table-cell>
          <table:table-cell office:value-type="string" calcext:value-type="string">
            <text:p>Melee</text:p>
          </table:table-cell>
          <table:table-cell table:number-columns-repeated="2"/>
        </table:table-row>
        <table:table-row table:style-name="ro2">
          <table:table-cell office:value-type="string" calcext:value-type="string">
            <text:p>Catalytic Hammer</text:p>
          </table:table-cell>
          <table:table-cell office:value-type="string" calcext:value-type="string">
            <text:p>Tortuga II</text:p>
          </table:table-cell>
          <table:table-cell table:number-columns-repeated="2"/>
          <table:table-cell office:value-type="string" calcext:value-type="string">
            <text:p>Main</text:p>
          </table:table-cell>
          <table:table-cell office:value-type="string" calcext:value-type="string">
            <text:p>Melee</text:p>
          </table:table-cell>
          <table:table-cell table:number-columns-repeated="2"/>
        </table:table-row>
        <table:table-row table:style-name="ro2">
          <table:table-cell office:value-type="string" calcext:value-type="string">
            <text:p>Daisy Cutter</text:p>
          </table:table-cell>
          <table:table-cell office:value-type="string" calcext:value-type="string">
            <text:p>Tortuga II</text:p>
          </table:table-cell>
          <table:table-cell table:number-columns-repeated="2"/>
          <table:table-cell office:value-type="string" calcext:value-type="string">
            <text:p>Heavy</text:p>
          </table:table-cell>
          <table:table-cell office:value-type="string" calcext:value-type="string">
            <text:p>CQB</text:p>
          </table:table-cell>
          <table:table-cell table:number-columns-repeated="2"/>
        </table:table-row>
        <table:table-row table:style-name="ro2">
          <table:table-cell office:value-type="string" calcext:value-type="string">
            <text:p>Deck-Sweeper Automatic Shotgun</text:p>
          </table:table-cell>
          <table:table-cell office:value-type="string" calcext:value-type="string">
            <text:p>Tortuga I</text:p>
          </table:table-cell>
          <table:table-cell table:number-columns-repeated="2"/>
          <table:table-cell office:value-type="string" calcext:value-type="string">
            <text:p>Main</text:p>
          </table:table-cell>
          <table:table-cell office:value-type="string" calcext:value-type="string">
            <text:p>CQB</text:p>
          </table:table-cell>
          <table:table-cell table:number-columns-repeated="2"/>
        </table:table-row>
        <table:table-row table:style-name="ro2">
          <table:table-cell office:value-type="string" calcext:value-type="string">
            <text:p>Combat Drill</text:p>
          </table:table-cell>
          <table:table-cell office:value-type="string" calcext:value-type="string">
            <text:p>Vlad III</text:p>
          </table:table-cell>
          <table:table-cell table:number-columns-repeated="2"/>
          <table:table-cell office:value-type="string" calcext:value-type="string">
            <text:p>Superheavy</text:p>
          </table:table-cell>
          <table:table-cell office:value-type="string" calcext:value-type="string">
            <text:p>Melee</text:p>
          </table:table-cell>
          <table:table-cell table:number-columns-repeated="2"/>
        </table:table-row>
        <table:table-row table:style-name="ro2">
          <table:table-cell office:value-type="string" calcext:value-type="string">
            <text:p>Impact Lance</text:p>
          </table:table-cell>
          <table:table-cell office:value-type="string" calcext:value-type="string">
            <text:p>Vlad I</text:p>
          </table:table-cell>
          <table:table-cell table:number-columns-repeated="2"/>
          <table:table-cell office:value-type="string" calcext:value-type="string">
            <text:p>Main</text:p>
          </table:table-cell>
          <table:table-cell office:value-type="string" calcext:value-type="string">
            <text:p>Melee</text:p>
          </table:table-cell>
          <table:table-cell table:number-columns-repeated="2"/>
        </table:table-row>
        <table:table-row table:style-name="ro2">
          <table:table-cell office:value-type="string" calcext:value-type="string">
            <text:p>Impaler Nailgun</text:p>
          </table:table-cell>
          <table:table-cell office:value-type="string" calcext:value-type="string">
            <text:p>Vlad II</text:p>
          </table:table-cell>
          <table:table-cell table:number-columns-repeated="2"/>
          <table:table-cell office:value-type="string" calcext:value-type="string">
            <text:p>Main</text:p>
          </table:table-cell>
          <table:table-cell office:value-type="string" calcext:value-type="string">
            <text:p>CQB</text:p>
          </table:table-cell>
          <table:table-cell table:number-columns-repeated="2"/>
        </table:table-row>
        <table:table-row table:style-name="ro2">
          <table:table-cell office:value-type="string" calcext:value-type="string">
            <text:p>Ferrofluid Lance</text:p>
          </table:table-cell>
          <table:table-cell office:value-type="string" calcext:value-type="string">
            <text:p>White Witch I</text:p>
          </table:table-cell>
          <table:table-cell table:number-columns-repeated="2"/>
          <table:table-cell office:value-type="string" calcext:value-type="string">
            <text:p>Main</text:p>
          </table:table-cell>
          <table:table-cell office:value-type="string" calcext:value-type="string">
            <text:p>Melee</text:p>
          </table:table-cell>
          <table:table-cell table:number-columns-repeated="2"/>
        </table:table-row>
        <table:table-row table:style-name="ro2">
          <table:table-cell office:value-type="string" calcext:value-type="string">
            <text:p>Retort Loop</text:p>
          </table:table-cell>
          <table:table-cell office:value-type="string" calcext:value-type="string">
            <text:p>White Witch III</text:p>
          </table:table-cell>
          <table:table-cell table:number-columns-repeated="2"/>
          <table:table-cell office:value-type="string" calcext:value-type="string">
            <text:p>Heavy</text:p>
          </table:table-cell>
          <table:table-cell office:value-type="string" calcext:value-type="string">
            <text:p>Cannon</text:p>
          </table:table-cell>
          <table:table-cell table:number-columns-repeated="2"/>
        </table:table-row>
        <table:table-row table:style-name="ro2">
          <table:table-cell office:value-type="string" calcext:value-type="string">
            <text:p>D/D 288</text:p>
          </table:table-cell>
          <table:table-cell office:value-type="string" calcext:value-type="string">
            <text:p>Zheng III</text:p>
          </table:table-cell>
          <table:table-cell table:number-columns-repeated="2"/>
          <table:table-cell office:value-type="string" calcext:value-type="string">
            <text:p>Superheavy</text:p>
          </table:table-cell>
          <table:table-cell office:value-type="string" calcext:value-type="string">
            <text:p>Melee</text:p>
          </table:table-cell>
          <table:table-cell table:number-columns-repeated="2"/>
        </table:table-row>
        <table:table-row table:style-name="ro2">
          <table:table-cell office:value-type="string" calcext:value-type="string">
            <text:p>Tiger-Hunter Combat Sheath</text:p>
          </table:table-cell>
          <table:table-cell office:value-type="string" calcext:value-type="string">
            <text:p>Zheng I</text:p>
          </table:table-cell>
          <table:table-cell table:number-columns-repeated="2"/>
          <table:table-cell office:value-type="string" calcext:value-type="string">
            <text:p>Main</text:p>
          </table:table-cell>
          <table:table-cell office:value-type="string" calcext:value-type="string">
            <text:p>Melee</text:p>
          </table:table-cell>
          <table:table-cell table:number-columns-repeated="2"/>
        </table:table-row>
        <table:table-row table:style-name="ro2">
          <table:table-cell office:value-type="string" calcext:value-type="string">
            <text:p>Blast Pick</text:p>
          </table:table-cell>
          <table:table-cell office:value-type="string" calcext:value-type="string">
            <text:p>Exotic</text:p>
          </table:table-cell>
          <table:table-cell table:number-columns-repeated="2"/>
          <table:table-cell office:value-type="string" calcext:value-type="string">
            <text:p>Heavy</text:p>
          </table:table-cell>
          <table:table-cell office:value-type="string" calcext:value-type="string">
            <text:p>Melee</text:p>
          </table:table-cell>
          <table:table-cell table:style-name="Default"/>
          <table:table-cell/>
        </table:table-row>
        <table:table-row table:style-name="ro2">
          <table:table-cell office:value-type="string" calcext:value-type="string">
            <text:p>Brood-Sibling’s Molt</text:p>
          </table:table-cell>
          <table:table-cell office:value-type="string" calcext:value-type="string">
            <text:p>Exotic</text:p>
          </table:table-cell>
          <table:table-cell table:number-columns-repeated="2"/>
          <table:table-cell office:value-type="string" calcext:value-type="string">
            <text:p>Main</text:p>
          </table:table-cell>
          <table:table-cell office:value-type="string" calcext:value-type="string">
            <text:p>Melee</text:p>
          </table:table-cell>
          <table:table-cell table:style-name="Default"/>
          <table:table-cell/>
        </table:table-row>
        <table:table-row table:style-name="ro2">
          <table:table-cell office:value-type="string" calcext:value-type="string">
            <text:p>Brutus’s Shield</text:p>
          </table:table-cell>
          <table:table-cell office:value-type="string" calcext:value-type="string">
            <text:p>Exotic</text:p>
          </table:table-cell>
          <table:table-cell table:number-columns-repeated="2"/>
          <table:table-cell office:value-type="string" calcext:value-type="string">
            <text:p>Main</text:p>
          </table:table-cell>
          <table:table-cell office:value-type="string" calcext:value-type="string">
            <text:p>Melee</text:p>
          </table:table-cell>
          <table:table-cell table:style-name="Default"/>
          <table:table-cell/>
        </table:table-row>
        <table:table-row table:style-name="ro2">
          <table:table-cell office:value-type="string" calcext:value-type="string">
            <text:p>Brutus’s Wrecker</text:p>
          </table:table-cell>
          <table:table-cell office:value-type="string" calcext:value-type="string">
            <text:p>Exotic</text:p>
          </table:table-cell>
          <table:table-cell table:number-columns-repeated="2"/>
          <table:table-cell office:value-type="string" calcext:value-type="string">
            <text:p>Heavy</text:p>
          </table:table-cell>
          <table:table-cell office:value-type="string" calcext:value-type="string">
            <text:p>Melee</text:p>
          </table:table-cell>
          <table:table-cell table:style-name="Default"/>
          <table:table-cell/>
        </table:table-row>
        <table:table-row table:style-name="ro2">
          <table:table-cell office:value-type="string" calcext:value-type="string">
            <text:p>Plasma Maul</text:p>
          </table:table-cell>
          <table:table-cell office:value-type="string" calcext:value-type="string">
            <text:p>Exotic</text:p>
          </table:table-cell>
          <table:table-cell table:number-columns-repeated="2"/>
          <table:table-cell office:value-type="string" calcext:value-type="string">
            <text:p>Heavy</text:p>
          </table:table-cell>
          <table:table-cell office:value-type="string" calcext:value-type="string">
            <text:p>Melee</text:p>
          </table:table-cell>
          <table:table-cell table:style-name="Default"/>
          <table:table-cell/>
        </table:table-row>
        <table:table-row table:style-name="ro2">
          <table:table-cell office:value-type="string" calcext:value-type="string">
            <text:p>Reaper Assault Cannon</text:p>
          </table:table-cell>
          <table:table-cell office:value-type="string" calcext:value-type="string">
            <text:p>Exotic</text:p>
          </table:table-cell>
          <table:table-cell table:number-columns-repeated="2"/>
          <table:table-cell office:value-type="string" calcext:value-type="string">
            <text:p>Main</text:p>
          </table:table-cell>
          <table:table-cell office:value-type="string" calcext:value-type="string">
            <text:p>Cannon</text:p>
          </table:table-cell>
          <table:table-cell table:style-name="Default"/>
          <table:table-cell/>
        </table:table-row>
        <table:table-row table:style-name="ro2">
          <table:table-cell office:value-type="string" calcext:value-type="string">
            <text:p>Shock Baton</text:p>
          </table:table-cell>
          <table:table-cell office:value-type="string" calcext:value-type="string">
            <text:p>Exotic</text:p>
          </table:table-cell>
          <table:table-cell table:number-columns-repeated="2"/>
          <table:table-cell office:value-type="string" calcext:value-type="string">
            <text:p>Main</text:p>
          </table:table-cell>
          <table:table-cell office:value-type="string" calcext:value-type="string">
            <text:p>Melee</text:p>
          </table:table-cell>
          <table:table-cell table:style-name="Default"/>
          <table:table-cell/>
        </table:table-row>
        <table:table-row table:style-name="ro2">
          <table:table-cell office:value-type="string" calcext:value-type="string">
            <text:p>XC-BR Battle Rifle</text:p>
          </table:table-cell>
          <table:table-cell office:value-type="string" calcext:value-type="string">
            <text:p>Exotic</text:p>
          </table:table-cell>
          <table:table-cell table:number-columns-repeated="2"/>
          <table:table-cell office:value-type="string" calcext:value-type="string">
            <text:p>Main</text:p>
          </table:table-cell>
          <table:table-cell office:value-type="string" calcext:value-type="string">
            <text:p>Rifle</text:p>
          </table:table-cell>
          <table:table-cell table:number-columns-repeated="2"/>
        </table:table-row>
        <table:table-row table:style-name="ro2">
          <table:table-cell office:value-type="string" calcext:value-type="string">
            <text:p>XC-DPM Predator Nexus</text:p>
          </table:table-cell>
          <table:table-cell office:value-type="string" calcext:value-type="string">
            <text:p>Exotic</text:p>
          </table:table-cell>
          <table:table-cell table:number-columns-repeated="2"/>
          <table:table-cell office:value-type="string" calcext:value-type="string">
            <text:p>Main</text:p>
          </table:table-cell>
          <table:table-cell office:value-type="string" calcext:value-type="string">
            <text:p>Nexus</text:p>
          </table:table-cell>
          <table:table-cell table:number-columns-repeated="2"/>
        </table:table-row>
        <table:table-row table:style-name="ro2">
          <table:table-cell office:value-type="string" calcext:value-type="string">
            <text:p>“Steelpunch” Heavy Needlebeam</text:p>
          </table:table-cell>
          <table:table-cell office:value-type="string" calcext:value-type="string">
            <text:p>Exotic</text:p>
          </table:table-cell>
          <table:table-cell table:number-columns-repeated="2"/>
          <table:table-cell office:value-type="string" calcext:value-type="string">
            <text:p>Heavy</text:p>
          </table:table-cell>
          <table:table-cell office:value-type="string" calcext:value-type="string">
            <text:p>Rifle</text:p>
          </table:table-cell>
          <table:table-cell table:number-columns-repeated="2"/>
        </table:table-row>
        <table:table-row table:style-name="ro2">
          <table:table-cell office:value-type="string" calcext:value-type="string">
            <text:p>“Sting” Heavy Anti-Armor Rifle</text:p>
          </table:table-cell>
          <table:table-cell office:value-type="string" calcext:value-type="string">
            <text:p>Exotic</text:p>
          </table:table-cell>
          <table:table-cell table:number-columns-repeated="2"/>
          <table:table-cell office:value-type="string" calcext:value-type="string">
            <text:p>Superheavy</text:p>
          </table:table-cell>
          <table:table-cell office:value-type="string" calcext:value-type="string">
            <text:p>Rifle</text:p>
          </table:table-cell>
          <table:table-cell table:number-columns-repeated="2"/>
        </table:table-row>
        <table:table-row table:style-name="ro2" table:number-rows-repeated="1048459">
          <table:table-cell table:number-columns-repeated="8"/>
        </table:table-row>
        <table:table-row table:style-name="ro2">
          <table:table-cell table:number-columns-repeated="8"/>
        </table:table-row>
      </table:table>
      <table:table table:name="Systems" table:style-name="ta1">
        <office:forms form:automatic-focus="false" form:apply-design-mode="false"/>
        <table:table-column table:style-name="co34" table:default-cell-style-name="Default"/>
        <table:table-column table:style-name="co28" table:default-cell-style-name="Default"/>
        <table:table-column table:style-name="co35" table:default-cell-style-name="Default"/>
        <table:table-column table:style-name="co36" table:default-cell-style-name="Default"/>
        <table:table-column table:style-name="co8" table:default-cell-style-name="ce51"/>
        <table:table-column table:style-name="co8" table:default-cell-style-name="ce33"/>
        <table:table-column table:style-name="co8" table:default-cell-style-name="ce54"/>
        <table:table-column table:style-name="co8" table:default-cell-style-name="ce33"/>
        <table:table-column table:style-name="co8" table:default-cell-style-name="ce54"/>
        <table:table-column table:style-name="co8" table:default-cell-style-name="ce33"/>
        <table:table-column table:style-name="co8" table:default-cell-style-name="Default"/>
        <table:table-column table:style-name="co37" table:default-cell-style-name="Default"/>
        <table:table-column table:style-name="co38" table:default-cell-style-name="Default"/>
        <table:table-row table:style-name="ro9">
          <table:table-cell office:value-type="string" calcext:value-type="string">
            <text:p>System</text:p>
          </table:table-cell>
          <table:table-cell office:value-type="string" calcext:value-type="string">
            <text:p>License</text:p>
          </table:table-cell>
          <table:table-cell office:value-type="string" calcext:value-type="string">
            <text:p>Frame</text:p>
          </table:table-cell>
          <table:table-cell office:value-type="string" calcext:value-type="string">
            <text:p>Talent</text:p>
          </table:table-cell>
          <table:table-cell table:style-name="ce50" office:value-type="string" calcext:value-type="string">
            <text:p>SP</text:p>
          </table:table-cell>
          <table:table-cell table:style-name="ce52" office:value-type="string" calcext:value-type="string">
            <text:p>Limited</text:p>
          </table:table-cell>
          <table:table-cell table:style-name="ce53" office:value-type="string" calcext:value-type="string">
            <text:p>Unique</text:p>
          </table:table-cell>
          <table:table-cell table:style-name="ce52" office:value-type="string" calcext:value-type="string">
            <text:p>AI</text:p>
          </table:table-cell>
          <table:table-cell table:style-name="ce53" office:value-type="string" calcext:value-type="string">
            <text:p>Indestructible</text:p>
          </table:table-cell>
          <table:table-cell table:style-name="ce52" office:value-type="string" calcext:value-type="string">
            <text:p>Mod</text:p>
          </table:table-cell>
          <table:table-cell/>
          <table:table-cell office:value-type="string" calcext:value-type="string">
            <text:p>Effect</text:p>
          </table:table-cell>
          <table:table-cell office:value-type="string" calcext:value-type="string">
            <text:p>Value</text:p>
          </table:table-cell>
        </table:table-row>
        <table:table-row table:style-name="ro2">
          <table:table-cell office:value-type="string" calcext:value-type="string">
            <text:p>Enlightenment-Class NHP</text:p>
          </table:table-cell>
          <table:table-cell table:number-columns-repeated="2"/>
          <table:table-cell office:value-type="string" calcext:value-type="string">
            <text:p>Technophile III</text:p>
          </table:table-cell>
          <table:table-cell table:number-columns-repeated="2"/>
          <table:table-cell office:value-type="float" office:value="1" calcext:value-type="float">
            <text:p>1</text:p>
          </table:table-cell>
          <table:table-cell table:number-columns-repeated="6"/>
        </table:table-row>
        <table:table-row table:style-name="ro2">
          <table:table-cell office:value-type="string" calcext:value-type="string">
            <text:p>Servant-Class NHP</text:p>
          </table:table-cell>
          <table:table-cell table:number-columns-repeated="2"/>
          <table:table-cell office:value-type="string" calcext:value-type="string">
            <text:p>Technophile I</text:p>
          </table:table-cell>
          <table:table-cell table:number-columns-repeated="2"/>
          <table:table-cell office:value-type="float" office:value="1" calcext:value-type="float">
            <text:p>1</text:p>
          </table:table-cell>
          <table:table-cell table:number-columns-repeated="6"/>
        </table:table-row>
        <table:table-row table:style-name="ro2">
          <table:table-cell office:value-type="string" calcext:value-type="string">
            <text:p>Student-Class NHP</text:p>
          </table:table-cell>
          <table:table-cell table:number-columns-repeated="2"/>
          <table:table-cell office:value-type="string" calcext:value-type="string">
            <text:p>Technophile II</text:p>
          </table:table-cell>
          <table:table-cell table:number-columns-repeated="2"/>
          <table:table-cell office:value-type="float" office:value="1" calcext:value-type="float">
            <text:p>1</text:p>
          </table:table-cell>
          <table:table-cell table:number-columns-repeated="6"/>
        </table:table-row>
        <table:table-row table:style-name="ro2">
          <table:table-cell office:value-type="string" calcext:value-type="string">
            <text:p>Unstable NHP</text:p>
          </table:table-cell>
          <table:table-cell table:number-columns-repeated="2"/>
          <table:table-cell office:value-type="string" calcext:value-type="string">
            <text:p>Iconoclast I</text:p>
          </table:table-cell>
          <table:table-cell table:number-columns-repeated="2"/>
          <table:table-cell office:value-type="float" office:value="1" calcext:value-type="float">
            <text:p>1</text:p>
          </table:table-cell>
          <table:table-cell table:number-columns-repeated="6"/>
        </table:table-row>
        <table:table-row table:style-name="ro2">
          <table:table-cell office:value-type="string" calcext:value-type="string">
            <text:p>Ammo Case I</text:p>
          </table:table-cell>
          <table:table-cell table:number-columns-repeated="2"/>
          <table:table-cell office:value-type="string" calcext:value-type="string">
            <text:p>Walking Armory I</text:p>
          </table:table-cell>
          <table:table-cell/>
          <table:table-cell office:value-type="float" office:value="6" calcext:value-type="float">
            <text:p>6</text:p>
          </table:table-cell>
          <table:table-cell table:number-columns-repeated="7"/>
        </table:table-row>
        <table:table-row table:style-name="ro2">
          <table:table-cell office:value-type="string" calcext:value-type="string">
            <text:p>Ammo Case II</text:p>
          </table:table-cell>
          <table:table-cell table:number-columns-repeated="2"/>
          <table:table-cell office:value-type="string" calcext:value-type="string">
            <text:p>Walking Armory II</text:p>
          </table:table-cell>
          <table:table-cell/>
          <table:table-cell office:value-type="float" office:value="6" calcext:value-type="float">
            <text:p>6</text:p>
          </table:table-cell>
          <table:table-cell table:number-columns-repeated="7"/>
        </table:table-row>
        <table:table-row table:style-name="ro2">
          <table:table-cell office:value-type="string" calcext:value-type="string">
            <text:p>Ammo Case III</text:p>
          </table:table-cell>
          <table:table-cell table:number-columns-repeated="2"/>
          <table:table-cell office:value-type="string" calcext:value-type="string">
            <text:p>Walking Armory III</text:p>
          </table:table-cell>
          <table:table-cell/>
          <table:table-cell office:value-type="float" office:value="6" calcext:value-type="float">
            <text:p>6</text:p>
          </table:table-cell>
          <table:table-cell table:number-columns-repeated="7"/>
        </table:table-row>
        <table:table-row table:style-name="ro2">
          <table:table-cell office:value-type="string" calcext:value-type="string">
            <text:p>Blink Anchor</text:p>
          </table:table-cell>
          <table:table-cell/>
          <table:table-cell office:value-type="string" calcext:value-type="string">
            <text:p>Sunzi</text:p>
          </table:table-cell>
          <table:table-cell table:number-columns-repeated="2"/>
          <table:table-cell office:value-type="float" office:value="3" calcext:value-type="float">
            <text:p>3</text:p>
          </table:table-cell>
          <table:table-cell table:number-columns-repeated="7"/>
        </table:table-row>
        <table:table-row table:style-name="ro2">
          <table:table-cell office:value-type="string" calcext:value-type="string">
            <text:p>Spaceborn EVA</text:p>
          </table:table-cell>
          <table:table-cell table:number-columns-repeated="2"/>
          <table:table-cell office:value-type="string" calcext:value-type="string">
            <text:p>Spaceborn I</text:p>
          </table:table-cell>
          <table:table-cell table:number-columns-repeated="2"/>
          <table:table-cell office:value-type="float" office:value="1" calcext:value-type="float">
            <text:p>1</text:p>
          </table:table-cell>
          <table:table-cell table:number-columns-repeated="6"/>
        </table:table-row>
        <table:table-row table:style-name="ro2">
          <table:table-cell office:value-type="string" calcext:value-type="string">
            <text:p>Armament Redundancy</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2">
          <table:table-cell office:value-type="string" calcext:value-type="string">
            <text:p>COMP/CON-Class Assistant Unit</text:p>
          </table:table-cell>
          <table:table-cell table:number-columns-repeated="3"/>
          <table:table-cell office:value-type="float" office:value="2" calcext:value-type="float">
            <text:p>2</text:p>
          </table:table-cell>
          <table:table-cell/>
          <table:table-cell table:number-columns-repeated="2" office:value-type="float" office:value="1" calcext:value-type="float">
            <text:p>1</text:p>
          </table:table-cell>
          <table:table-cell table:number-columns-repeated="5"/>
        </table:table-row>
        <table:table-row table:style-name="ro2">
          <table:table-cell office:value-type="string" calcext:value-type="string">
            <text:p>Custom Paint Job</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4"/>
        </table:table-row>
        <table:table-row table:style-name="ro2">
          <table:table-cell office:value-type="string" calcext:value-type="string">
            <text:p>EVA Module</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Expanded Compartment</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Manipulators</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Pattern-A Jericho Deployable Cover</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Pattern-A Smoke Charges</text:p>
          </table:table-cell>
          <table:table-cell table:number-columns-repeated="3"/>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number-columns-repeated="6"/>
        </table:table-row>
        <table:table-row table:style-name="ro2">
          <table:table-cell office:value-type="string" calcext:value-type="string">
            <text:p>Pattern-B Hex Charges</text:p>
          </table:table-cell>
          <table:table-cell table:number-columns-repeated="3"/>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number-columns-repeated="6"/>
        </table:table-row>
        <table:table-row table:style-name="ro2">
          <table:table-cell office:value-type="string" calcext:value-type="string">
            <text:p>Personalizations</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HP-Bonus</text:p>
          </table:table-cell>
          <table:table-cell office:value-type="float" office:value="2" calcext:value-type="float">
            <text:p>2</text:p>
          </table:table-cell>
        </table:table-row>
        <table:table-row table:style-name="ro2">
          <table:table-cell office:value-type="string" calcext:value-type="string">
            <text:p>Rapid Burst Jump Jet Systems</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Stable Structure</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Turret Drones</text:p>
          </table:table-cell>
          <table:table-cell table:number-columns-repeated="3"/>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number-columns-repeated="6"/>
        </table:table-row>
        <table:table-row table:style-name="ro2">
          <table:table-cell office:value-type="string" calcext:value-type="string">
            <text:p>Type-3 Projected Shield</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Type-I Flight System</text:p>
          </table:table-cell>
          <table:table-cell table:number-columns-repeated="3"/>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Jäger Kunst I</text:p>
          </table:table-cell>
          <table:table-cell office:value-type="string" calcext:value-type="string">
            <text:p>Atlas 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Jäger Kunst II</text:p>
          </table:table-cell>
          <table:table-cell office:value-type="string" calcext:value-type="string">
            <text:p>Atlas III</text:p>
          </table:table-cell>
          <table:table-cell table:number-columns-repeated="2"/>
          <table:table-cell table:number-columns-repeated="2" office:value-type="float" office:value="3" calcext:value-type="float">
            <text:p>3</text:p>
          </table:table-cell>
          <table:table-cell office:value-type="float" office:value="1" calcext:value-type="float">
            <text:p>1</text:p>
          </table:table-cell>
          <table:table-cell table:number-columns-repeated="6"/>
        </table:table-row>
        <table:table-row table:style-name="ro2">
          <table:table-cell office:value-type="string" calcext:value-type="string">
            <text:p>Multi-Gear Maneuver System</text:p>
          </table:table-cell>
          <table:table-cell office:value-type="string" calcext:value-type="string">
            <text:p>Atlas I</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Ricochet Blades</text:p>
          </table:table-cell>
          <table:table-cell office:value-type="string" calcext:value-type="string">
            <text:p>Atlas II</text:p>
          </table:table-cell>
          <table:table-cell table:number-columns-repeated="2"/>
          <table:table-cell table:number-columns-repeated="2" office:value-type="float" office:value="3" calcext:value-type="float">
            <text:p>3</text:p>
          </table:table-cell>
          <table:table-cell office:value-type="float" office:value="1" calcext:value-type="float">
            <text:p>1</text:p>
          </table:table-cell>
          <table:table-cell table:number-columns-repeated="6"/>
        </table:table-row>
        <table:table-row table:style-name="ro2">
          <table:table-cell office:value-type="string" calcext:value-type="string">
            <text:p>Hive Drone</text:p>
          </table:table-cell>
          <table:table-cell office:value-type="string" calcext:value-type="string">
            <text:p>Balor 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Nanocomposite Adaptation</text:p>
          </table:table-cell>
          <table:table-cell office:value-type="string" calcext:value-type="string">
            <text:p>Balor II</text:p>
          </table:table-cell>
          <table:table-cell table:number-columns-repeated="2"/>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3"/>
        </table:table-row>
        <table:table-row table:style-name="ro2">
          <table:table-cell office:value-type="string" calcext:value-type="string">
            <text:p>Scanner Swarm</text:p>
          </table:table-cell>
          <table:table-cell office:value-type="string" calcext:value-type="string">
            <text:p>Balor I</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Swarm Body</text:p>
          </table:table-cell>
          <table:table-cell office:value-type="string" calcext:value-type="string">
            <text:p>Balor I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Autoloader Drone</text:p>
          </table:table-cell>
          <table:table-cell office:value-type="string" calcext:value-type="string">
            <text:p>Barbarossa II</text:p>
          </table:table-cell>
          <table:table-cell table:number-columns-repeated="2"/>
          <table:table-cell office:value-type="float" office:value="2" calcext:value-type="float">
            <text:p>2</text:p>
          </table:table-cell>
          <table:table-cell table:number-columns-repeated="2" office:value-type="float" office:value="1" calcext:value-type="float">
            <text:p>1</text:p>
          </table:table-cell>
          <table:table-cell table:number-columns-repeated="6"/>
        </table:table-row>
        <table:table-row table:style-name="ro2">
          <table:table-cell office:value-type="string" calcext:value-type="string">
            <text:p>External Ammo Feed</text:p>
          </table:table-cell>
          <table:table-cell office:value-type="string" calcext:value-type="string">
            <text:p>Barbarossa III</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Flak Launcher</text:p>
          </table:table-cell>
          <table:table-cell office:value-type="string" calcext:value-type="string">
            <text:p>Barbarossa 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Siege Stabilizers</text:p>
          </table:table-cell>
          <table:table-cell office:value-type="string" calcext:value-type="string">
            <text:p>Barbarossa I</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Roller” Directed Payload Charges</text:p>
          </table:table-cell>
          <table:table-cell office:value-type="string" calcext:value-type="string">
            <text:p>Barbarossa I</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Black ICE Module</text:p>
          </table:table-cell>
          <table:table-cell office:value-type="string" calcext:value-type="string">
            <text:p>Black Witch III</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Ferrous Lash</text:p>
          </table:table-cell>
          <table:table-cell office:value-type="string" calcext:value-type="string">
            <text:p>Black Witch 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ICEOUT Drone</text:p>
          </table:table-cell>
          <table:table-cell office:value-type="string" calcext:value-type="string">
            <text:p>Black Witch II</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Magnetic Shield</text:p>
          </table:table-cell>
          <table:table-cell office:value-type="string" calcext:value-type="string">
            <text:p>Black Witch I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Perimeter Command Plate</text:p>
          </table:table-cell>
          <table:table-cell office:value-type="string" calcext:value-type="string">
            <text:p>Black Witch 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Reinforced Cabling</text:p>
          </table:table-cell>
          <table:table-cell office:value-type="string" calcext:value-type="string">
            <text:p>Blackbeard I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SEKHMET-Class NHP</text:p>
          </table:table-cell>
          <table:table-cell office:value-type="string" calcext:value-type="string">
            <text:p>Blackbeard III</text:p>
          </table:table-cell>
          <table:table-cell table:number-columns-repeated="2"/>
          <table:table-cell office:value-type="float" office:value="3" calcext:value-type="float">
            <text:p>3</text:p>
          </table:table-cell>
          <table:table-cell/>
          <table:table-cell table:number-columns-repeated="2" office:value-type="float" office:value="1" calcext:value-type="float">
            <text:p>1</text:p>
          </table:table-cell>
          <table:table-cell table:number-columns-repeated="5"/>
        </table:table-row>
        <table:table-row table:style-name="ro2">
          <table:table-cell office:value-type="string" calcext:value-type="string">
            <text:p>Synthetic Muscle Netting</text:p>
          </table:table-cell>
          <table:table-cell office:value-type="string" calcext:value-type="string">
            <text:p>Blackbeard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Hardpoint Reinforcement</text:p>
          </table:table-cell>
          <table:table-cell office:value-type="string" calcext:value-type="string">
            <text:p>Caliban 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Rapid Maneuver Jets</text:p>
          </table:table-cell>
          <table:table-cell office:value-type="string" calcext:value-type="string">
            <text:p>Caliban III</text:p>
          </table:table-cell>
          <table:table-cell table:number-columns-repeated="2"/>
          <table:table-cell office:value-type="float" office:value="4" calcext:value-type="float">
            <text:p>4</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Spike Charges</text:p>
          </table:table-cell>
          <table:table-cell office:value-type="string" calcext:value-type="string">
            <text:p>Caliban II</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Supermassive Mod</text:p>
          </table:table-cell>
          <table:table-cell office:value-type="string" calcext:value-type="string">
            <text:p>Caliban I</text:p>
          </table:table-cell>
          <table:table-cell table:number-columns-repeated="2"/>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3"/>
        </table:table-row>
        <table:table-row table:style-name="ro2">
          <table:table-cell office:value-type="string" calcext:value-type="string">
            <text:p>Core Siphon</text:p>
          </table:table-cell>
          <table:table-cell office:value-type="string" calcext:value-type="string">
            <text:p>Death’s Head 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High-Stress Mag Clamps</text:p>
          </table:table-cell>
          <table:table-cell office:value-type="string" calcext:value-type="string">
            <text:p>Death’s Head I</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Kinetic Compensator</text:p>
          </table:table-cell>
          <table:table-cell office:value-type="string" calcext:value-type="string">
            <text:p>Death’s Head I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Tracking Bug</text:p>
          </table:table-cell>
          <table:table-cell office:value-type="string" calcext:value-type="string">
            <text:p>Death’s Head 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Aegis Shield Generator</text:p>
          </table:table-cell>
          <table:table-cell office:value-type="string" calcext:value-type="string">
            <text:p>Drake II</text:p>
          </table:table-cell>
          <table:table-cell table:number-columns-repeated="2"/>
          <table:table-cell office:value-type="float" office:value="2" calcext:value-type="float">
            <text:p>2</text:p>
          </table:table-cell>
          <table:table-cell table:number-columns-repeated="2" office:value-type="float" office:value="1" calcext:value-type="float">
            <text:p>1</text:p>
          </table:table-cell>
          <table:table-cell table:number-columns-repeated="6"/>
        </table:table-row>
        <table:table-row table:style-name="ro2">
          <table:table-cell office:value-type="string" calcext:value-type="string">
            <text:p>Argonaut Shield</text:p>
          </table:table-cell>
          <table:table-cell office:value-type="string" calcext:value-type="string">
            <text:p>Drake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Portable Bunker</text:p>
          </table:table-cell>
          <table:table-cell office:value-type="string" calcext:value-type="string">
            <text:p>Drake III</text:p>
          </table:table-cell>
          <table:table-cell table:number-columns-repeated="2"/>
          <table:table-cell office:value-type="float" office:value="2" calcext:value-type="float">
            <text:p>2</text:p>
          </table:table-cell>
          <table:table-cell table:number-columns-repeated="2" office:value-type="float" office:value="1" calcext:value-type="float">
            <text:p>1</text:p>
          </table:table-cell>
          <table:table-cell table:number-columns-repeated="6"/>
        </table:table-row>
        <table:table-row table:style-name="ro2">
          <table:table-cell office:value-type="string" calcext:value-type="string">
            <text:p>Flicker Field Projector</text:p>
          </table:table-cell>
          <table:table-cell office:value-type="string" calcext:value-type="string">
            <text:p>Dusk Wing II</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Neurospike</text:p>
          </table:table-cell>
          <table:table-cell office:value-type="string" calcext:value-type="string">
            <text:p>Dusk Wing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Oasis Wall</text:p>
          </table:table-cell>
          <table:table-cell office:value-type="string" calcext:value-type="string">
            <text:p>Dusk Wing III</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Stuncrown</text:p>
          </table:table-cell>
          <table:table-cell office:value-type="string" calcext:value-type="string">
            <text:p>Dusk Wing III</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Dominion’s Breadth</text:p>
          </table:table-cell>
          <table:table-cell office:value-type="string" calcext:value-type="string">
            <text:p>Emperor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Shahnameh</text:p>
          </table:table-cell>
          <table:table-cell office:value-type="string" calcext:value-type="string">
            <text:p>Emperor II</text:p>
          </table:table-cell>
          <table:table-cell table:number-columns-repeated="2"/>
          <table:table-cell table:number-columns-repeated="2" office:value-type="float" office:value="3" calcext:value-type="float">
            <text:p>3</text:p>
          </table:table-cell>
          <table:table-cell office:value-type="float" office:value="1" calcext:value-type="float">
            <text:p>1</text:p>
          </table:table-cell>
          <table:table-cell table:number-columns-repeated="6"/>
        </table:table-row>
        <table:table-row table:style-name="ro2">
          <table:table-cell office:value-type="string" calcext:value-type="string">
            <text:p>The Imperial Eye</text:p>
          </table:table-cell>
          <table:table-cell office:value-type="string" calcext:value-type="string">
            <text:p>Emperor 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The Walk of Kings</text:p>
          </table:table-cell>
          <table:table-cell office:value-type="string" calcext:value-type="string">
            <text:p>Emperor III</text:p>
          </table:table-cell>
          <table:table-cell table:number-columns-repeated="2"/>
          <table:table-cell table:number-columns-repeated="2" office:value-type="float" office:value="3" calcext:value-type="float">
            <text:p>3</text:p>
          </table:table-cell>
          <table:table-cell office:value-type="float" office:value="1" calcext:value-type="float">
            <text:p>1</text:p>
          </table:table-cell>
          <table:table-cell table:number-columns-repeated="6"/>
        </table:table-row>
        <table:table-row table:style-name="ro2">
          <table:table-cell office:value-type="string" calcext:value-type="string">
            <text:p>Āyah of the Syzygy</text:p>
          </table:table-cell>
          <table:table-cell office:value-type="string" calcext:value-type="string">
            <text:p>Emperor I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AGNI-Class NHP</text:p>
          </table:table-cell>
          <table:table-cell office:value-type="string" calcext:value-type="string">
            <text:p>Genghis III</text:p>
          </table:table-cell>
          <table:table-cell table:number-columns-repeated="2"/>
          <table:table-cell office:value-type="float" office:value="3" calcext:value-type="float">
            <text:p>3</text:p>
          </table:table-cell>
          <table:table-cell table:number-columns-repeated="3" office:value-type="float" office:value="1" calcext:value-type="float">
            <text:p>1</text:p>
          </table:table-cell>
          <table:table-cell table:number-columns-repeated="5"/>
        </table:table-row>
        <table:table-row table:style-name="ro2">
          <table:table-cell office:value-type="string" calcext:value-type="string">
            <text:p>Auto-Cooler</text:p>
          </table:table-cell>
          <table:table-cell office:value-type="string" calcext:value-type="string">
            <text:p>Genghis 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Explosive Vents</text:p>
          </table:table-cell>
          <table:table-cell office:value-type="string" calcext:value-type="string">
            <text:p>Genghis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Havok Charges</text:p>
          </table:table-cell>
          <table:table-cell office:value-type="string" calcext:value-type="string">
            <text:p>Genghis II</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H0R_OS System Upgrade I</text:p>
          </table:table-cell>
          <table:table-cell office:value-type="string" calcext:value-type="string">
            <text:p>Goblin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H0R_OS System Upgrade II</text:p>
          </table:table-cell>
          <table:table-cell office:value-type="string" calcext:value-type="string">
            <text:p>Goblin 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H0R_OS System Upgrade III</text:p>
          </table:table-cell>
          <table:table-cell office:value-type="string" calcext:value-type="string">
            <text:p>Goblin I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Metahook</text:p>
          </table:table-cell>
          <table:table-cell office:value-type="string" calcext:value-type="string">
            <text:p>Goblin 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OSIRIS-Class NHP</text:p>
          </table:table-cell>
          <table:table-cell office:value-type="string" calcext:value-type="string">
            <text:p>Goblin III</text:p>
          </table:table-cell>
          <table:table-cell table:number-columns-repeated="2"/>
          <table:table-cell office:value-type="float" office:value="3" calcext:value-type="float">
            <text:p>3</text:p>
          </table:table-cell>
          <table:table-cell/>
          <table:table-cell table:number-columns-repeated="2" office:value-type="float" office:value="1" calcext:value-type="float">
            <text:p>1</text:p>
          </table:table-cell>
          <table:table-cell table:number-columns-repeated="5"/>
        </table:table-row>
        <table:table-row table:style-name="ro2">
          <table:table-cell office:value-type="string" calcext:value-type="string">
            <text:p>//SCORPION V70.1</text:p>
          </table:table-cell>
          <table:table-cell office:value-type="string" calcext:value-type="string">
            <text:p>Gorgon 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Mimic Mesh</text:p>
          </table:table-cell>
          <table:table-cell office:value-type="string" calcext:value-type="string">
            <text:p>Gorgon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Monitor Module</text:p>
          </table:table-cell>
          <table:table-cell office:value-type="string" calcext:value-type="string">
            <text:p>Gorgon 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SCYLLA-Class NHP</text:p>
          </table:table-cell>
          <table:table-cell office:value-type="string" calcext:value-type="string">
            <text:p>Gorgon III</text:p>
          </table:table-cell>
          <table:table-cell table:number-columns-repeated="2"/>
          <table:table-cell office:value-type="float" office:value="3" calcext:value-type="float">
            <text:p>3</text:p>
          </table:table-cell>
          <table:table-cell/>
          <table:table-cell table:number-columns-repeated="2" office:value-type="float" office:value="1" calcext:value-type="float">
            <text:p>1</text:p>
          </table:table-cell>
          <table:table-cell table:number-columns-repeated="5"/>
        </table:table-row>
        <table:table-row table:style-name="ro2">
          <table:table-cell office:value-type="string" calcext:value-type="string">
            <text:p>Sentinel Drone</text:p>
          </table:table-cell>
          <table:table-cell office:value-type="string" calcext:value-type="string">
            <text:p>Gorgon 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Assassin Drone</text:p>
          </table:table-cell>
          <table:table-cell office:value-type="string" calcext:value-type="string">
            <text:p>Hydra I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Puppetmaster</text:p>
          </table:table-cell>
          <table:table-cell office:value-type="string" calcext:value-type="string">
            <text:p>Hydra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Tempest Drone</text:p>
          </table:table-cell>
          <table:table-cell office:value-type="string" calcext:value-type="string">
            <text:p>Hydra 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Clamp Bombs</text:p>
          </table:table-cell>
          <table:table-cell office:value-type="string" calcext:value-type="string">
            <text:p>Iskander III</text:p>
          </table:table-cell>
          <table:table-cell table:number-columns-repeated="2"/>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number-columns-repeated="6"/>
        </table:table-row>
        <table:table-row table:style-name="ro2">
          <table:table-cell office:value-type="string" calcext:value-type="string">
            <text:p>Grounding Charges</text:p>
          </table:table-cell>
          <table:table-cell office:value-type="string" calcext:value-type="string">
            <text:p>Iskander I</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Repulser Field</text:p>
          </table:table-cell>
          <table:table-cell office:value-type="string" calcext:value-type="string">
            <text:p>Iskander II</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Tesseract</text:p>
          </table:table-cell>
          <table:table-cell office:value-type="string" calcext:value-type="string">
            <text:p>Iskander I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FORGE-2 Subaltern Squad</text:p>
          </table:table-cell>
          <table:table-cell office:value-type="string" calcext:value-type="string">
            <text:p>Kidd III</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table:number-columns-repeated="6"/>
        </table:table-row>
        <table:table-row table:style-name="ro2">
          <table:table-cell office:value-type="string" calcext:value-type="string">
            <text:p>Field-Approved, Brass Ignorant Modifications</text:p>
          </table:table-cell>
          <table:table-cell office:value-type="string" calcext:value-type="string">
            <text:p>Kidd 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Omnibus Plate</text:p>
          </table:table-cell>
          <table:table-cell office:value-type="string" calcext:value-type="string">
            <text:p>Kidd II</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PEBCAC</text:p>
          </table:table-cell>
          <table:table-cell office:value-type="string" calcext:value-type="string">
            <text:p>Kidd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SMOKESTACK Heat Sink</text:p>
          </table:table-cell>
          <table:table-cell office:value-type="string" calcext:value-type="string">
            <text:p>Kidd III</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Forge Clamps</text:p>
          </table:table-cell>
          <table:table-cell office:value-type="string" calcext:value-type="string">
            <text:p>Kobold I</text:p>
          </table:table-cell>
          <table:table-cell table:number-columns-repeated="2"/>
          <table:table-cell office:value-type="float" office:value="1" calcext:value-type="float">
            <text:p>1</text:p>
          </table:table-cell>
          <table:table-cell table:number-columns-repeated="8"/>
        </table:table-row>
        <table:table-row table:style-name="ro2">
          <table:table-cell office:value-type="string" calcext:value-type="string">
            <text:p>Immolate</text:p>
          </table:table-cell>
          <table:table-cell office:value-type="string" calcext:value-type="string">
            <text:p>Kobold I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Purifying Code</text:p>
          </table:table-cell>
          <table:table-cell office:value-type="string" calcext:value-type="string">
            <text:p>Kobold I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Seismic Ripper</text:p>
          </table:table-cell>
          <table:table-cell office:value-type="string" calcext:value-type="string">
            <text:p>Kobold 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Aceso Stabilizer</text:p>
          </table:table-cell>
          <table:table-cell office:value-type="string" calcext:value-type="string">
            <text:p>Lancaster III</text:p>
          </table:table-cell>
          <table:table-cell table:number-columns-repeated="2"/>
          <table:table-cell table:number-columns-repeated="2" office:value-type="float" office:value="3" calcext:value-type="float">
            <text:p>3</text:p>
          </table:table-cell>
          <table:table-cell office:value-type="float" office:value="1" calcext:value-type="float">
            <text:p>1</text:p>
          </table:table-cell>
          <table:table-cell table:number-columns-repeated="6"/>
        </table:table-row>
        <table:table-row table:style-name="ro2">
          <table:table-cell office:value-type="string" calcext:value-type="string">
            <text:p>Cable Winch System</text:p>
          </table:table-cell>
          <table:table-cell office:value-type="string" calcext:value-type="string">
            <text:p>Lancaster I</text:p>
          </table:table-cell>
          <table:table-cell table:number-columns-repeated="2"/>
          <table:table-cell office:value-type="float" office:value="1" calcext:value-type="float">
            <text:p>1</text:p>
          </table:table-cell>
          <table:table-cell table:number-columns-repeated="8"/>
        </table:table-row>
        <table:table-row table:style-name="ro2">
          <table:table-cell office:value-type="string" calcext:value-type="string">
            <text:p>Mule Harness</text:p>
          </table:table-cell>
          <table:table-cell office:value-type="string" calcext:value-type="string">
            <text:p>Lancaster 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Restock Drone</text:p>
          </table:table-cell>
          <table:table-cell office:value-type="string" calcext:value-type="string">
            <text:p>Lancaster I</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Whitewash Sealant Spray</text:p>
          </table:table-cell>
          <table:table-cell office:value-type="string" calcext:value-type="string">
            <text:p>Lancaster 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Antilinear Time</text:p>
          </table:table-cell>
          <table:table-cell office:value-type="string" calcext:value-type="string">
            <text:p>Lich 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DIDYMOS-Class NHP</text:p>
          </table:table-cell>
          <table:table-cell office:value-type="string" calcext:value-type="string">
            <text:p>Lich III</text:p>
          </table:table-cell>
          <table:table-cell table:number-columns-repeated="2"/>
          <table:table-cell table:number-columns-repeated="2" office:value-type="float" office:value="3" calcext:value-type="float">
            <text:p>3</text:p>
          </table:table-cell>
          <table:table-cell table:number-columns-repeated="2" office:value-type="float" office:value="1" calcext:value-type="float">
            <text:p>1</text:p>
          </table:table-cell>
          <table:table-cell table:number-columns-repeated="5"/>
        </table:table-row>
        <table:table-row table:style-name="ro2">
          <table:table-cell office:value-type="string" calcext:value-type="string">
            <text:p>Stay of Execution</text:p>
          </table:table-cell>
          <table:table-cell office:value-type="string" calcext:value-type="string">
            <text:p>Lich III</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Unhinge Chronology</text:p>
          </table:table-cell>
          <table:table-cell office:value-type="string" calcext:value-type="string">
            <text:p>Lich 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Wandering Nightmare</text:p>
          </table:table-cell>
          <table:table-cell office:value-type="string" calcext:value-type="string">
            <text:p>Lich I</text:p>
          </table:table-cell>
          <table:table-cell table:number-columns-repeated="2"/>
          <table:table-cell office:value-type="float" office:value="1" calcext:value-type="float">
            <text:p>1</text:p>
          </table:table-cell>
          <table:table-cell table:number-columns-repeated="8"/>
        </table:table-row>
        <table:table-row table:style-name="ro2">
          <table:table-cell office:value-type="string" calcext:value-type="string">
            <text:p>Beckoner</text:p>
          </table:table-cell>
          <table:table-cell office:value-type="string" calcext:value-type="string">
            <text:p>Manticore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EMP Pulse</text:p>
          </table:table-cell>
          <table:table-cell office:value-type="string" calcext:value-type="string">
            <text:p>Manticore I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Lightning Generator</text:p>
          </table:table-cell>
          <table:table-cell office:value-type="string" calcext:value-type="string">
            <text:p>Manticore III</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Smite</text:p>
          </table:table-cell>
          <table:table-cell office:value-type="string" calcext:value-type="string">
            <text:p>Manticore II</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Active Camoflage</text:p>
          </table:table-cell>
          <table:table-cell office:value-type="string" calcext:value-type="string">
            <text:p>Metalmark III</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Flash Charges</text:p>
          </table:table-cell>
          <table:table-cell office:value-type="string" calcext:value-type="string">
            <text:p>Metalmark I</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Reactive Weave</text:p>
          </table:table-cell>
          <table:table-cell office:value-type="string" calcext:value-type="string">
            <text:p>Metalmark I</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Shock Wreath</text:p>
          </table:table-cell>
          <table:table-cell office:value-type="string" calcext:value-type="string">
            <text:p>Metalmark I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row>
        <table:table-row table:style-name="ro2">
          <table:table-cell office:value-type="string" calcext:value-type="string">
            <text:p>Aggressive System Sync</text:p>
          </table:table-cell>
          <table:table-cell office:value-type="string" calcext:value-type="string">
            <text:p>Minotaur 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Interdiction Field</text:p>
          </table:table-cell>
          <table:table-cell office:value-type="string" calcext:value-type="string">
            <text:p>Minotaur III</text:p>
          </table:table-cell>
          <table:table-cell table:number-columns-repeated="2"/>
          <table:table-cell office:value-type="float" office:value="3" calcext:value-type="float">
            <text:p>3</text:p>
          </table:table-cell>
          <table:table-cell table:number-columns-repeated="8"/>
        </table:table-row>
        <table:table-row table:style-name="ro2">
          <table:table-cell office:value-type="string" calcext:value-type="string">
            <text:p>Law of Blades</text:p>
          </table:table-cell>
          <table:table-cell office:value-type="string" calcext:value-type="string">
            <text:p>Minotaur I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Mesmer Charges</text:p>
          </table:table-cell>
          <table:table-cell office:value-type="string" calcext:value-type="string">
            <text:p>Minotaur I</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Metafold Carver</text:p>
          </table:table-cell>
          <table:table-cell office:value-type="string" calcext:value-type="string">
            <text:p>Minotaur 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Viral Logic Suite</text:p>
          </table:table-cell>
          <table:table-cell office:value-type="string" calcext:value-type="string">
            <text:p>Minotaur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Javelin Rockets</text:p>
          </table:table-cell>
          <table:table-cell office:value-type="string" calcext:value-type="string">
            <text:p>Monarch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Stabilizer Mod</text:p>
          </table:table-cell>
          <table:table-cell office:value-type="string" calcext:value-type="string">
            <text:p>Monarch II</text:p>
          </table:table-cell>
          <table:table-cell table:number-columns-repeated="2"/>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3"/>
        </table:table-row>
        <table:table-row table:style-name="ro2">
          <table:table-cell office:value-type="string" calcext:value-type="string">
            <text:p>TLALOC-Class NHP</text:p>
          </table:table-cell>
          <table:table-cell office:value-type="string" calcext:value-type="string">
            <text:p>Monarch III</text:p>
          </table:table-cell>
          <table:table-cell table:number-columns-repeated="2"/>
          <table:table-cell office:value-type="float" office:value="3" calcext:value-type="float">
            <text:p>3</text:p>
          </table:table-cell>
          <table:table-cell/>
          <table:table-cell table:number-columns-repeated="2" office:value-type="float" office:value="1" calcext:value-type="float">
            <text:p>1</text:p>
          </table:table-cell>
          <table:table-cell table:number-columns-repeated="5"/>
        </table:table-row>
        <table:table-row table:style-name="ro2">
          <table:table-cell office:value-type="string" calcext:value-type="string">
            <text:p>Fade Cloak</text:p>
          </table:table-cell>
          <table:table-cell office:value-type="string" calcext:value-type="string">
            <text:p>Mourning Cloak I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Hunter Logic Suite</text:p>
          </table:table-cell>
          <table:table-cell office:value-type="string" calcext:value-type="string">
            <text:p>Mourning Cloak 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Singularity Motivator</text:p>
          </table:table-cell>
          <table:table-cell office:value-type="string" calcext:value-type="string">
            <text:p>Mourning Cloak 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Blinkshield</text:p>
          </table:table-cell>
          <table:table-cell office:value-type="string" calcext:value-type="string">
            <text:p>Napoleon I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Phase-Ready Mod</text:p>
          </table:table-cell>
          <table:table-cell office:value-type="string" calcext:value-type="string">
            <text:p>Napoleon II</text:p>
          </table:table-cell>
          <table:table-cell table:number-columns-repeated="2"/>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3"/>
        </table:table-row>
        <table:table-row table:style-name="ro2">
          <table:table-cell office:value-type="string" calcext:value-type="string">
            <text:p>Stasis Barrier</text:p>
          </table:table-cell>
          <table:table-cell office:value-type="string" calcext:value-type="string">
            <text:p>Napoleon II</text:p>
          </table:table-cell>
          <table:table-cell table:number-columns-repeated="2"/>
          <table:table-cell office:value-type="float" office:value="2" calcext:value-type="float">
            <text:p>2</text:p>
          </table:table-cell>
          <table:table-cell table:number-columns-repeated="2" office:value-type="float" office:value="1" calcext:value-type="float">
            <text:p>1</text:p>
          </table:table-cell>
          <table:table-cell table:number-columns-repeated="6"/>
        </table:table-row>
        <table:table-row table:style-name="ro2">
          <table:table-cell office:value-type="string" calcext:value-type="string">
            <text:p>Stasis Bolt</text:p>
          </table:table-cell>
          <table:table-cell office:value-type="string" calcext:value-type="string">
            <text:p>Napoleon I</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Stasis Generator</text:p>
          </table:table-cell>
          <table:table-cell office:value-type="string" calcext:value-type="string">
            <text:p>Napoleon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Armor-Lock Plating</text:p>
          </table:table-cell>
          <table:table-cell office:value-type="string" calcext:value-type="string">
            <text:p>Nelson II</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Bulwark Mods</text:p>
          </table:table-cell>
          <table:table-cell office:value-type="string" calcext:value-type="string">
            <text:p>Nelson I</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Ramjet</text:p>
          </table:table-cell>
          <table:table-cell office:value-type="string" calcext:value-type="string">
            <text:p>Nelson III</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Thermal Charge</text:p>
          </table:table-cell>
          <table:table-cell office:value-type="string" calcext:value-type="string">
            <text:p>Nelson II</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row>
        <table:table-row table:style-name="ro2">
          <table:table-cell office:value-type="string" calcext:value-type="string">
            <text:p>Eye of Horus</text:p>
          </table:table-cell>
          <table:table-cell office:value-type="string" calcext:value-type="string">
            <text:p>Pegasus II</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Hunter Lock</text:p>
          </table:table-cell>
          <table:table-cell office:value-type="string" calcext:value-type="string">
            <text:p>Pegasus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SISYPHUS-Class NHP</text:p>
          </table:table-cell>
          <table:table-cell office:value-type="string" calcext:value-type="string">
            <text:p>Pegasus III</text:p>
          </table:table-cell>
          <table:table-cell table:number-columns-repeated="2"/>
          <table:table-cell office:value-type="float" office:value="2" calcext:value-type="float">
            <text:p>2</text:p>
          </table:table-cell>
          <table:table-cell/>
          <table:table-cell table:number-columns-repeated="2" office:value-type="float" office:value="1" calcext:value-type="float">
            <text:p>1</text:p>
          </table:table-cell>
          <table:table-cell table:number-columns-repeated="5"/>
        </table:table-row>
        <table:table-row table:style-name="ro2">
          <table:table-cell office:value-type="string" calcext:value-type="string">
            <text:p>BB Breach/Blast Charges</text:p>
          </table:table-cell>
          <table:table-cell office:value-type="string" calcext:value-type="string">
            <text:p>Raleigh I</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number-columns-repeated="6"/>
        </table:table-row>
        <table:table-row table:style-name="ro2">
          <table:table-cell office:value-type="string" calcext:value-type="string">
            <text:p>UNCLE-Class Comp/Con</text:p>
          </table:table-cell>
          <table:table-cell office:value-type="string" calcext:value-type="string">
            <text:p>Raleigh III</text:p>
          </table:table-cell>
          <table:table-cell table:number-columns-repeated="2"/>
          <table:table-cell office:value-type="float" office:value="3" calcext:value-type="float">
            <text:p>3</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2">
          <table:table-cell office:value-type="string" calcext:value-type="string">
            <text:p>“Roland” Chamber</text:p>
          </table:table-cell>
          <table:table-cell office:value-type="string" calcext:value-type="string">
            <text:p>Raleigh II</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ENCLAVE-Pattern Support Shield</text:p>
          </table:table-cell>
          <table:table-cell office:value-type="string" calcext:value-type="string">
            <text:p>Saladin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Flash Anchor</text:p>
          </table:table-cell>
          <table:table-cell office:value-type="string" calcext:value-type="string">
            <text:p>Saladin II</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Hardlight Defense System</text:p>
          </table:table-cell>
          <table:table-cell office:value-type="string" calcext:value-type="string">
            <text:p>Saladin II</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NOAH-Class NHP</text:p>
          </table:table-cell>
          <table:table-cell office:value-type="string" calcext:value-type="string">
            <text:p>Saladin III</text:p>
          </table:table-cell>
          <table:table-cell table:number-columns-repeated="2"/>
          <table:table-cell office:value-type="float" office:value="3" calcext:value-type="float">
            <text:p>3</text:p>
          </table:table-cell>
          <table:table-cell/>
          <table:table-cell table:number-columns-repeated="2" office:value-type="float" office:value="1" calcext:value-type="float">
            <text:p>1</text:p>
          </table:table-cell>
          <table:table-cell table:number-columns-repeated="5"/>
        </table:table-row>
        <table:table-row table:style-name="ro2">
          <table:table-cell office:value-type="string" calcext:value-type="string">
            <text:p>Paracausal Mod</text:p>
          </table:table-cell>
          <table:table-cell office:value-type="string" calcext:value-type="string">
            <text:p>Saladin III</text:p>
          </table:table-cell>
          <table:table-cell table:number-columns-repeated="2"/>
          <table:table-cell office:value-type="float" office:value="4" calcext:value-type="float">
            <text:p>4</text:p>
          </table:table-cell>
          <table:table-cell table:number-columns-repeated="4"/>
          <table:table-cell office:value-type="float" office:value="1" calcext:value-type="float">
            <text:p>1</text:p>
          </table:table-cell>
          <table:table-cell table:number-columns-repeated="3"/>
        </table:table-row>
        <table:table-row table:style-name="ro2">
          <table:table-cell office:value-type="string" calcext:value-type="string">
            <text:p>ASURA-Class NHP</text:p>
          </table:table-cell>
          <table:table-cell office:value-type="string" calcext:value-type="string">
            <text:p>Sherman III</text:p>
          </table:table-cell>
          <table:table-cell table:number-columns-repeated="2"/>
          <table:table-cell office:value-type="float" office:value="3" calcext:value-type="float">
            <text:p>3</text:p>
          </table:table-cell>
          <table:table-cell table:number-columns-repeated="3" office:value-type="float" office:value="1" calcext:value-type="float">
            <text:p>1</text:p>
          </table:table-cell>
          <table:table-cell table:number-columns-repeated="5"/>
        </table:table-row>
        <table:table-row table:style-name="ro2">
          <table:table-cell office:value-type="string" calcext:value-type="string">
            <text:p>Reactor Stabilizer</text:p>
          </table:table-cell>
          <table:table-cell office:value-type="string" calcext:value-type="string">
            <text:p>Sherman I</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Redundant Systems Upgrade</text:p>
          </table:table-cell>
          <table:table-cell office:value-type="string" calcext:value-type="string">
            <text:p>Sherman II</text:p>
          </table:table-cell>
          <table:table-cell table:number-columns-repeated="2"/>
          <table:table-cell office:value-type="float" office:value="3" calcext:value-type="float">
            <text:p>3</text:p>
          </table:table-cell>
          <table:table-cell table:number-columns-repeated="2" office:value-type="float" office:value="1" calcext:value-type="float">
            <text:p>1</text:p>
          </table:table-cell>
          <table:table-cell table:number-columns-repeated="6"/>
        </table:table-row>
        <table:table-row table:style-name="ro2">
          <table:table-cell office:value-type="string" calcext:value-type="string">
            <text:p>Accelerate</text:p>
          </table:table-cell>
          <table:table-cell office:value-type="string" calcext:value-type="string">
            <text:p>Sunzi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Blink Charges</text:p>
          </table:table-cell>
          <table:table-cell office:value-type="string" calcext:value-type="string">
            <text:p>Sunzi I</text:p>
          </table:table-cell>
          <table:table-cell table:number-columns-repeated="2"/>
          <table:table-cell table:number-columns-repeated="2" office:value-type="float" office:value="3" calcext:value-type="float">
            <text:p>3</text:p>
          </table:table-cell>
          <table:table-cell office:value-type="float" office:value="1" calcext:value-type="float">
            <text:p>1</text:p>
          </table:table-cell>
          <table:table-cell table:number-columns-repeated="6"/>
        </table:table-row>
        <table:table-row table:style-name="ro2">
          <table:table-cell office:value-type="string" calcext:value-type="string">
            <text:p>Blinkspace Tunneler</text:p>
          </table:table-cell>
          <table:table-cell office:value-type="string" calcext:value-type="string">
            <text:p>Sunzi 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Final Secret</text:p>
          </table:table-cell>
          <table:table-cell office:value-type="string" calcext:value-type="string">
            <text:p>Sunzi I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Realspace Breach</text:p>
          </table:table-cell>
          <table:table-cell office:value-type="string" calcext:value-type="string">
            <text:p>Sunzi I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ATHENA-Class NHP</text:p>
          </table:table-cell>
          <table:table-cell office:value-type="string" calcext:value-type="string">
            <text:p>Swallowtail III</text:p>
          </table:table-cell>
          <table:table-cell table:number-columns-repeated="2"/>
          <table:table-cell office:value-type="float" office:value="3" calcext:value-type="float">
            <text:p>3</text:p>
          </table:table-cell>
          <table:table-cell/>
          <table:table-cell table:number-columns-repeated="2" office:value-type="float" office:value="1" calcext:value-type="float">
            <text:p>1</text:p>
          </table:table-cell>
          <table:table-cell table:number-columns-repeated="5"/>
        </table:table-row>
        <table:table-row table:style-name="ro2">
          <table:table-cell office:value-type="string" calcext:value-type="string">
            <text:p>LB/OC Cloaking Field</text:p>
          </table:table-cell>
          <table:table-cell office:value-type="string" calcext:value-type="string">
            <text:p>Swallowtail III</text:p>
          </table:table-cell>
          <table:table-cell table:number-columns-repeated="2"/>
          <table:table-cell office:value-type="float" office:value="4" calcext:value-type="float">
            <text:p>4</text:p>
          </table:table-cell>
          <table:table-cell table:number-columns-repeated="8"/>
        </table:table-row>
        <table:table-row table:style-name="ro2">
          <table:table-cell office:value-type="string" calcext:value-type="string">
            <text:p>Lotus Projector</text:p>
          </table:table-cell>
          <table:table-cell office:value-type="string" calcext:value-type="string">
            <text:p>Swallowtail 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Markerlight</text:p>
          </table:table-cell>
          <table:table-cell office:value-type="string" calcext:value-type="string">
            <text:p>Swallowtail 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Retractable Profile</text:p>
          </table:table-cell>
          <table:table-cell office:value-type="string" calcext:value-type="string">
            <text:p>Swallowtail II</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Deep Well Heat Sink</text:p>
          </table:table-cell>
          <table:table-cell office:value-type="string" calcext:value-type="string">
            <text:p>Tokugawa II</text:p>
          </table:table-cell>
          <table:table-cell table:number-columns-repeated="2"/>
          <table:table-cell office:value-type="float" office:value="4" calcext:value-type="float">
            <text:p>4</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External Batteries</text:p>
          </table:table-cell>
          <table:table-cell office:value-type="string" calcext:value-type="string">
            <text:p>Tokugawa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LUCIFER-Class NHP</text:p>
          </table:table-cell>
          <table:table-cell office:value-type="string" calcext:value-type="string">
            <text:p>Tokugawa III</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5"/>
        </table:table-row>
        <table:table-row table:style-name="ro2">
          <table:table-cell office:value-type="string" calcext:value-type="string">
            <text:p>Plasma Gauntlet</text:p>
          </table:table-cell>
          <table:table-cell office:value-type="string" calcext:value-type="string">
            <text:p>Tokugawa III</text:p>
          </table:table-cell>
          <table:table-cell table:number-columns-repeated="2"/>
          <table:table-cell office:value-type="float" office:value="2" calcext:value-type="float">
            <text:p>2</text:p>
          </table:table-cell>
          <table:table-cell table:number-columns-repeated="2" office:value-type="float" office:value="1" calcext:value-type="float">
            <text:p>1</text:p>
          </table:table-cell>
          <table:table-cell table:number-columns-repeated="6"/>
        </table:table-row>
        <table:table-row table:style-name="ro2">
          <table:table-cell office:value-type="string" calcext:value-type="string">
            <text:p>Hyperdense Armor</text:p>
          </table:table-cell>
          <table:table-cell office:value-type="string" calcext:value-type="string">
            <text:p>Tortuga III</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Siege Ram</text:p>
          </table:table-cell>
          <table:table-cell office:value-type="string" calcext:value-type="string">
            <text:p>Tortuga 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Throughbolt Rounds</text:p>
          </table:table-cell>
          <table:table-cell office:value-type="string" calcext:value-type="string">
            <text:p>Tortuga I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row>
        <table:table-row table:style-name="ro2">
          <table:table-cell office:value-type="string" calcext:value-type="string">
            <text:p>Caltrop Launcher</text:p>
          </table:table-cell>
          <table:table-cell office:value-type="string" calcext:value-type="string">
            <text:p>Vlad II</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Charged Stake</text:p>
          </table:table-cell>
          <table:table-cell office:value-type="string" calcext:value-type="string">
            <text:p>Vlad III</text:p>
          </table:table-cell>
          <table:table-cell table:number-columns-repeated="2"/>
          <table:table-cell office:value-type="float" office:value="2" calcext:value-type="float">
            <text:p>2</text:p>
          </table:table-cell>
          <table:table-cell table:number-columns-repeated="8"/>
        </table:table-row>
        <table:table-row table:style-name="ro2">
          <table:table-cell office:value-type="string" calcext:value-type="string">
            <text:p>Webjaw Snare</text:p>
          </table:table-cell>
          <table:table-cell office:value-type="string" calcext:value-type="string">
            <text:p>Vlad I</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Camus’s Razor</text:p>
          </table:table-cell>
          <table:table-cell office:value-type="string" calcext:value-type="string">
            <text:p>White Witch 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Ferrospike Barrier</text:p>
          </table:table-cell>
          <table:table-cell office:value-type="string" calcext:value-type="string">
            <text:p>White Witch III</text:p>
          </table:table-cell>
          <table:table-cell table:number-columns-repeated="2"/>
          <table:table-cell office:value-type="float" office:value="3" calcext:value-type="float">
            <text:p>3</text:p>
          </table:table-cell>
          <table:table-cell table:number-columns-repeated="8"/>
        </table:table-row>
        <table:table-row table:style-name="ro2">
          <table:table-cell office:value-type="string" calcext:value-type="string">
            <text:p>Pinning Spire</text:p>
          </table:table-cell>
          <table:table-cell office:value-type="string" calcext:value-type="string">
            <text:p>White Witch I</text:p>
          </table:table-cell>
          <table:table-cell table:number-columns-repeated="2"/>
          <table:table-cell office:value-type="float" office:value="1" calcext:value-type="float">
            <text:p>1</text:p>
          </table:table-cell>
          <table:table-cell table:number-columns-repeated="8"/>
        </table:table-row>
        <table:table-row table:style-name="ro2">
          <table:table-cell office:value-type="string" calcext:value-type="string">
            <text:p>Sympathetic Shield</text:p>
          </table:table-cell>
          <table:table-cell office:value-type="string" calcext:value-type="string">
            <text:p>White Witch II</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number-columns-repeated="7"/>
        </table:table-row>
        <table:table-row table:style-name="ro2">
          <table:table-cell office:value-type="string" calcext:value-type="string">
            <text:p>Molten Wreathe</text:p>
          </table:table-cell>
          <table:table-cell office:value-type="string" calcext:value-type="string">
            <text:p>Zheng II</text:p>
          </table:table-cell>
          <table:table-cell table:number-columns-repeated="2"/>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3"/>
        </table:table-row>
        <table:table-row table:style-name="ro2">
          <table:table-cell office:value-type="string" calcext:value-type="string">
            <text:p>Total Strength Suite I</text:p>
          </table:table-cell>
          <table:table-cell office:value-type="string" calcext:value-type="string">
            <text:p>Zheng I</text:p>
          </table:table-cell>
          <table:table-cell table:number-columns-repeated="2"/>
          <table:table-cell office:value-type="float" office:value="1" calcext:value-type="float">
            <text:p>1</text:p>
          </table:table-cell>
          <table:table-cell table:number-columns-repeated="8"/>
        </table:table-row>
        <table:table-row table:style-name="ro2">
          <table:table-cell office:value-type="string" calcext:value-type="string">
            <text:p>Total Strength Suite II</text:p>
          </table:table-cell>
          <table:table-cell office:value-type="string" calcext:value-type="string">
            <text:p>Zheng II</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Total Strength Suite III</text:p>
          </table:table-cell>
          <table:table-cell office:value-type="string" calcext:value-type="string">
            <text:p>Zheng III</text:p>
          </table:table-cell>
          <table:table-cell table:number-columns-repeated="2"/>
          <table:table-cell office:value-type="float" office:value="3" calcext:value-type="float">
            <text:p>3</text:p>
          </table:table-cell>
          <table:table-cell table:number-columns-repeated="8"/>
        </table:table-row>
        <table:table-row table:style-name="ro2">
          <table:table-cell office:value-type="string" calcext:value-type="string">
            <text:p><text:s/>ADJUTANT-Class Comp/Con</text:p>
          </table:table-cell>
          <table:table-cell office:value-type="string" calcext:value-type="string">
            <text:p>Exotic</text:p>
          </table:table-cell>
          <table:table-cell table:number-columns-repeated="2"/>
          <table:table-cell office:value-type="float" office:value="3" calcext:value-type="float">
            <text:p>3</text:p>
          </table:table-cell>
          <table:table-cell/>
          <table:table-cell table:number-columns-repeated="2" office:value-type="float" office:value="1" calcext:value-type="float">
            <text:p>1</text:p>
          </table:table-cell>
          <table:table-cell table:number-columns-repeated="5"/>
        </table:table-row>
        <table:table-row table:style-name="ro2">
          <table:table-cell office:value-type="string" calcext:value-type="string">
            <text:p>Carapace Cladding</text:p>
          </table:table-cell>
          <table:table-cell office:value-type="string" calcext:value-type="string">
            <text:p>Exotic</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Cockpit-Integrated Stim Pump</text:p>
          </table:table-cell>
          <table:table-cell office:value-type="string" calcext:value-type="string">
            <text:p>Exotic</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Cynosure</text:p>
          </table:table-cell>
          <table:table-cell office:value-type="string" calcext:value-type="string">
            <text:p>Exotic</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Fragment of Beggar One</text:p>
          </table:table-cell>
          <table:table-cell office:value-type="string" calcext:value-type="string">
            <text:p>Exotic</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Markey’s Fusebox</text:p>
          </table:table-cell>
          <table:table-cell office:value-type="string" calcext:value-type="string">
            <text:p>Exotic</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6"/>
        </table:table-row>
        <table:table-row table:style-name="ro2">
          <table:table-cell office:value-type="string" calcext:value-type="string">
            <text:p>Mesmertrance Dampener</text:p>
          </table:table-cell>
          <table:table-cell office:value-type="string" calcext:value-type="string">
            <text:p>Exotic</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Miniaturized LinAc Coherent Beam Cannon</text:p>
          </table:table-cell>
          <table:table-cell office:value-type="string" calcext:value-type="string">
            <text:p>Exotic</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table-cell office:value-type="string" calcext:value-type="string">
            <text:p>Opportunity</text:p>
          </table:table-cell>
          <table:table-cell office:value-type="string" calcext:value-type="string">
            <text:p>Exotic</text:p>
          </table:table-cell>
          <table:table-cell table:number-columns-repeated="2"/>
          <table:table-cell office:value-type="float" office:value="2" calcext:value-type="float">
            <text:p>2</text:p>
          </table:table-cell>
          <table:table-cell/>
          <table:table-cell table:number-columns-repeated="2" office:value-type="float" office:value="1" calcext:value-type="float">
            <text:p>1</text:p>
          </table:table-cell>
          <table:table-cell table:number-columns-repeated="5"/>
        </table:table-row>
        <table:table-row table:style-name="ro2">
          <table:table-cell office:value-type="string" calcext:value-type="string">
            <text:p>Pattern-C Advanced Charges</text:p>
          </table:table-cell>
          <table:table-cell office:value-type="string" calcext:value-type="string">
            <text:p>Exotic</text:p>
          </table:table-cell>
          <table:table-cell table:number-columns-repeated="2"/>
          <table:table-cell table:number-columns-repeated="2" office:value-type="float" office:value="3" calcext:value-type="float">
            <text:p>3</text:p>
          </table:table-cell>
          <table:table-cell office:value-type="float" office:value="1" calcext:value-type="float">
            <text:p>1</text:p>
          </table:table-cell>
          <table:table-cell table:number-columns-repeated="6"/>
        </table:table-row>
        <table:table-row table:style-name="ro2">
          <table:table-cell office:value-type="string" calcext:value-type="string">
            <text:p>Snapdragon Anti-Chassis Guided Missile Launcher</text:p>
          </table:table-cell>
          <table:table-cell office:value-type="string" calcext:value-type="string">
            <text:p>Exotic</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2" table:number-rows-repeated="1048387">
          <table:table-cell table:number-columns-repeated="13"/>
        </table:table-row>
        <table:table-row table:style-name="ro2">
          <table:table-cell table:number-columns-repeated="13"/>
        </table:table-row>
      </table:table>
      <table:table table:name="Skill Triggers" table:style-name="ta1">
        <office:forms form:automatic-focus="false" form:apply-design-mode="false"/>
        <table:table-column table:style-name="co39" table:default-cell-style-name="Default"/>
        <table:table-column table:style-name="co40" table:number-columns-repeated="2" table:default-cell-style-name="Default"/>
        <table:table-column table:style-name="co11" table:default-cell-style-name="Default"/>
        <table:table-row table:style-name="ro2">
          <table:table-cell office:value-type="string" calcext:value-type="string">
            <text:p>Skill Trigger</text:p>
          </table:table-cell>
          <table:table-cell office:value-type="string" calcext:value-type="string">
            <text:p>Valid Select Skill Trigger</text:p>
          </table:table-cell>
          <table:table-cell table:number-columns-repeated="2"/>
        </table:table-row>
        <table:table-row table:style-name="ro2">
          <table:table-cell office:value-type="string" calcext:value-type="string">
            <text:p>Act Unseen or Unheard</text:p>
          </table:table-cell>
          <table:table-cell table:formula="of:=IF(&#10;    OR(&#10;        COUNTIF([$Build.$B$2:.$B$17];[.A2])=0;&#10;        SUMPRODUCT(&#10;            ([.$A$2:.$A$30]&lt;&gt;[.A2]) *&#10;            (&#10;                COUNTIF([$Build.$B$2:.$B$17];[.$A$2:.$A$30])&#10;                &gt;=&#10;                COUNTIF([$Build.$B$2:.$B$17];[.A2])&#10;            )&#10;        )&gt;=3&#10;    );&#10;    [.A2];&#10;    &quot;&quot;&#10;)" office:value-type="string" office:string-value="Act Unseen or Unheard" calcext:value-type="string">
            <text:p>Act Unseen or Unheard</text:p>
          </table:table-cell>
          <table:table-cell/>
          <table:table-cell table:style-name="ce47"/>
        </table:table-row>
        <table:table-row table:style-name="ro2">
          <table:table-cell office:value-type="string" calcext:value-type="string">
            <text:p>Apply Fists to Faces</text:p>
          </table:table-cell>
          <table:table-cell table:formula="of:=IF(&#10;    OR(&#10;        COUNTIF([$Build.$B$2:.$B$17];[.A3])=0;&#10;        SUMPRODUCT(&#10;            ([.$A$2:.$A$30]&lt;&gt;[.A3]) *&#10;            (&#10;                COUNTIF([$Build.$B$2:.$B$17];[.$A$2:.$A$30])&#10;                &gt;=&#10;                COUNTIF([$Build.$B$2:.$B$17];[.A3])&#10;            )&#10;        )&gt;=3&#10;    );&#10;    [.A3];&#10;    &quot;&quot;&#10;)" office:value-type="string" office:string-value="Apply Fists to Faces" calcext:value-type="string">
            <text:p>Apply Fists to Faces</text:p>
          </table:table-cell>
          <table:table-cell table:number-columns-repeated="2"/>
        </table:table-row>
        <table:table-row table:style-name="ro2">
          <table:table-cell office:value-type="string" calcext:value-type="string">
            <text:p>Assault</text:p>
          </table:table-cell>
          <table:table-cell table:formula="of:=IF(&#10;    OR(&#10;        COUNTIF([$Build.$B$2:.$B$17];[.A4])=0;&#10;        SUMPRODUCT(&#10;            ([.$A$2:.$A$30]&lt;&gt;[.A4]) *&#10;            (&#10;                COUNTIF([$Build.$B$2:.$B$17];[.$A$2:.$A$30])&#10;                &gt;=&#10;                COUNTIF([$Build.$B$2:.$B$17];[.A4])&#10;            )&#10;        )&gt;=3&#10;    );&#10;    [.A4];&#10;    &quot;&quot;&#10;)" office:value-type="string" office:string-value="Assault" calcext:value-type="string">
            <text:p>Assault</text:p>
          </table:table-cell>
          <table:table-cell table:number-columns-repeated="2"/>
        </table:table-row>
        <table:table-row table:style-name="ro2">
          <table:table-cell office:value-type="string" calcext:value-type="string">
            <text:p>Blow Something Up</text:p>
          </table:table-cell>
          <table:table-cell table:formula="of:=IF(&#10;    OR(&#10;        COUNTIF([$Build.$B$2:.$B$17];[.A5])=0;&#10;        SUMPRODUCT(&#10;            ([.$A$2:.$A$30]&lt;&gt;[.A5]) *&#10;            (&#10;                COUNTIF([$Build.$B$2:.$B$17];[.$A$2:.$A$30])&#10;                &gt;=&#10;                COUNTIF([$Build.$B$2:.$B$17];[.A5])&#10;            )&#10;        )&gt;=3&#10;    );&#10;    [.A5];&#10;    &quot;&quot;&#10;)" office:value-type="string" office:string-value="Blow Something Up" calcext:value-type="string">
            <text:p>Blow Something Up</text:p>
          </table:table-cell>
          <table:table-cell table:number-columns-repeated="2"/>
        </table:table-row>
        <table:table-row table:style-name="ro2">
          <table:table-cell office:value-type="string" calcext:value-type="string">
            <text:p>Charm</text:p>
          </table:table-cell>
          <table:table-cell table:formula="of:=IF(&#10;    OR(&#10;        COUNTIF([$Build.$B$2:.$B$17];[.A6])=0;&#10;        SUMPRODUCT(&#10;            ([.$A$2:.$A$30]&lt;&gt;[.A6]) *&#10;            (&#10;                COUNTIF([$Build.$B$2:.$B$17];[.$A$2:.$A$30])&#10;                &gt;=&#10;                COUNTIF([$Build.$B$2:.$B$17];[.A6])&#10;            )&#10;        )&gt;=3&#10;    );&#10;    [.A6];&#10;    &quot;&quot;&#10;)" office:value-type="string" office:string-value="Charm" calcext:value-type="string">
            <text:p>Charm</text:p>
          </table:table-cell>
          <table:table-cell table:number-columns-repeated="2"/>
        </table:table-row>
        <table:table-row table:style-name="ro2">
          <table:table-cell office:value-type="string" calcext:value-type="string">
            <text:p>Get Somewhere Quickly</text:p>
          </table:table-cell>
          <table:table-cell table:formula="of:=IF(&#10;    OR(&#10;        COUNTIF([$Build.$B$2:.$B$17];[.A7])=0;&#10;        SUMPRODUCT(&#10;            ([.$A$2:.$A$30]&lt;&gt;[.A7]) *&#10;            (&#10;                COUNTIF([$Build.$B$2:.$B$17];[.$A$2:.$A$30])&#10;                &gt;=&#10;                COUNTIF([$Build.$B$2:.$B$17];[.A7])&#10;            )&#10;        )&gt;=3&#10;    );&#10;    [.A7];&#10;    &quot;&quot;&#10;)" office:value-type="string" office:string-value="Get Somewhere Quickly" calcext:value-type="string">
            <text:p>Get Somewhere Quickly</text:p>
          </table:table-cell>
          <table:table-cell table:number-columns-repeated="2"/>
        </table:table-row>
        <table:table-row table:style-name="ro2">
          <table:table-cell office:value-type="string" calcext:value-type="string">
            <text:p>Get a Hold of Something</text:p>
          </table:table-cell>
          <table:table-cell table:formula="of:=IF(&#10;    OR(&#10;        COUNTIF([$Build.$B$2:.$B$17];[.A8])=0;&#10;        SUMPRODUCT(&#10;            ([.$A$2:.$A$30]&lt;&gt;[.A8]) *&#10;            (&#10;                COUNTIF([$Build.$B$2:.$B$17];[.$A$2:.$A$30])&#10;                &gt;=&#10;                COUNTIF([$Build.$B$2:.$B$17];[.A8])&#10;            )&#10;        )&gt;=3&#10;    );&#10;    [.A8];&#10;    &quot;&quot;&#10;)" office:value-type="string" office:string-value="Get a Hold of Something" calcext:value-type="string">
            <text:p>Get a Hold of Something</text:p>
          </table:table-cell>
          <table:table-cell table:number-columns-repeated="2"/>
        </table:table-row>
        <table:table-row table:style-name="ro2">
          <table:table-cell office:value-type="string" calcext:value-type="string">
            <text:p>Hack or Fix</text:p>
          </table:table-cell>
          <table:table-cell table:formula="of:=IF(&#10;    OR(&#10;        COUNTIF([$Build.$B$2:.$B$17];[.A9])=0;&#10;        SUMPRODUCT(&#10;            ([.$A$2:.$A$30]&lt;&gt;[.A9]) *&#10;            (&#10;                COUNTIF([$Build.$B$2:.$B$17];[.$A$2:.$A$30])&#10;                &gt;=&#10;                COUNTIF([$Build.$B$2:.$B$17];[.A9])&#10;            )&#10;        )&gt;=3&#10;    );&#10;    [.A9];&#10;    &quot;&quot;&#10;)" office:value-type="string" office:string-value="Hack or Fix" calcext:value-type="string">
            <text:p>Hack or Fix</text:p>
          </table:table-cell>
          <table:table-cell table:number-columns-repeated="2"/>
        </table:table-row>
        <table:table-row table:style-name="ro2">
          <table:table-cell office:value-type="string" calcext:value-type="string">
            <text:p>Invent or Create</text:p>
          </table:table-cell>
          <table:table-cell table:formula="of:=IF(&#10;    OR(&#10;        COUNTIF([$Build.$B$2:.$B$17];[.A10])=0;&#10;        SUMPRODUCT(&#10;            ([.$A$2:.$A$30]&lt;&gt;[.A10]) *&#10;            (&#10;                COUNTIF([$Build.$B$2:.$B$17];[.$A$2:.$A$30])&#10;                &gt;=&#10;                COUNTIF([$Build.$B$2:.$B$17];[.A10])&#10;            )&#10;        )&gt;=3&#10;    );&#10;    [.A10];&#10;    &quot;&quot;&#10;)" office:value-type="string" office:string-value="Invent or Create" calcext:value-type="string">
            <text:p>Invent or Create</text:p>
          </table:table-cell>
          <table:table-cell table:number-columns-repeated="2"/>
        </table:table-row>
        <table:table-row table:style-name="ro2">
          <table:table-cell office:value-type="string" calcext:value-type="string">
            <text:p>Investigate</text:p>
          </table:table-cell>
          <table:table-cell table:formula="of:=IF(&#10;    OR(&#10;        COUNTIF([$Build.$B$2:.$B$17];[.A11])=0;&#10;        SUMPRODUCT(&#10;            ([.$A$2:.$A$30]&lt;&gt;[.A11]) *&#10;            (&#10;                COUNTIF([$Build.$B$2:.$B$17];[.$A$2:.$A$30])&#10;                &gt;=&#10;                COUNTIF([$Build.$B$2:.$B$17];[.A11])&#10;            )&#10;        )&gt;=3&#10;    );&#10;    [.A11];&#10;    &quot;&quot;&#10;)" office:value-type="string" office:string-value="Investigate" calcext:value-type="string">
            <text:p>Investigate</text:p>
          </table:table-cell>
          <table:table-cell table:number-columns-repeated="2"/>
        </table:table-row>
        <table:table-row table:style-name="ro2">
          <table:table-cell office:value-type="string" calcext:value-type="string">
            <text:p>Lead or Inspire</text:p>
          </table:table-cell>
          <table:table-cell table:formula="of:=IF(&#10;    OR(&#10;        COUNTIF([$Build.$B$2:.$B$17];[.A12])=0;&#10;        SUMPRODUCT(&#10;            ([.$A$2:.$A$30]&lt;&gt;[.A12]) *&#10;            (&#10;                COUNTIF([$Build.$B$2:.$B$17];[.$A$2:.$A$30])&#10;                &gt;=&#10;                COUNTIF([$Build.$B$2:.$B$17];[.A12])&#10;            )&#10;        )&gt;=3&#10;    );&#10;    [.A12];&#10;    &quot;&quot;&#10;)" office:value-type="string" office:string-value="Lead or Inspire" calcext:value-type="string">
            <text:p>Lead or Inspire</text:p>
          </table:table-cell>
          <table:table-cell table:number-columns-repeated="2"/>
        </table:table-row>
        <table:table-row table:style-name="ro2">
          <table:table-cell office:value-type="string" calcext:value-type="string">
            <text:p>Patch</text:p>
          </table:table-cell>
          <table:table-cell table:formula="of:=IF(&#10;    OR(&#10;        COUNTIF([$Build.$B$2:.$B$17];[.A13])=0;&#10;        SUMPRODUCT(&#10;            ([.$A$2:.$A$30]&lt;&gt;[.A13]) *&#10;            (&#10;                COUNTIF([$Build.$B$2:.$B$17];[.$A$2:.$A$30])&#10;                &gt;=&#10;                COUNTIF([$Build.$B$2:.$B$17];[.A13])&#10;            )&#10;        )&gt;=3&#10;    );&#10;    [.A13];&#10;    &quot;&quot;&#10;)" office:value-type="string" office:string-value="Patch" calcext:value-type="string">
            <text:p>Patch</text:p>
          </table:table-cell>
          <table:table-cell table:number-columns-repeated="2"/>
        </table:table-row>
        <table:table-row table:style-name="ro2">
          <table:table-cell office:value-type="string" calcext:value-type="string">
            <text:p>Pull Rank</text:p>
          </table:table-cell>
          <table:table-cell table:formula="of:=IF(&#10;    OR(&#10;        COUNTIF([$Build.$B$2:.$B$17];[.A14])=0;&#10;        SUMPRODUCT(&#10;            ([.$A$2:.$A$30]&lt;&gt;[.A14]) *&#10;            (&#10;                COUNTIF([$Build.$B$2:.$B$17];[.$A$2:.$A$30])&#10;                &gt;=&#10;                COUNTIF([$Build.$B$2:.$B$17];[.A14])&#10;            )&#10;        )&gt;=3&#10;    );&#10;    [.A14];&#10;    &quot;&quot;&#10;)" office:value-type="string" office:string-value="Pull Rank" calcext:value-type="string">
            <text:p>Pull Rank</text:p>
          </table:table-cell>
          <table:table-cell table:number-columns-repeated="2"/>
        </table:table-row>
        <table:table-row table:style-name="ro2">
          <table:table-cell office:value-type="string" calcext:value-type="string">
            <text:p>Read a Situation</text:p>
          </table:table-cell>
          <table:table-cell table:formula="of:=IF(&#10;    OR(&#10;        COUNTIF([$Build.$B$2:.$B$17];[.A15])=0;&#10;        SUMPRODUCT(&#10;            ([.$A$2:.$A$30]&lt;&gt;[.A15]) *&#10;            (&#10;                COUNTIF([$Build.$B$2:.$B$17];[.$A$2:.$A$30])&#10;                &gt;=&#10;                COUNTIF([$Build.$B$2:.$B$17];[.A15])&#10;            )&#10;        )&gt;=3&#10;    );&#10;    [.A15];&#10;    &quot;&quot;&#10;)" office:value-type="string" office:string-value="Read a Situation" calcext:value-type="string">
            <text:p>Read a Situation</text:p>
          </table:table-cell>
          <table:table-cell table:number-columns-repeated="2"/>
        </table:table-row>
        <table:table-row table:style-name="ro2">
          <table:table-cell office:value-type="string" calcext:value-type="string">
            <text:p>Show Off</text:p>
          </table:table-cell>
          <table:table-cell table:formula="of:=IF(&#10;    OR(&#10;        COUNTIF([$Build.$B$2:.$B$17];[.A16])=0;&#10;        SUMPRODUCT(&#10;            ([.$A$2:.$A$30]&lt;&gt;[.A16]) *&#10;            (&#10;                COUNTIF([$Build.$B$2:.$B$17];[.$A$2:.$A$30])&#10;                &gt;=&#10;                COUNTIF([$Build.$B$2:.$B$17];[.A16])&#10;            )&#10;        )&gt;=3&#10;    );&#10;    [.A16];&#10;    &quot;&quot;&#10;)" office:value-type="string" office:string-value="Show Off" calcext:value-type="string">
            <text:p>Show Off</text:p>
          </table:table-cell>
          <table:table-cell table:number-columns-repeated="2"/>
        </table:table-row>
        <table:table-row table:style-name="ro2">
          <table:table-cell office:value-type="string" calcext:value-type="string">
            <text:p>Spot</text:p>
          </table:table-cell>
          <table:table-cell table:formula="of:=IF(&#10;    OR(&#10;        COUNTIF([$Build.$B$2:.$B$17];[.A17])=0;&#10;        SUMPRODUCT(&#10;            ([.$A$2:.$A$30]&lt;&gt;[.A17]) *&#10;            (&#10;                COUNTIF([$Build.$B$2:.$B$17];[.$A$2:.$A$30])&#10;                &gt;=&#10;                COUNTIF([$Build.$B$2:.$B$17];[.A17])&#10;            )&#10;        )&gt;=3&#10;    );&#10;    [.A17];&#10;    &quot;&quot;&#10;)" office:value-type="string" office:string-value="Spot" calcext:value-type="string">
            <text:p>Spot</text:p>
          </table:table-cell>
          <table:table-cell table:number-columns-repeated="2"/>
        </table:table-row>
        <table:table-row table:style-name="ro2">
          <table:table-cell office:value-type="string" calcext:value-type="string">
            <text:p>Stay Cool</text:p>
          </table:table-cell>
          <table:table-cell table:formula="of:=IF(&#10;    OR(&#10;        COUNTIF([$Build.$B$2:.$B$17];[.A18])=0;&#10;        SUMPRODUCT(&#10;            ([.$A$2:.$A$30]&lt;&gt;[.A18]) *&#10;            (&#10;                COUNTIF([$Build.$B$2:.$B$17];[.$A$2:.$A$30])&#10;                &gt;=&#10;                COUNTIF([$Build.$B$2:.$B$17];[.A18])&#10;            )&#10;        )&gt;=3&#10;    );&#10;    [.A18];&#10;    &quot;&quot;&#10;)" office:value-type="string" office:string-value="Stay Cool" calcext:value-type="string">
            <text:p>Stay Cool</text:p>
          </table:table-cell>
          <table:table-cell table:number-columns-repeated="2"/>
        </table:table-row>
        <table:table-row table:style-name="ro2">
          <table:table-cell office:value-type="string" calcext:value-type="string">
            <text:p>Survive</text:p>
          </table:table-cell>
          <table:table-cell table:formula="of:=IF(&#10;    OR(&#10;        COUNTIF([$Build.$B$2:.$B$17];[.A19])=0;&#10;        SUMPRODUCT(&#10;            ([.$A$2:.$A$30]&lt;&gt;[.A19]) *&#10;            (&#10;                COUNTIF([$Build.$B$2:.$B$17];[.$A$2:.$A$30])&#10;                &gt;=&#10;                COUNTIF([$Build.$B$2:.$B$17];[.A19])&#10;            )&#10;        )&gt;=3&#10;    );&#10;    [.A19];&#10;    &quot;&quot;&#10;)" office:value-type="string" office:string-value="Survive" calcext:value-type="string">
            <text:p>Survive</text:p>
          </table:table-cell>
          <table:table-cell table:number-columns-repeated="2"/>
        </table:table-row>
        <table:table-row table:style-name="ro2">
          <table:table-cell office:value-type="string" calcext:value-type="string">
            <text:p>Take Control</text:p>
          </table:table-cell>
          <table:table-cell table:formula="of:=IF(&#10;    OR(&#10;        COUNTIF([$Build.$B$2:.$B$17];[.A20])=0;&#10;        SUMPRODUCT(&#10;            ([.$A$2:.$A$30]&lt;&gt;[.A20]) *&#10;            (&#10;                COUNTIF([$Build.$B$2:.$B$17];[.$A$2:.$A$30])&#10;                &gt;=&#10;                COUNTIF([$Build.$B$2:.$B$17];[.A20])&#10;            )&#10;        )&gt;=3&#10;    );&#10;    [.A20];&#10;    &quot;&quot;&#10;)" office:value-type="string" office:string-value="Take Control" calcext:value-type="string">
            <text:p>Take Control</text:p>
          </table:table-cell>
          <table:table-cell table:number-columns-repeated="2"/>
        </table:table-row>
        <table:table-row table:style-name="ro2">
          <table:table-cell office:value-type="string" calcext:value-type="string">
            <text:p>Take Someone Out</text:p>
          </table:table-cell>
          <table:table-cell table:formula="of:=IF(&#10;    OR(&#10;        COUNTIF([$Build.$B$2:.$B$17];[.A21])=0;&#10;        SUMPRODUCT(&#10;            ([.$A$2:.$A$30]&lt;&gt;[.A21]) *&#10;            (&#10;                COUNTIF([$Build.$B$2:.$B$17];[.$A$2:.$A$30])&#10;                &gt;=&#10;                COUNTIF([$Build.$B$2:.$B$17];[.A21])&#10;            )&#10;        )&gt;=3&#10;    );&#10;    [.A21];&#10;    &quot;&quot;&#10;)" office:value-type="string" office:string-value="Take Someone Out" calcext:value-type="string">
            <text:p>Take Someone Out</text:p>
          </table:table-cell>
          <table:table-cell table:number-columns-repeated="2"/>
        </table:table-row>
        <table:table-row table:style-name="ro2">
          <table:table-cell office:value-type="string" calcext:value-type="string">
            <text:p>Threaten</text:p>
          </table:table-cell>
          <table:table-cell table:formula="of:=IF(&#10;    OR(&#10;        COUNTIF([$Build.$B$2:.$B$17];[.A22])=0;&#10;        SUMPRODUCT(&#10;            ([.$A$2:.$A$30]&lt;&gt;[.A22]) *&#10;            (&#10;                COUNTIF([$Build.$B$2:.$B$17];[.$A$2:.$A$30])&#10;                &gt;=&#10;                COUNTIF([$Build.$B$2:.$B$17];[.A22])&#10;            )&#10;        )&gt;=3&#10;    );&#10;    [.A22];&#10;    &quot;&quot;&#10;)" office:value-type="string" office:string-value="Threaten" calcext:value-type="string">
            <text:p>Threaten</text:p>
          </table:table-cell>
          <table:table-cell table:number-columns-repeated="2"/>
        </table:table-row>
        <table:table-row table:style-name="ro2">
          <table:table-cell office:value-type="string" calcext:value-type="string">
            <text:p>Word on the Street</text:p>
          </table:table-cell>
          <table:table-cell table:formula="of:=IF(&#10;    OR(&#10;        COUNTIF([$Build.$B$2:.$B$17];[.A23])=0;&#10;        SUMPRODUCT(&#10;            ([.$A$2:.$A$30]&lt;&gt;[.A23]) *&#10;            (&#10;                COUNTIF([$Build.$B$2:.$B$17];[.$A$2:.$A$30])&#10;                &gt;=&#10;                COUNTIF([$Build.$B$2:.$B$17];[.A23])&#10;            )&#10;        )&gt;=3&#10;    );&#10;    [.A23];&#10;    &quot;&quot;&#10;)" office:value-type="string" office:string-value="Word on the Street" calcext:value-type="string">
            <text:p>Word on the Street</text:p>
          </table:table-cell>
          <table:table-cell table:number-columns-repeated="2"/>
        </table:table-row>
      </table:table>
      <table:table table:name="Licenses" table:style-name="ta1">
        <office:forms form:automatic-focus="false" form:apply-design-mode="false"/>
        <table:table-column table:style-name="co28" table:default-cell-style-name="Default"/>
        <table:table-column table:style-name="co41" table:default-cell-style-name="Default"/>
        <table:table-column table:style-name="co11" table:default-cell-style-name="ce47"/>
        <table:table-column table:style-name="co11" table:default-cell-style-name="Default"/>
        <table:table-row table:style-name="ro2">
          <table:table-cell office:value-type="string" calcext:value-type="string">
            <text:p>License</text:p>
          </table:table-cell>
          <table:table-cell office:value-type="string" calcext:value-type="string">
            <text:p>Prerequisite</text:p>
          </table:table-cell>
          <table:table-cell table:style-name="Default" office:value-type="string" calcext:value-type="string">
            <text:p>Manufacturer</text:p>
          </table:table-cell>
          <table:table-cell/>
        </table:table-row>
        <table:table-row table:style-name="ro2">
          <table:table-cell office:value-type="string" calcext:value-type="string">
            <text:p>Atlas I</text:p>
          </table:table-cell>
          <table:table-cell/>
          <table:table-cell office:value-type="string" calcext:value-type="string">
            <text:p>SSC</text:p>
          </table:table-cell>
          <table:table-cell/>
        </table:table-row>
        <table:table-row table:style-name="ro2">
          <table:table-cell office:value-type="string" calcext:value-type="string">
            <text:p>Atlas II</text:p>
          </table:table-cell>
          <table:table-cell office:value-type="string" calcext:value-type="string">
            <text:p>Atlas I</text:p>
          </table:table-cell>
          <table:table-cell office:value-type="string" calcext:value-type="string">
            <text:p>SSC</text:p>
          </table:table-cell>
          <table:table-cell table:style-name="ce6"/>
        </table:table-row>
        <table:table-row table:style-name="ro2">
          <table:table-cell office:value-type="string" calcext:value-type="string">
            <text:p>Atlas III</text:p>
          </table:table-cell>
          <table:table-cell office:value-type="string" calcext:value-type="string">
            <text:p>Atlas II</text:p>
          </table:table-cell>
          <table:table-cell office:value-type="string" calcext:value-type="string">
            <text:p>SSC</text:p>
          </table:table-cell>
          <table:table-cell/>
        </table:table-row>
        <table:table-row table:style-name="ro2">
          <table:table-cell office:value-type="string" calcext:value-type="string">
            <text:p>Balor I</text:p>
          </table:table-cell>
          <table:table-cell/>
          <table:table-cell office:value-type="string" calcext:value-type="string">
            <text:p>HORUS</text:p>
          </table:table-cell>
          <table:table-cell/>
        </table:table-row>
        <table:table-row table:style-name="ro2">
          <table:table-cell office:value-type="string" calcext:value-type="string">
            <text:p>Balor II</text:p>
          </table:table-cell>
          <table:table-cell office:value-type="string" calcext:value-type="string">
            <text:p>Balor I</text:p>
          </table:table-cell>
          <table:table-cell office:value-type="string" calcext:value-type="string">
            <text:p>HORUS</text:p>
          </table:table-cell>
          <table:table-cell/>
        </table:table-row>
        <table:table-row table:style-name="ro2">
          <table:table-cell office:value-type="string" calcext:value-type="string">
            <text:p>Balor III</text:p>
          </table:table-cell>
          <table:table-cell office:value-type="string" calcext:value-type="string">
            <text:p>Balor II</text:p>
          </table:table-cell>
          <table:table-cell office:value-type="string" calcext:value-type="string">
            <text:p>HORUS</text:p>
          </table:table-cell>
          <table:table-cell/>
        </table:table-row>
        <table:table-row table:style-name="ro2">
          <table:table-cell office:value-type="string" calcext:value-type="string">
            <text:p>Barbarossa I</text:p>
          </table:table-cell>
          <table:table-cell/>
          <table:table-cell office:value-type="string" calcext:value-type="string">
            <text:p>HA</text:p>
          </table:table-cell>
          <table:table-cell/>
        </table:table-row>
        <table:table-row table:style-name="ro2">
          <table:table-cell office:value-type="string" calcext:value-type="string">
            <text:p>Barbarossa II</text:p>
          </table:table-cell>
          <table:table-cell office:value-type="string" calcext:value-type="string">
            <text:p>Barbarossa I</text:p>
          </table:table-cell>
          <table:table-cell office:value-type="string" calcext:value-type="string">
            <text:p>HA</text:p>
          </table:table-cell>
          <table:table-cell/>
        </table:table-row>
        <table:table-row table:style-name="ro2">
          <table:table-cell office:value-type="string" calcext:value-type="string">
            <text:p>Barbarossa III</text:p>
          </table:table-cell>
          <table:table-cell office:value-type="string" calcext:value-type="string">
            <text:p>Barbarossa II</text:p>
          </table:table-cell>
          <table:table-cell office:value-type="string" calcext:value-type="string">
            <text:p>HA</text:p>
          </table:table-cell>
          <table:table-cell/>
        </table:table-row>
        <table:table-row table:style-name="ro2">
          <table:table-cell office:value-type="string" calcext:value-type="string">
            <text:p>Black Witch I</text:p>
          </table:table-cell>
          <table:table-cell/>
          <table:table-cell office:value-type="string" calcext:value-type="string">
            <text:p>SSC</text:p>
          </table:table-cell>
          <table:table-cell/>
        </table:table-row>
        <table:table-row table:style-name="ro2">
          <table:table-cell office:value-type="string" calcext:value-type="string">
            <text:p>Black Witch II</text:p>
          </table:table-cell>
          <table:table-cell office:value-type="string" calcext:value-type="string">
            <text:p>Black Witch I</text:p>
          </table:table-cell>
          <table:table-cell office:value-type="string" calcext:value-type="string">
            <text:p>SSC</text:p>
          </table:table-cell>
          <table:table-cell/>
        </table:table-row>
        <table:table-row table:style-name="ro2">
          <table:table-cell office:value-type="string" calcext:value-type="string">
            <text:p>Black Witch III</text:p>
          </table:table-cell>
          <table:table-cell office:value-type="string" calcext:value-type="string">
            <text:p>Black Witch II</text:p>
          </table:table-cell>
          <table:table-cell office:value-type="string" calcext:value-type="string">
            <text:p>SSC</text:p>
          </table:table-cell>
          <table:table-cell/>
        </table:table-row>
        <table:table-row table:style-name="ro2">
          <table:table-cell office:value-type="string" calcext:value-type="string">
            <text:p>Blackbeard I</text:p>
          </table:table-cell>
          <table:table-cell/>
          <table:table-cell office:value-type="string" calcext:value-type="string">
            <text:p>IPS-N</text:p>
          </table:table-cell>
          <table:table-cell/>
        </table:table-row>
        <table:table-row table:style-name="ro2">
          <table:table-cell office:value-type="string" calcext:value-type="string">
            <text:p>Blackbeard II</text:p>
          </table:table-cell>
          <table:table-cell office:value-type="string" calcext:value-type="string">
            <text:p>Blackbeard I</text:p>
          </table:table-cell>
          <table:table-cell office:value-type="string" calcext:value-type="string">
            <text:p>IPS-N</text:p>
          </table:table-cell>
          <table:table-cell/>
        </table:table-row>
        <table:table-row table:style-name="ro2">
          <table:table-cell office:value-type="string" calcext:value-type="string">
            <text:p>Blackbeard III</text:p>
          </table:table-cell>
          <table:table-cell office:value-type="string" calcext:value-type="string">
            <text:p>Blackbeard II</text:p>
          </table:table-cell>
          <table:table-cell office:value-type="string" calcext:value-type="string">
            <text:p>IPS-N</text:p>
          </table:table-cell>
          <table:table-cell/>
        </table:table-row>
        <table:table-row table:style-name="ro2">
          <table:table-cell office:value-type="string" calcext:value-type="string">
            <text:p>Caliban I</text:p>
          </table:table-cell>
          <table:table-cell/>
          <table:table-cell office:value-type="string" calcext:value-type="string">
            <text:p>IPS-N</text:p>
          </table:table-cell>
          <table:table-cell/>
        </table:table-row>
        <table:table-row table:style-name="ro2">
          <table:table-cell office:value-type="string" calcext:value-type="string">
            <text:p>Caliban II</text:p>
          </table:table-cell>
          <table:table-cell office:value-type="string" calcext:value-type="string">
            <text:p>Caliban I</text:p>
          </table:table-cell>
          <table:table-cell office:value-type="string" calcext:value-type="string">
            <text:p>IPS-N</text:p>
          </table:table-cell>
          <table:table-cell/>
        </table:table-row>
        <table:table-row table:style-name="ro2">
          <table:table-cell office:value-type="string" calcext:value-type="string">
            <text:p>Caliban III</text:p>
          </table:table-cell>
          <table:table-cell office:value-type="string" calcext:value-type="string">
            <text:p>Caliban II</text:p>
          </table:table-cell>
          <table:table-cell office:value-type="string" calcext:value-type="string">
            <text:p>IPS-N</text:p>
          </table:table-cell>
          <table:table-cell/>
        </table:table-row>
        <table:table-row table:style-name="ro2">
          <table:table-cell office:value-type="string" calcext:value-type="string">
            <text:p>Death’s Head I</text:p>
          </table:table-cell>
          <table:table-cell/>
          <table:table-cell office:value-type="string" calcext:value-type="string">
            <text:p>SSC</text:p>
          </table:table-cell>
          <table:table-cell/>
        </table:table-row>
        <table:table-row table:style-name="ro2">
          <table:table-cell office:value-type="string" calcext:value-type="string">
            <text:p>Death’s Head II</text:p>
          </table:table-cell>
          <table:table-cell office:value-type="string" calcext:value-type="string">
            <text:p>Death’s Head I</text:p>
          </table:table-cell>
          <table:table-cell office:value-type="string" calcext:value-type="string">
            <text:p>SSC</text:p>
          </table:table-cell>
          <table:table-cell/>
        </table:table-row>
        <table:table-row table:style-name="ro2">
          <table:table-cell office:value-type="string" calcext:value-type="string">
            <text:p>Death’s Head III</text:p>
          </table:table-cell>
          <table:table-cell office:value-type="string" calcext:value-type="string">
            <text:p>Death’s Head II</text:p>
          </table:table-cell>
          <table:table-cell office:value-type="string" calcext:value-type="string">
            <text:p>SSC</text:p>
          </table:table-cell>
          <table:table-cell/>
        </table:table-row>
        <table:table-row table:style-name="ro2">
          <table:table-cell office:value-type="string" calcext:value-type="string">
            <text:p>Drake I</text:p>
          </table:table-cell>
          <table:table-cell/>
          <table:table-cell office:value-type="string" calcext:value-type="string">
            <text:p>IPS-N</text:p>
          </table:table-cell>
          <table:table-cell/>
        </table:table-row>
        <table:table-row table:style-name="ro2">
          <table:table-cell office:value-type="string" calcext:value-type="string">
            <text:p>Drake II</text:p>
          </table:table-cell>
          <table:table-cell office:value-type="string" calcext:value-type="string">
            <text:p>Drake I</text:p>
          </table:table-cell>
          <table:table-cell office:value-type="string" calcext:value-type="string">
            <text:p>IPS-N</text:p>
          </table:table-cell>
          <table:table-cell/>
        </table:table-row>
        <table:table-row table:style-name="ro2">
          <table:table-cell office:value-type="string" calcext:value-type="string">
            <text:p>Drake III</text:p>
          </table:table-cell>
          <table:table-cell office:value-type="string" calcext:value-type="string">
            <text:p>Drake II</text:p>
          </table:table-cell>
          <table:table-cell office:value-type="string" calcext:value-type="string">
            <text:p>IPS-N</text:p>
          </table:table-cell>
          <table:table-cell/>
        </table:table-row>
        <table:table-row table:style-name="ro2">
          <table:table-cell office:value-type="string" calcext:value-type="string">
            <text:p>Dusk Wing I</text:p>
          </table:table-cell>
          <table:table-cell/>
          <table:table-cell office:value-type="string" calcext:value-type="string">
            <text:p>SSC</text:p>
          </table:table-cell>
          <table:table-cell/>
        </table:table-row>
        <table:table-row table:style-name="ro2">
          <table:table-cell office:value-type="string" calcext:value-type="string">
            <text:p>Dusk Wing II</text:p>
          </table:table-cell>
          <table:table-cell office:value-type="string" calcext:value-type="string">
            <text:p>Dusk Wing I</text:p>
          </table:table-cell>
          <table:table-cell office:value-type="string" calcext:value-type="string">
            <text:p>SSC</text:p>
          </table:table-cell>
          <table:table-cell/>
        </table:table-row>
        <table:table-row table:style-name="ro2">
          <table:table-cell office:value-type="string" calcext:value-type="string">
            <text:p>Dusk Wing III</text:p>
          </table:table-cell>
          <table:table-cell office:value-type="string" calcext:value-type="string">
            <text:p>Dusk Wing II</text:p>
          </table:table-cell>
          <table:table-cell office:value-type="string" calcext:value-type="string">
            <text:p>SSC</text:p>
          </table:table-cell>
          <table:table-cell/>
        </table:table-row>
        <table:table-row table:style-name="ro2">
          <table:table-cell office:value-type="string" calcext:value-type="string">
            <text:p>Emperor I</text:p>
          </table:table-cell>
          <table:table-cell/>
          <table:table-cell office:value-type="string" calcext:value-type="string">
            <text:p>SSC</text:p>
          </table:table-cell>
          <table:table-cell/>
        </table:table-row>
        <table:table-row table:style-name="ro2">
          <table:table-cell office:value-type="string" calcext:value-type="string">
            <text:p>Emperor II</text:p>
          </table:table-cell>
          <table:table-cell office:value-type="string" calcext:value-type="string">
            <text:p>Emperor I</text:p>
          </table:table-cell>
          <table:table-cell office:value-type="string" calcext:value-type="string">
            <text:p>SSC</text:p>
          </table:table-cell>
          <table:table-cell/>
        </table:table-row>
        <table:table-row table:style-name="ro2">
          <table:table-cell office:value-type="string" calcext:value-type="string">
            <text:p>Emperor III</text:p>
          </table:table-cell>
          <table:table-cell office:value-type="string" calcext:value-type="string">
            <text:p>Emperor II</text:p>
          </table:table-cell>
          <table:table-cell office:value-type="string" calcext:value-type="string">
            <text:p>SSC</text:p>
          </table:table-cell>
          <table:table-cell/>
        </table:table-row>
        <table:table-row table:style-name="ro2">
          <table:table-cell office:value-type="string" calcext:value-type="string">
            <text:p>Genghis I</text:p>
          </table:table-cell>
          <table:table-cell/>
          <table:table-cell office:value-type="string" calcext:value-type="string">
            <text:p>HA</text:p>
          </table:table-cell>
          <table:table-cell/>
        </table:table-row>
        <table:table-row table:style-name="ro2">
          <table:table-cell office:value-type="string" calcext:value-type="string">
            <text:p>Genghis II</text:p>
          </table:table-cell>
          <table:table-cell office:value-type="string" calcext:value-type="string">
            <text:p>Genghis I</text:p>
          </table:table-cell>
          <table:table-cell office:value-type="string" calcext:value-type="string">
            <text:p>HA</text:p>
          </table:table-cell>
          <table:table-cell/>
        </table:table-row>
        <table:table-row table:style-name="ro2">
          <table:table-cell office:value-type="string" calcext:value-type="string">
            <text:p>Genghis III</text:p>
          </table:table-cell>
          <table:table-cell office:value-type="string" calcext:value-type="string">
            <text:p>Genghis II</text:p>
          </table:table-cell>
          <table:table-cell office:value-type="string" calcext:value-type="string">
            <text:p>HA</text:p>
          </table:table-cell>
          <table:table-cell/>
        </table:table-row>
        <table:table-row table:style-name="ro2">
          <table:table-cell office:value-type="string" calcext:value-type="string">
            <text:p>Gilgamesh I</text:p>
          </table:table-cell>
          <table:table-cell/>
          <table:table-cell office:value-type="string" calcext:value-type="string">
            <text:p>HA</text:p>
          </table:table-cell>
          <table:table-cell/>
        </table:table-row>
        <table:table-row table:style-name="ro2">
          <table:table-cell office:value-type="string" calcext:value-type="string">
            <text:p>Gilgamesh II</text:p>
          </table:table-cell>
          <table:table-cell office:value-type="string" calcext:value-type="string">
            <text:p>Gilgamesh I</text:p>
          </table:table-cell>
          <table:table-cell office:value-type="string" calcext:value-type="string">
            <text:p>HA</text:p>
          </table:table-cell>
          <table:table-cell/>
        </table:table-row>
        <table:table-row table:style-name="ro2">
          <table:table-cell office:value-type="string" calcext:value-type="string">
            <text:p>Gilgamesh III</text:p>
          </table:table-cell>
          <table:table-cell office:value-type="string" calcext:value-type="string">
            <text:p>Gilgamesh II</text:p>
          </table:table-cell>
          <table:table-cell office:value-type="string" calcext:value-type="string">
            <text:p>HA</text:p>
          </table:table-cell>
          <table:table-cell/>
        </table:table-row>
        <table:table-row table:style-name="ro2">
          <table:table-cell office:value-type="string" calcext:value-type="string">
            <text:p>Goblin I</text:p>
          </table:table-cell>
          <table:table-cell/>
          <table:table-cell office:value-type="string" calcext:value-type="string">
            <text:p>HORUS</text:p>
          </table:table-cell>
          <table:table-cell/>
        </table:table-row>
        <table:table-row table:style-name="ro2">
          <table:table-cell office:value-type="string" calcext:value-type="string">
            <text:p>Goblin II</text:p>
          </table:table-cell>
          <table:table-cell office:value-type="string" calcext:value-type="string">
            <text:p>Goblin I</text:p>
          </table:table-cell>
          <table:table-cell office:value-type="string" calcext:value-type="string">
            <text:p>HORUS</text:p>
          </table:table-cell>
          <table:table-cell/>
        </table:table-row>
        <table:table-row table:style-name="ro2">
          <table:table-cell office:value-type="string" calcext:value-type="string">
            <text:p>Goblin III</text:p>
          </table:table-cell>
          <table:table-cell office:value-type="string" calcext:value-type="string">
            <text:p>Goblin II</text:p>
          </table:table-cell>
          <table:table-cell office:value-type="string" calcext:value-type="string">
            <text:p>HORUS</text:p>
          </table:table-cell>
          <table:table-cell/>
        </table:table-row>
        <table:table-row table:style-name="ro2">
          <table:table-cell office:value-type="string" calcext:value-type="string">
            <text:p>Gorgon I</text:p>
          </table:table-cell>
          <table:table-cell/>
          <table:table-cell office:value-type="string" calcext:value-type="string">
            <text:p>HORUS</text:p>
          </table:table-cell>
          <table:table-cell/>
        </table:table-row>
        <table:table-row table:style-name="ro2">
          <table:table-cell office:value-type="string" calcext:value-type="string">
            <text:p>Gorgon II</text:p>
          </table:table-cell>
          <table:table-cell office:value-type="string" calcext:value-type="string">
            <text:p>Gorgon I</text:p>
          </table:table-cell>
          <table:table-cell office:value-type="string" calcext:value-type="string">
            <text:p>HORUS</text:p>
          </table:table-cell>
          <table:table-cell/>
        </table:table-row>
        <table:table-row table:style-name="ro2">
          <table:table-cell office:value-type="string" calcext:value-type="string">
            <text:p>Gorgon III</text:p>
          </table:table-cell>
          <table:table-cell office:value-type="string" calcext:value-type="string">
            <text:p>Gorgon II</text:p>
          </table:table-cell>
          <table:table-cell office:value-type="string" calcext:value-type="string">
            <text:p>HORUS</text:p>
          </table:table-cell>
          <table:table-cell/>
        </table:table-row>
        <table:table-row table:style-name="ro2">
          <table:table-cell office:value-type="string" calcext:value-type="string">
            <text:p>Hydra I</text:p>
          </table:table-cell>
          <table:table-cell/>
          <table:table-cell office:value-type="string" calcext:value-type="string">
            <text:p>HORUS</text:p>
          </table:table-cell>
          <table:table-cell/>
        </table:table-row>
        <table:table-row table:style-name="ro2">
          <table:table-cell office:value-type="string" calcext:value-type="string">
            <text:p>Hydra II</text:p>
          </table:table-cell>
          <table:table-cell office:value-type="string" calcext:value-type="string">
            <text:p>Hydra I</text:p>
          </table:table-cell>
          <table:table-cell office:value-type="string" calcext:value-type="string">
            <text:p>HORUS</text:p>
          </table:table-cell>
          <table:table-cell/>
        </table:table-row>
        <table:table-row table:style-name="ro2">
          <table:table-cell office:value-type="string" calcext:value-type="string">
            <text:p>Hydra III</text:p>
          </table:table-cell>
          <table:table-cell office:value-type="string" calcext:value-type="string">
            <text:p>Hydra II</text:p>
          </table:table-cell>
          <table:table-cell office:value-type="string" calcext:value-type="string">
            <text:p>HORUS</text:p>
          </table:table-cell>
          <table:table-cell/>
        </table:table-row>
        <table:table-row table:style-name="ro2">
          <table:table-cell office:value-type="string" calcext:value-type="string">
            <text:p>Iskander I</text:p>
          </table:table-cell>
          <table:table-cell/>
          <table:table-cell office:value-type="string" calcext:value-type="string">
            <text:p>HA</text:p>
          </table:table-cell>
          <table:table-cell/>
        </table:table-row>
        <table:table-row table:style-name="ro2">
          <table:table-cell office:value-type="string" calcext:value-type="string">
            <text:p>Iskander II</text:p>
          </table:table-cell>
          <table:table-cell office:value-type="string" calcext:value-type="string">
            <text:p>Iskander I</text:p>
          </table:table-cell>
          <table:table-cell office:value-type="string" calcext:value-type="string">
            <text:p>HA</text:p>
          </table:table-cell>
          <table:table-cell/>
        </table:table-row>
        <table:table-row table:style-name="ro2">
          <table:table-cell office:value-type="string" calcext:value-type="string">
            <text:p>Iskander III</text:p>
          </table:table-cell>
          <table:table-cell office:value-type="string" calcext:value-type="string">
            <text:p>Iskander II</text:p>
          </table:table-cell>
          <table:table-cell office:value-type="string" calcext:value-type="string">
            <text:p>HA</text:p>
          </table:table-cell>
          <table:table-cell/>
        </table:table-row>
        <table:table-row table:style-name="ro2">
          <table:table-cell office:value-type="string" calcext:value-type="string">
            <text:p>Kidd I</text:p>
          </table:table-cell>
          <table:table-cell/>
          <table:table-cell office:value-type="string" calcext:value-type="string">
            <text:p>IPS-N</text:p>
          </table:table-cell>
          <table:table-cell/>
        </table:table-row>
        <table:table-row table:style-name="ro2">
          <table:table-cell office:value-type="string" calcext:value-type="string">
            <text:p>Kidd II</text:p>
          </table:table-cell>
          <table:table-cell office:value-type="string" calcext:value-type="string">
            <text:p>Kidd I</text:p>
          </table:table-cell>
          <table:table-cell office:value-type="string" calcext:value-type="string">
            <text:p>IPS-N</text:p>
          </table:table-cell>
          <table:table-cell/>
        </table:table-row>
        <table:table-row table:style-name="ro2">
          <table:table-cell office:value-type="string" calcext:value-type="string">
            <text:p>Kidd III</text:p>
          </table:table-cell>
          <table:table-cell office:value-type="string" calcext:value-type="string">
            <text:p>Kidd II</text:p>
          </table:table-cell>
          <table:table-cell office:value-type="string" calcext:value-type="string">
            <text:p>IPS-N</text:p>
          </table:table-cell>
          <table:table-cell/>
        </table:table-row>
        <table:table-row table:style-name="ro2">
          <table:table-cell office:value-type="string" calcext:value-type="string">
            <text:p>Kobold I</text:p>
          </table:table-cell>
          <table:table-cell/>
          <table:table-cell office:value-type="string" calcext:value-type="string">
            <text:p>HORUS</text:p>
          </table:table-cell>
          <table:table-cell/>
        </table:table-row>
        <table:table-row table:style-name="ro2">
          <table:table-cell office:value-type="string" calcext:value-type="string">
            <text:p>Kobold II</text:p>
          </table:table-cell>
          <table:table-cell office:value-type="string" calcext:value-type="string">
            <text:p>Kobold I</text:p>
          </table:table-cell>
          <table:table-cell office:value-type="string" calcext:value-type="string">
            <text:p>HORUS</text:p>
          </table:table-cell>
          <table:table-cell/>
        </table:table-row>
        <table:table-row table:style-name="ro2">
          <table:table-cell office:value-type="string" calcext:value-type="string">
            <text:p>Kobold III</text:p>
          </table:table-cell>
          <table:table-cell office:value-type="string" calcext:value-type="string">
            <text:p>Kobold II</text:p>
          </table:table-cell>
          <table:table-cell office:value-type="string" calcext:value-type="string">
            <text:p>HORUS</text:p>
          </table:table-cell>
          <table:table-cell/>
        </table:table-row>
        <table:table-row table:style-name="ro2">
          <table:table-cell office:value-type="string" calcext:value-type="string">
            <text:p>Lancaster I</text:p>
          </table:table-cell>
          <table:table-cell/>
          <table:table-cell office:value-type="string" calcext:value-type="string">
            <text:p>IPS-N</text:p>
          </table:table-cell>
          <table:table-cell/>
        </table:table-row>
        <table:table-row table:style-name="ro2">
          <table:table-cell office:value-type="string" calcext:value-type="string">
            <text:p>Lancaster II</text:p>
          </table:table-cell>
          <table:table-cell office:value-type="string" calcext:value-type="string">
            <text:p>Lancaster I</text:p>
          </table:table-cell>
          <table:table-cell office:value-type="string" calcext:value-type="string">
            <text:p>IPS-N</text:p>
          </table:table-cell>
          <table:table-cell/>
        </table:table-row>
        <table:table-row table:style-name="ro2">
          <table:table-cell office:value-type="string" calcext:value-type="string">
            <text:p>Lancaster III</text:p>
          </table:table-cell>
          <table:table-cell office:value-type="string" calcext:value-type="string">
            <text:p>Lancaster II</text:p>
          </table:table-cell>
          <table:table-cell office:value-type="string" calcext:value-type="string">
            <text:p>IPS-N</text:p>
          </table:table-cell>
          <table:table-cell/>
        </table:table-row>
        <table:table-row table:style-name="ro2">
          <table:table-cell office:value-type="string" calcext:value-type="string">
            <text:p>Lich I</text:p>
          </table:table-cell>
          <table:table-cell/>
          <table:table-cell office:value-type="string" calcext:value-type="string">
            <text:p>HORUS</text:p>
          </table:table-cell>
          <table:table-cell/>
        </table:table-row>
        <table:table-row table:style-name="ro2">
          <table:table-cell office:value-type="string" calcext:value-type="string">
            <text:p>Lich II</text:p>
          </table:table-cell>
          <table:table-cell office:value-type="string" calcext:value-type="string">
            <text:p>Lich I</text:p>
          </table:table-cell>
          <table:table-cell office:value-type="string" calcext:value-type="string">
            <text:p>HORUS</text:p>
          </table:table-cell>
          <table:table-cell/>
        </table:table-row>
        <table:table-row table:style-name="ro2">
          <table:table-cell office:value-type="string" calcext:value-type="string">
            <text:p>Lich III</text:p>
          </table:table-cell>
          <table:table-cell office:value-type="string" calcext:value-type="string">
            <text:p>Lich II</text:p>
          </table:table-cell>
          <table:table-cell office:value-type="string" calcext:value-type="string">
            <text:p>HORUS</text:p>
          </table:table-cell>
          <table:table-cell/>
        </table:table-row>
        <table:table-row table:style-name="ro2">
          <table:table-cell office:value-type="string" calcext:value-type="string">
            <text:p>Manticore I</text:p>
          </table:table-cell>
          <table:table-cell/>
          <table:table-cell office:value-type="string" calcext:value-type="string">
            <text:p>HORUS</text:p>
          </table:table-cell>
          <table:table-cell/>
        </table:table-row>
        <table:table-row table:style-name="ro2">
          <table:table-cell office:value-type="string" calcext:value-type="string">
            <text:p>Manticore II</text:p>
          </table:table-cell>
          <table:table-cell office:value-type="string" calcext:value-type="string">
            <text:p>Manticore I</text:p>
          </table:table-cell>
          <table:table-cell office:value-type="string" calcext:value-type="string">
            <text:p>HORUS</text:p>
          </table:table-cell>
          <table:table-cell/>
        </table:table-row>
        <table:table-row table:style-name="ro2">
          <table:table-cell office:value-type="string" calcext:value-type="string">
            <text:p>Manticore III</text:p>
          </table:table-cell>
          <table:table-cell office:value-type="string" calcext:value-type="string">
            <text:p>Manticore II</text:p>
          </table:table-cell>
          <table:table-cell office:value-type="string" calcext:value-type="string">
            <text:p>HORUS</text:p>
          </table:table-cell>
          <table:table-cell/>
        </table:table-row>
        <table:table-row table:style-name="ro2">
          <table:table-cell office:value-type="string" calcext:value-type="string">
            <text:p>Metalmark I</text:p>
          </table:table-cell>
          <table:table-cell/>
          <table:table-cell office:value-type="string" calcext:value-type="string">
            <text:p>SSC</text:p>
          </table:table-cell>
          <table:table-cell/>
        </table:table-row>
        <table:table-row table:style-name="ro2">
          <table:table-cell office:value-type="string" calcext:value-type="string">
            <text:p>Metalmark II</text:p>
          </table:table-cell>
          <table:table-cell office:value-type="string" calcext:value-type="string">
            <text:p>Metalmark I</text:p>
          </table:table-cell>
          <table:table-cell office:value-type="string" calcext:value-type="string">
            <text:p>SSC</text:p>
          </table:table-cell>
          <table:table-cell/>
        </table:table-row>
        <table:table-row table:style-name="ro2">
          <table:table-cell office:value-type="string" calcext:value-type="string">
            <text:p>Metalmark III</text:p>
          </table:table-cell>
          <table:table-cell office:value-type="string" calcext:value-type="string">
            <text:p>Metalmark II</text:p>
          </table:table-cell>
          <table:table-cell office:value-type="string" calcext:value-type="string">
            <text:p>SSC</text:p>
          </table:table-cell>
          <table:table-cell/>
        </table:table-row>
        <table:table-row table:style-name="ro2">
          <table:table-cell office:value-type="string" calcext:value-type="string">
            <text:p>Minotaur I</text:p>
          </table:table-cell>
          <table:table-cell/>
          <table:table-cell office:value-type="string" calcext:value-type="string">
            <text:p>HORUS</text:p>
          </table:table-cell>
          <table:table-cell/>
        </table:table-row>
        <table:table-row table:style-name="ro2">
          <table:table-cell office:value-type="string" calcext:value-type="string">
            <text:p>Minotaur II</text:p>
          </table:table-cell>
          <table:table-cell office:value-type="string" calcext:value-type="string">
            <text:p>Minotaur I</text:p>
          </table:table-cell>
          <table:table-cell office:value-type="string" calcext:value-type="string">
            <text:p>HORUS</text:p>
          </table:table-cell>
          <table:table-cell/>
        </table:table-row>
        <table:table-row table:style-name="ro2">
          <table:table-cell office:value-type="string" calcext:value-type="string">
            <text:p>Minotaur III</text:p>
          </table:table-cell>
          <table:table-cell office:value-type="string" calcext:value-type="string">
            <text:p>Minotaur II</text:p>
          </table:table-cell>
          <table:table-cell office:value-type="string" calcext:value-type="string">
            <text:p>HORUS</text:p>
          </table:table-cell>
          <table:table-cell/>
        </table:table-row>
        <table:table-row table:style-name="ro2">
          <table:table-cell office:value-type="string" calcext:value-type="string">
            <text:p>Monarch I</text:p>
          </table:table-cell>
          <table:table-cell/>
          <table:table-cell office:value-type="string" calcext:value-type="string">
            <text:p>SSC</text:p>
          </table:table-cell>
          <table:table-cell/>
        </table:table-row>
        <table:table-row table:style-name="ro2">
          <table:table-cell office:value-type="string" calcext:value-type="string">
            <text:p>Monarch II</text:p>
          </table:table-cell>
          <table:table-cell office:value-type="string" calcext:value-type="string">
            <text:p>Monarch I</text:p>
          </table:table-cell>
          <table:table-cell office:value-type="string" calcext:value-type="string">
            <text:p>SSC</text:p>
          </table:table-cell>
          <table:table-cell/>
        </table:table-row>
        <table:table-row table:style-name="ro2">
          <table:table-cell office:value-type="string" calcext:value-type="string">
            <text:p>Monarch III</text:p>
          </table:table-cell>
          <table:table-cell office:value-type="string" calcext:value-type="string">
            <text:p>Monarch II</text:p>
          </table:table-cell>
          <table:table-cell office:value-type="string" calcext:value-type="string">
            <text:p>SSC</text:p>
          </table:table-cell>
          <table:table-cell/>
        </table:table-row>
        <table:table-row table:style-name="ro2">
          <table:table-cell office:value-type="string" calcext:value-type="string">
            <text:p>Mourning Cloak I</text:p>
          </table:table-cell>
          <table:table-cell/>
          <table:table-cell office:value-type="string" calcext:value-type="string">
            <text:p>SSC</text:p>
          </table:table-cell>
          <table:table-cell/>
        </table:table-row>
        <table:table-row table:style-name="ro2">
          <table:table-cell office:value-type="string" calcext:value-type="string">
            <text:p>Mourning Cloak II</text:p>
          </table:table-cell>
          <table:table-cell office:value-type="string" calcext:value-type="string">
            <text:p>Mourning Cloak I</text:p>
          </table:table-cell>
          <table:table-cell office:value-type="string" calcext:value-type="string">
            <text:p>SSC</text:p>
          </table:table-cell>
          <table:table-cell/>
        </table:table-row>
        <table:table-row table:style-name="ro2">
          <table:table-cell office:value-type="string" calcext:value-type="string">
            <text:p>Mourning Cloak III</text:p>
          </table:table-cell>
          <table:table-cell office:value-type="string" calcext:value-type="string">
            <text:p>Mourning Cloak II</text:p>
          </table:table-cell>
          <table:table-cell office:value-type="string" calcext:value-type="string">
            <text:p>SSC</text:p>
          </table:table-cell>
          <table:table-cell/>
        </table:table-row>
        <table:table-row table:style-name="ro2">
          <table:table-cell office:value-type="string" calcext:value-type="string">
            <text:p>Napoleon I</text:p>
          </table:table-cell>
          <table:table-cell/>
          <table:table-cell office:value-type="string" calcext:value-type="string">
            <text:p>HA</text:p>
          </table:table-cell>
          <table:table-cell/>
        </table:table-row>
        <table:table-row table:style-name="ro2">
          <table:table-cell office:value-type="string" calcext:value-type="string">
            <text:p>Napoleon II</text:p>
          </table:table-cell>
          <table:table-cell office:value-type="string" calcext:value-type="string">
            <text:p>Napoleon I</text:p>
          </table:table-cell>
          <table:table-cell office:value-type="string" calcext:value-type="string">
            <text:p>HA</text:p>
          </table:table-cell>
          <table:table-cell/>
        </table:table-row>
        <table:table-row table:style-name="ro2">
          <table:table-cell office:value-type="string" calcext:value-type="string">
            <text:p>Napoleon III</text:p>
          </table:table-cell>
          <table:table-cell office:value-type="string" calcext:value-type="string">
            <text:p>Napoleon II</text:p>
          </table:table-cell>
          <table:table-cell office:value-type="string" calcext:value-type="string">
            <text:p>HA</text:p>
          </table:table-cell>
          <table:table-cell/>
        </table:table-row>
        <table:table-row table:style-name="ro2">
          <table:table-cell office:value-type="string" calcext:value-type="string">
            <text:p>Nelson I</text:p>
          </table:table-cell>
          <table:table-cell/>
          <table:table-cell office:value-type="string" calcext:value-type="string">
            <text:p>IPS-N</text:p>
          </table:table-cell>
          <table:table-cell/>
        </table:table-row>
        <table:table-row table:style-name="ro2">
          <table:table-cell office:value-type="string" calcext:value-type="string">
            <text:p>Nelson II</text:p>
          </table:table-cell>
          <table:table-cell office:value-type="string" calcext:value-type="string">
            <text:p>Nelson I</text:p>
          </table:table-cell>
          <table:table-cell office:value-type="string" calcext:value-type="string">
            <text:p>IPS-N</text:p>
          </table:table-cell>
          <table:table-cell/>
        </table:table-row>
        <table:table-row table:style-name="ro2">
          <table:table-cell office:value-type="string" calcext:value-type="string">
            <text:p>Nelson III</text:p>
          </table:table-cell>
          <table:table-cell office:value-type="string" calcext:value-type="string">
            <text:p>Nelson II</text:p>
          </table:table-cell>
          <table:table-cell office:value-type="string" calcext:value-type="string">
            <text:p>IPS-N</text:p>
          </table:table-cell>
          <table:table-cell/>
        </table:table-row>
        <table:table-row table:style-name="ro2">
          <table:table-cell office:value-type="string" calcext:value-type="string">
            <text:p>Pegasus I</text:p>
          </table:table-cell>
          <table:table-cell/>
          <table:table-cell office:value-type="string" calcext:value-type="string">
            <text:p>HORUS</text:p>
          </table:table-cell>
          <table:table-cell/>
        </table:table-row>
        <table:table-row table:style-name="ro2">
          <table:table-cell office:value-type="string" calcext:value-type="string">
            <text:p>Pegasus II</text:p>
          </table:table-cell>
          <table:table-cell office:value-type="string" calcext:value-type="string">
            <text:p>Pegasus I</text:p>
          </table:table-cell>
          <table:table-cell office:value-type="string" calcext:value-type="string">
            <text:p>HORUS</text:p>
          </table:table-cell>
          <table:table-cell/>
        </table:table-row>
        <table:table-row table:style-name="ro2">
          <table:table-cell office:value-type="string" calcext:value-type="string">
            <text:p>Pegasus III</text:p>
          </table:table-cell>
          <table:table-cell office:value-type="string" calcext:value-type="string">
            <text:p>Pegasus II</text:p>
          </table:table-cell>
          <table:table-cell office:value-type="string" calcext:value-type="string">
            <text:p>HORUS</text:p>
          </table:table-cell>
          <table:table-cell/>
        </table:table-row>
        <table:table-row table:style-name="ro2">
          <table:table-cell office:value-type="string" calcext:value-type="string">
            <text:p>Raleigh I</text:p>
          </table:table-cell>
          <table:table-cell/>
          <table:table-cell office:value-type="string" calcext:value-type="string">
            <text:p>IPS-N</text:p>
          </table:table-cell>
          <table:table-cell/>
        </table:table-row>
        <table:table-row table:style-name="ro2">
          <table:table-cell office:value-type="string" calcext:value-type="string">
            <text:p>Raleigh II</text:p>
          </table:table-cell>
          <table:table-cell office:value-type="string" calcext:value-type="string">
            <text:p>Raleigh I</text:p>
          </table:table-cell>
          <table:table-cell office:value-type="string" calcext:value-type="string">
            <text:p>IPS-N</text:p>
          </table:table-cell>
          <table:table-cell/>
        </table:table-row>
        <table:table-row table:style-name="ro2">
          <table:table-cell office:value-type="string" calcext:value-type="string">
            <text:p>Raleigh III</text:p>
          </table:table-cell>
          <table:table-cell office:value-type="string" calcext:value-type="string">
            <text:p>Raleigh II</text:p>
          </table:table-cell>
          <table:table-cell office:value-type="string" calcext:value-type="string">
            <text:p>IPS-N</text:p>
          </table:table-cell>
          <table:table-cell/>
        </table:table-row>
        <table:table-row table:style-name="ro2">
          <table:table-cell office:value-type="string" calcext:value-type="string">
            <text:p>Saladin I</text:p>
          </table:table-cell>
          <table:table-cell/>
          <table:table-cell office:value-type="string" calcext:value-type="string">
            <text:p>HA</text:p>
          </table:table-cell>
          <table:table-cell/>
        </table:table-row>
        <table:table-row table:style-name="ro2">
          <table:table-cell office:value-type="string" calcext:value-type="string">
            <text:p>Saladin II</text:p>
          </table:table-cell>
          <table:table-cell office:value-type="string" calcext:value-type="string">
            <text:p>Saladin I</text:p>
          </table:table-cell>
          <table:table-cell office:value-type="string" calcext:value-type="string">
            <text:p>HA</text:p>
          </table:table-cell>
          <table:table-cell/>
        </table:table-row>
        <table:table-row table:style-name="ro2">
          <table:table-cell office:value-type="string" calcext:value-type="string">
            <text:p>Saladin III</text:p>
          </table:table-cell>
          <table:table-cell office:value-type="string" calcext:value-type="string">
            <text:p>Saladin II</text:p>
          </table:table-cell>
          <table:table-cell office:value-type="string" calcext:value-type="string">
            <text:p>HA</text:p>
          </table:table-cell>
          <table:table-cell/>
        </table:table-row>
        <table:table-row table:style-name="ro2">
          <table:table-cell office:value-type="string" calcext:value-type="string">
            <text:p>Sherman I</text:p>
          </table:table-cell>
          <table:table-cell/>
          <table:table-cell office:value-type="string" calcext:value-type="string">
            <text:p>HA</text:p>
          </table:table-cell>
          <table:table-cell/>
        </table:table-row>
        <table:table-row table:style-name="ro2">
          <table:table-cell office:value-type="string" calcext:value-type="string">
            <text:p>Sherman II</text:p>
          </table:table-cell>
          <table:table-cell office:value-type="string" calcext:value-type="string">
            <text:p>Sherman I</text:p>
          </table:table-cell>
          <table:table-cell office:value-type="string" calcext:value-type="string">
            <text:p>HA</text:p>
          </table:table-cell>
          <table:table-cell/>
        </table:table-row>
        <table:table-row table:style-name="ro2">
          <table:table-cell office:value-type="string" calcext:value-type="string">
            <text:p>Sherman III</text:p>
          </table:table-cell>
          <table:table-cell office:value-type="string" calcext:value-type="string">
            <text:p>Sherman II</text:p>
          </table:table-cell>
          <table:table-cell office:value-type="string" calcext:value-type="string">
            <text:p>HA</text:p>
          </table:table-cell>
          <table:table-cell/>
        </table:table-row>
        <table:table-row table:style-name="ro2">
          <table:table-cell office:value-type="string" calcext:value-type="string">
            <text:p>Sunzi I</text:p>
          </table:table-cell>
          <table:table-cell/>
          <table:table-cell office:value-type="string" calcext:value-type="string">
            <text:p>HA</text:p>
          </table:table-cell>
          <table:table-cell/>
        </table:table-row>
        <table:table-row table:style-name="ro2">
          <table:table-cell office:value-type="string" calcext:value-type="string">
            <text:p>Sunzi II</text:p>
          </table:table-cell>
          <table:table-cell office:value-type="string" calcext:value-type="string">
            <text:p>Sunzi I</text:p>
          </table:table-cell>
          <table:table-cell office:value-type="string" calcext:value-type="string">
            <text:p>HA</text:p>
          </table:table-cell>
          <table:table-cell/>
        </table:table-row>
        <table:table-row table:style-name="ro2">
          <table:table-cell office:value-type="string" calcext:value-type="string">
            <text:p>Sunzi III</text:p>
          </table:table-cell>
          <table:table-cell office:value-type="string" calcext:value-type="string">
            <text:p>Sunzi II</text:p>
          </table:table-cell>
          <table:table-cell office:value-type="string" calcext:value-type="string">
            <text:p>HA</text:p>
          </table:table-cell>
          <table:table-cell/>
        </table:table-row>
        <table:table-row table:style-name="ro2">
          <table:table-cell office:value-type="string" calcext:value-type="string">
            <text:p>Swallowtail I</text:p>
          </table:table-cell>
          <table:table-cell/>
          <table:table-cell office:value-type="string" calcext:value-type="string">
            <text:p>SSC</text:p>
          </table:table-cell>
          <table:table-cell/>
        </table:table-row>
        <table:table-row table:style-name="ro2">
          <table:table-cell office:value-type="string" calcext:value-type="string">
            <text:p>Swallowtail II</text:p>
          </table:table-cell>
          <table:table-cell office:value-type="string" calcext:value-type="string">
            <text:p>Swallowtail I</text:p>
          </table:table-cell>
          <table:table-cell office:value-type="string" calcext:value-type="string">
            <text:p>SSC</text:p>
          </table:table-cell>
          <table:table-cell/>
        </table:table-row>
        <table:table-row table:style-name="ro2">
          <table:table-cell office:value-type="string" calcext:value-type="string">
            <text:p>Swallowtail III</text:p>
          </table:table-cell>
          <table:table-cell office:value-type="string" calcext:value-type="string">
            <text:p>Swallowtail II</text:p>
          </table:table-cell>
          <table:table-cell office:value-type="string" calcext:value-type="string">
            <text:p>SSC</text:p>
          </table:table-cell>
          <table:table-cell/>
        </table:table-row>
        <table:table-row table:style-name="ro2">
          <table:table-cell office:value-type="string" calcext:value-type="string">
            <text:p>Tokugawa I</text:p>
          </table:table-cell>
          <table:table-cell/>
          <table:table-cell office:value-type="string" calcext:value-type="string">
            <text:p>HA</text:p>
          </table:table-cell>
          <table:table-cell/>
        </table:table-row>
        <table:table-row table:style-name="ro2">
          <table:table-cell office:value-type="string" calcext:value-type="string">
            <text:p>Tokugawa II</text:p>
          </table:table-cell>
          <table:table-cell office:value-type="string" calcext:value-type="string">
            <text:p>Tokugawa I</text:p>
          </table:table-cell>
          <table:table-cell office:value-type="string" calcext:value-type="string">
            <text:p>HA</text:p>
          </table:table-cell>
          <table:table-cell/>
        </table:table-row>
        <table:table-row table:style-name="ro2">
          <table:table-cell office:value-type="string" calcext:value-type="string">
            <text:p>Tokugawa III</text:p>
          </table:table-cell>
          <table:table-cell office:value-type="string" calcext:value-type="string">
            <text:p>Tokugawa II</text:p>
          </table:table-cell>
          <table:table-cell office:value-type="string" calcext:value-type="string">
            <text:p>HA</text:p>
          </table:table-cell>
          <table:table-cell/>
        </table:table-row>
        <table:table-row table:style-name="ro2">
          <table:table-cell office:value-type="string" calcext:value-type="string">
            <text:p>Tortuga I</text:p>
          </table:table-cell>
          <table:table-cell/>
          <table:table-cell office:value-type="string" calcext:value-type="string">
            <text:p>IPS-N</text:p>
          </table:table-cell>
          <table:table-cell/>
        </table:table-row>
        <table:table-row table:style-name="ro2">
          <table:table-cell office:value-type="string" calcext:value-type="string">
            <text:p>Tortuga II</text:p>
          </table:table-cell>
          <table:table-cell office:value-type="string" calcext:value-type="string">
            <text:p>Tortuga I</text:p>
          </table:table-cell>
          <table:table-cell office:value-type="string" calcext:value-type="string">
            <text:p>IPS-N</text:p>
          </table:table-cell>
          <table:table-cell/>
        </table:table-row>
        <table:table-row table:style-name="ro2">
          <table:table-cell office:value-type="string" calcext:value-type="string">
            <text:p>Tortuga III</text:p>
          </table:table-cell>
          <table:table-cell office:value-type="string" calcext:value-type="string">
            <text:p>Tortuga II</text:p>
          </table:table-cell>
          <table:table-cell office:value-type="string" calcext:value-type="string">
            <text:p>IPS-N</text:p>
          </table:table-cell>
          <table:table-cell/>
        </table:table-row>
        <table:table-row table:style-name="ro2">
          <table:table-cell office:value-type="string" calcext:value-type="string">
            <text:p>Vlad I</text:p>
          </table:table-cell>
          <table:table-cell/>
          <table:table-cell office:value-type="string" calcext:value-type="string">
            <text:p>IPS-N</text:p>
          </table:table-cell>
          <table:table-cell/>
        </table:table-row>
        <table:table-row table:style-name="ro2">
          <table:table-cell office:value-type="string" calcext:value-type="string">
            <text:p>Vlad II</text:p>
          </table:table-cell>
          <table:table-cell office:value-type="string" calcext:value-type="string">
            <text:p>Vlad I</text:p>
          </table:table-cell>
          <table:table-cell office:value-type="string" calcext:value-type="string">
            <text:p>IPS-N</text:p>
          </table:table-cell>
          <table:table-cell/>
        </table:table-row>
        <table:table-row table:style-name="ro2">
          <table:table-cell office:value-type="string" calcext:value-type="string">
            <text:p>Vlad III</text:p>
          </table:table-cell>
          <table:table-cell office:value-type="string" calcext:value-type="string">
            <text:p>Vlad II</text:p>
          </table:table-cell>
          <table:table-cell office:value-type="string" calcext:value-type="string">
            <text:p>IPS-N</text:p>
          </table:table-cell>
          <table:table-cell/>
        </table:table-row>
        <table:table-row table:style-name="ro2">
          <table:table-cell office:value-type="string" calcext:value-type="string">
            <text:p>White Witch I</text:p>
          </table:table-cell>
          <table:table-cell/>
          <table:table-cell office:value-type="string" calcext:value-type="string">
            <text:p>SSC</text:p>
          </table:table-cell>
          <table:table-cell/>
        </table:table-row>
        <table:table-row table:style-name="ro2">
          <table:table-cell office:value-type="string" calcext:value-type="string">
            <text:p>White Witch II</text:p>
          </table:table-cell>
          <table:table-cell office:value-type="string" calcext:value-type="string">
            <text:p>White Witch I</text:p>
          </table:table-cell>
          <table:table-cell office:value-type="string" calcext:value-type="string">
            <text:p>SSC</text:p>
          </table:table-cell>
          <table:table-cell/>
        </table:table-row>
        <table:table-row table:style-name="ro2">
          <table:table-cell office:value-type="string" calcext:value-type="string">
            <text:p>White Witch III</text:p>
          </table:table-cell>
          <table:table-cell office:value-type="string" calcext:value-type="string">
            <text:p>White Witch II</text:p>
          </table:table-cell>
          <table:table-cell office:value-type="string" calcext:value-type="string">
            <text:p>SSC</text:p>
          </table:table-cell>
          <table:table-cell/>
        </table:table-row>
        <table:table-row table:style-name="ro2">
          <table:table-cell office:value-type="string" calcext:value-type="string">
            <text:p>Zheng I</text:p>
          </table:table-cell>
          <table:table-cell/>
          <table:table-cell office:value-type="string" calcext:value-type="string">
            <text:p>IPS-N</text:p>
          </table:table-cell>
          <table:table-cell/>
        </table:table-row>
        <table:table-row table:style-name="ro2">
          <table:table-cell office:value-type="string" calcext:value-type="string">
            <text:p>Zheng II</text:p>
          </table:table-cell>
          <table:table-cell office:value-type="string" calcext:value-type="string">
            <text:p>Zheng I</text:p>
          </table:table-cell>
          <table:table-cell office:value-type="string" calcext:value-type="string">
            <text:p>IPS-N</text:p>
          </table:table-cell>
          <table:table-cell/>
        </table:table-row>
        <table:table-row table:style-name="ro2">
          <table:table-cell office:value-type="string" calcext:value-type="string">
            <text:p>Zheng III</text:p>
          </table:table-cell>
          <table:table-cell office:value-type="string" calcext:value-type="string">
            <text:p>Zheng II</text:p>
          </table:table-cell>
          <table:table-cell office:value-type="string" calcext:value-type="string">
            <text:p>IPS-N</text:p>
          </table:table-cell>
          <table:table-cell/>
        </table:table-row>
      </table:table>
      <table:table table:name="Talents" table:style-name="ta1">
        <office:forms form:automatic-focus="false" form:apply-design-mode="false"/>
        <table:table-column table:style-name="co42" table:default-cell-style-name="Default"/>
        <table:table-column table:style-name="co41" table:default-cell-style-name="Default"/>
        <table:table-row table:style-name="ro2">
          <table:table-cell office:value-type="string" calcext:value-type="string">
            <text:p>Talent</text:p>
          </table:table-cell>
          <table:table-cell office:value-type="string" calcext:value-type="string">
            <text:p>Prerequisite</text:p>
          </table:table-cell>
        </table:table-row>
        <table:table-row table:style-name="ro2">
          <table:table-cell office:value-type="string" calcext:value-type="string">
            <text:p>Ace I</text:p>
          </table:table-cell>
          <table:table-cell/>
        </table:table-row>
        <table:table-row table:style-name="ro2">
          <table:table-cell office:value-type="string" calcext:value-type="string">
            <text:p>Ace II</text:p>
          </table:table-cell>
          <table:table-cell office:value-type="string" calcext:value-type="string">
            <text:p>Ace I</text:p>
          </table:table-cell>
        </table:table-row>
        <table:table-row table:style-name="ro2">
          <table:table-cell office:value-type="string" calcext:value-type="string">
            <text:p>Ace III</text:p>
          </table:table-cell>
          <table:table-cell office:value-type="string" calcext:value-type="string">
            <text:p>Ace II</text:p>
          </table:table-cell>
        </table:table-row>
        <table:table-row table:style-name="ro2">
          <table:table-cell office:value-type="string" calcext:value-type="string">
            <text:p>Black Thumb I</text:p>
          </table:table-cell>
          <table:table-cell/>
        </table:table-row>
        <table:table-row table:style-name="ro2">
          <table:table-cell office:value-type="string" calcext:value-type="string">
            <text:p>Black Thumb II</text:p>
          </table:table-cell>
          <table:table-cell office:value-type="string" calcext:value-type="string">
            <text:p>Black Thumb I</text:p>
          </table:table-cell>
        </table:table-row>
        <table:table-row table:style-name="ro2">
          <table:table-cell office:value-type="string" calcext:value-type="string">
            <text:p>Black Thumb III</text:p>
          </table:table-cell>
          <table:table-cell office:value-type="string" calcext:value-type="string">
            <text:p>Black Thumb II</text:p>
          </table:table-cell>
        </table:table-row>
        <table:table-row table:style-name="ro2">
          <table:table-cell office:value-type="string" calcext:value-type="string">
            <text:p>Bonded I</text:p>
          </table:table-cell>
          <table:table-cell/>
        </table:table-row>
        <table:table-row table:style-name="ro2">
          <table:table-cell office:value-type="string" calcext:value-type="string">
            <text:p>Bonded II</text:p>
          </table:table-cell>
          <table:table-cell office:value-type="string" calcext:value-type="string">
            <text:p>Bonded I</text:p>
          </table:table-cell>
        </table:table-row>
        <table:table-row table:style-name="ro2">
          <table:table-cell office:value-type="string" calcext:value-type="string">
            <text:p>Bonded III</text:p>
          </table:table-cell>
          <table:table-cell office:value-type="string" calcext:value-type="string">
            <text:p>Bonded II</text:p>
          </table:table-cell>
        </table:table-row>
        <table:table-row table:style-name="ro2">
          <table:table-cell office:value-type="string" calcext:value-type="string">
            <text:p>Brawler I</text:p>
          </table:table-cell>
          <table:table-cell/>
        </table:table-row>
        <table:table-row table:style-name="ro2">
          <table:table-cell office:value-type="string" calcext:value-type="string">
            <text:p>Brawler II</text:p>
          </table:table-cell>
          <table:table-cell office:value-type="string" calcext:value-type="string">
            <text:p>Brawler I</text:p>
          </table:table-cell>
        </table:table-row>
        <table:table-row table:style-name="ro2">
          <table:table-cell office:value-type="string" calcext:value-type="string">
            <text:p>Brawler III</text:p>
          </table:table-cell>
          <table:table-cell office:value-type="string" calcext:value-type="string">
            <text:p>Brawler II</text:p>
          </table:table-cell>
        </table:table-row>
        <table:table-row table:style-name="ro2">
          <table:table-cell office:value-type="string" calcext:value-type="string">
            <text:p>Brutal I</text:p>
          </table:table-cell>
          <table:table-cell/>
        </table:table-row>
        <table:table-row table:style-name="ro2">
          <table:table-cell office:value-type="string" calcext:value-type="string">
            <text:p>Brutal II</text:p>
          </table:table-cell>
          <table:table-cell office:value-type="string" calcext:value-type="string">
            <text:p>Brutal I</text:p>
          </table:table-cell>
        </table:table-row>
        <table:table-row table:style-name="ro2">
          <table:table-cell office:value-type="string" calcext:value-type="string">
            <text:p>Brutal III</text:p>
          </table:table-cell>
          <table:table-cell office:value-type="string" calcext:value-type="string">
            <text:p>Brutal II</text:p>
          </table:table-cell>
        </table:table-row>
        <table:table-row table:style-name="ro2">
          <table:table-cell office:value-type="string" calcext:value-type="string">
            <text:p>Centimane I</text:p>
          </table:table-cell>
          <table:table-cell/>
        </table:table-row>
        <table:table-row table:style-name="ro2">
          <table:table-cell office:value-type="string" calcext:value-type="string">
            <text:p>Centimane II</text:p>
          </table:table-cell>
          <table:table-cell office:value-type="string" calcext:value-type="string">
            <text:p>Centimane I</text:p>
          </table:table-cell>
        </table:table-row>
        <table:table-row table:style-name="ro2">
          <table:table-cell office:value-type="string" calcext:value-type="string">
            <text:p>Centimane III</text:p>
          </table:table-cell>
          <table:table-cell office:value-type="string" calcext:value-type="string">
            <text:p>Centimane II</text:p>
          </table:table-cell>
        </table:table-row>
        <table:table-row table:style-name="ro2">
          <table:table-cell office:value-type="string" calcext:value-type="string">
            <text:p>Combined Arms I</text:p>
          </table:table-cell>
          <table:table-cell/>
        </table:table-row>
        <table:table-row table:style-name="ro2">
          <table:table-cell office:value-type="string" calcext:value-type="string">
            <text:p>Combined Arms II</text:p>
          </table:table-cell>
          <table:table-cell office:value-type="string" calcext:value-type="string">
            <text:p>Combined Arms I</text:p>
          </table:table-cell>
        </table:table-row>
        <table:table-row table:style-name="ro2">
          <table:table-cell office:value-type="string" calcext:value-type="string">
            <text:p>Combined Arms III</text:p>
          </table:table-cell>
          <table:table-cell office:value-type="string" calcext:value-type="string">
            <text:p>Combined Arms II</text:p>
          </table:table-cell>
        </table:table-row>
        <table:table-row table:style-name="ro2">
          <table:table-cell office:value-type="string" calcext:value-type="string">
            <text:p>Crack Shot I</text:p>
          </table:table-cell>
          <table:table-cell/>
        </table:table-row>
        <table:table-row table:style-name="ro2">
          <table:table-cell office:value-type="string" calcext:value-type="string">
            <text:p>Crack Shot II</text:p>
          </table:table-cell>
          <table:table-cell office:value-type="string" calcext:value-type="string">
            <text:p>Crack Shot I</text:p>
          </table:table-cell>
        </table:table-row>
        <table:table-row table:style-name="ro2">
          <table:table-cell office:value-type="string" calcext:value-type="string">
            <text:p>Crack Shot III</text:p>
          </table:table-cell>
          <table:table-cell office:value-type="string" calcext:value-type="string">
            <text:p>Crack Shot II</text:p>
          </table:table-cell>
        </table:table-row>
        <table:table-row table:style-name="ro2">
          <table:table-cell office:value-type="string" calcext:value-type="string">
            <text:p>Demolitionist I</text:p>
          </table:table-cell>
          <table:table-cell/>
        </table:table-row>
        <table:table-row table:style-name="ro2">
          <table:table-cell office:value-type="string" calcext:value-type="string">
            <text:p>Demolitionist II</text:p>
          </table:table-cell>
          <table:table-cell office:value-type="string" calcext:value-type="string">
            <text:p>Demolitionist I</text:p>
          </table:table-cell>
        </table:table-row>
        <table:table-row table:style-name="ro2">
          <table:table-cell office:value-type="string" calcext:value-type="string">
            <text:p>Demolitionist III</text:p>
          </table:table-cell>
          <table:table-cell office:value-type="string" calcext:value-type="string">
            <text:p>Demolitionist II</text:p>
          </table:table-cell>
        </table:table-row>
        <table:table-row table:style-name="ro2">
          <table:table-cell office:value-type="string" calcext:value-type="string">
            <text:p>Drone Commander I</text:p>
          </table:table-cell>
          <table:table-cell/>
        </table:table-row>
        <table:table-row table:style-name="ro2">
          <table:table-cell office:value-type="string" calcext:value-type="string">
            <text:p>Drone Commander II</text:p>
          </table:table-cell>
          <table:table-cell office:value-type="string" calcext:value-type="string">
            <text:p>Drone Commander I</text:p>
          </table:table-cell>
        </table:table-row>
        <table:table-row table:style-name="ro2">
          <table:table-cell office:value-type="string" calcext:value-type="string">
            <text:p>Drone Commander III</text:p>
          </table:table-cell>
          <table:table-cell office:value-type="string" calcext:value-type="string">
            <text:p>Drone Commander II</text:p>
          </table:table-cell>
        </table:table-row>
        <table:table-row table:style-name="ro2">
          <table:table-cell office:value-type="string" calcext:value-type="string">
            <text:p>Duelist I</text:p>
          </table:table-cell>
          <table:table-cell/>
        </table:table-row>
        <table:table-row table:style-name="ro2">
          <table:table-cell office:value-type="string" calcext:value-type="string">
            <text:p>Duelist II</text:p>
          </table:table-cell>
          <table:table-cell office:value-type="string" calcext:value-type="string">
            <text:p>Duelist I</text:p>
          </table:table-cell>
        </table:table-row>
        <table:table-row table:style-name="ro2">
          <table:table-cell office:value-type="string" calcext:value-type="string">
            <text:p>Duelist III</text:p>
          </table:table-cell>
          <table:table-cell office:value-type="string" calcext:value-type="string">
            <text:p>Duelist II</text:p>
          </table:table-cell>
        </table:table-row>
        <table:table-row table:style-name="ro2">
          <table:table-cell office:value-type="string" calcext:value-type="string">
            <text:p>Empath I</text:p>
          </table:table-cell>
          <table:table-cell/>
        </table:table-row>
        <table:table-row table:style-name="ro2">
          <table:table-cell office:value-type="string" calcext:value-type="string">
            <text:p>Empath II</text:p>
          </table:table-cell>
          <table:table-cell office:value-type="string" calcext:value-type="string">
            <text:p>Empath I</text:p>
          </table:table-cell>
        </table:table-row>
        <table:table-row table:style-name="ro2">
          <table:table-cell office:value-type="string" calcext:value-type="string">
            <text:p>Empath III</text:p>
          </table:table-cell>
          <table:table-cell office:value-type="string" calcext:value-type="string">
            <text:p>Empath II</text:p>
          </table:table-cell>
        </table:table-row>
        <table:table-row table:style-name="ro2">
          <table:table-cell office:value-type="string" calcext:value-type="string">
            <text:p>Engineer I</text:p>
          </table:table-cell>
          <table:table-cell/>
        </table:table-row>
        <table:table-row table:style-name="ro2">
          <table:table-cell office:value-type="string" calcext:value-type="string">
            <text:p>Engineer II</text:p>
          </table:table-cell>
          <table:table-cell office:value-type="string" calcext:value-type="string">
            <text:p>Engineer I</text:p>
          </table:table-cell>
        </table:table-row>
        <table:table-row table:style-name="ro2">
          <table:table-cell office:value-type="string" calcext:value-type="string">
            <text:p>Engineer III</text:p>
          </table:table-cell>
          <table:table-cell office:value-type="string" calcext:value-type="string">
            <text:p>Engineer II</text:p>
          </table:table-cell>
        </table:table-row>
        <table:table-row table:style-name="ro2">
          <table:table-cell office:value-type="string" calcext:value-type="string">
            <text:p>Executioner I</text:p>
          </table:table-cell>
          <table:table-cell/>
        </table:table-row>
        <table:table-row table:style-name="ro2">
          <table:table-cell office:value-type="string" calcext:value-type="string">
            <text:p>Executioner II</text:p>
          </table:table-cell>
          <table:table-cell office:value-type="string" calcext:value-type="string">
            <text:p>Executioner I</text:p>
          </table:table-cell>
        </table:table-row>
        <table:table-row table:style-name="ro2">
          <table:table-cell office:value-type="string" calcext:value-type="string">
            <text:p>Executioner III</text:p>
          </table:table-cell>
          <table:table-cell office:value-type="string" calcext:value-type="string">
            <text:p>Executioner II</text:p>
          </table:table-cell>
        </table:table-row>
        <table:table-row table:style-name="ro2">
          <table:table-cell office:value-type="string" calcext:value-type="string">
            <text:p>Exemplar I</text:p>
          </table:table-cell>
          <table:table-cell/>
        </table:table-row>
        <table:table-row table:style-name="ro2">
          <table:table-cell office:value-type="string" calcext:value-type="string">
            <text:p>Exemplar II</text:p>
          </table:table-cell>
          <table:table-cell office:value-type="string" calcext:value-type="string">
            <text:p>Exemplar I</text:p>
          </table:table-cell>
        </table:table-row>
        <table:table-row table:style-name="ro2">
          <table:table-cell office:value-type="string" calcext:value-type="string">
            <text:p>Exemplar III</text:p>
          </table:table-cell>
          <table:table-cell office:value-type="string" calcext:value-type="string">
            <text:p>Exemplar II</text:p>
          </table:table-cell>
        </table:table-row>
        <table:table-row table:style-name="ro2">
          <table:table-cell office:value-type="string" calcext:value-type="string">
            <text:p>Field Analyst I</text:p>
          </table:table-cell>
          <table:table-cell/>
        </table:table-row>
        <table:table-row table:style-name="ro2">
          <table:table-cell office:value-type="string" calcext:value-type="string">
            <text:p>Field Analyst II</text:p>
          </table:table-cell>
          <table:table-cell office:value-type="string" calcext:value-type="string">
            <text:p>Field Analyst I</text:p>
          </table:table-cell>
        </table:table-row>
        <table:table-row table:style-name="ro2">
          <table:table-cell office:value-type="string" calcext:value-type="string">
            <text:p>Field Analyst III</text:p>
          </table:table-cell>
          <table:table-cell office:value-type="string" calcext:value-type="string">
            <text:p>Field Analyst II</text:p>
          </table:table-cell>
        </table:table-row>
        <table:table-row table:style-name="ro2">
          <table:table-cell office:value-type="string" calcext:value-type="string">
            <text:p>Grease Monkey I</text:p>
          </table:table-cell>
          <table:table-cell/>
        </table:table-row>
        <table:table-row table:style-name="ro2">
          <table:table-cell office:value-type="string" calcext:value-type="string">
            <text:p>Grease Monkey II</text:p>
          </table:table-cell>
          <table:table-cell office:value-type="string" calcext:value-type="string">
            <text:p>Grease Monkey I</text:p>
          </table:table-cell>
        </table:table-row>
        <table:table-row table:style-name="ro2">
          <table:table-cell office:value-type="string" calcext:value-type="string">
            <text:p>Grease Monkey III</text:p>
          </table:table-cell>
          <table:table-cell office:value-type="string" calcext:value-type="string">
            <text:p>Grease Monkey II</text:p>
          </table:table-cell>
        </table:table-row>
        <table:table-row table:style-name="ro2">
          <table:table-cell office:value-type="string" calcext:value-type="string">
            <text:p>Gunslinger I</text:p>
          </table:table-cell>
          <table:table-cell/>
        </table:table-row>
        <table:table-row table:style-name="ro2">
          <table:table-cell office:value-type="string" calcext:value-type="string">
            <text:p>Gunslinger II</text:p>
          </table:table-cell>
          <table:table-cell office:value-type="string" calcext:value-type="string">
            <text:p>Gunslinger I</text:p>
          </table:table-cell>
        </table:table-row>
        <table:table-row table:style-name="ro2">
          <table:table-cell office:value-type="string" calcext:value-type="string">
            <text:p>Gunslinger III</text:p>
          </table:table-cell>
          <table:table-cell office:value-type="string" calcext:value-type="string">
            <text:p>Gunslinger II</text:p>
          </table:table-cell>
        </table:table-row>
        <table:table-row table:style-name="ro2">
          <table:table-cell office:value-type="string" calcext:value-type="string">
            <text:p>Hacker I</text:p>
          </table:table-cell>
          <table:table-cell/>
        </table:table-row>
        <table:table-row table:style-name="ro2">
          <table:table-cell office:value-type="string" calcext:value-type="string">
            <text:p>Hacker II</text:p>
          </table:table-cell>
          <table:table-cell office:value-type="string" calcext:value-type="string">
            <text:p>Hacker I</text:p>
          </table:table-cell>
        </table:table-row>
        <table:table-row table:style-name="ro2">
          <table:table-cell office:value-type="string" calcext:value-type="string">
            <text:p>Hacker III</text:p>
          </table:table-cell>
          <table:table-cell office:value-type="string" calcext:value-type="string">
            <text:p>Hacker II</text:p>
          </table:table-cell>
        </table:table-row>
        <table:table-row table:style-name="ro2">
          <table:table-cell office:value-type="string" calcext:value-type="string">
            <text:p>Heavy Gunner I</text:p>
          </table:table-cell>
          <table:table-cell/>
        </table:table-row>
        <table:table-row table:style-name="ro2">
          <table:table-cell office:value-type="string" calcext:value-type="string">
            <text:p>Heavy Gunner II</text:p>
          </table:table-cell>
          <table:table-cell office:value-type="string" calcext:value-type="string">
            <text:p>Heavy Gunner I</text:p>
          </table:table-cell>
        </table:table-row>
        <table:table-row table:style-name="ro2">
          <table:table-cell office:value-type="string" calcext:value-type="string">
            <text:p>Heavy Gunner III</text:p>
          </table:table-cell>
          <table:table-cell office:value-type="string" calcext:value-type="string">
            <text:p>Heavy Gunner II</text:p>
          </table:table-cell>
        </table:table-row>
        <table:table-row table:style-name="ro2">
          <table:table-cell office:value-type="string" calcext:value-type="string">
            <text:p>Hunter I</text:p>
          </table:table-cell>
          <table:table-cell/>
        </table:table-row>
        <table:table-row table:style-name="ro2">
          <table:table-cell office:value-type="string" calcext:value-type="string">
            <text:p>Hunter II</text:p>
          </table:table-cell>
          <table:table-cell office:value-type="string" calcext:value-type="string">
            <text:p>Hunter I</text:p>
          </table:table-cell>
        </table:table-row>
        <table:table-row table:style-name="ro2">
          <table:table-cell office:value-type="string" calcext:value-type="string">
            <text:p>Hunter III</text:p>
          </table:table-cell>
          <table:table-cell office:value-type="string" calcext:value-type="string">
            <text:p>Hunter II</text:p>
          </table:table-cell>
        </table:table-row>
        <table:table-row table:style-name="ro2">
          <table:table-cell office:value-type="string" calcext:value-type="string">
            <text:p>Iconoclast I</text:p>
          </table:table-cell>
          <table:table-cell/>
        </table:table-row>
        <table:table-row table:style-name="ro2">
          <table:table-cell office:value-type="string" calcext:value-type="string">
            <text:p>Iconoclast II</text:p>
          </table:table-cell>
          <table:table-cell office:value-type="string" calcext:value-type="string">
            <text:p>Iconoclast I</text:p>
          </table:table-cell>
        </table:table-row>
        <table:table-row table:style-name="ro2">
          <table:table-cell office:value-type="string" calcext:value-type="string">
            <text:p>Iconoclast III</text:p>
          </table:table-cell>
          <table:table-cell office:value-type="string" calcext:value-type="string">
            <text:p>Iconoclast II</text:p>
          </table:table-cell>
        </table:table-row>
        <table:table-row table:style-name="ro2">
          <table:table-cell office:value-type="string" calcext:value-type="string">
            <text:p>Infiltrator I</text:p>
          </table:table-cell>
          <table:table-cell/>
        </table:table-row>
        <table:table-row table:style-name="ro2">
          <table:table-cell office:value-type="string" calcext:value-type="string">
            <text:p>Infiltrator II</text:p>
          </table:table-cell>
          <table:table-cell office:value-type="string" calcext:value-type="string">
            <text:p>Infiltrator I</text:p>
          </table:table-cell>
        </table:table-row>
        <table:table-row table:style-name="ro2">
          <table:table-cell office:value-type="string" calcext:value-type="string">
            <text:p>Infiltrator III</text:p>
          </table:table-cell>
          <table:table-cell office:value-type="string" calcext:value-type="string">
            <text:p>Infiltrator II</text:p>
          </table:table-cell>
        </table:table-row>
        <table:table-row table:style-name="ro2">
          <table:table-cell office:value-type="string" calcext:value-type="string">
            <text:p>Juggernaut I</text:p>
          </table:table-cell>
          <table:table-cell/>
        </table:table-row>
        <table:table-row table:style-name="ro2">
          <table:table-cell office:value-type="string" calcext:value-type="string">
            <text:p>Juggernaut II</text:p>
          </table:table-cell>
          <table:table-cell office:value-type="string" calcext:value-type="string">
            <text:p>Juggernaut I</text:p>
          </table:table-cell>
        </table:table-row>
        <table:table-row table:style-name="ro2">
          <table:table-cell office:value-type="string" calcext:value-type="string">
            <text:p>Juggernaut III</text:p>
          </table:table-cell>
          <table:table-cell office:value-type="string" calcext:value-type="string">
            <text:p>Juggernaut II</text:p>
          </table:table-cell>
        </table:table-row>
        <table:table-row table:style-name="ro2">
          <table:table-cell office:value-type="string" calcext:value-type="string">
            <text:p>Leader I</text:p>
          </table:table-cell>
          <table:table-cell/>
        </table:table-row>
        <table:table-row table:style-name="ro2">
          <table:table-cell office:value-type="string" calcext:value-type="string">
            <text:p>Leader II</text:p>
          </table:table-cell>
          <table:table-cell office:value-type="string" calcext:value-type="string">
            <text:p>Leader I</text:p>
          </table:table-cell>
        </table:table-row>
        <table:table-row table:style-name="ro2">
          <table:table-cell office:value-type="string" calcext:value-type="string">
            <text:p>Leader III</text:p>
          </table:table-cell>
          <table:table-cell office:value-type="string" calcext:value-type="string">
            <text:p>Leader II</text:p>
          </table:table-cell>
        </table:table-row>
        <table:table-row table:style-name="ro2">
          <table:table-cell office:value-type="string" calcext:value-type="string">
            <text:p>Nuclear Cavalier I</text:p>
          </table:table-cell>
          <table:table-cell/>
        </table:table-row>
        <table:table-row table:style-name="ro2">
          <table:table-cell office:value-type="string" calcext:value-type="string">
            <text:p>Nuclear Cavalier II</text:p>
          </table:table-cell>
          <table:table-cell office:value-type="string" calcext:value-type="string">
            <text:p>Nuclear Cavalier I</text:p>
          </table:table-cell>
        </table:table-row>
        <table:table-row table:style-name="ro2">
          <table:table-cell office:value-type="string" calcext:value-type="string">
            <text:p>Nuclear Cavalier III</text:p>
          </table:table-cell>
          <table:table-cell office:value-type="string" calcext:value-type="string">
            <text:p>Nuclear Cavalier II</text:p>
          </table:table-cell>
        </table:table-row>
        <table:table-row table:style-name="ro2">
          <table:table-cell office:value-type="string" calcext:value-type="string">
            <text:p>Prospector I</text:p>
          </table:table-cell>
          <table:table-cell/>
        </table:table-row>
        <table:table-row table:style-name="ro2">
          <table:table-cell office:value-type="string" calcext:value-type="string">
            <text:p>Prospector II</text:p>
          </table:table-cell>
          <table:table-cell office:value-type="string" calcext:value-type="string">
            <text:p>Prospector I</text:p>
          </table:table-cell>
        </table:table-row>
        <table:table-row table:style-name="ro2">
          <table:table-cell office:value-type="string" calcext:value-type="string">
            <text:p>Prospector III</text:p>
          </table:table-cell>
          <table:table-cell office:value-type="string" calcext:value-type="string">
            <text:p>Prospector II</text:p>
          </table:table-cell>
        </table:table-row>
        <table:table-row table:style-name="ro2">
          <table:table-cell office:value-type="string" calcext:value-type="string">
            <text:p>Siege Specialist I</text:p>
          </table:table-cell>
          <table:table-cell/>
        </table:table-row>
        <table:table-row table:style-name="ro2">
          <table:table-cell office:value-type="string" calcext:value-type="string">
            <text:p>Siege Specialist II</text:p>
          </table:table-cell>
          <table:table-cell office:value-type="string" calcext:value-type="string">
            <text:p>Siege Specialist I</text:p>
          </table:table-cell>
        </table:table-row>
        <table:table-row table:style-name="ro2">
          <table:table-cell office:value-type="string" calcext:value-type="string">
            <text:p>Siege Specialist III</text:p>
          </table:table-cell>
          <table:table-cell office:value-type="string" calcext:value-type="string">
            <text:p>Siege Specialist II</text:p>
          </table:table-cell>
        </table:table-row>
        <table:table-row table:style-name="ro2">
          <table:table-cell office:value-type="string" calcext:value-type="string">
            <text:p>Skirmisher I</text:p>
          </table:table-cell>
          <table:table-cell/>
        </table:table-row>
        <table:table-row table:style-name="ro2">
          <table:table-cell office:value-type="string" calcext:value-type="string">
            <text:p>Skirmisher II</text:p>
          </table:table-cell>
          <table:table-cell office:value-type="string" calcext:value-type="string">
            <text:p>Skirmisher I</text:p>
          </table:table-cell>
        </table:table-row>
        <table:table-row table:style-name="ro2">
          <table:table-cell office:value-type="string" calcext:value-type="string">
            <text:p>Skirmisher III</text:p>
          </table:table-cell>
          <table:table-cell office:value-type="string" calcext:value-type="string">
            <text:p>Skirmisher II</text:p>
          </table:table-cell>
        </table:table-row>
        <table:table-row table:style-name="ro2">
          <table:table-cell office:value-type="string" calcext:value-type="string">
            <text:p>Spaceborn I</text:p>
          </table:table-cell>
          <table:table-cell/>
        </table:table-row>
        <table:table-row table:style-name="ro2">
          <table:table-cell office:value-type="string" calcext:value-type="string">
            <text:p>Spaceborn II</text:p>
          </table:table-cell>
          <table:table-cell office:value-type="string" calcext:value-type="string">
            <text:p>Spaceborn I</text:p>
          </table:table-cell>
        </table:table-row>
        <table:table-row table:style-name="ro2">
          <table:table-cell office:value-type="string" calcext:value-type="string">
            <text:p>Spaceborn III</text:p>
          </table:table-cell>
          <table:table-cell office:value-type="string" calcext:value-type="string">
            <text:p>Spaceborn II</text:p>
          </table:table-cell>
        </table:table-row>
        <table:table-row table:style-name="ro2">
          <table:table-cell office:value-type="string" calcext:value-type="string">
            <text:p>Spotter I</text:p>
          </table:table-cell>
          <table:table-cell/>
        </table:table-row>
        <table:table-row table:style-name="ro2">
          <table:table-cell office:value-type="string" calcext:value-type="string">
            <text:p>Spotter II</text:p>
          </table:table-cell>
          <table:table-cell office:value-type="string" calcext:value-type="string">
            <text:p>Spotter I</text:p>
          </table:table-cell>
        </table:table-row>
        <table:table-row table:style-name="ro2">
          <table:table-cell office:value-type="string" calcext:value-type="string">
            <text:p>Spotter III</text:p>
          </table:table-cell>
          <table:table-cell office:value-type="string" calcext:value-type="string">
            <text:p>Spotter II</text:p>
          </table:table-cell>
        </table:table-row>
        <table:table-row table:style-name="ro2">
          <table:table-cell office:value-type="string" calcext:value-type="string">
            <text:p>Stormbringer I</text:p>
          </table:table-cell>
          <table:table-cell/>
        </table:table-row>
        <table:table-row table:style-name="ro2">
          <table:table-cell office:value-type="string" calcext:value-type="string">
            <text:p>Stormbringer II</text:p>
          </table:table-cell>
          <table:table-cell office:value-type="string" calcext:value-type="string">
            <text:p>Stormbringer I</text:p>
          </table:table-cell>
        </table:table-row>
        <table:table-row table:style-name="ro2">
          <table:table-cell office:value-type="string" calcext:value-type="string">
            <text:p>Stormbringer III</text:p>
          </table:table-cell>
          <table:table-cell office:value-type="string" calcext:value-type="string">
            <text:p>Stormbringer II</text:p>
          </table:table-cell>
        </table:table-row>
        <table:table-row table:style-name="ro2">
          <table:table-cell office:value-type="string" calcext:value-type="string">
            <text:p>Sysop I</text:p>
          </table:table-cell>
          <table:table-cell/>
        </table:table-row>
        <table:table-row table:style-name="ro2">
          <table:table-cell office:value-type="string" calcext:value-type="string">
            <text:p>Sysop II</text:p>
          </table:table-cell>
          <table:table-cell office:value-type="string" calcext:value-type="string">
            <text:p>Sysop I</text:p>
          </table:table-cell>
        </table:table-row>
        <table:table-row table:style-name="ro2">
          <table:table-cell office:value-type="string" calcext:value-type="string">
            <text:p>Sysop III</text:p>
          </table:table-cell>
          <table:table-cell office:value-type="string" calcext:value-type="string">
            <text:p>Sysop II</text:p>
          </table:table-cell>
        </table:table-row>
        <table:table-row table:style-name="ro2">
          <table:table-cell office:value-type="string" calcext:value-type="string">
            <text:p>Tactician I</text:p>
          </table:table-cell>
          <table:table-cell/>
        </table:table-row>
        <table:table-row table:style-name="ro2">
          <table:table-cell office:value-type="string" calcext:value-type="string">
            <text:p>Tactician II</text:p>
          </table:table-cell>
          <table:table-cell office:value-type="string" calcext:value-type="string">
            <text:p>Tactician I</text:p>
          </table:table-cell>
        </table:table-row>
        <table:table-row table:style-name="ro2">
          <table:table-cell office:value-type="string" calcext:value-type="string">
            <text:p>Tactician III</text:p>
          </table:table-cell>
          <table:table-cell office:value-type="string" calcext:value-type="string">
            <text:p>Tactician II</text:p>
          </table:table-cell>
        </table:table-row>
        <table:table-row table:style-name="ro2">
          <table:table-cell office:value-type="string" calcext:value-type="string">
            <text:p>Technophile I</text:p>
          </table:table-cell>
          <table:table-cell/>
        </table:table-row>
        <table:table-row table:style-name="ro2">
          <table:table-cell office:value-type="string" calcext:value-type="string">
            <text:p>Technophile II</text:p>
          </table:table-cell>
          <table:table-cell office:value-type="string" calcext:value-type="string">
            <text:p>Technophile I</text:p>
          </table:table-cell>
        </table:table-row>
        <table:table-row table:style-name="ro2">
          <table:table-cell office:value-type="string" calcext:value-type="string">
            <text:p>Technophile III</text:p>
          </table:table-cell>
          <table:table-cell office:value-type="string" calcext:value-type="string">
            <text:p>Technophile II</text:p>
          </table:table-cell>
        </table:table-row>
        <table:table-row table:style-name="ro2">
          <table:table-cell office:value-type="string" calcext:value-type="string">
            <text:p>Vanguard I</text:p>
          </table:table-cell>
          <table:table-cell/>
        </table:table-row>
        <table:table-row table:style-name="ro2">
          <table:table-cell office:value-type="string" calcext:value-type="string">
            <text:p>Vanguard II</text:p>
          </table:table-cell>
          <table:table-cell office:value-type="string" calcext:value-type="string">
            <text:p>Vanguard I</text:p>
          </table:table-cell>
        </table:table-row>
        <table:table-row table:style-name="ro2">
          <table:table-cell office:value-type="string" calcext:value-type="string">
            <text:p>Vanguard III</text:p>
          </table:table-cell>
          <table:table-cell office:value-type="string" calcext:value-type="string">
            <text:p>Vanguard II</text:p>
          </table:table-cell>
        </table:table-row>
        <table:table-row table:style-name="ro2">
          <table:table-cell office:value-type="string" calcext:value-type="string">
            <text:p>Walking Armory I</text:p>
          </table:table-cell>
          <table:table-cell/>
        </table:table-row>
        <table:table-row table:style-name="ro2">
          <table:table-cell office:value-type="string" calcext:value-type="string">
            <text:p>Walking Armory II</text:p>
          </table:table-cell>
          <table:table-cell office:value-type="string" calcext:value-type="string">
            <text:p>Walking Armory I</text:p>
          </table:table-cell>
        </table:table-row>
        <table:table-row table:style-name="ro2">
          <table:table-cell office:value-type="string" calcext:value-type="string">
            <text:p>Walking Armory III</text:p>
          </table:table-cell>
          <table:table-cell office:value-type="string" calcext:value-type="string">
            <text:p>Walking Armory II</text:p>
          </table:table-cell>
        </table:table-row>
      </table:table>
      <table:named-expressions/>
      <table:database-ranges>
        <table:database-range table:name="__Anonymous_Sheet_DB__1" table:target-range-address="Frames.A1:Frames.S56" table:display-filter-buttons="true">
          <table:sort>
            <table:sort-by table:field-number="15" table:data-type="automatic"/>
          </table:sort>
        </table:database-range>
        <table:database-range table:name="__Anonymous_Sheet_DB__7" table:target-range-address="Licenses.A1:Licenses.C115">
          <table:sort>
            <table:sort-by table:field-number="0" table:data-type="automatic"/>
          </table:sort>
        </table:database-range>
        <table:database-range table:name="__Anonymous_Sheet_DB__8" table:target-range-address="Talents.A1:Talents.B112">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number-style style:name="N168">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ame_5f_Equal" style:display-name="Frame_Equal" style:family="table-cell" style:parent-style-name="Default">
      <style:table-cell-properties fo:background-color="#ffe994"/>
    </style:style>
    <style:style style:name="Frame_5f_Less" style:display-name="Frame_Less" style:family="table-cell" style:parent-style-name="Default">
      <style:table-cell-properties fo:background-color="#ff6d6d" style:diagonal-bl-tr="none" style:diagonal-tl-br="none"/>
    </style:style>
    <style:style style:name="Frame_5f_Greater" style:display-name="Frame_Greater" style:family="table-cell" style:parent-style-name="Default">
      <style:table-cell-properties fo:background-color="#afd095"/>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8">00/00/0000</text:date>, <text:time style:data-style-name="N2" text:time-value="22:42:09.62730607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6T08:13:25.376136900</meta:creation-date>
    <dc:date>2026-07-18T00:46:21.608514031</dc:date>
    <meta:editing-duration>PT10H19M54S</meta:editing-duration>
    <meta:editing-cycles>165</meta:editing-cycles>
    <meta:generator>LibreOffice/25.2.3.2$Linux_X86_64 LibreOffice_project/520$Build-2</meta:generator>
    <meta:document-statistic meta:table-count="9" meta:cell-count="7750" meta:object-count="0"/>
  </office:meta>
</office:document-meta>
</file>